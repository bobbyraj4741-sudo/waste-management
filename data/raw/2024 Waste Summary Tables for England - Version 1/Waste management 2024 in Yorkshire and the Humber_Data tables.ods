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color="#1F497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B7DEE8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B7DEE8"/>
      <style:text-properties fo:color="#1F497D"/>
    </style:style>
    <style:style style:name="ce7" style:family="table-cell" style:parent-style-name="Default" style:data-style-name="N0">
      <style:table-cell-properties fo:background-color="#B7DEE8"/>
    </style:style>
    <style:style style:name="ce8" style:family="table-cell" style:parent-style-name="Default" style:data-style-name="N0">
      <style:table-cell-properties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9" style:family="table-cell" style:parent-style-name="Hyperlink" style:data-style-name="N0">
      <style:table-cell-properties style:vertical-align="automatic" fo:background-color="#FFFFFF"/>
      <style:text-properties fo:color="#0000FF" fo:font-size="20pt" style:font-size-asian="20pt" style:font-size-complex="20pt" style:text-underline-style="solid" style:text-underline-type="single"/>
    </style:style>
    <style:style style:name="ce10" style:family="table-cell" style:parent-style-name="Default" style:data-style-name="N0">
      <style:table-cell-properties fo:background-color="#FFFFFF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11" style:family="table-cell" style:parent-style-name="Default" style:data-style-name="N0">
      <style:table-cell-properties fo:background-color="#FFFFFF"/>
      <style:text-properties style:font-name="Wingdings" style:font-name-asian="Wingdings" style:font-name-complex="Wingdings" fo:font-size="14pt" style:font-size-asian="14pt" style:font-size-complex="14pt" style:font-charset="x-symbol"/>
    </style:style>
    <style:style style:name="ce12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20pt" style:font-size-asian="20pt" style:font-size-complex="20pt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/>
    </style:style>
    <style:style style:name="ce14" style:family="table-cell" style:parent-style-name="Default" style:data-style-name="N0">
      <style:table-cell-properties style:vertical-align="middle"/>
      <style:text-properties style:font-name="Wingdings" style:font-name-asian="Wingdings" style:font-name-complex="Wingdings" style:font-charset="x-symbol"/>
    </style:style>
    <style:style style:name="ce1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8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8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0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Default" style:data-style-name="N3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8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5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74" style:family="table-cell" style:parent-style-name="Default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9" style:family="table-cell" style:parent-style-name="Default" style:data-style-name="N36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0" style:family="table-cell" style:parent-style-name="Comma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1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2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3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4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5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6" style:family="table-cell" style:parent-style-name="Comma_32__91_0_93_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7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8" style:family="table-cell" style:parent-style-name="Comma_32__91_0_93_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9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Default" style:data-style-name="N3">
      <style:table-cell-properties style:vertical-align="middle"/>
      <style:text-properties style:font-name="Calibri" style:font-name-asian="Calibri" style:font-name-complex="Calibri"/>
    </style:style>
    <style:style style:name="ce92" style:family="table-cell" style:parent-style-name="Default" style:data-style-name="N1">
      <style:table-cell-properties style:vertical-align="middle"/>
      <style:text-properties style:font-name="Calibri" style:font-name-asian="Calibri" style:font-name-complex="Calibri"/>
    </style:style>
    <style:style style:name="ce93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5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6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8" style:family="table-cell" style:parent-style-name="Default" style:data-style-name="N36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10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10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1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2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3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4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5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6" style:family="table-cell" style:parent-style-name="Comma_32__91_0_93_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1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Default" style:data-style-name="N36">
      <style:table-cell-properties style:vertical-align="middle"/>
      <style:text-properties style:font-name="Calibri" style:font-name-asian="Calibri" style:font-name-complex="Calibri"/>
    </style:style>
    <style:style style:name="ce1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2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34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5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6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7" style:family="table-cell" style:parent-style-name="Comma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8" style:family="table-cell" style:parent-style-name="Comma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9" style:family="table-cell" style:parent-style-name="Comma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0" style:family="table-cell" style:parent-style-name="Comma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1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42" style:family="table-cell" style:parent-style-name="Comma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3" style:family="table-cell" style:parent-style-name="Comma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4" style:family="table-cell" style:parent-style-name="Default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46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47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48" style:family="table-cell" style:parent-style-name="Default" style:data-style-name="N3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9" style:family="table-cell" style:parent-style-name="Normal_E_38_WIncin09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5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/>
    </style:style>
    <style:style style:name="ce151" style:family="table-cell" style:parent-style-name="Default" style:data-style-name="N36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thin solid #FFFFFF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5" style:family="table-cell" style:parent-style-name="Default" style:data-style-name="N0">
      <style:table-cell-properties fo:border-top="thin solid #FFFFFF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7" style:family="table-cell" style:parent-style-name="Default" style:data-style-name="N0">
      <style:table-cell-properties style:vertical-align="middle"/>
    </style:style>
    <style:style style:name="ce15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middle" fo:wrap-option="wrap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6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4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6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17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Default" style:data-style-name="N36">
      <style:table-cell-properties style:vertical-align="middle"/>
    </style:style>
    <style:style style:name="ce1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6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77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78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9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0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1" style:family="table-cell" style:parent-style-name="Normal_emhaztables06_1902562" style:data-style-name="N0">
      <style:table-cell-properties fo:border-top="thin solid #000000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2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3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4" style:family="table-cell" style:parent-style-name="Normal_emhaztables06_1902562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5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6" style:family="table-cell" style:parent-style-name="Default" style:data-style-name="N3">
      <style:table-cell-properties fo:border-top="thin solid #ABABAB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7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8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9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0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1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92" style:family="table-cell" style:parent-style-name="Normal_emhaztables06_1902562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3" style:family="table-cell" style:parent-style-name="Normal_eoehaztables06_1902577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4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eoehaztables06_1902577" style:data-style-name="N36">
      <style:table-cell-properties fo:border-top="none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6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97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98" style:family="table-cell" style:parent-style-name="Normal_yhhaztables06_1902555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199" style:family="table-cell" style:parent-style-name="Normal_yhhaztables06_1902555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00" style:family="table-cell" style:parent-style-name="Normal_eoehaztables06_1902577" style:data-style-name="N36">
      <style:table-cell-properties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01" style:family="table-cell" style:parent-style-name="Normal_eoehaztables06_1902577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02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203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04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05" style:family="table-cell" style:parent-style-name="Normal_yhhaztables06_1902555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06" style:family="table-cell" style:parent-style-name="Normal_eoehaztables06_1902577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07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08" style:family="table-cell" style:parent-style-name="Normal_eoehaztables06_1902577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09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10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11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12" style:family="table-cell" style:parent-style-name="Normal_yhhaztables06_1902555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13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214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15" style:family="table-cell" style:parent-style-name="Normal_eoehaztables06_1902577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16" style:family="table-cell" style:parent-style-name="Normal_emhaztables06_1902562" style:data-style-name="N0">
      <style:table-cell-properties fo:border-top="thin solid #000000" fo:border-bottom="thin solid #000000" fo:border-left="thin solid #000000" fo:border-right="thin solid #C0C0C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7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C0C0C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8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9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0" style:family="table-cell" style:parent-style-name="Comma_32__91_0_93_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1" style:family="table-cell" style:parent-style-name="Comma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2" style:family="table-cell" style:parent-style-name="Normal_eoehaztables06_1902577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23" style:family="table-cell" style:parent-style-name="Normal_eoehaztables06_1902577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24" style:family="table-cell" style:parent-style-name="Comma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5" style:family="table-cell" style:parent-style-name="Comma_32__91_0_93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6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7" style:family="table-cell" style:parent-style-name="Comma_32__91_0_93_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8" style:family="table-cell" style:parent-style-name="Comma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9" style:family="table-cell" style:parent-style-name="Comma_32__91_0_93_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0" style:family="table-cell" style:parent-style-name="Normal_eoehaztables06_1902577" style:data-style-name="N3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31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2" style:family="table-cell" style:parent-style-name="Comma_32__91_0_93_" style:data-style-name="N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3" style:family="table-cell" style:parent-style-name="Comma_32__91_0_93_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4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5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6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7" style:family="table-cell" style:parent-style-name="Comma_32__91_0_93_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8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9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0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1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2" style:family="table-cell" style:parent-style-name="Normal_emhaztables06_1902562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3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4" style:family="table-cell" style:parent-style-name="Comma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5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6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7" style:family="table-cell" style:parent-style-name="Comma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48" style:family="table-cell" style:parent-style-name="Comma" style:data-style-name="N36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249" style:family="table-cell" style:parent-style-name="Comma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50" style:family="table-cell" style:parent-style-name="Comma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2" style:family="table-cell" style:parent-style-name="Default" style:data-style-name="N38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3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5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6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7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8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9" style:family="table-cell" style:parent-style-name="Default" style:data-style-name="N39">
      <style:table-cell-properties fo:border-top="thin solid #000000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260" style:family="table-cell" style:parent-style-name="Default" style:data-style-name="N39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1" style:family="table-cell" style:parent-style-name="Default" style:data-style-name="N39">
      <style:table-cell-properties style:vertical-align="middle"/>
      <style:text-properties style:font-name="Calibri" style:font-name-asian="Calibri" style:font-name-complex="Calibri"/>
    </style:style>
    <style:style style:name="ce262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63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4" style:family="table-cell" style:parent-style-name="Default" style:data-style-name="N39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5" style:family="table-cell" style:parent-style-name="Default" style:data-style-name="N39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6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67" style:family="table-cell" style:parent-style-name="Default" style:data-style-name="N39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268" style:family="table-cell" style:parent-style-name="Default" style:data-style-name="N39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269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70" style:family="table-cell" style:parent-style-name="Default" style:data-style-name="N39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1" style:family="table-cell" style:parent-style-name="Default" style:data-style-name="N39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2" style:family="table-cell" style:parent-style-name="Default" style:data-style-name="N39">
      <style:table-cell-properties fo:border-top="none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4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5" style:family="table-cell" style:parent-style-name="Default" style:data-style-name="N3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6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7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8" style:family="table-cell" style:parent-style-name="Default" style:data-style-name="N39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9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80" style:family="table-cell" style:parent-style-name="Default" style:data-style-name="N39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1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2" style:family="table-cell" style:parent-style-name="Default" style:data-style-name="N39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3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84" style:family="table-cell" style:parent-style-name="Default" style:data-style-name="N39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285" style:family="table-cell" style:parent-style-name="Default" style:data-style-name="N39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6" style:family="table-cell" style:parent-style-name="Default" style:data-style-name="N39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7" style:family="table-cell" style:parent-style-name="Default" style:data-style-name="N39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8" style:family="table-cell" style:parent-style-name="Comma_32__91_0_93_" style:data-style-name="N39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9" style:family="table-cell" style:parent-style-name="Comma_32__91_0_93_" style:data-style-name="N39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0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9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93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9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5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6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8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9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0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1" style:family="table-cell" style:parent-style-name="Default" style:data-style-name="N3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2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03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4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5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6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7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8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9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10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1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312" style:family="table-cell" style:parent-style-name="Default" style:data-style-name="N0">
      <style:table-cell-properties style:vertical-align="middle" fo:background-color="#FFFFFF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3" style:family="table-cell" style:parent-style-name="Default" style:data-style-name="N38">
      <style:table-cell-properties style:vertical-align="middle" fo:background-color="#FFFFFF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4" style:family="table-cell" style:parent-style-name="Default" style:data-style-name="N38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5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6" style:family="table-cell" style:parent-style-name="Comma" style:data-style-name="N38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18" style:family="table-cell" style:parent-style-name="Default" style:data-style-name="N3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9" style:family="table-cell" style:parent-style-name="Comma" style:data-style-name="N3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0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1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22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23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24" style:family="table-cell" style:parent-style-name="Normal_emhaztables06_1902562" style:data-style-name="N0">
      <style:table-cell-properties fo:border-top="none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5" style:family="table-cell" style:parent-style-name="Normal_eoehaztables06_1902577" style:data-style-name="N36">
      <style:table-cell-properties fo:border-top="none" fo:border-bottom="none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26" style:family="table-cell" style:parent-style-name="Comma" style:data-style-name="N36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327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/>
    </style:style>
    <style:style style:name="ce328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329" style:family="table-cell" style:parent-style-name="Comma" style:data-style-name="N3">
      <style:table-cell-properties fo:border-top="thick solid #000000" fo:border-bottom="thick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30" style:family="table-cell" style:parent-style-name="Default" style:data-style-name="N3">
      <style:table-cell-properties fo:border-top="thick solid #000000" fo:border-bottom="thick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31" style:family="table-cell" style:parent-style-name="Comma" style:data-style-name="N3">
      <style:table-cell-properties fo:border-top="thick solid #000000" fo:border-bottom="thick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32" style:family="table-cell" style:parent-style-name="Default" style:data-style-name="N3">
      <style:table-cell-properties fo:border-top="thick solid #000000" fo:border-bottom="thick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33" style:family="table-cell" style:parent-style-name="Normal_emhaztables06_1902562" style:data-style-name="N0">
      <style:table-cell-properties fo:border-top="thick solid #000000" fo:border-bottom="thick solid #000000" fo:border-left="thick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34" style:family="table-cell" style:parent-style-name="Comma_32__91_0_93_" style:data-style-name="N3">
      <style:table-cell-properties fo:border-top="thick solid #000000" fo:border-bottom="thick solid #000000" fo:border-left="none" fo:border-right="thick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35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6" style:family="table-cell" style:parent-style-name="Default" style:data-style-name="N38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7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8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9" style:family="table-cell" style:parent-style-name="Default" style:data-style-name="N38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0" style:family="table-cell" style:parent-style-name="Hyperlink" style:data-style-name="N0">
      <style:table-cell-properties style:vertical-align="automatic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341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42" style:family="table-cell" style:parent-style-name="Default" style:data-style-name="N0">
      <style:table-cell-properties style:vertical-align="middle" fo:background-color="#B7DEE8" style:repeat-content="false"/>
      <style:paragraph-properties fo:text-align="center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43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4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5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4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48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349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35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51" style:family="table-cell" style:parent-style-name="Default" style:data-style-name="N0">
      <style:table-cell-properties fo:border-top="thin solid #000000" fo:border-bottom="thin solid #FFFFFF" fo:border-left="thin solid #FFFFFF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2" style:family="table-cell" style:parent-style-name="Default" style:data-style-name="N0">
      <style:table-cell-properties fo:border-top="thin solid #000000" fo:border-bottom="thin solid #FFFFFF" fo:border-left="none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5" style:family="table-cell" style:parent-style-name="Default" style:data-style-name="N0"/>
    <style:style style:name="ce3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58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9" style:family="table-cell" style:parent-style-name="Default" style:data-style-name="N3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0" style:family="table-cell" style:parent-style-name="Default" style:data-style-name="N3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1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4.79777777777778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17361111111111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26319444444444cm"/>
    </style:style>
    <style:style style:name="co8" style:family="table-column">
      <style:table-column-properties fo:break-before="auto" style:column-width="3.10444444444444cm"/>
    </style:style>
    <style:style style:name="co9" style:family="table-column">
      <style:table-column-properties fo:break-before="auto" style:column-width="2.99861111111111cm"/>
    </style:style>
    <style:style style:name="co10" style:family="table-column">
      <style:table-column-properties fo:break-before="auto" style:column-width="3.29847222222222cm"/>
    </style:style>
    <style:style style:name="co11" style:family="table-column">
      <style:table-column-properties fo:break-before="auto" style:column-width="3.05152777777778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1.78152777777778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76930555555556cm"/>
    </style:style>
    <style:style style:name="co18" style:family="table-column">
      <style:table-column-properties fo:break-before="auto" style:column-width="0.829027777777778cm"/>
    </style:style>
    <style:style style:name="co19" style:family="table-column">
      <style:table-column-properties fo:break-before="auto" style:column-width="2.94569444444444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3.40430555555556cm"/>
    </style:style>
    <style:style style:name="co22" style:family="table-column">
      <style:table-column-properties fo:break-before="auto" style:column-width="3.06916666666667cm"/>
    </style:style>
    <style:style style:name="co23" style:family="table-column">
      <style:table-column-properties fo:break-before="auto" style:column-width="2.66347222222222cm"/>
    </style:style>
    <style:style style:name="co24" style:family="table-column">
      <style:table-column-properties fo:break-before="auto" style:column-width="2.87513888888889cm"/>
    </style:style>
    <style:style style:name="co25" style:family="table-column">
      <style:table-column-properties fo:break-before="auto" style:column-width="2.8575cm"/>
    </style:style>
    <style:style style:name="co26" style:family="table-column">
      <style:table-column-properties fo:break-before="auto" style:column-width="2.71638888888889cm"/>
    </style:style>
    <style:style style:name="co27" style:family="table-column">
      <style:table-column-properties fo:break-before="auto" style:column-width="3.52777777777778cm"/>
    </style:style>
    <style:style style:name="co28" style:family="table-column">
      <style:table-column-properties fo:break-before="auto" style:column-width="0.864305555555556cm"/>
    </style:style>
    <style:style style:name="co29" style:family="table-column">
      <style:table-column-properties fo:break-before="auto" style:column-width="3.45722222222222cm"/>
    </style:style>
    <style:style style:name="co30" style:family="table-column">
      <style:table-column-properties fo:break-before="auto" style:column-width="3.38666666666667cm"/>
    </style:style>
    <style:style style:name="co31" style:family="table-column">
      <style:table-column-properties fo:break-before="auto" style:column-width="2.48708333333333cm"/>
    </style:style>
    <style:style style:name="co32" style:family="table-column">
      <style:table-column-properties fo:break-before="auto" style:column-width="2.52236111111111cm"/>
    </style:style>
    <style:style style:name="co33" style:family="table-column">
      <style:table-column-properties fo:break-before="auto" style:column-width="2.46944444444444cm"/>
    </style:style>
    <style:style style:name="co34" style:family="table-column">
      <style:table-column-properties fo:break-before="auto" style:column-width="6.40291666666667cm"/>
    </style:style>
    <style:style style:name="co35" style:family="table-column">
      <style:table-column-properties fo:break-before="auto" style:column-width="2.61055555555556cm"/>
    </style:style>
    <style:style style:name="co36" style:family="table-column">
      <style:table-column-properties fo:break-before="auto" style:column-width="3.35138888888889cm"/>
    </style:style>
    <style:style style:name="co37" style:family="table-column">
      <style:table-column-properties fo:break-before="auto" style:column-width="2.75166666666667cm"/>
    </style:style>
    <style:style style:name="co38" style:family="table-column">
      <style:table-column-properties fo:break-before="auto" style:column-width="3.84527777777778cm"/>
    </style:style>
    <style:style style:name="co39" style:family="table-column">
      <style:table-column-properties fo:break-before="auto" style:column-width="2.41652777777778cm"/>
    </style:style>
    <style:style style:name="co40" style:family="table-column">
      <style:table-column-properties fo:break-before="auto" style:column-width="9.86013888888889cm"/>
    </style:style>
    <style:style style:name="co41" style:family="table-column">
      <style:table-column-properties fo:break-before="auto" style:column-width="3.13972222222222cm"/>
    </style:style>
    <style:style style:name="co42" style:family="table-column">
      <style:table-column-properties fo:break-before="auto" style:column-width="3.01625cm"/>
    </style:style>
    <style:style style:name="co43" style:family="table-column">
      <style:table-column-properties fo:break-before="auto" style:column-width="3.33375cm"/>
    </style:style>
    <style:style style:name="co44" style:family="table-column">
      <style:table-column-properties fo:break-before="auto" style:column-width="3.4925cm"/>
    </style:style>
    <style:style style:name="co45" style:family="table-column">
      <style:table-column-properties fo:break-before="auto" style:column-width="3.54541666666667cm"/>
    </style:style>
    <style:style style:name="co46" style:family="table-column">
      <style:table-column-properties fo:break-before="auto" style:column-width="6.15597222222222cm"/>
    </style:style>
    <style:style style:name="co47" style:family="table-column">
      <style:table-column-properties fo:break-before="auto" style:column-width="2.82222222222222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9.27805555555556cm"/>
    </style:style>
    <style:style style:name="co50" style:family="table-column">
      <style:table-column-properties fo:break-before="auto" style:column-width="3.15736111111111cm"/>
    </style:style>
    <style:style style:name="co51" style:family="table-column">
      <style:table-column-properties fo:break-before="auto" style:column-width="2.62819444444444cm"/>
    </style:style>
    <style:style style:name="co52" style:family="table-column">
      <style:table-column-properties fo:break-before="auto" style:column-width="2.36361111111111cm"/>
    </style:style>
    <style:style style:name="co53" style:family="table-column">
      <style:table-column-properties fo:break-before="auto" style:column-width="0.934861111111111cm"/>
    </style:style>
    <style:style style:name="co54" style:family="table-column">
      <style:table-column-properties fo:break-before="auto" style:column-width="6.10305555555556cm"/>
    </style:style>
    <style:style style:name="co55" style:family="table-column">
      <style:table-column-properties fo:break-before="auto" style:column-width="2.68111111111111cm"/>
    </style:style>
    <style:style style:name="co56" style:family="table-column">
      <style:table-column-properties fo:break-before="auto" style:column-width="0.917222222222222cm"/>
    </style:style>
    <style:style style:name="co57" style:family="table-column">
      <style:table-column-properties fo:break-before="auto" style:column-width="1.5875cm"/>
    </style:style>
    <style:style style:name="co58" style:family="table-column">
      <style:table-column-properties fo:break-before="auto" style:column-width="4.07458333333333cm"/>
    </style:style>
    <style:style style:name="co59" style:family="table-column">
      <style:table-column-properties fo:break-before="auto" style:column-width="2.13430555555556cm" style:use-optimal-column-width="true"/>
    </style:style>
    <style:style style:name="co60" style:family="table-column">
      <style:table-column-properties fo:break-before="auto" style:column-width="2.09902777777778cm"/>
    </style:style>
    <style:style style:name="co61" style:family="table-column">
      <style:table-column-properties fo:break-before="auto" style:column-width="2.24013888888889cm"/>
    </style:style>
    <style:style style:name="co62" style:family="table-column">
      <style:table-column-properties fo:break-before="auto" style:column-width="1.94027777777778cm" style:use-optimal-column-width="true"/>
    </style:style>
    <style:style style:name="co63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8.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2.5pt" style:use-optimal-row-height="false" fo:break-before="auto"/>
    </style:style>
    <style:style style:name="ro15" style:family="table-row">
      <style:table-row-properties style:row-height="6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42.75pt" style:use-optimal-row-height="false" fo:break-before="auto"/>
    </style:style>
    <style:style style:name="ro18" style:family="table-row">
      <style:table-row-properties style:row-height="19.5pt" style:use-optimal-row-height="false" fo:break-before="auto"/>
    </style:style>
    <style:style style:name="ro19" style:family="table-row">
      <style:table-row-properties style:row-height="20.15pt" style:use-optimal-row-height="false" fo:break-before="auto"/>
    </style:style>
    <style:style style:name="ro20" style:family="table-row">
      <style:table-row-properties style:row-height="20.25pt" style:use-optimal-row-height="false" fo:break-before="auto"/>
    </style:style>
    <style:style style:name="ro21" style:family="table-row">
      <style:table-row-properties style:row-height="39.75pt" style:use-optimal-row-height="false" fo:break-before="auto"/>
    </style:style>
    <style:style style:name="ro22" style:family="table-row">
      <style:table-row-properties style:row-height="24pt" style:use-optimal-row-height="false" fo:break-before="auto"/>
    </style:style>
    <style:style style:name="ro23" style:family="table-row">
      <style:table-row-properties style:row-height="36.75pt" style:use-optimal-row-height="false" fo:break-before="auto"/>
    </style:style>
    <style:style style:name="ro24" style:family="table-row">
      <style:table-row-properties style:row-height="36pt" style:use-optimal-row-height="false" fo:break-before="auto"/>
    </style:style>
    <style:style style:name="ro25" style:family="table-row">
      <style:table-row-properties style:row-height="35.25pt" style:use-optimal-row-height="false" fo:break-before="auto"/>
    </style:style>
    <style:style style:name="ro26" style:family="table-row">
      <style:table-row-properties style:row-height="40.5pt" style:use-optimal-row-height="false" fo:break-before="auto"/>
    </style:style>
    <style:style style:name="ro27" style:family="table-row">
      <style:table-row-properties style:row-height="24.65pt" style:use-optimal-row-height="false" fo:break-before="auto"/>
    </style:style>
    <style:style style:name="ro28" style:family="table-row">
      <style:table-row-properties style:row-height="21pt" style:use-optimal-row-height="false" fo:break-before="auto"/>
    </style:style>
    <style:style style:name="ro29" style:family="table-row">
      <style:table-row-properties style:row-height="47.25pt" style:use-optimal-row-height="false" fo:break-before="auto"/>
    </style:style>
    <style:style style:name="ro30" style:family="table-row">
      <style:table-row-properties style:row-height="60.75pt" style:use-optimal-row-height="false" fo:break-before="auto"/>
    </style:style>
    <style:style style:name="ro31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table:tab-color="#70AD47" style:writing-mode="lr-tb"/>
    </style:style>
    <style:style style:name="ta2" style:family="table" style:master-page-name="mp2">
      <style:table-properties table:display="true" table:tab-color="#70AD47" style:writing-mode="lr-tb"/>
    </style:style>
    <style:style style:name="ta3" style:family="table" style:master-page-name="mp3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6" table:number-rows-spanned="1" table:style-name="ce341">
            <text:p>Waste Management Information 2024</text:p>
          </table:table-cell>
          <table:covered-table-cell table:number-columns-repeated="5"/>
          <table:table-cell office:value-type="string" table:number-columns-spanned="10" table:number-rows-spanned="1" table:style-name="ce342">
            <text:p>Former Yorkshire and the Humber Planning Region</text:p>
          </table:table-cell>
          <table:covered-table-cell table:number-columns-repeated="9"/>
          <table:table-cell table:number-columns-repeated="16368"/>
        </table:table-row>
        <table:table-row table:style-name="ro2">
          <table:table-cell table:style-name="ce2"/>
          <table:table-cell table:number-columns-repeated="5" table:style-name="ce3"/>
          <table:table-cell table:number-columns-repeated="10" table:style-name="ce4"/>
          <table:table-cell table:number-columns-repeated="16368"/>
        </table:table-row>
        <table:table-row table:style-name="ro3">
          <table:table-cell office:value-type="string" table:style-name="ce5">
            <text:p>Category</text:p>
          </table:table-cell>
          <table:table-cell table:number-columns-repeated="2" table:style-name="ce6"/>
          <table:table-cell table:style-name="ce5"/>
          <table:table-cell office:value-type="string" table:style-name="ce5">
            <text:p>Click on the link to go to the tab</text:p>
          </table:table-cell>
          <table:table-cell table:style-name="ce6"/>
          <table:table-cell table:number-columns-repeated="10" table:style-name="ce7"/>
          <table:table-cell table:number-columns-repeated="16368"/>
        </table:table-row>
        <table:table-row table:style-name="ro3">
          <table:table-cell office:value-type="string" table:style-name="ce8">
            <text:p>Landfill<text:s/></text:p>
          </table:table-cell>
          <table:table-cell table:number-columns-repeated="2" table:style-name="ce3"/>
          <table:table-cell table:style-name="ce8"/>
          <table:table-cell office:value-type="string" table:style-name="ce340">
            <text:p><text:a xlink:href="#'Landfill_Inputs'.A1">Landfill inputs 2024</text:a></text:p>
          </table:table-cell>
          <table:table-cell table:number-columns-repeated="3" table:style-name="ce9"/>
          <table:table-cell table:number-columns-repeated="4" table:style-name="ce4"/>
          <table:table-cell table:style-name="ce10"/>
          <table:table-cell table:style-name="ce11"/>
          <table:table-cell table:number-columns-repeated="2" table:style-name="ce4"/>
          <table:table-cell table:number-columns-repeated="16368"/>
        </table:table-row>
        <table:table-row table:style-name="ro3">
          <table:table-cell office:value-type="string" table:style-name="ce8">
            <text:p>Landfill<text:s/></text:p>
          </table:table-cell>
          <table:table-cell table:number-columns-repeated="2" table:style-name="ce3"/>
          <table:table-cell table:style-name="ce8"/>
          <table:table-cell office:value-type="string" table:style-name="ce340">
            <text:p><text:a xlink:href="#'Landfill_Input_Trends'.A1">Landfill input trends from 2000 to 2024</text:a></text:p>
          </table:table-cell>
          <table:table-cell table:number-columns-repeated="7" table:style-name="ce4"/>
          <table:table-cell table:style-name="ce10"/>
          <table:table-cell table:number-columns-repeated="3" table:style-name="ce4"/>
          <table:table-cell table:number-columns-repeated="16368"/>
        </table:table-row>
        <table:table-row table:style-name="ro3">
          <table:table-cell office:value-type="string" table:style-name="ce8">
            <text:p>Landfill<text:s/></text:p>
          </table:table-cell>
          <table:table-cell table:number-columns-repeated="2" table:style-name="ce3"/>
          <table:table-cell table:style-name="ce8"/>
          <table:table-cell office:value-type="string" table:style-name="ce340">
            <text:p><text:a xlink:href="#'Landfill_Capacity'.A1">Landfill capacity 2024</text:a></text:p>
          </table:table-cell>
          <table:table-cell table:number-columns-repeated="7" table:style-name="ce4"/>
          <table:table-cell table:style-name="ce10"/>
          <table:table-cell table:number-columns-repeated="3" table:style-name="ce4"/>
          <table:table-cell table:number-columns-repeated="16368"/>
        </table:table-row>
        <table:table-row table:style-name="ro3">
          <table:table-cell office:value-type="string" table:style-name="ce8">
            <text:p>Landfill<text:s/></text:p>
          </table:table-cell>
          <table:table-cell table:number-columns-repeated="2" table:style-name="ce3"/>
          <table:table-cell table:style-name="ce8"/>
          <table:table-cell office:value-type="string" table:style-name="ce340">
            <text:p><text:a xlink:href="#'Landfill_Capacity_Trends'.A1">Landfill capacity trends from 2000 to 2024</text:a></text:p>
          </table:table-cell>
          <table:table-cell table:number-columns-repeated="7" table:style-name="ce4"/>
          <table:table-cell table:style-name="ce10"/>
          <table:table-cell table:number-columns-repeated="3" table:style-name="ce4"/>
          <table:table-cell table:number-columns-repeated="16368"/>
        </table:table-row>
        <table:table-row table:style-name="ro3">
          <table:table-cell office:value-type="string" table:style-name="ce8">
            <text:p>Transfer, Treatment and MRS</text:p>
          </table:table-cell>
          <table:table-cell table:number-columns-repeated="3" table:style-name="ce3"/>
          <table:table-cell office:value-type="string" table:style-name="ce340">
            <text:p><text:a xlink:href="#'Transfer_Treatment_&amp;_MRS_Inputs'.A1">Transfer, treatment and MRS inputs 2024</text:a></text:p>
          </table:table-cell>
          <table:table-cell table:number-columns-repeated="7" table:style-name="ce4"/>
          <table:table-cell table:style-name="ce10"/>
          <table:table-cell table:number-columns-repeated="3" table:style-name="ce4"/>
          <table:table-cell table:number-columns-repeated="16368"/>
        </table:table-row>
        <table:table-row table:style-name="ro3">
          <table:table-cell office:value-type="string" table:style-name="ce8">
            <text:p>Transfer, Treatment and MRS</text:p>
          </table:table-cell>
          <table:table-cell table:number-columns-repeated="3" table:style-name="ce3"/>
          <table:table-cell office:value-type="string" table:style-name="ce340">
            <text:p><text:a xlink:href="#'Transfer_Treatment_&amp;_MRS_Trends'.A1">Transfer, treatment and MRS input trends from 2000 to 2024</text:a></text:p>
          </table:table-cell>
          <table:table-cell table:number-columns-repeated="7" table:style-name="ce4"/>
          <table:table-cell table:style-name="ce10"/>
          <table:table-cell table:number-columns-repeated="3" table:style-name="ce4"/>
          <table:table-cell table:number-columns-repeated="16368"/>
        </table:table-row>
        <table:table-row table:style-name="ro3">
          <table:table-cell office:value-type="string" table:style-name="ce8">
            <text:p>Incineration</text:p>
          </table:table-cell>
          <table:table-cell table:number-columns-repeated="3" table:style-name="ce3"/>
          <table:table-cell office:value-type="string" table:style-name="ce340">
            <text:p><text:a xlink:href="#'Incineration_Input_&amp;_Capacity'.A1">Incineration inputs and capacity 2024</text:a></text:p>
          </table:table-cell>
          <table:table-cell table:number-columns-repeated="7" table:style-name="ce4"/>
          <table:table-cell table:style-name="ce10"/>
          <table:table-cell table:style-name="ce11"/>
          <table:table-cell table:number-columns-repeated="2" table:style-name="ce4"/>
          <table:table-cell table:number-columns-repeated="16368"/>
        </table:table-row>
        <table:table-row table:style-name="ro3">
          <table:table-cell office:value-type="string" table:style-name="ce8">
            <text:p>Land disposal</text:p>
          </table:table-cell>
          <table:table-cell table:number-columns-repeated="3" table:style-name="ce3"/>
          <table:table-cell office:value-type="string" table:style-name="ce340">
            <text:p><text:a xlink:href="#'Land_Disposal'.A1">Land disposal inputs 2024</text:a></text:p>
          </table:table-cell>
          <table:table-cell table:number-columns-repeated="7" table:style-name="ce4"/>
          <table:table-cell table:style-name="ce10"/>
          <table:table-cell table:style-name="ce11"/>
          <table:table-cell table:number-columns-repeated="2" table:style-name="ce4"/>
          <table:table-cell table:number-columns-repeated="16368"/>
        </table:table-row>
        <table:table-row table:style-name="ro3">
          <table:table-cell office:value-type="string" table:style-name="ce8">
            <text:p>Use of waste</text:p>
          </table:table-cell>
          <table:table-cell table:number-columns-repeated="3" table:style-name="ce3"/>
          <table:table-cell office:value-type="string" table:style-name="ce340">
            <text:p><text:a xlink:href="#'Use_of_Waste'.A1">Use of waste inputs 2024</text:a></text:p>
          </table:table-cell>
          <table:table-cell table:number-columns-repeated="7" table:style-name="ce4"/>
          <table:table-cell table:style-name="ce10"/>
          <table:table-cell table:style-name="ce11"/>
          <table:table-cell table:number-columns-repeated="2" table:style-name="ce4"/>
          <table:table-cell table:number-columns-repeated="16368"/>
        </table:table-row>
        <table:table-row table:style-name="ro3">
          <table:table-cell office:value-type="string" table:style-name="ce8">
            <text:p>Hazardous waste</text:p>
          </table:table-cell>
          <table:table-cell table:number-columns-repeated="3" table:style-name="ce3"/>
          <table:table-cell office:value-type="string" table:style-name="ce340">
            <text:p><text:a xlink:href="#'Haz_Waste_Managed_&amp;_Deposits'.A1">Hazardous waste management and deposits 2024</text:a></text:p>
          </table:table-cell>
          <table:table-cell table:number-columns-repeated="7" table:style-name="ce4"/>
          <table:table-cell table:style-name="ce10"/>
          <table:table-cell table:style-name="ce11"/>
          <table:table-cell table:number-columns-repeated="2" table:style-name="ce4"/>
          <table:table-cell table:number-columns-repeated="16368"/>
        </table:table-row>
        <table:table-row table:style-name="ro3">
          <table:table-cell office:value-type="string" table:style-name="ce8">
            <text:p>Hazardous waste</text:p>
          </table:table-cell>
          <table:table-cell table:number-columns-repeated="3" table:style-name="ce3"/>
          <table:table-cell office:value-type="string" table:style-name="ce340">
            <text:p><text:a xlink:href="#'Haz_Waste_Deposits_by_Fate'.A1">Hazardous waste deposits by fate 2024</text:a></text:p>
          </table:table-cell>
          <table:table-cell table:number-columns-repeated="7" table:style-name="ce4"/>
          <table:table-cell table:style-name="ce10"/>
          <table:table-cell table:style-name="ce11"/>
          <table:table-cell table:number-columns-repeated="2" table:style-name="ce4"/>
          <table:table-cell table:number-columns-repeated="16368"/>
        </table:table-row>
        <table:table-row table:style-name="ro3">
          <table:table-cell office:value-type="string" table:style-name="ce8">
            <text:p>Hazardous waste</text:p>
          </table:table-cell>
          <table:table-cell table:number-columns-repeated="3" table:style-name="ce3"/>
          <table:table-cell office:value-type="string" table:style-name="ce340">
            <text:p><text:a xlink:href="#'Haz_Waste_Trends'.A1">Hazardous waste: trends data from 2000 to 2024</text:a></text:p>
          </table:table-cell>
          <table:table-cell table:number-columns-repeated="7" table:style-name="ce4"/>
          <table:table-cell table:style-name="ce10"/>
          <table:table-cell table:style-name="ce11"/>
          <table:table-cell table:number-columns-repeated="2" table:style-name="ce4"/>
          <table:table-cell table:number-columns-repeated="16368"/>
        </table:table-row>
        <table:table-row table:style-name="ro3">
          <table:table-cell table:style-name="ce12"/>
          <table:table-cell table:number-columns-repeated="15" table:style-name="ce4"/>
          <table:table-cell table:number-columns-repeated="16368"/>
        </table:table-row>
        <table:table-row table:number-rows-repeated="18" table:style-name="ro3">
          <table:table-cell table:style-name="ce13"/>
          <table:table-cell table:number-columns-repeated="16383"/>
        </table:table-row>
        <table:table-row table:number-rows-repeated="1048542" table:style-name="ro4">
          <table:table-cell table:number-columns-repeated="16384"/>
        </table:table-row>
      </table:table>
      <table:table table:name="Landfill_Inputs" table:style-name="ta2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default-cell-style-name="ce15"/>
        <table:table-column table:style-name="co16" table:number-columns-repeated="4" table:default-cell-style-name="ce15"/>
        <table:table-column table:style-name="co17" table:default-cell-style-name="ce15"/>
        <table:table-column table:style-name="co16" table:default-cell-style-name="ce15"/>
        <table:table-column table:style-name="co14" table:number-columns-repeated="16366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Yorkshire and the Humber: <text:s/>Landfill inputs 2024</text:p>
          </table:table-cell>
          <table:table-cell table:style-name="ce15"/>
          <table:table-cell table:style-name="ce17"/>
          <table:table-cell table:number-columns-repeated="16380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16382" table:style-name="ce15"/>
        </table:table-row>
        <table:table-row table:style-name="ro7">
          <table:table-cell table:style-name="ce15"/>
          <table:table-cell table:style-name="ce19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43">
            <text:p>Landfill Type</text:p>
          </table:table-cell>
          <table:table-cell office:value-type="string" table:number-columns-spanned="4" table:number-rows-spanned="1" table:style-name="ce3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345">
            <text:p>YORKSHIRE AND THE HUMBER</text:p>
          </table:table-cell>
          <table:table-cell table:number-columns-repeated="16377" table:style-name="ce15"/>
        </table:table-row>
        <table:table-row table:style-name="ro9">
          <table:table-cell table:style-name="ce22"/>
          <table:covered-table-cell/>
          <table:table-cell office:value-type="string" table:style-name="ce23">
            <text:p>Former Humberside</text:p>
          </table:table-cell>
          <table:table-cell office:value-type="string" table:style-name="ce2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23">
            <text:p>West Yorkshire</text:p>
          </table:table-cell>
          <table:covered-table-cell/>
          <table:table-cell table:number-columns-repeated="22" table:style-name="ce24"/>
          <table:table-cell table:style-name="ce25"/>
          <table:table-cell table:number-columns-repeated="16354" table:style-name="ce26"/>
        </table:table-row>
        <table:table-row table:style-name="ro10">
          <table:table-cell table:style-name="ce15"/>
          <table:table-cell office:value-type="string" table:style-name="ce27">
            <text:p>Hazardous Merchant</text:p>
          </table:table-cell>
          <table:table-cell office:value-type="float" office:value="22606.57" table:style-name="ce259">
            <text:p><text:s text:c="2"/>23</text:p>
          </table:table-cell>
          <table:table-cell office:value-type="float" office:value="0" table:style-name="ce256">
            <text:p><text:s/>-<text:s/></text:p>
          </table:table-cell>
          <table:table-cell office:value-type="float" office:value="0" table:style-name="ce256">
            <text:p><text:s/>-<text:s/></text:p>
          </table:table-cell>
          <table:table-cell office:value-type="float" office:value="100461.9999999999" table:style-name="ce261">
            <text:p><text:s text:c="2"/>100</text:p>
          </table:table-cell>
          <table:table-cell office:value-type="float" office:value="123068.56999999989" table:formula="of:=SUM([.C7:.F7])" table:style-name="ce262">
            <text:p><text:s text:c="2"/>123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31">
            <text:p>Hazardous Restricted</text:p>
          </table:table-cell>
          <table:table-cell office:value-type="float" office:value="0" table:style-name="ce257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58">
            <text:p><text:s/>-<text:s/></text:p>
          </table:table-cell>
          <table:table-cell office:value-type="float" office:value="0" table:formula="of:=SUM([.C8:.F8])" table:style-name="ce35">
            <text:p><text:s/>-<text:s/>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31">
            <text:p>Non Hazardous with SNRHW cell</text:p>
          </table:table-cell>
          <table:table-cell office:value-type="float" office:value="0" table:style-name="ce257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56193" table:style-name="ce261">
            <text:p><text:s text:c="2"/>156</text:p>
          </table:table-cell>
          <table:table-cell office:value-type="float" office:value="156193" table:formula="of:=SUM([.C9:.F9])" table:style-name="ce266">
            <text:p><text:s text:c="2"/>156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31">
            <text:p>Non Hazardous</text:p>
          </table:table-cell>
          <table:table-cell office:value-type="float" office:value="542459.58000000007" table:style-name="ce267">
            <text:p><text:s text:c="2"/>542</text:p>
          </table:table-cell>
          <table:table-cell office:value-type="float" office:value="86211.28" table:style-name="ce261">
            <text:p><text:s text:c="2"/>86</text:p>
          </table:table-cell>
          <table:table-cell office:value-type="float" office:value="529058.02" table:style-name="ce261">
            <text:p><text:s text:c="2"/>529</text:p>
          </table:table-cell>
          <table:table-cell office:value-type="float" office:value="459789.38" table:style-name="ce261">
            <text:p><text:s text:c="2"/>460</text:p>
          </table:table-cell>
          <table:table-cell office:value-type="float" office:value="1617518.2600000002" table:formula="of:=SUM([.C10:.F10])" table:style-name="ce266">
            <text:p><text:s text:c="2"/>1,618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36">
            <text:p>Non Hazardous Restricted</text:p>
          </table:table-cell>
          <table:table-cell office:value-type="float" office:value="0" table:style-name="ce257">
            <text:p><text:s/>-<text:s/></text:p>
          </table:table-cell>
          <table:table-cell office:value-type="float" office:value="238618.6" table:style-name="ce261">
            <text:p><text:s text:c="2"/>239</text:p>
          </table:table-cell>
          <table:table-cell office:value-type="float" office:value="13088.129000000001" table:style-name="ce261">
            <text:p><text:s text:c="2"/>13</text:p>
          </table:table-cell>
          <table:table-cell office:value-type="float" office:value="0" table:style-name="ce258">
            <text:p><text:s/>-<text:s/></text:p>
          </table:table-cell>
          <table:table-cell office:value-type="float" office:value="251706.72899999999" table:formula="of:=SUM([.C11:.F11])" table:style-name="ce266">
            <text:p><text:s text:c="2"/>252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37">
            <text:p>Inert</text:p>
          </table:table-cell>
          <table:table-cell office:value-type="float" office:value="311411" table:style-name="ce268">
            <text:p><text:s text:c="2"/>311</text:p>
          </table:table-cell>
          <table:table-cell office:value-type="float" office:value="128643.64000000001" table:style-name="ce261">
            <text:p><text:s text:c="2"/>129</text:p>
          </table:table-cell>
          <table:table-cell office:value-type="float" office:value="25493" table:style-name="ce264">
            <text:p><text:s text:c="2"/>25</text:p>
          </table:table-cell>
          <table:table-cell office:value-type="float" office:value="274624.7790000001" table:style-name="ce261">
            <text:p><text:s text:c="2"/>275</text:p>
          </table:table-cell>
          <table:table-cell office:value-type="float" office:value="740172.41900000011" table:formula="of:=SUM([.C12:.F12])" table:style-name="ce269">
            <text:p><text:s text:c="2"/>740</text:p>
          </table:table-cell>
          <table:table-cell table:number-columns-repeated="16377" table:style-name="ce15"/>
        </table:table-row>
        <table:table-row table:style-name="ro11">
          <table:table-cell table:style-name="ce15"/>
          <table:table-cell office:value-type="string" table:style-name="ce41">
            <text:p>Total</text:p>
          </table:table-cell>
          <table:table-cell office:value-type="float" office:value="876477.15" table:formula="of:=SUM([.C7:.C12])" table:style-name="ce270">
            <text:p><text:s text:c="2"/>876</text:p>
          </table:table-cell>
          <table:table-cell office:value-type="float" office:value="453473.52" table:formula="of:=SUM([.D7:.D12])" table:style-name="ce271">
            <text:p><text:s text:c="2"/>453</text:p>
          </table:table-cell>
          <table:table-cell office:value-type="float" office:value="567639.14899999998" table:formula="of:=SUM([.E7:.E12])" table:style-name="ce271">
            <text:p><text:s text:c="2"/>568</text:p>
          </table:table-cell>
          <table:table-cell office:value-type="float" office:value="991069.15899999999" table:formula="of:=SUM([.F7:.F12])" table:style-name="ce271">
            <text:p><text:s text:c="2"/>991</text:p>
          </table:table-cell>
          <table:table-cell office:value-type="float" office:value="2888658.9780000001" table:formula="of:=SUM([.G7:.G12])" table:style-name="ce272">
            <text:p><text:s text:c="2"/>2,889</text:p>
          </table:table-cell>
          <table:table-cell table:number-columns-repeated="16377" table:style-name="ce15"/>
        </table:table-row>
        <table:table-row table:style-name="ro12">
          <table:table-cell table:number-columns-repeated="16384" table:style-name="ce15"/>
        </table:table-row>
        <table:table-row table:style-name="ro12">
          <table:table-cell table:style-name="ce15"/>
          <table:table-cell office:value-type="string" table:style-name="ce44">
            <text:p>Table Notes:</text:p>
          </table:table-cell>
          <table:table-cell table:number-columns-repeated="5" table:style-name="ce45"/>
          <table:table-cell table:number-columns-repeated="16377" table:style-name="ce15"/>
        </table:table-row>
        <table:table-row table:style-name="ro13">
          <table:table-cell table:style-name="ce15"/>
          <table:table-cell office:value-type="string" table:style-name="ce15">
            <text:p>Data since 2005 has been reclassified into categories used under the PPC permitting of landfills and because of the ban on the co-disposal of waste in landfills in July 2004.</text:p>
          </table:table-cell>
          <table:table-cell table:number-columns-repeated="16382" table:style-name="ce15"/>
        </table:table-row>
        <table:table-row table:style-name="ro13">
          <table:table-cell/>
          <table:table-cell office:value-type="string" table:style-name="ce15">
            <text:p>From 16 July 2004, hazardous landfills have only been able to accept wastes classified as hazardous under the Hazardous Waste Directive.</text:p>
          </table:table-cell>
          <table:table-cell table:number-columns-repeated="16382" table:style-name="ce15"/>
        </table:table-row>
        <table:table-row table:style-name="ro13">
          <table:table-cell/>
          <table:table-cell office:value-type="string" table:number-columns-spanned="9" table:number-rows-spanned="1" table:style-name="ce346">
            <text:p>Some non-hazardous sites can accept some Stable Non Reactive Hazardous Wastes (SNRHW) into a dedicated cell, but this is usually a small part of the overall capacity of the site.</text:p>
          </table:table-cell>
          <table:covered-table-cell table:number-columns-repeated="8"/>
          <table:table-cell table:number-columns-repeated="16374"/>
        </table:table-row>
        <table:table-row table:style-name="ro13">
          <table:table-cell/>
          <table:table-cell office:value-type="string" table:number-columns-spanned="8" table:number-rows-spanned="1" table:style-name="ce346">
            <text:p>The above data do not include waste received by closed landfills for restoration purposes.<text:s/></text:p>
          </table:table-cell>
          <table:covered-table-cell table:number-columns-repeated="7"/>
          <table:table-cell table:number-columns-repeated="16375" table:style-name="ce15"/>
        </table:table-row>
        <table:table-row table:style-name="ro13">
          <table:table-cell/>
          <table:table-cell table:number-columns-repeated="7" table:style-name="ce46"/>
          <table:table-cell table:number-columns-repeated="16376" table:style-name="ce15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Inputs.$B$2:Landfill_Inputs.$I$21" table:base-cell-address="Landfill_Inputs.$A$1"/>
        </table:named-expressions>
      </table:table>
      <table:table table:name="Landfill_Input_Trends" table:style-name="ta1"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8" table:default-cell-style-name="ce15"/>
        <table:table-column table:style-name="co25" table:default-cell-style-name="ce15"/>
        <table:table-column table:style-name="co26" table:default-cell-style-name="ce15"/>
        <table:table-column table:style-name="co14" table:number-columns-repeated="16373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Yorkshire and the Humber: Waste deposit trends: Landfill deposits by site type, waste type and sub-region fom 2000/1 to 2024</text:p>
          </table:table-cell>
          <table:table-cell table:style-name="ce15"/>
          <table:table-cell table:style-name="ce47"/>
          <table:table-cell table:number-columns-repeated="16380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style-name="ce15"/>
          <table:table-cell table:style-name="ce47"/>
          <table:table-cell table:number-columns-repeated="16380" table:style-name="ce15"/>
        </table:table-row>
        <table:table-row table:style-name="ro5">
          <table:table-cell table:number-columns-repeated="3" table:style-name="ce15"/>
          <table:table-cell table:style-name="ce47"/>
          <table:table-cell table:number-columns-repeated="16380" table:style-name="ce15"/>
        </table:table-row>
        <table:table-row table:style-name="ro5">
          <table:table-cell table:style-name="ce15"/>
          <table:table-cell table:style-name="ce48"/>
          <table:table-cell table:style-name="ce49"/>
          <table:table-cell office:value-type="string" table:number-columns-spanned="5" table:number-rows-spanned="1" table:style-name="ce344">
            <text:p>Sub Region</text:p>
          </table:table-cell>
          <table:covered-table-cell table:number-columns-repeated="4"/>
          <table:table-cell table:style-name="ce50"/>
          <table:table-cell table:number-columns-repeated="16375"/>
        </table:table-row>
        <table:table-row table:style-name="ro3">
          <table:table-cell table:style-name="ce15"/>
          <table:table-cell office:value-type="string" table:style-name="ce51">
            <text:p>Year</text:p>
          </table:table-cell>
          <table:table-cell office:value-type="string" table:style-name="ce52">
            <text:p>Site Type</text:p>
          </table:table-cell>
          <table:table-cell office:value-type="string" table:style-name="ce53">
            <text:p>Waste type</text:p>
          </table:table-cell>
          <table:table-cell office:value-type="string" table:style-name="ce23">
            <text:p>Former Humberside</text:p>
          </table:table-cell>
          <table:table-cell office:value-type="string" table:style-name="ce2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54">
            <text:p>West Yorkshire</text:p>
          </table:table-cell>
          <table:table-cell office:value-type="string" table:style-name="ce55">
            <text:p>YORKSHIRE AND THE HUMBER</text:p>
          </table:table-cell>
          <table:table-cell table:number-columns-repeated="16375"/>
        </table:table-row>
        <table:table-row table:style-name="ro5">
          <table:table-cell table:style-name="ce15"/>
          <table:table-cell office:value-type="string" table:number-columns-spanned="1" table:number-rows-spanned="16" table:style-name="ce347">
            <text:p>2000/1</text:p>
          </table:table-cell>
          <table:table-cell office:value-type="string" table:number-columns-spanned="1" table:number-rows-spanned="3" table:style-name="ce348">
            <text:p>Co disposal</text:p>
          </table:table-cell>
          <table:table-cell office:value-type="string" table:style-name="ce57">
            <text:p>Inert/C&amp;D</text:p>
          </table:table-cell>
          <table:table-cell office:value-type="float" office:value="27" table:style-name="ce58">
            <text:p><text:s/>27<text:s/></text:p>
          </table:table-cell>
          <table:table-cell office:value-type="float" office:value="133" table:style-name="ce58">
            <text:p><text:s/>133<text:s/></text:p>
          </table:table-cell>
          <table:table-cell office:value-type="float" office:value="203" table:style-name="ce58">
            <text:p><text:s/>203<text:s/></text:p>
          </table:table-cell>
          <table:table-cell office:value-type="float" office:value="261" table:style-name="ce58">
            <text:p><text:s/>261<text:s/></text:p>
          </table:table-cell>
          <table:table-cell office:value-type="float" office:value="624" table:formula="of:=SUM([.E7:.H7])" table:style-name="ce59">
            <text:p><text:s/>624<text:s/></text:p>
          </table:table-cell>
          <table:table-cell table:number-columns-repeated="1637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89" table:style-name="ce58">
            <text:p><text:s/>89<text:s/></text:p>
          </table:table-cell>
          <table:table-cell office:value-type="float" office:value="580" table:style-name="ce58">
            <text:p><text:s/>580<text:s/></text:p>
          </table:table-cell>
          <table:table-cell office:value-type="float" office:value="930" table:style-name="ce58">
            <text:p><text:s/>930<text:s/></text:p>
          </table:table-cell>
          <table:table-cell office:value-type="float" office:value="1314" table:style-name="ce58">
            <text:p><text:s/>1,314<text:s/></text:p>
          </table:table-cell>
          <table:table-cell office:value-type="float" office:value="2913" table:formula="of:=SUM([.E8:.H8])" table:style-name="ce61">
            <text:p><text:s/>2,913<text:s/></text:p>
          </table:table-cell>
          <table:table-cell table:number-columns-repeated="1637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56" table:style-name="ce58">
            <text:p><text:s/>56<text:s/></text:p>
          </table:table-cell>
          <table:table-cell office:value-type="float" office:value="24" table:style-name="ce58">
            <text:p><text:s/>24<text:s/></text:p>
          </table:table-cell>
          <table:table-cell office:value-type="float" office:value="195" table:style-name="ce58">
            <text:p><text:s/>195<text:s/></text:p>
          </table:table-cell>
          <table:table-cell office:value-type="float" office:value="59" table:style-name="ce58">
            <text:p><text:s/>59<text:s/></text:p>
          </table:table-cell>
          <table:table-cell office:value-type="float" office:value="334" table:formula="of:=SUM([.E9:.H9])" table:style-name="ce61">
            <text:p><text:s/>334<text:s/></text:p>
          </table:table-cell>
          <table:table-cell table:number-columns-repeated="16375"/>
        </table:table-row>
        <table:table-row table:style-name="ro5">
          <table:table-cell table:style-name="ce15"/>
          <table:covered-table-cell/>
          <table:table-cell office:value-type="string" table:style-name="ce63">
            <text:p>Co disposal Total</text:p>
          </table:table-cell>
          <table:table-cell table:style-name="ce64"/>
          <table:table-cell office:value-type="float" office:value="172" table:formula="of:=SUBTOTAL(9;[.E7:.E9])" table:style-name="ce65">
            <text:p><text:s/>172<text:s/></text:p>
          </table:table-cell>
          <table:table-cell office:value-type="float" office:value="737" table:formula="of:=SUBTOTAL(9;[.F7:.F9])" table:style-name="ce65">
            <text:p><text:s/>737<text:s/></text:p>
          </table:table-cell>
          <table:table-cell office:value-type="float" office:value="1328" table:formula="of:=SUBTOTAL(9;[.G7:.G9])" table:style-name="ce65">
            <text:p><text:s/>1,328<text:s/></text:p>
          </table:table-cell>
          <table:table-cell office:value-type="float" office:value="1634" table:formula="of:=SUBTOTAL(9;[.H7:.H9])" table:style-name="ce65">
            <text:p><text:s/>1,634<text:s/></text:p>
          </table:table-cell>
          <table:table-cell office:value-type="float" office:value="3871" table:formula="of:=SUBTOTAL(9;[.I7:.I9])" table:style-name="ce66">
            <text:p><text:s/>3,871<text:s/></text:p>
          </table:table-cell>
          <table:table-cell table:number-columns-repeated="16375"/>
        </table:table-row>
        <table:table-row table:style-name="ro5">
          <table:table-cell table:style-name="ce15"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67">
            <text:p>Inert/C&amp;D</text:p>
          </table:table-cell>
          <table:table-cell office:value-type="float" office:value="320" table:style-name="ce32">
            <text:p><text:s/>320<text:s/></text:p>
          </table:table-cell>
          <table:table-cell office:value-type="float" office:value="506" table:style-name="ce33">
            <text:p><text:s/>506<text:s/></text:p>
          </table:table-cell>
          <table:table-cell office:value-type="float" office:value="20" table:style-name="ce33">
            <text:p><text:s/>20<text:s/></text:p>
          </table:table-cell>
          <table:table-cell office:value-type="float" office:value="257" table:style-name="ce33">
            <text:p><text:s/>257<text:s/></text:p>
          </table:table-cell>
          <table:table-cell office:value-type="float" office:value="1103" table:formula="of:=SUM([.E11:.H11])" table:style-name="ce61">
            <text:p><text:s/>1,103<text:s/></text:p>
          </table:table-cell>
          <table:table-cell table:number-columns-repeated="1637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087" table:style-name="ce32">
            <text:p><text:s/>2,087<text:s/></text:p>
          </table:table-cell>
          <table:table-cell office:value-type="float" office:value="157" table:style-name="ce33">
            <text:p><text:s/>15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7" table:style-name="ce33">
            <text:p><text:s/>87<text:s/></text:p>
          </table:table-cell>
          <table:table-cell office:value-type="float" office:value="2331" table:formula="of:=SUM([.E12:.H12])" table:style-name="ce61">
            <text:p><text:s/>2,331<text:s/></text:p>
          </table:table-cell>
          <table:table-cell table:number-columns-repeated="1637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159" table:style-name="ce32">
            <text:p><text:s/>15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9" table:formula="of:=SUM([.E13:.H13])" table:style-name="ce61">
            <text:p><text:s/>159<text:s/></text:p>
          </table:table-cell>
          <table:table-cell table:number-columns-repeated="16375"/>
        </table:table-row>
        <table:table-row table:style-name="ro5">
          <table:table-cell table:style-name="ce15"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2566" table:formula="of:=SUBTOTAL(9;[.E11:.E13])" table:style-name="ce65">
            <text:p><text:s/>2,566<text:s/></text:p>
          </table:table-cell>
          <table:table-cell office:value-type="float" office:value="663" table:formula="of:=SUBTOTAL(9;[.F11:.F13])" table:style-name="ce65">
            <text:p><text:s/>663<text:s/></text:p>
          </table:table-cell>
          <table:table-cell office:value-type="float" office:value="20" table:formula="of:=SUBTOTAL(9;[.G11:.G13])" table:style-name="ce65">
            <text:p><text:s/>20<text:s/></text:p>
          </table:table-cell>
          <table:table-cell office:value-type="float" office:value="344" table:formula="of:=SUBTOTAL(9;[.H11:.H13])" table:style-name="ce65">
            <text:p><text:s/>344<text:s/></text:p>
          </table:table-cell>
          <table:table-cell office:value-type="float" office:value="3593" table:formula="of:=SUBTOTAL(9;[.I11:.I13])" table:style-name="ce66">
            <text:p><text:s/>3,593<text:s/></text:p>
          </table:table-cell>
          <table:table-cell table:number-columns-repeated="16375"/>
        </table:table-row>
        <table:table-row table:style-name="ro5">
          <table:table-cell table:style-name="ce15"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67">
            <text:p>Inert/C&amp;D</text:p>
          </table:table-cell>
          <table:table-cell office:value-type="float" office:value="232" table:style-name="ce32">
            <text:p><text:s/>232<text:s/></text:p>
          </table:table-cell>
          <table:table-cell office:value-type="float" office:value="19" table:style-name="ce33">
            <text:p><text:s/>19<text:s/></text:p>
          </table:table-cell>
          <table:table-cell office:value-type="float" office:value="245" table:style-name="ce33">
            <text:p><text:s/>245<text:s/></text:p>
          </table:table-cell>
          <table:table-cell office:value-type="float" office:value="375" table:style-name="ce33">
            <text:p><text:s/>375<text:s/></text:p>
          </table:table-cell>
          <table:table-cell office:value-type="float" office:value="871" table:formula="of:=SUM([.E15:.H15])" table:style-name="ce61">
            <text:p><text:s/>871<text:s/></text:p>
          </table:table-cell>
          <table:table-cell table:number-columns-repeated="1637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" table:style-name="ce32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" table:formula="of:=SUM([.E16:.H16])" table:style-name="ce61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2" table:style-name="ce32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" table:formula="of:=SUM([.E17:.H17])" table:style-name="ce61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236" table:formula="of:=SUBTOTAL(9;[.E15:.E17])" table:style-name="ce65">
            <text:p><text:s/>236<text:s/></text:p>
          </table:table-cell>
          <table:table-cell office:value-type="float" office:value="19" table:formula="of:=SUBTOTAL(9;[.F15:.F17])" table:style-name="ce65">
            <text:p><text:s/>19<text:s/></text:p>
          </table:table-cell>
          <table:table-cell office:value-type="float" office:value="245" table:formula="of:=SUBTOTAL(9;[.G15:.G17])" table:style-name="ce65">
            <text:p><text:s/>245<text:s/></text:p>
          </table:table-cell>
          <table:table-cell office:value-type="float" office:value="375" table:formula="of:=SUBTOTAL(9;[.H15:.H17])" table:style-name="ce65">
            <text:p><text:s/>375<text:s/></text:p>
          </table:table-cell>
          <table:table-cell office:value-type="float" office:value="875" table:formula="of:=SUBTOTAL(9;[.I15:.I17])" table:style-name="ce66">
            <text:p><text:s/>87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67">
            <text:p>Inert/C&amp;D</text:p>
          </table:table-cell>
          <table:table-cell office:value-type="float" office:value="19" table:style-name="ce32">
            <text:p><text:s/>19<text:s/></text:p>
          </table:table-cell>
          <table:table-cell office:value-type="float" office:value="454" table:style-name="ce33">
            <text:p><text:s/>454<text:s/></text:p>
          </table:table-cell>
          <table:table-cell office:value-type="float" office:value="150" table:style-name="ce33">
            <text:p><text:s/>150<text:s/></text:p>
          </table:table-cell>
          <table:table-cell office:value-type="float" office:value="80" table:style-name="ce33">
            <text:p><text:s/>80<text:s/></text:p>
          </table:table-cell>
          <table:table-cell office:value-type="float" office:value="703" table:formula="of:=SUM([.E19:.H19])" table:style-name="ce61">
            <text:p><text:s/>70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41" table:style-name="ce32">
            <text:p><text:s/>241<text:s/></text:p>
          </table:table-cell>
          <table:table-cell office:value-type="float" office:value="632" table:style-name="ce33">
            <text:p><text:s/>632<text:s/></text:p>
          </table:table-cell>
          <table:table-cell office:value-type="float" office:value="142" table:style-name="ce33">
            <text:p><text:s/>142<text:s/></text:p>
          </table:table-cell>
          <table:table-cell office:value-type="float" office:value="23" table:style-name="ce33">
            <text:p><text:s/>23<text:s/></text:p>
          </table:table-cell>
          <table:table-cell office:value-type="float" office:value="1038" table:formula="of:=SUM([.E20:.H20])" table:style-name="ce61">
            <text:p><text:s/>1,03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105" table:style-name="ce32">
            <text:p><text:s/>105<text:s/></text:p>
          </table:table-cell>
          <table:table-cell office:value-type="float" office:value="1" table:style-name="ce33">
            <text:p><text:s/>1<text:s/></text:p>
          </table:table-cell>
          <table:table-cell office:value-type="float" office:value="144" table:style-name="ce33">
            <text:p><text:s/>144<text:s/></text:p>
          </table:table-cell>
          <table:table-cell office:value-type="float" office:value="5" table:style-name="ce33">
            <text:p><text:s/>5<text:s/></text:p>
          </table:table-cell>
          <table:table-cell office:value-type="float" office:value="255" table:formula="of:=SUM([.E21:.H21])" table:style-name="ce61">
            <text:p><text:s/>25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Restricted-user Total</text:p>
          </table:table-cell>
          <table:table-cell table:style-name="ce64"/>
          <table:table-cell office:value-type="float" office:value="365" table:formula="of:=SUBTOTAL(9;[.E19:.E21])" table:style-name="ce29">
            <text:p><text:s/>365<text:s/></text:p>
          </table:table-cell>
          <table:table-cell office:value-type="float" office:value="1087" table:formula="of:=SUBTOTAL(9;[.F19:.F21])" table:style-name="ce29">
            <text:p><text:s/>1,087<text:s/></text:p>
          </table:table-cell>
          <table:table-cell office:value-type="float" office:value="436" table:formula="of:=SUBTOTAL(9;[.G19:.G21])" table:style-name="ce29">
            <text:p><text:s/>436<text:s/></text:p>
          </table:table-cell>
          <table:table-cell office:value-type="float" office:value="108" table:formula="of:=SUBTOTAL(9;[.H19:.H21])" table:style-name="ce29">
            <text:p><text:s/>108<text:s/></text:p>
          </table:table-cell>
          <table:table-cell office:value-type="float" office:value="1996" table:formula="of:=SUBTOTAL(9;[.I19:.I21])" table:style-name="ce59">
            <text:p><text:s/>1,996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0/1 Total</text:p>
          </table:table-cell>
          <table:table-cell table:style-name="ce72"/>
          <table:table-cell table:style-name="ce73"/>
          <table:table-cell office:value-type="float" office:value="3339" table:formula="of:=SUBTOTAL(9;[.E7:.E21])" table:style-name="ce43">
            <text:p><text:s/>3,339<text:s/></text:p>
          </table:table-cell>
          <table:table-cell office:value-type="float" office:value="2506" table:formula="of:=SUBTOTAL(9;[.F7:.F21])" table:style-name="ce43">
            <text:p><text:s/>2,506<text:s/></text:p>
          </table:table-cell>
          <table:table-cell office:value-type="float" office:value="2029" table:formula="of:=SUBTOTAL(9;[.G7:.G21])" table:style-name="ce43">
            <text:p><text:s/>2,029<text:s/></text:p>
          </table:table-cell>
          <table:table-cell office:value-type="float" office:value="2461" table:formula="of:=SUBTOTAL(9;[.H7:.H21])" table:style-name="ce43">
            <text:p><text:s/>2,461<text:s/></text:p>
          </table:table-cell>
          <table:table-cell office:value-type="float" office:value="10335" table:formula="of:=SUBTOTAL(9;[.I7:.I21])" table:style-name="ce74">
            <text:p><text:s/>10,335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number-columns-spanned="1" table:number-rows-spanned="16" table:style-name="ce347">
            <text:p>2002/3</text:p>
          </table:table-cell>
          <table:table-cell office:value-type="string" table:number-columns-spanned="1" table:number-rows-spanned="3" table:style-name="ce348">
            <text:p>Co disposal</text:p>
          </table:table-cell>
          <table:table-cell office:value-type="string" table:style-name="ce67">
            <text:p>Inert/C&amp;D</text:p>
          </table:table-cell>
          <table:table-cell office:value-type="float" office:value="151" table:style-name="ce32">
            <text:p><text:s/>151<text:s/></text:p>
          </table:table-cell>
          <table:table-cell office:value-type="float" office:value="116" table:style-name="ce33">
            <text:p><text:s/>116<text:s/></text:p>
          </table:table-cell>
          <table:table-cell office:value-type="float" office:value="365" table:style-name="ce33">
            <text:p><text:s/>365<text:s/></text:p>
          </table:table-cell>
          <table:table-cell office:value-type="float" office:value="326" table:style-name="ce33">
            <text:p><text:s/>326<text:s/></text:p>
          </table:table-cell>
          <table:table-cell office:value-type="float" office:value="958" table:formula="of:=SUM([.E24:.H24])" table:style-name="ce61">
            <text:p><text:s/>9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225" table:style-name="ce32">
            <text:p><text:s/>1,225<text:s/></text:p>
          </table:table-cell>
          <table:table-cell office:value-type="float" office:value="379" table:style-name="ce33">
            <text:p><text:s/>379<text:s/></text:p>
          </table:table-cell>
          <table:table-cell office:value-type="float" office:value="876" table:style-name="ce33">
            <text:p><text:s/>876<text:s/></text:p>
          </table:table-cell>
          <table:table-cell office:value-type="float" office:value="915" table:style-name="ce33">
            <text:p><text:s/>915<text:s/></text:p>
          </table:table-cell>
          <table:table-cell office:value-type="float" office:value="3395" table:formula="of:=SUM([.E25:.H25])" table:style-name="ce61">
            <text:p><text:s/>3,3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22" table:style-name="ce32">
            <text:p><text:s/>22<text:s/></text:p>
          </table:table-cell>
          <table:table-cell office:value-type="float" office:value="9" table:style-name="ce33">
            <text:p><text:s/>9<text:s/></text:p>
          </table:table-cell>
          <table:table-cell office:value-type="float" office:value="97" table:style-name="ce33">
            <text:p><text:s/>97<text:s/></text:p>
          </table:table-cell>
          <table:table-cell office:value-type="float" office:value="113" table:style-name="ce33">
            <text:p><text:s/>113<text:s/></text:p>
          </table:table-cell>
          <table:table-cell office:value-type="float" office:value="241" table:formula="of:=SUM([.E26:.H26])" table:style-name="ce61">
            <text:p><text:s/>2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Co disposal Total</text:p>
          </table:table-cell>
          <table:table-cell table:style-name="ce64"/>
          <table:table-cell office:value-type="float" office:value="1398" table:formula="of:=SUBTOTAL(9;[.E24:.E26])" table:style-name="ce65">
            <text:p><text:s/>1,398<text:s/></text:p>
          </table:table-cell>
          <table:table-cell office:value-type="float" office:value="504" table:formula="of:=SUBTOTAL(9;[.F24:.F26])" table:style-name="ce65">
            <text:p><text:s/>504<text:s/></text:p>
          </table:table-cell>
          <table:table-cell office:value-type="float" office:value="1338" table:formula="of:=SUBTOTAL(9;[.G24:.G26])" table:style-name="ce65">
            <text:p><text:s/>1,338<text:s/></text:p>
          </table:table-cell>
          <table:table-cell office:value-type="float" office:value="1354" table:formula="of:=SUBTOTAL(9;[.H24:.H26])" table:style-name="ce65">
            <text:p><text:s/>1,354<text:s/></text:p>
          </table:table-cell>
          <table:table-cell office:value-type="float" office:value="4594" table:formula="of:=SUBTOTAL(9;[.I24:.I26])" table:style-name="ce66">
            <text:p><text:s/>4,5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67">
            <text:p>Inert/C&amp;D</text:p>
          </table:table-cell>
          <table:table-cell office:value-type="float" office:value="44" table:style-name="ce32">
            <text:p><text:s/>44<text:s/></text:p>
          </table:table-cell>
          <table:table-cell office:value-type="float" office:value="44" table:style-name="ce33">
            <text:p><text:s/>44<text:s/></text:p>
          </table:table-cell>
          <table:table-cell office:value-type="float" office:value="110" table:style-name="ce33">
            <text:p><text:s/>110<text:s/></text:p>
          </table:table-cell>
          <table:table-cell office:value-type="float" office:value="166" table:style-name="ce33">
            <text:p><text:s/>166<text:s/></text:p>
          </table:table-cell>
          <table:table-cell office:value-type="float" office:value="364" table:formula="of:=SUM([.E28:.H28])" table:style-name="ce61">
            <text:p><text:s/>36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524" table:style-name="ce32">
            <text:p><text:s/>524<text:s/></text:p>
          </table:table-cell>
          <table:table-cell office:value-type="float" office:value="388" table:style-name="ce33">
            <text:p><text:s/>388<text:s/></text:p>
          </table:table-cell>
          <table:table-cell office:value-type="float" office:value="57" table:style-name="ce33">
            <text:p><text:s/>57<text:s/></text:p>
          </table:table-cell>
          <table:table-cell office:value-type="float" office:value="665" table:style-name="ce33">
            <text:p><text:s/>665<text:s/></text:p>
          </table:table-cell>
          <table:table-cell office:value-type="float" office:value="1634" table:formula="of:=SUM([.E29:.H29])" table:style-name="ce61">
            <text:p><text:s/>1,6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7" table:style-name="ce33">
            <text:p><text:s/>27<text:s/></text:p>
          </table:table-cell>
          <table:table-cell office:value-type="float" office:value="27" table:style-name="ce33">
            <text:p><text:s/>27<text:s/></text:p>
          </table:table-cell>
          <table:table-cell office:value-type="float" office:value="54" table:formula="of:=SUM([.E30:.H30])" table:style-name="ce61">
            <text:p><text:s/>5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568" table:formula="of:=SUBTOTAL(9;[.E28:.E30])" table:style-name="ce65">
            <text:p><text:s/>568<text:s/></text:p>
          </table:table-cell>
          <table:table-cell office:value-type="float" office:value="432" table:formula="of:=SUBTOTAL(9;[.F28:.F30])" table:style-name="ce65">
            <text:p><text:s/>432<text:s/></text:p>
          </table:table-cell>
          <table:table-cell office:value-type="float" office:value="194" table:formula="of:=SUBTOTAL(9;[.G28:.G30])" table:style-name="ce65">
            <text:p><text:s/>194<text:s/></text:p>
          </table:table-cell>
          <table:table-cell office:value-type="float" office:value="858" table:formula="of:=SUBTOTAL(9;[.H28:.H30])" table:style-name="ce65">
            <text:p><text:s/>858<text:s/></text:p>
          </table:table-cell>
          <table:table-cell office:value-type="float" office:value="2052" table:formula="of:=SUBTOTAL(9;[.I28:.I30])" table:style-name="ce66">
            <text:p><text:s/>2,05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67">
            <text:p>Inert/C&amp;D</text:p>
          </table:table-cell>
          <table:table-cell office:value-type="float" office:value="218" table:style-name="ce32">
            <text:p><text:s/>218<text:s/></text:p>
          </table:table-cell>
          <table:table-cell office:value-type="float" office:value="142" table:style-name="ce33">
            <text:p><text:s/>142<text:s/></text:p>
          </table:table-cell>
          <table:table-cell office:value-type="float" office:value="388" table:style-name="ce33">
            <text:p><text:s/>388<text:s/></text:p>
          </table:table-cell>
          <table:table-cell office:value-type="float" office:value="563" table:style-name="ce33">
            <text:p><text:s/>563<text:s/></text:p>
          </table:table-cell>
          <table:table-cell office:value-type="float" office:value="1311" table:formula="of:=SUM([.E32:.H32])" table:style-name="ce61">
            <text:p><text:s/>1,3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06" table:style-name="ce32">
            <text:p><text:s/>10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" table:style-name="ce33">
            <text:p><text:s/>3<text:s/></text:p>
          </table:table-cell>
          <table:table-cell office:value-type="float" office:value="109" table:formula="of:=SUM([.E33:.H33])" table:style-name="ce61">
            <text:p><text:s/>1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4:.H34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324" table:formula="of:=SUBTOTAL(9;[.E32:.E34])" table:style-name="ce65">
            <text:p><text:s/>324<text:s/></text:p>
          </table:table-cell>
          <table:table-cell office:value-type="float" office:value="142" table:formula="of:=SUBTOTAL(9;[.F32:.F34])" table:style-name="ce65">
            <text:p><text:s/>142<text:s/></text:p>
          </table:table-cell>
          <table:table-cell office:value-type="float" office:value="388" table:formula="of:=SUBTOTAL(9;[.G32:.G34])" table:style-name="ce65">
            <text:p><text:s/>388<text:s/></text:p>
          </table:table-cell>
          <table:table-cell office:value-type="float" office:value="566" table:formula="of:=SUBTOTAL(9;[.H32:.H34])" table:style-name="ce65">
            <text:p><text:s/>566<text:s/></text:p>
          </table:table-cell>
          <table:table-cell office:value-type="float" office:value="1420" table:formula="of:=SUBTOTAL(9;[.I32:.I34])" table:style-name="ce66">
            <text:p><text:s/>1,42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67">
            <text:p>Inert/C&amp;D</text:p>
          </table:table-cell>
          <table:table-cell office:value-type="float" office:value="163.69" table:style-name="ce32">
            <text:p><text:s/>164<text:s/></text:p>
          </table:table-cell>
          <table:table-cell office:value-type="float" office:value="0.215" table:style-name="ce33">
            <text:p><text:s/>0<text:s/></text:p>
          </table:table-cell>
          <table:table-cell office:value-type="float" office:value="1.673" table:style-name="ce33">
            <text:p><text:s/>2<text:s/></text:p>
          </table:table-cell>
          <table:table-cell office:value-type="float" office:value="2.3530000000000002" table:style-name="ce33">
            <text:p><text:s/>2<text:s/></text:p>
          </table:table-cell>
          <table:table-cell office:value-type="float" office:value="167.93100000000001" table:formula="of:=SUM([.E36:.H36])" table:style-name="ce61">
            <text:p><text:s/>1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64.503" table:style-name="ce32">
            <text:p><text:s/>65<text:s/></text:p>
          </table:table-cell>
          <table:table-cell office:value-type="float" office:value="552.56600000000003" table:style-name="ce33">
            <text:p><text:s/>553<text:s/></text:p>
          </table:table-cell>
          <table:table-cell office:value-type="float" office:value="75.432000000000002" table:style-name="ce33">
            <text:p><text:s/>75<text:s/></text:p>
          </table:table-cell>
          <table:table-cell office:value-type="float" office:value="5.3999999999999999E-2" table:style-name="ce33">
            <text:p><text:s/>0<text:s/></text:p>
          </table:table-cell>
          <table:table-cell office:value-type="float" office:value="692.55500000000006" table:formula="of:=SUM([.E37:.H37])" table:style-name="ce61">
            <text:p><text:s/>69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1.9490000000000001" table:style-name="ce32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.9490000000000001" table:formula="of:=SUM([.E38:.H38])" table:style-name="ce61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Restricted-user Total</text:p>
          </table:table-cell>
          <table:table-cell table:style-name="ce64"/>
          <table:table-cell office:value-type="float" office:value="230.142" table:formula="of:=SUBTOTAL(9;[.E36:.E38])" table:style-name="ce29">
            <text:p><text:s/>230<text:s/></text:p>
          </table:table-cell>
          <table:table-cell office:value-type="float" office:value="552.78100000000006" table:formula="of:=SUBTOTAL(9;[.F36:.F38])" table:style-name="ce29">
            <text:p><text:s/>553<text:s/></text:p>
          </table:table-cell>
          <table:table-cell office:value-type="float" office:value="77.105000000000004" table:formula="of:=SUBTOTAL(9;[.G36:.G38])" table:style-name="ce29">
            <text:p><text:s/>77<text:s/></text:p>
          </table:table-cell>
          <table:table-cell office:value-type="float" office:value="2.407" table:formula="of:=SUBTOTAL(9;[.H36:.H38])" table:style-name="ce29">
            <text:p><text:s/>2<text:s/></text:p>
          </table:table-cell>
          <table:table-cell office:value-type="float" office:value="862.43500000000006" table:formula="of:=SUBTOTAL(9;[.I36:.I38])" table:style-name="ce59">
            <text:p><text:s/>86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2/3 Total</text:p>
          </table:table-cell>
          <table:table-cell table:style-name="ce72"/>
          <table:table-cell table:style-name="ce73"/>
          <table:table-cell office:value-type="float" office:value="2520.1420000000003" table:formula="of:=SUBTOTAL(9;[.E24:.E38])" table:style-name="ce43">
            <text:p><text:s/>2,520<text:s/></text:p>
          </table:table-cell>
          <table:table-cell office:value-type="float" office:value="1630.7809999999999" table:formula="of:=SUBTOTAL(9;[.F24:.F38])" table:style-name="ce43">
            <text:p><text:s/>1,631<text:s/></text:p>
          </table:table-cell>
          <table:table-cell office:value-type="float" office:value="1997.105" table:formula="of:=SUBTOTAL(9;[.G24:.G38])" table:style-name="ce43">
            <text:p><text:s/>1,997<text:s/></text:p>
          </table:table-cell>
          <table:table-cell office:value-type="float" office:value="2780.4070000000002" table:formula="of:=SUBTOTAL(9;[.H24:.H38])" table:style-name="ce43">
            <text:p><text:s/>2,780<text:s/></text:p>
          </table:table-cell>
          <table:table-cell office:value-type="float" office:value="8928.4350000000013" table:formula="of:=SUBTOTAL(9;[.I24:.I38])" table:style-name="ce74">
            <text:p><text:s/>8,928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number-columns-spanned="1" table:number-rows-spanned="16" table:style-name="ce347">
            <text:p>2004/5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67">
            <text:p>Inert/C&amp;D</text:p>
          </table:table-cell>
          <table:table-cell office:value-type="float" office:value="9.1488399314880375" table:style-name="ce32">
            <text:p><text:s/>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.0725999574661254" table:style-name="ce33">
            <text:p><text:s/>5<text:s/></text:p>
          </table:table-cell>
          <table:table-cell office:value-type="float" office:value="14.221439888954162" table:formula="of:=SUM([.E41:.H41])" table:style-name="ce61">
            <text:p><text:s/>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.45903999719023703" table:style-name="ce32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45903999719023703" table:formula="of:=SUM([.E42:.H42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79.166769609197971" table:style-name="ce32">
            <text:p><text:s/>7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38849999594688417" table:style-name="ce33">
            <text:p><text:s/>0<text:s/></text:p>
          </table:table-cell>
          <table:table-cell office:value-type="float" office:value="79.555269605144858" table:formula="of:=SUM([.E43:.H43])" table:style-name="ce61">
            <text:p><text:s/>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64"/>
          <table:table-cell office:value-type="float" office:value="88.774649537876243" table:formula="of:=SUBTOTAL(9;[.E41:.E43])" table:style-name="ce65">
            <text:p><text:s/>89<text:s/></text:p>
          </table:table-cell>
          <table:table-cell office:value-type="float" office:value="0" table:formula="of:=SUBTOTAL(9;[.F41:.F43])" table:style-name="ce65">
            <text:p><text:s/>-<text:s/></text:p>
          </table:table-cell>
          <table:table-cell office:value-type="float" office:value="0" table:formula="of:=SUBTOTAL(9;[.G41:.G43])" table:style-name="ce65">
            <text:p><text:s/>-<text:s/></text:p>
          </table:table-cell>
          <table:table-cell office:value-type="float" office:value="5.4610999534130098" table:formula="of:=SUBTOTAL(9;[.H41:.H43])" table:style-name="ce65">
            <text:p><text:s/>5<text:s/></text:p>
          </table:table-cell>
          <table:table-cell office:value-type="float" office:value="94.235749491289255" table:formula="of:=SUBTOTAL(9;[.I41:.I43])" table:style-name="ce66">
            <text:p><text:s/>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67">
            <text:p>Inert/C&amp;D</text:p>
          </table:table-cell>
          <table:table-cell office:value-type="float" office:value="196.32439981245994" table:style-name="ce32">
            <text:p><text:s/>196<text:s/></text:p>
          </table:table-cell>
          <table:table-cell office:value-type="float" office:value="228.89861599814893" table:style-name="ce33">
            <text:p><text:s/>229<text:s/></text:p>
          </table:table-cell>
          <table:table-cell office:value-type="float" office:value="359.95619999039172" table:style-name="ce33">
            <text:p><text:s/>360<text:s/></text:p>
          </table:table-cell>
          <table:table-cell office:value-type="float" office:value="376.83387948203085" table:style-name="ce33">
            <text:p><text:s/>377<text:s/></text:p>
          </table:table-cell>
          <table:table-cell office:value-type="float" office:value="1162.0130952830314" table:formula="of:=SUM([.E45:.H45])" table:style-name="ce61">
            <text:p><text:s/>1,16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385.8948463248014" table:style-name="ce32">
            <text:p><text:s/>1,386<text:s/></text:p>
          </table:table-cell>
          <table:table-cell office:value-type="float" office:value="785.14694296152095" table:style-name="ce33">
            <text:p><text:s/>785<text:s/></text:p>
          </table:table-cell>
          <table:table-cell office:value-type="float" office:value="804.3711010670811" table:style-name="ce33">
            <text:p><text:s/>804<text:s/></text:p>
          </table:table-cell>
          <table:table-cell office:value-type="float" office:value="1167.4913312778772" table:style-name="ce33">
            <text:p><text:s/>1,167<text:s/></text:p>
          </table:table-cell>
          <table:table-cell office:value-type="float" office:value="4142.904221631281" table:formula="of:=SUM([.E46:.H46])" table:style-name="ce61">
            <text:p><text:s/>4,1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23.342600001119077" table:style-name="ce32">
            <text:p><text:s/>23<text:s/></text:p>
          </table:table-cell>
          <table:table-cell office:value-type="float" office:value="17.20260005987808" table:style-name="ce33">
            <text:p><text:s/>17<text:s/></text:p>
          </table:table-cell>
          <table:table-cell office:value-type="float" office:value="187.57527841282635" table:style-name="ce33">
            <text:p><text:s/>188<text:s/></text:p>
          </table:table-cell>
          <table:table-cell office:value-type="float" office:value="100.28482948231324" table:style-name="ce33">
            <text:p><text:s/>100<text:s/></text:p>
          </table:table-cell>
          <table:table-cell office:value-type="float" office:value="328.40530795613677" table:formula="of:=SUM([.E47:.H47])" table:style-name="ce61">
            <text:p><text:s/>3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1605.5618461383804" table:formula="of:=SUBTOTAL(9;[.E45:.E47])" table:style-name="ce65">
            <text:p><text:s/>1,606<text:s/></text:p>
          </table:table-cell>
          <table:table-cell office:value-type="float" office:value="1031.248159019548" table:formula="of:=SUBTOTAL(9;[.F45:.F47])" table:style-name="ce65">
            <text:p><text:s/>1,031<text:s/></text:p>
          </table:table-cell>
          <table:table-cell office:value-type="float" office:value="1351.9025794702991" table:formula="of:=SUBTOTAL(9;[.G45:.G47])" table:style-name="ce65">
            <text:p><text:s/>1,352<text:s/></text:p>
          </table:table-cell>
          <table:table-cell office:value-type="float" office:value="1644.6100402422212" table:formula="of:=SUBTOTAL(9;[.H45:.H47])" table:style-name="ce65">
            <text:p><text:s/>1,645<text:s/></text:p>
          </table:table-cell>
          <table:table-cell office:value-type="float" office:value="5633.3226248704486" table:formula="of:=SUBTOTAL(9;[.I45:.I47])" table:style-name="ce66">
            <text:p><text:s/>5,6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67">
            <text:p>Inert/C&amp;D</text:p>
          </table:table-cell>
          <table:table-cell office:value-type="float" office:value="281.46189990234376" table:style-name="ce32">
            <text:p><text:s/>281<text:s/></text:p>
          </table:table-cell>
          <table:table-cell office:value-type="float" office:value="534.13684202384945" table:style-name="ce33">
            <text:p><text:s/>534<text:s/></text:p>
          </table:table-cell>
          <table:table-cell office:value-type="float" office:value="327.73493047857283" table:style-name="ce33">
            <text:p><text:s/>328<text:s/></text:p>
          </table:table-cell>
          <table:table-cell office:value-type="float" office:value="446.37019982910158" table:style-name="ce33">
            <text:p><text:s/>446<text:s/></text:p>
          </table:table-cell>
          <table:table-cell office:value-type="float" office:value="1589.7038722338675" table:formula="of:=SUM([.E49:.H49])" table:style-name="ce61">
            <text:p><text:s/>1,5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9.3315300903320306" table:style-name="ce32">
            <text:p><text:s/>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.3109500122070312" table:style-name="ce33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.642480102539063" table:formula="of:=SUM([.E50:.H50])" table:style-name="ce61">
            <text:p><text:s/>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.9199999570846558E-3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.9199999570846558E-3" table:formula="of:=SUM([.E51:.H51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290.79342999267578" table:formula="of:=SUBTOTAL(9;[.E49:.E51])" table:style-name="ce65">
            <text:p><text:s/>291<text:s/></text:p>
          </table:table-cell>
          <table:table-cell office:value-type="float" office:value="534.13876202380652" table:formula="of:=SUBTOTAL(9;[.F49:.F51])" table:style-name="ce65">
            <text:p><text:s/>534<text:s/></text:p>
          </table:table-cell>
          <table:table-cell office:value-type="float" office:value="329.04588049077989" table:formula="of:=SUBTOTAL(9;[.G49:.G51])" table:style-name="ce65">
            <text:p><text:s/>329<text:s/></text:p>
          </table:table-cell>
          <table:table-cell office:value-type="float" office:value="446.37019982910158" table:formula="of:=SUBTOTAL(9;[.H49:.H51])" table:style-name="ce65">
            <text:p><text:s/>446<text:s/></text:p>
          </table:table-cell>
          <table:table-cell office:value-type="float" office:value="1600.3482723363638" table:formula="of:=SUBTOTAL(9;[.I49:.I51])" table:style-name="ce66">
            <text:p><text:s/>1,60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67">
            <text:p>Inert/C&amp;D</text:p>
          </table:table-cell>
          <table:table-cell office:value-type="float" office:value="7.2435799785852435" table:style-name="ce32">
            <text:p><text:s/>7<text:s/></text:p>
          </table:table-cell>
          <table:table-cell office:value-type="float" office:value="1.3340000000000001" table:style-name="ce33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19600000000000001" table:style-name="ce33">
            <text:p><text:s/>0<text:s/></text:p>
          </table:table-cell>
          <table:table-cell office:value-type="float" office:value="8.7735799785852429" table:formula="of:=SUM([.E53:.H53])" table:style-name="ce61">
            <text:p><text:s/>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404.48724800407888" table:style-name="ce32">
            <text:p><text:s/>404<text:s/></text:p>
          </table:table-cell>
          <table:table-cell office:value-type="float" office:value="651.91073046874999" table:style-name="ce33">
            <text:p><text:s/>652<text:s/></text:p>
          </table:table-cell>
          <table:table-cell office:value-type="float" office:value="56.315299939930441" table:style-name="ce33">
            <text:p><text:s/>56<text:s/></text:p>
          </table:table-cell>
          <table:table-cell office:value-type="float" office:value="2.5000000000000001E-2" table:style-name="ce33">
            <text:p><text:s/>0<text:s/></text:p>
          </table:table-cell>
          <table:table-cell office:value-type="float" office:value="1112.7382784127594" table:formula="of:=SUM([.E54:.H54])" table:style-name="ce61">
            <text:p><text:s/>1,1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2.3672800011634827" table:style-name="ce38">
            <text:p><text:s/>2<text:s/></text:p>
          </table:table-cell>
          <table:table-cell office:value-type="float" office:value="0" table:style-name="ce39">
            <text:p><text:s/>-<text:s/></text:p>
          </table:table-cell>
          <table:table-cell office:value-type="float" office:value="15.754750282287597" table:style-name="ce39">
            <text:p><text:s/>16<text:s/></text:p>
          </table:table-cell>
          <table:table-cell office:value-type="float" office:value="0" table:style-name="ce39">
            <text:p><text:s/>-<text:s/></text:p>
          </table:table-cell>
          <table:table-cell office:value-type="float" office:value="18.122030283451082" table:formula="of:=SUM([.E55:.H55])" table:style-name="ce76">
            <text:p><text:s/>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64"/>
          <table:table-cell office:value-type="float" office:value="414.09810798382756" table:formula="of:=SUBTOTAL(9;[.E53:.E55])" table:style-name="ce33">
            <text:p><text:s/>414<text:s/></text:p>
          </table:table-cell>
          <table:table-cell office:value-type="float" office:value="653.24473046874994" table:formula="of:=SUBTOTAL(9;[.F53:.F55])" table:style-name="ce33">
            <text:p><text:s/>653<text:s/></text:p>
          </table:table-cell>
          <table:table-cell office:value-type="float" office:value="72.070050222218043" table:formula="of:=SUBTOTAL(9;[.G53:.G55])" table:style-name="ce33">
            <text:p><text:s/>72<text:s/></text:p>
          </table:table-cell>
          <table:table-cell office:value-type="float" office:value="0.221" table:formula="of:=SUBTOTAL(9;[.H53:.H55])" table:style-name="ce33">
            <text:p><text:s/>0<text:s/></text:p>
          </table:table-cell>
          <table:table-cell office:value-type="float" office:value="1139.6338886747958" table:formula="of:=SUBTOTAL(9;[.I53:.I55])" table:style-name="ce61">
            <text:p><text:s/>1,14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4/5 Total</text:p>
          </table:table-cell>
          <table:table-cell table:style-name="ce72"/>
          <table:table-cell table:style-name="ce77"/>
          <table:table-cell office:value-type="float" office:value="2399.2280336527601" table:formula="of:=SUBTOTAL(9;[.E41:.E55])" table:style-name="ce43">
            <text:p><text:s/>2,399<text:s/></text:p>
          </table:table-cell>
          <table:table-cell office:value-type="float" office:value="2218.6316515121048" table:formula="of:=SUBTOTAL(9;[.F41:.F55])" table:style-name="ce43">
            <text:p><text:s/>2,219<text:s/></text:p>
          </table:table-cell>
          <table:table-cell office:value-type="float" office:value="1753.0185101832969" table:formula="of:=SUBTOTAL(9;[.G41:.G55])" table:style-name="ce43">
            <text:p><text:s/>1,753<text:s/></text:p>
          </table:table-cell>
          <table:table-cell office:value-type="float" office:value="2096.6623400247358" table:formula="of:=SUBTOTAL(9;[.H41:.H55])" table:style-name="ce43">
            <text:p><text:s/>2,097<text:s/></text:p>
          </table:table-cell>
          <table:table-cell office:value-type="float" office:value="8467.5405353728984" table:formula="of:=SUBTOTAL(9;[.I41:.I55])" table:style-name="ce74">
            <text:p><text:s/>8,46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5" table:number-columns-spanned="1" table:number-rows-spanned="16" table:style-name="ce347">
            <text:p>2005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2.5654599609375" table:style-name="ce78">
            <text:p><text:s/>3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2.5654599609375" table:formula="of:=SUM([.E58:.H58])" table:style-name="ce61">
            <text:p><text:s/>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59:.H59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01.14445106943" table:style-name="ce78">
            <text:p><text:s/>101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01.14445106943" table:formula="of:=SUM([.E60:.H60])" table:style-name="ce61">
            <text:p><text:s/>1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64"/>
          <table:table-cell office:value-type="float" office:value="103.70991103036751" table:formula="of:=SUBTOTAL(9;[.E58:.E60])" table:style-name="ce65">
            <text:p><text:s/>104<text:s/></text:p>
          </table:table-cell>
          <table:table-cell office:value-type="float" office:value="0" table:formula="of:=SUBTOTAL(9;[.F58:.F60])" table:style-name="ce65">
            <text:p><text:s/>-<text:s/></text:p>
          </table:table-cell>
          <table:table-cell office:value-type="float" office:value="0" table:formula="of:=SUBTOTAL(9;[.G58:.G60])" table:style-name="ce65">
            <text:p><text:s/>-<text:s/></text:p>
          </table:table-cell>
          <table:table-cell office:value-type="float" office:value="0" table:formula="of:=SUBTOTAL(9;[.H58:.H60])" table:style-name="ce65">
            <text:p><text:s/>-<text:s/></text:p>
          </table:table-cell>
          <table:table-cell office:value-type="float" office:value="103.70991103036751" table:formula="of:=SUBTOTAL(9;[.I58:.I60])" table:style-name="ce66">
            <text:p><text:s/>1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60.37421984589099" table:style-name="ce33">
            <text:p><text:s/>260<text:s/></text:p>
          </table:table-cell>
          <table:table-cell office:value-type="float" office:value="292.02282970088697" table:style-name="ce33">
            <text:p><text:s/>292<text:s/></text:p>
          </table:table-cell>
          <table:table-cell office:value-type="float" office:value="312.070770189315" table:style-name="ce33">
            <text:p><text:s/>312<text:s/></text:p>
          </table:table-cell>
          <table:table-cell office:value-type="float" office:value="336.93043473807001" table:style-name="ce33">
            <text:p><text:s/>337<text:s/></text:p>
          </table:table-cell>
          <table:table-cell office:value-type="float" office:value="1201.398254474163" table:formula="of:=SUM([.E62:.H62])" table:style-name="ce59">
            <text:p><text:s/>1,2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782.56826217707" table:style-name="ce33">
            <text:p><text:s/>1,783<text:s/></text:p>
          </table:table-cell>
          <table:table-cell office:value-type="float" office:value="555.22925255945302" table:style-name="ce33">
            <text:p><text:s/>555<text:s/></text:p>
          </table:table-cell>
          <table:table-cell office:value-type="float" office:value="691.45363111703796" table:style-name="ce33">
            <text:p><text:s/>691<text:s/></text:p>
          </table:table-cell>
          <table:table-cell office:value-type="float" office:value="1090.4566598854101" table:style-name="ce33">
            <text:p><text:s/>1,090<text:s/></text:p>
          </table:table-cell>
          <table:table-cell office:value-type="float" office:value="4119.7078057389708" table:formula="of:=SUM([.E63:.H63])" table:style-name="ce61">
            <text:p><text:s/>4,12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5.5126998133249" table:style-name="ce33">
            <text:p><text:s/>1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90.70791769886" table:style-name="ce33">
            <text:p><text:s/>191<text:s/></text:p>
          </table:table-cell>
          <table:table-cell office:value-type="float" office:value="38.9736272424757" table:style-name="ce33">
            <text:p><text:s/>39<text:s/></text:p>
          </table:table-cell>
          <table:table-cell office:value-type="float" office:value="245.19424475466059" table:formula="of:=SUM([.E64:.H64])" table:style-name="ce76">
            <text:p><text:s/>24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2058.4551818362861" table:formula="of:=SUBTOTAL(9;[.E62:.E64])" table:style-name="ce65">
            <text:p><text:s/>2,058<text:s/></text:p>
          </table:table-cell>
          <table:table-cell office:value-type="float" office:value="847.25208226033999" table:formula="of:=SUBTOTAL(9;[.F62:.F64])" table:style-name="ce65">
            <text:p><text:s/>847<text:s/></text:p>
          </table:table-cell>
          <table:table-cell office:value-type="float" office:value="1194.232319005213" table:formula="of:=SUBTOTAL(9;[.G62:.G64])" table:style-name="ce65">
            <text:p><text:s/>1,194<text:s/></text:p>
          </table:table-cell>
          <table:table-cell office:value-type="float" office:value="1466.3607218659558" table:formula="of:=SUBTOTAL(9;[.H62:.H64])" table:style-name="ce65">
            <text:p><text:s/>1,466<text:s/></text:p>
          </table:table-cell>
          <table:table-cell office:value-type="float" office:value="5566.3003049677945" table:formula="of:=SUBTOTAL(9;[.I62:.I64])" table:style-name="ce66">
            <text:p><text:s/>5,56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79.957930175781" table:style-name="ce33">
            <text:p><text:s/>180<text:s/></text:p>
          </table:table-cell>
          <table:table-cell office:value-type="float" office:value="490.69781931114198" table:style-name="ce33">
            <text:p><text:s/>491<text:s/></text:p>
          </table:table-cell>
          <table:table-cell office:value-type="float" office:value="218.494" table:style-name="ce33">
            <text:p><text:s/>218<text:s/></text:p>
          </table:table-cell>
          <table:table-cell office:value-type="float" office:value="122.419913520813" table:style-name="ce33">
            <text:p><text:s/>122<text:s/></text:p>
          </table:table-cell>
          <table:table-cell office:value-type="float" office:value="1011.569663007736" table:formula="of:=SUM([.E66:.H66])" table:style-name="ce61">
            <text:p><text:s/>1,0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9.236000000000001" table:style-name="ce33">
            <text:p><text:s/>1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.186" table:style-name="ce33">
            <text:p><text:s/>10<text:s/></text:p>
          </table:table-cell>
          <table:table-cell office:value-type="float" office:value="3.0000000000000001E-3" table:style-name="ce33">
            <text:p><text:s/>0<text:s/></text:p>
          </table:table-cell>
          <table:table-cell office:value-type="float" office:value="29.425000000000001" table:formula="of:=SUM([.E67:.H67])" table:style-name="ce61">
            <text:p><text:s/>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68:.H68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199.19393017578099" table:formula="of:=SUBTOTAL(9;[.E66:.E68])" table:style-name="ce65">
            <text:p><text:s/>199<text:s/></text:p>
          </table:table-cell>
          <table:table-cell office:value-type="float" office:value="490.69781931114198" table:formula="of:=SUBTOTAL(9;[.F66:.F68])" table:style-name="ce65">
            <text:p><text:s/>491<text:s/></text:p>
          </table:table-cell>
          <table:table-cell office:value-type="float" office:value="228.68" table:formula="of:=SUBTOTAL(9;[.G66:.G68])" table:style-name="ce65">
            <text:p><text:s/>229<text:s/></text:p>
          </table:table-cell>
          <table:table-cell office:value-type="float" office:value="122.422913520813" table:formula="of:=SUBTOTAL(9;[.H66:.H68])" table:style-name="ce65">
            <text:p><text:s/>122<text:s/></text:p>
          </table:table-cell>
          <table:table-cell office:value-type="float" office:value="1040.9946630077361" table:formula="of:=SUBTOTAL(9;[.I66:.I68])" table:style-name="ce66">
            <text:p><text:s/>1,0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51.356700000047603" table:style-name="ce33">
            <text:p><text:s/>51<text:s/></text:p>
          </table:table-cell>
          <table:table-cell office:value-type="float" office:value="1.3640000000000001" table:style-name="ce33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.0179999999999998" table:style-name="ce33">
            <text:p><text:s/>6<text:s/></text:p>
          </table:table-cell>
          <table:table-cell office:value-type="float" office:value="58.738700000047601" table:formula="of:=SUM([.E70:.H70])" table:style-name="ce61">
            <text:p><text:s/>5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434.05020184588398" table:style-name="ce33">
            <text:p><text:s/>434<text:s/></text:p>
          </table:table-cell>
          <table:table-cell office:value-type="float" office:value="631.29482031249995" table:style-name="ce33">
            <text:p><text:s/>631<text:s/></text:p>
          </table:table-cell>
          <table:table-cell office:value-type="float" office:value="5.2999999999999999E-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65.398022158384" table:formula="of:=SUM([.E71:.H71])" table:style-name="ce61">
            <text:p><text:s/>1,06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.54" table:style-name="ce33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6.337429999947499" table:style-name="ce33">
            <text:p><text:s/>16<text:s/></text:p>
          </table:table-cell>
          <table:table-cell office:value-type="float" office:value="16.877429999947498" table:formula="of:=SUM([.E72:.H72])" table:style-name="ce76">
            <text:p><text:s/>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64"/>
          <table:table-cell office:value-type="float" office:value="485.94690184593162" table:formula="of:=SUBTOTAL(9;[.E70:.E72])" table:style-name="ce65">
            <text:p><text:s/>486<text:s/></text:p>
          </table:table-cell>
          <table:table-cell office:value-type="float" office:value="632.65882031249998" table:formula="of:=SUBTOTAL(9;[.F70:.F72])" table:style-name="ce65">
            <text:p><text:s/>633<text:s/></text:p>
          </table:table-cell>
          <table:table-cell office:value-type="float" office:value="5.2999999999999999E-2" table:formula="of:=SUBTOTAL(9;[.G70:.G72])" table:style-name="ce65">
            <text:p><text:s/>0<text:s/></text:p>
          </table:table-cell>
          <table:table-cell office:value-type="float" office:value="22.3554299999475" table:formula="of:=SUBTOTAL(9;[.H70:.H72])" table:style-name="ce65">
            <text:p><text:s/>22<text:s/></text:p>
          </table:table-cell>
          <table:table-cell office:value-type="float" office:value="1141.0141521583791" table:formula="of:=SUBTOTAL(9;[.I70:.I72])" table:style-name="ce66">
            <text:p><text:s/>1,141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5 Total</text:p>
          </table:table-cell>
          <table:table-cell table:style-name="ce72"/>
          <table:table-cell table:style-name="ce77"/>
          <table:table-cell office:value-type="float" office:value="2847.3059248883656" table:formula="of:=SUBTOTAL(9;[.E58:.E72])" table:style-name="ce43">
            <text:p><text:s/>2,847<text:s/></text:p>
          </table:table-cell>
          <table:table-cell office:value-type="float" office:value="1970.6087218839818" table:formula="of:=SUBTOTAL(9;[.F58:.F72])" table:style-name="ce43">
            <text:p><text:s/>1,971<text:s/></text:p>
          </table:table-cell>
          <table:table-cell office:value-type="float" office:value="1422.9653190052129" table:formula="of:=SUBTOTAL(9;[.G58:.G72])" table:style-name="ce43">
            <text:p><text:s/>1,423<text:s/></text:p>
          </table:table-cell>
          <table:table-cell office:value-type="float" office:value="1611.1390653867163" table:formula="of:=SUBTOTAL(9;[.H58:.H72])" table:style-name="ce43">
            <text:p><text:s/>1,611<text:s/></text:p>
          </table:table-cell>
          <table:table-cell office:value-type="float" office:value="7852.0190311642773" table:formula="of:=SUBTOTAL(9;[.I58:.I72])" table:style-name="ce74">
            <text:p><text:s/>7,852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6" table:number-columns-spanned="1" table:number-rows-spanned="16" table:style-name="ce347">
            <text:p>2006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11.1047527103424" table:style-name="ce80">
            <text:p><text:s/>11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11.1047527103424" table:formula="of:=SUM([.E75:.H75])" table:style-name="ce61">
            <text:p><text:s/>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5.4717449665069501E-2" table:style-name="ce80">
            <text:p><text:s/>0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5.4717449665069501E-2" table:formula="of:=SUM([.E76:.H76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96.380867840707296" table:style-name="ce80">
            <text:p><text:s/>96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96.380867840707296" table:formula="of:=SUM([.E77:.H77])" table:style-name="ce61">
            <text:p><text:s/>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64"/>
          <table:table-cell office:value-type="float" office:value="107.54033800071477" table:formula="of:=SUBTOTAL(9;[.E75:.E77])" table:style-name="ce65">
            <text:p><text:s/>108<text:s/></text:p>
          </table:table-cell>
          <table:table-cell office:value-type="float" office:value="0" table:formula="of:=SUBTOTAL(9;[.F75:.F77])" table:style-name="ce65">
            <text:p><text:s/>-<text:s/></text:p>
          </table:table-cell>
          <table:table-cell office:value-type="float" office:value="0" table:formula="of:=SUBTOTAL(9;[.G75:.G77])" table:style-name="ce65">
            <text:p><text:s/>-<text:s/></text:p>
          </table:table-cell>
          <table:table-cell office:value-type="float" office:value="0" table:formula="of:=SUBTOTAL(9;[.H75:.H77])" table:style-name="ce65">
            <text:p><text:s/>-<text:s/></text:p>
          </table:table-cell>
          <table:table-cell office:value-type="float" office:value="107.54033800071477" table:formula="of:=SUBTOTAL(9;[.I75:.I77])" table:style-name="ce66">
            <text:p><text:s/>10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356.11486049243803" table:style-name="ce81">
            <text:p><text:s/>356<text:s/></text:p>
          </table:table-cell>
          <table:table-cell office:value-type="float" office:value="250.31450693018701" table:style-name="ce82">
            <text:p><text:s/>250<text:s/></text:p>
          </table:table-cell>
          <table:table-cell office:value-type="float" office:value="128.07261056494701" table:style-name="ce82">
            <text:p><text:s/>128<text:s/></text:p>
          </table:table-cell>
          <table:table-cell office:value-type="float" office:value="553.85760709452597" table:style-name="ce82">
            <text:p><text:s/>554<text:s/></text:p>
          </table:table-cell>
          <table:table-cell office:value-type="float" office:value="1288.359585082098" table:formula="of:=SUM([.E79:.H79])" table:style-name="ce59">
            <text:p><text:s/>1,28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551.8062972704299" table:style-name="ce83">
            <text:p><text:s/>1,552<text:s/></text:p>
          </table:table-cell>
          <table:table-cell office:value-type="float" office:value="338.160885608824" table:style-name="ce58">
            <text:p><text:s/>338<text:s/></text:p>
          </table:table-cell>
          <table:table-cell office:value-type="float" office:value="402.06935087794801" table:style-name="ce58">
            <text:p><text:s/>402<text:s/></text:p>
          </table:table-cell>
          <table:table-cell office:value-type="float" office:value="856.44949936878697" table:style-name="ce58">
            <text:p><text:s/>856<text:s/></text:p>
          </table:table-cell>
          <table:table-cell office:value-type="float" office:value="3148.4860331259888" table:formula="of:=SUM([.E80:.H80])" table:style-name="ce61">
            <text:p><text:s/>3,14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3.95435991895198" table:style-name="ce84">
            <text:p><text:s/>4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7.1463647988000796" table:style-name="ce85">
            <text:p><text:s/>7<text:s/></text:p>
          </table:table-cell>
          <table:table-cell office:value-type="float" office:value="11.10072471775206" table:formula="of:=SUM([.E81:.H81])" table:style-name="ce76">
            <text:p><text:s/>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1911.8755176818199" table:formula="of:=SUBTOTAL(9;[.E79:.E81])" table:style-name="ce65">
            <text:p><text:s/>1,912<text:s/></text:p>
          </table:table-cell>
          <table:table-cell office:value-type="float" office:value="588.47539253901095" table:formula="of:=SUBTOTAL(9;[.F79:.F81])" table:style-name="ce65">
            <text:p><text:s/>588<text:s/></text:p>
          </table:table-cell>
          <table:table-cell office:value-type="float" office:value="530.14196144289508" table:formula="of:=SUBTOTAL(9;[.G79:.G81])" table:style-name="ce65">
            <text:p><text:s/>530<text:s/></text:p>
          </table:table-cell>
          <table:table-cell office:value-type="float" office:value="1417.453471262113" table:formula="of:=SUBTOTAL(9;[.H79:.H81])" table:style-name="ce65">
            <text:p><text:s/>1,417<text:s/></text:p>
          </table:table-cell>
          <table:table-cell office:value-type="float" office:value="4447.9463429258385" table:formula="of:=SUBTOTAL(9;[.I79:.I81])" table:style-name="ce66">
            <text:p><text:s/>4,44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225.712150390625" table:style-name="ce81">
            <text:p><text:s/>226<text:s/></text:p>
          </table:table-cell>
          <table:table-cell office:value-type="float" office:value="640.85940935134897" table:style-name="ce82">
            <text:p><text:s/>641<text:s/></text:p>
          </table:table-cell>
          <table:table-cell office:value-type="float" office:value="269.89043339347802" table:style-name="ce82">
            <text:p><text:s/>270<text:s/></text:p>
          </table:table-cell>
          <table:table-cell office:value-type="float" office:value="157.923" table:style-name="ce86">
            <text:p><text:s/>158<text:s/></text:p>
          </table:table-cell>
          <table:table-cell office:value-type="float" office:value="1294.3849931354519" table:formula="of:=SUM([.E83:.H83])" table:style-name="ce61">
            <text:p><text:s/>1,2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4.178000000000001" table:style-name="ce83">
            <text:p><text:s/>1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6.93" table:style-name="ce58">
            <text:p><text:s/>17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31.108000000000001" table:formula="of:=SUM([.E84:.H84])" table:style-name="ce61">
            <text:p><text:s/>3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8">
            <text:p><text:s/>-<text:s/></text:p>
          </table:table-cell>
          <table:table-cell office:value-type="float" office:value="0" table:formula="of:=SUM([.E85:.H85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239.890150390625" table:formula="of:=SUBTOTAL(9;[.E83:.E85])" table:style-name="ce65">
            <text:p><text:s/>240<text:s/></text:p>
          </table:table-cell>
          <table:table-cell office:value-type="float" office:value="640.85940935134897" table:formula="of:=SUBTOTAL(9;[.F83:.F85])" table:style-name="ce65">
            <text:p><text:s/>641<text:s/></text:p>
          </table:table-cell>
          <table:table-cell office:value-type="float" office:value="286.82043339347803" table:formula="of:=SUBTOTAL(9;[.G83:.G85])" table:style-name="ce65">
            <text:p><text:s/>287<text:s/></text:p>
          </table:table-cell>
          <table:table-cell office:value-type="float" office:value="157.923" table:formula="of:=SUBTOTAL(9;[.H83:.H85])" table:style-name="ce65">
            <text:p><text:s/>158<text:s/></text:p>
          </table:table-cell>
          <table:table-cell office:value-type="float" office:value="1325.4929931354518" table:formula="of:=SUBTOTAL(9;[.I83:.I85])" table:style-name="ce66">
            <text:p><text:s/>1,32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51.786611846923797" table:style-name="ce58">
            <text:p><text:s/>52<text:s/></text:p>
          </table:table-cell>
          <table:table-cell office:value-type="float" office:value="0.54200000000000004" table:style-name="ce58">
            <text:p><text:s/>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7876000976562501" table:style-name="ce58">
            <text:p><text:s/>2<text:s/></text:p>
          </table:table-cell>
          <table:table-cell office:value-type="float" office:value="54.116211944580051" table:formula="of:=SUM([.E87:.H87])" table:style-name="ce61">
            <text:p><text:s/>5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23.50440800783002" table:style-name="ce58">
            <text:p><text:s/>324<text:s/></text:p>
          </table:table-cell>
          <table:table-cell office:value-type="float" office:value="532.726" table:style-name="ce58">
            <text:p><text:s/>53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56.23040800782996" table:formula="of:=SUM([.E88:.H88])" table:style-name="ce61">
            <text:p><text:s/>8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2648000717163E-2" table:style-name="ce58">
            <text:p><text:s/>0<text:s/></text:p>
          </table:table-cell>
          <table:table-cell office:value-type="float" office:value="1.2648000717163E-2" table:formula="of:=SUM([.E89:.H89])" table:style-name="ce76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64"/>
          <table:table-cell office:value-type="float" office:value="375.29101985475381" table:formula="of:=SUBTOTAL(9;[.E87:.E89])" table:style-name="ce65">
            <text:p><text:s/>375<text:s/></text:p>
          </table:table-cell>
          <table:table-cell office:value-type="float" office:value="533.26800000000003" table:formula="of:=SUBTOTAL(9;[.F87:.F89])" table:style-name="ce65">
            <text:p><text:s/>533<text:s/></text:p>
          </table:table-cell>
          <table:table-cell office:value-type="float" office:value="0" table:formula="of:=SUBTOTAL(9;[.G87:.G89])" table:style-name="ce65">
            <text:p><text:s/>-<text:s/></text:p>
          </table:table-cell>
          <table:table-cell office:value-type="float" office:value="1.800248098373413" table:formula="of:=SUBTOTAL(9;[.H87:.H89])" table:style-name="ce65">
            <text:p><text:s/>2<text:s/></text:p>
          </table:table-cell>
          <table:table-cell office:value-type="float" office:value="910.35926795312719" table:formula="of:=SUBTOTAL(9;[.I87:.I89])" table:style-name="ce66">
            <text:p><text:s/>91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6 Total</text:p>
          </table:table-cell>
          <table:table-cell table:style-name="ce72"/>
          <table:table-cell table:style-name="ce77"/>
          <table:table-cell office:value-type="float" office:value="2634.5970259279134" table:formula="of:=SUBTOTAL(9;[.E75:.E89])" table:style-name="ce43">
            <text:p><text:s/>2,635<text:s/></text:p>
          </table:table-cell>
          <table:table-cell office:value-type="float" office:value="1762.6028018903598" table:formula="of:=SUBTOTAL(9;[.F75:.F89])" table:style-name="ce43">
            <text:p><text:s/>1,763<text:s/></text:p>
          </table:table-cell>
          <table:table-cell office:value-type="float" office:value="816.96239483637305" table:formula="of:=SUBTOTAL(9;[.G75:.G89])" table:style-name="ce43">
            <text:p><text:s/>817<text:s/></text:p>
          </table:table-cell>
          <table:table-cell office:value-type="float" office:value="1577.1767193604865" table:formula="of:=SUBTOTAL(9;[.H75:.H89])" table:style-name="ce43">
            <text:p><text:s/>1,577<text:s/></text:p>
          </table:table-cell>
          <table:table-cell office:value-type="float" office:value="6791.3389420151334" table:formula="of:=SUBTOTAL(9;[.I75:.I89])" table:style-name="ce74">
            <text:p><text:s/>6,79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7" table:number-columns-spanned="1" table:number-rows-spanned="16" table:style-name="ce347">
            <text:p>2007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2.6414800109863283" table:style-name="ce89">
            <text:p><text:s/>3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2.6414800109863283" table:formula="of:=SUM([.E92:.H92])" table:style-name="ce61">
            <text:p><text:s/>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93:.H93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55.6979441929711" table:style-name="ce89">
            <text:p><text:s/>56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55.6979441929711" table:formula="of:=SUM([.E94:.H94])" table:style-name="ce61">
            <text:p><text:s/>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58.339424203957428" table:formula="of:=SUM([.E92:.E94])" table:style-name="ce65">
            <text:p><text:s/>58<text:s/></text:p>
          </table:table-cell>
          <table:table-cell office:value-type="float" office:value="0" table:formula="of:=SUM([.F92:.F94])" table:style-name="ce65">
            <text:p><text:s/>-<text:s/></text:p>
          </table:table-cell>
          <table:table-cell office:value-type="float" office:value="0" table:formula="of:=SUM([.G92:.G94])" table:style-name="ce65">
            <text:p><text:s/>-<text:s/></text:p>
          </table:table-cell>
          <table:table-cell office:value-type="float" office:value="0" table:formula="of:=SUM([.H92:.H94])" table:style-name="ce65">
            <text:p><text:s/>-<text:s/></text:p>
          </table:table-cell>
          <table:table-cell office:value-type="float" office:value="58.339424203957428" table:formula="of:=SUM([.I92:.I94])" table:style-name="ce66">
            <text:p><text:s/>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53.73209159999999" table:style-name="ce58">
            <text:p><text:s/>154<text:s/></text:p>
          </table:table-cell>
          <table:table-cell office:value-type="float" office:value="239.85126042127609" table:style-name="ce58">
            <text:p><text:s/>240<text:s/></text:p>
          </table:table-cell>
          <table:table-cell office:value-type="float" office:value="86.503944003582006" table:style-name="ce58">
            <text:p><text:s/>87<text:s/></text:p>
          </table:table-cell>
          <table:table-cell office:value-type="float" office:value="361.56091744704543" table:style-name="ce58">
            <text:p><text:s/>362<text:s/></text:p>
          </table:table-cell>
          <table:table-cell office:value-type="float" office:value="841.64821347190355" table:formula="of:=SUM([.E96:.H96])" table:style-name="ce61">
            <text:p><text:s/>84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848.49061871545018" table:style-name="ce58">
            <text:p><text:s/>848<text:s/></text:p>
          </table:table-cell>
          <table:table-cell office:value-type="float" office:value="530.99064469823804" table:style-name="ce58">
            <text:p><text:s/>531<text:s/></text:p>
          </table:table-cell>
          <table:table-cell office:value-type="float" office:value="367.63634082362802" table:style-name="ce58">
            <text:p><text:s/>368<text:s/></text:p>
          </table:table-cell>
          <table:table-cell office:value-type="float" office:value="1237.9526482430399" table:style-name="ce58">
            <text:p><text:s/>1,238<text:s/></text:p>
          </table:table-cell>
          <table:table-cell office:value-type="float" office:value="2985.0702524803564" table:formula="of:=SUM([.E97:.H97])" table:style-name="ce61">
            <text:p><text:s/>2,9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3.6949700237512588" table:style-name="ce58">
            <text:p><text:s/>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9.536468994919211" table:style-name="ce58">
            <text:p><text:s/>20<text:s/></text:p>
          </table:table-cell>
          <table:table-cell office:value-type="float" office:value="23.231439018670471" table:formula="of:=SUM([.E98:.H98])" table:style-name="ce61">
            <text:p><text:s/>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1005.9176803392014" table:formula="of:=SUM([.E96:.E98])" table:style-name="ce65">
            <text:p><text:s/>1,006<text:s/></text:p>
          </table:table-cell>
          <table:table-cell office:value-type="float" office:value="770.84190511951419" table:formula="of:=SUM([.F96:.F98])" table:style-name="ce65">
            <text:p><text:s/>771<text:s/></text:p>
          </table:table-cell>
          <table:table-cell office:value-type="float" office:value="454.14028482721005" table:formula="of:=SUM([.G96:.G98])" table:style-name="ce65">
            <text:p><text:s/>454<text:s/></text:p>
          </table:table-cell>
          <table:table-cell office:value-type="float" office:value="1619.0500346850044" table:formula="of:=SUM([.H96:.H98])" table:style-name="ce65">
            <text:p><text:s/>1,619<text:s/></text:p>
          </table:table-cell>
          <table:table-cell office:value-type="float" office:value="3849.9499049709302" table:formula="of:=SUM([.I96:.I98])" table:style-name="ce66">
            <text:p><text:s/>3,85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210.48400000000001" table:style-name="ce58">
            <text:p><text:s/>210<text:s/></text:p>
          </table:table-cell>
          <table:table-cell office:value-type="float" office:value="767.23148291969301" table:style-name="ce58">
            <text:p><text:s/>767<text:s/></text:p>
          </table:table-cell>
          <table:table-cell office:value-type="float" office:value="76.828430077552795" table:style-name="ce58">
            <text:p><text:s/>77<text:s/></text:p>
          </table:table-cell>
          <table:table-cell office:value-type="float" office:value="113.54519677734375" table:style-name="ce58">
            <text:p><text:s/>114<text:s/></text:p>
          </table:table-cell>
          <table:table-cell office:value-type="float" office:value="1168.0891097745896" table:formula="of:=SUM([.E100:.H100])" table:style-name="ce61">
            <text:p><text:s/>1,1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2.417970703125" table:style-name="ce58">
            <text:p><text:s/>32<text:s/></text:p>
          </table:table-cell>
          <table:table-cell office:value-type="float" office:value="1.0380745925903321" table:style-name="ce58">
            <text:p><text:s/>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.964" table:style-name="ce58">
            <text:p><text:s/>3<text:s/></text:p>
          </table:table-cell>
          <table:table-cell office:value-type="float" office:value="36.420045295715333" table:formula="of:=SUM([.E101:.H101])" table:style-name="ce61">
            <text:p><text:s/>3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02:.H102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242.90197070312502" table:formula="of:=SUM([.E100:.E102])" table:style-name="ce65">
            <text:p><text:s/>243<text:s/></text:p>
          </table:table-cell>
          <table:table-cell office:value-type="float" office:value="768.26955751228331" table:formula="of:=SUM([.F100:.F102])" table:style-name="ce65">
            <text:p><text:s/>768<text:s/></text:p>
          </table:table-cell>
          <table:table-cell office:value-type="float" office:value="76.828430077552795" table:formula="of:=SUM([.G100:.G102])" table:style-name="ce65">
            <text:p><text:s/>77<text:s/></text:p>
          </table:table-cell>
          <table:table-cell office:value-type="float" office:value="116.50919677734375" table:formula="of:=SUM([.H100:.H102])" table:style-name="ce65">
            <text:p><text:s/>117<text:s/></text:p>
          </table:table-cell>
          <table:table-cell office:value-type="float" office:value="1204.5091550703048" table:formula="of:=SUM([.I100:.I102])" table:style-name="ce66">
            <text:p><text:s/>1,20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.36799999999999999" table:style-name="ce58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.500000119209289E-4" table:style-name="ce58">
            <text:p><text:s/>0<text:s/></text:p>
          </table:table-cell>
          <table:table-cell office:value-type="float" office:value="1.1297100458145142" table:style-name="ce58">
            <text:p><text:s/>1<text:s/></text:p>
          </table:table-cell>
          <table:table-cell office:value-type="float" office:value="1.498260045826435" table:formula="of:=SUM([.E104:.H104])" table:style-name="ce61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26.19276489257811" table:style-name="ce58">
            <text:p><text:s/>326<text:s/></text:p>
          </table:table-cell>
          <table:table-cell office:value-type="float" office:value="498.23303906249998" table:style-name="ce58">
            <text:p><text:s/>498<text:s/></text:p>
          </table:table-cell>
          <table:table-cell office:value-type="float" office:value="5.9774499855041503" table:style-name="ce58">
            <text:p><text:s/>6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30.4032539405822" table:formula="of:=SUM([.E105:.H105])" table:style-name="ce61">
            <text:p><text:s/>83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.8150002330541612E-2" table:style-name="ce58">
            <text:p><text:s/>0<text:s/></text:p>
          </table:table-cell>
          <table:table-cell office:value-type="float" office:value="4.8150002330541612E-2" table:formula="of:=SUM([.E106:.H106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326.56076489257811" table:formula="of:=SUM([.E104:.E106])" table:style-name="ce65">
            <text:p><text:s/>327<text:s/></text:p>
          </table:table-cell>
          <table:table-cell office:value-type="float" office:value="498.23303906249998" table:formula="of:=SUM([.F104:.F106])" table:style-name="ce65">
            <text:p><text:s/>498<text:s/></text:p>
          </table:table-cell>
          <table:table-cell office:value-type="float" office:value="5.977999985516071" table:formula="of:=SUM([.G104:.G106])" table:style-name="ce65">
            <text:p><text:s/>6<text:s/></text:p>
          </table:table-cell>
          <table:table-cell office:value-type="float" office:value="1.1778600481450558" table:formula="of:=SUM([.H104:.H106])" table:style-name="ce65">
            <text:p><text:s/>1<text:s/></text:p>
          </table:table-cell>
          <table:table-cell office:value-type="float" office:value="831.94966398873919" table:formula="of:=SUM([.I104:.I106])" table:style-name="ce66">
            <text:p><text:s/>83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7 Total</text:p>
          </table:table-cell>
          <table:table-cell table:style-name="ce72"/>
          <table:table-cell table:style-name="ce77"/>
          <table:table-cell office:value-type="float" office:value="1633.7198401388621" table:formula="of:=+[.E107]+[.E103]+[.E99]+[.E95]" table:style-name="ce43">
            <text:p><text:s/>1,634<text:s/></text:p>
          </table:table-cell>
          <table:table-cell office:value-type="float" office:value="2037.3445016942974" table:formula="of:=+[.F107]+[.F103]+[.F99]+[.F95]" table:style-name="ce43">
            <text:p><text:s/>2,037<text:s/></text:p>
          </table:table-cell>
          <table:table-cell office:value-type="float" office:value="536.94671489027894" table:formula="of:=+[.G107]+[.G103]+[.G99]+[.G95]" table:style-name="ce43">
            <text:p><text:s/>537<text:s/></text:p>
          </table:table-cell>
          <table:table-cell office:value-type="float" office:value="1736.7370915104932" table:formula="of:=+[.H107]+[.H103]+[.H99]+[.H95]" table:style-name="ce43">
            <text:p><text:s/>1,737<text:s/></text:p>
          </table:table-cell>
          <table:table-cell office:value-type="float" office:value="5944.7481482339317" table:formula="of:=+[.I107]+[.I103]+[.I99]+[.I95]" table:style-name="ce74">
            <text:p><text:s/>5,94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8" table:number-columns-spanned="1" table:number-rows-spanned="16" table:style-name="ce347">
            <text:p>2008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46.902460148811343" table:style-name="ce89">
            <text:p><text:s/>47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46.902460148811343" table:formula="of:=SUM([.E109:.H109])" table:style-name="ce61">
            <text:p><text:s/>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110:.H110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43.735760065719489" table:style-name="ce89">
            <text:p><text:s/>44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43.735760065719489" table:formula="of:=SUM([.E111:.H111])" table:style-name="ce61">
            <text:p><text:s/>4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90.638220214530833" table:formula="of:=SUM([.E109:.E111])" table:style-name="ce65">
            <text:p><text:s/>91<text:s/></text:p>
          </table:table-cell>
          <table:table-cell office:value-type="float" office:value="0" table:formula="of:=SUM([.F109:.F111])" table:style-name="ce65">
            <text:p><text:s/>-<text:s/></text:p>
          </table:table-cell>
          <table:table-cell office:value-type="float" office:value="0" table:formula="of:=SUM([.G109:.G111])" table:style-name="ce65">
            <text:p><text:s/>-<text:s/></text:p>
          </table:table-cell>
          <table:table-cell office:value-type="float" office:value="0" table:formula="of:=SUM([.H109:.H111])" table:style-name="ce65">
            <text:p><text:s/>-<text:s/></text:p>
          </table:table-cell>
          <table:table-cell office:value-type="float" office:value="90.638220214530833" table:formula="of:=SUM([.I109:.I111])" table:style-name="ce66">
            <text:p><text:s/>9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41.02908870437741" table:style-name="ce58">
            <text:p><text:s/>141<text:s/></text:p>
          </table:table-cell>
          <table:table-cell office:value-type="float" office:value="334.98911184620857" table:style-name="ce58">
            <text:p><text:s/>335<text:s/></text:p>
          </table:table-cell>
          <table:table-cell office:value-type="float" office:value="145.50018057763577" table:style-name="ce58">
            <text:p><text:s/>146<text:s/></text:p>
          </table:table-cell>
          <table:table-cell office:value-type="float" office:value="412.82937426736953" table:style-name="ce58">
            <text:p><text:s/>413<text:s/></text:p>
          </table:table-cell>
          <table:table-cell office:value-type="float" office:value="1034.3477553955913" table:formula="of:=SUM([.E113:.H113])" table:style-name="ce61">
            <text:p><text:s/>1,0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078.6011138129495" table:style-name="ce58">
            <text:p><text:s/>1,079<text:s/></text:p>
          </table:table-cell>
          <table:table-cell office:value-type="float" office:value="411.40681245708487" table:style-name="ce58">
            <text:p><text:s/>411<text:s/></text:p>
          </table:table-cell>
          <table:table-cell office:value-type="float" office:value="811.06535863512011" table:style-name="ce58">
            <text:p><text:s/>811<text:s/></text:p>
          </table:table-cell>
          <table:table-cell office:value-type="float" office:value="1193.8437047637849" table:style-name="ce58">
            <text:p><text:s/>1,194<text:s/></text:p>
          </table:table-cell>
          <table:table-cell office:value-type="float" office:value="3494.9169896689396" table:formula="of:=SUM([.E114:.H114])" table:style-name="ce61">
            <text:p><text:s/>3,4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4.0902688449621198" table:style-name="ce58">
            <text:p><text:s/>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0.064829951792955" table:style-name="ce58">
            <text:p><text:s/>10<text:s/></text:p>
          </table:table-cell>
          <table:table-cell office:value-type="float" office:value="14.155098796755075" table:formula="of:=SUM([.E115:.H115])" table:style-name="ce61">
            <text:p><text:s/>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1223.7204713622891" table:formula="of:=SUM([.E113:.E115])" table:style-name="ce65">
            <text:p><text:s/>1,224<text:s/></text:p>
          </table:table-cell>
          <table:table-cell office:value-type="float" office:value="746.39592430329344" table:formula="of:=SUM([.F113:.F115])" table:style-name="ce65">
            <text:p><text:s/>746<text:s/></text:p>
          </table:table-cell>
          <table:table-cell office:value-type="float" office:value="956.56553921275588" table:formula="of:=SUM([.G113:.G115])" table:style-name="ce65">
            <text:p><text:s/>957<text:s/></text:p>
          </table:table-cell>
          <table:table-cell office:value-type="float" office:value="1616.7379089829474" table:formula="of:=SUM([.H113:.H115])" table:style-name="ce65">
            <text:p><text:s/>1,617<text:s/></text:p>
          </table:table-cell>
          <table:table-cell office:value-type="float" office:value="4543.4198438612857" table:formula="of:=SUM([.I113:.I115])" table:style-name="ce66">
            <text:p><text:s/>4,5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97.09211096954346" table:style-name="ce58">
            <text:p><text:s/>197<text:s/></text:p>
          </table:table-cell>
          <table:table-cell office:value-type="float" office:value="294.20612847518919" table:style-name="ce58">
            <text:p><text:s/>294<text:s/></text:p>
          </table:table-cell>
          <table:table-cell office:value-type="float" office:value="181.33216931152344" table:style-name="ce58">
            <text:p><text:s/>181<text:s/></text:p>
          </table:table-cell>
          <table:table-cell office:value-type="float" office:value="179.09900708007814" table:style-name="ce58">
            <text:p><text:s/>179<text:s/></text:p>
          </table:table-cell>
          <table:table-cell office:value-type="float" office:value="851.72941583633428" table:formula="of:=SUM([.E117:.H117])" table:style-name="ce61">
            <text:p><text:s/>85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8.7989999999999995" table:style-name="ce58">
            <text:p><text:s/>9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.4374246826171877" table:style-name="ce58">
            <text:p><text:s/>2<text:s/></text:p>
          </table:table-cell>
          <table:table-cell office:value-type="float" office:value="11.236424682617187" table:formula="of:=SUM([.E118:.H118])" table:style-name="ce61">
            <text:p><text:s/>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9.0000003576278683E-5" table:style-name="ce58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9.0000003576278683E-5" table:formula="of:=SUM([.E119:.H119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205.89120096954704" table:formula="of:=SUM([.E117:.E119])" table:style-name="ce65">
            <text:p><text:s/>206<text:s/></text:p>
          </table:table-cell>
          <table:table-cell office:value-type="float" office:value="294.20612847518919" table:formula="of:=SUM([.F117:.F119])" table:style-name="ce65">
            <text:p><text:s/>294<text:s/></text:p>
          </table:table-cell>
          <table:table-cell office:value-type="float" office:value="181.33216931152344" table:formula="of:=SUM([.G117:.G119])" table:style-name="ce65">
            <text:p><text:s/>181<text:s/></text:p>
          </table:table-cell>
          <table:table-cell office:value-type="float" office:value="181.53643176269532" table:formula="of:=SUM([.H117:.H119])" table:style-name="ce65">
            <text:p><text:s/>182<text:s/></text:p>
          </table:table-cell>
          <table:table-cell office:value-type="float" office:value="862.96593051895502" table:formula="of:=SUM([.I117:.I119])" table:style-name="ce66">
            <text:p><text:s/>8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1.3440000000000001" table:style-name="ce58">
            <text:p><text:s/>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64345000922679896" table:style-name="ce58">
            <text:p><text:s/>1<text:s/></text:p>
          </table:table-cell>
          <table:table-cell office:value-type="float" office:value="2.8927231225967409" table:style-name="ce58">
            <text:p><text:s/>3<text:s/></text:p>
          </table:table-cell>
          <table:table-cell office:value-type="float" office:value="4.8801731318235397" table:formula="of:=SUM([.E121:.H121])" table:style-name="ce61">
            <text:p><text:s/>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02.40658007812499" table:style-name="ce58">
            <text:p><text:s/>202<text:s/></text:p>
          </table:table-cell>
          <table:table-cell office:value-type="float" office:value="946.05425000000002" table:style-name="ce58">
            <text:p><text:s/>946<text:s/></text:p>
          </table:table-cell>
          <table:table-cell office:value-type="float" office:value="29.693290149398148" table:style-name="ce58">
            <text:p><text:s/>3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178.1541202275232" table:formula="of:=SUM([.E122:.H122])" table:style-name="ce61">
            <text:p><text:s/>1,17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6.867000305652618E-2" table:style-name="ce58">
            <text:p><text:s/>0<text:s/></text:p>
          </table:table-cell>
          <table:table-cell office:value-type="float" office:value="6.867000305652618E-2" table:formula="of:=SUM([.E123:.H123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203.75058007812498" table:formula="of:=SUM([.E121:.E123])" table:style-name="ce65">
            <text:p><text:s/>204<text:s/></text:p>
          </table:table-cell>
          <table:table-cell office:value-type="float" office:value="946.05425000000002" table:formula="of:=SUM([.F121:.F123])" table:style-name="ce65">
            <text:p><text:s/>946<text:s/></text:p>
          </table:table-cell>
          <table:table-cell office:value-type="float" office:value="30.336740158624949" table:formula="of:=SUM([.G121:.G123])" table:style-name="ce65">
            <text:p><text:s/>30<text:s/></text:p>
          </table:table-cell>
          <table:table-cell office:value-type="float" office:value="2.9613931256532671" table:formula="of:=SUM([.H121:.H123])" table:style-name="ce65">
            <text:p><text:s/>3<text:s/></text:p>
          </table:table-cell>
          <table:table-cell office:value-type="float" office:value="1183.1029633624032" table:formula="of:=SUM([.I121:.I123])" table:style-name="ce66">
            <text:p><text:s/>1,183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8 Total</text:p>
          </table:table-cell>
          <table:table-cell table:style-name="ce72"/>
          <table:table-cell table:style-name="ce77"/>
          <table:table-cell office:value-type="float" office:value="1724.0004726244917" table:formula="of:=+[.E124]+[.E120]+[.E116]+[.E112]" table:style-name="ce43">
            <text:p><text:s/>1,724<text:s/></text:p>
          </table:table-cell>
          <table:table-cell office:value-type="float" office:value="1986.6563027784825" table:formula="of:=+[.F124]+[.F120]+[.F116]+[.F112]" table:style-name="ce43">
            <text:p><text:s/>1,987<text:s/></text:p>
          </table:table-cell>
          <table:table-cell office:value-type="float" office:value="1168.2344486829043" table:formula="of:=+[.G124]+[.G120]+[.G116]+[.G112]" table:style-name="ce43">
            <text:p><text:s/>1,168<text:s/></text:p>
          </table:table-cell>
          <table:table-cell office:value-type="float" office:value="1801.2357338712959" table:formula="of:=+[.H124]+[.H120]+[.H116]+[.H112]" table:style-name="ce43">
            <text:p><text:s/>1,801<text:s/></text:p>
          </table:table-cell>
          <table:table-cell office:value-type="float" office:value="6680.1269579571745" table:formula="of:=+[.I124]+[.I120]+[.I116]+[.I112]" table:style-name="ce74">
            <text:p><text:s/>6,680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9" table:number-columns-spanned="1" table:number-rows-spanned="16" table:style-name="ce347">
            <text:p>2009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24.427209999999999" table:style-name="ce89">
            <text:p><text:s/>24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24.427209999999999" table:formula="of:=SUM([.E126:.H126])" table:style-name="ce61">
            <text:p><text:s/>2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127:.H127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32.728439999999992" table:style-name="ce89">
            <text:p><text:s/>33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32.728439999999992" table:formula="of:=SUM([.E128:.H128])" table:style-name="ce61">
            <text:p><text:s/>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57.155649999999994" table:formula="of:=SUM([.E126:.E128])" table:style-name="ce65">
            <text:p><text:s/>57<text:s/></text:p>
          </table:table-cell>
          <table:table-cell office:value-type="float" office:value="0" table:formula="of:=SUM([.F126:.F128])" table:style-name="ce65">
            <text:p><text:s/>-<text:s/></text:p>
          </table:table-cell>
          <table:table-cell office:value-type="float" office:value="0" table:formula="of:=SUM([.G126:.G128])" table:style-name="ce65">
            <text:p><text:s/>-<text:s/></text:p>
          </table:table-cell>
          <table:table-cell office:value-type="float" office:value="0" table:formula="of:=SUM([.H126:.H128])" table:style-name="ce65">
            <text:p><text:s/>-<text:s/></text:p>
          </table:table-cell>
          <table:table-cell office:value-type="float" office:value="57.155649999999994" table:formula="of:=SUM([.I126:.I128])" table:style-name="ce66">
            <text:p><text:s/>5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87.489110000000025" table:style-name="ce58">
            <text:p><text:s/>87<text:s/></text:p>
          </table:table-cell>
          <table:table-cell office:value-type="float" office:value="222.27046999999999" table:style-name="ce58">
            <text:p><text:s/>222<text:s/></text:p>
          </table:table-cell>
          <table:table-cell office:value-type="float" office:value="157.21755999999999" table:style-name="ce58">
            <text:p><text:s/>157<text:s/></text:p>
          </table:table-cell>
          <table:table-cell office:value-type="float" office:value="218.07309000000004" table:style-name="ce58">
            <text:p><text:s/>218<text:s/></text:p>
          </table:table-cell>
          <table:table-cell office:value-type="float" office:value="685.05023000000006" table:formula="of:=SUM([.E130:.H130])" table:style-name="ce61">
            <text:p><text:s/>6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906.55260000000021" table:style-name="ce58">
            <text:p><text:s/>907<text:s/></text:p>
          </table:table-cell>
          <table:table-cell office:value-type="float" office:value="389.04816999999997" table:style-name="ce58">
            <text:p><text:s/>389<text:s/></text:p>
          </table:table-cell>
          <table:table-cell office:value-type="float" office:value="605.05511000000024" table:style-name="ce58">
            <text:p><text:s/>605<text:s/></text:p>
          </table:table-cell>
          <table:table-cell office:value-type="float" office:value="855.62117999999964" table:style-name="ce58">
            <text:p><text:s/>856<text:s/></text:p>
          </table:table-cell>
          <table:table-cell office:value-type="float" office:value="2756.2770600000003" table:formula="of:=SUM([.E131:.H131])" table:style-name="ce61">
            <text:p><text:s/>2,7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2.0920000000000001E-2" table:style-name="ce58">
            <text:p><text:s/>0<text:s/></text:p>
          </table:table-cell>
          <table:table-cell office:value-type="float" office:value="1.4500000000000001E-2" table:style-name="ce58">
            <text:p><text:s/>0<text:s/></text:p>
          </table:table-cell>
          <table:table-cell office:value-type="string" table:style-name="ce58">
            <text:p>-</text:p>
          </table:table-cell>
          <table:table-cell office:value-type="float" office:value="1.17876" table:style-name="ce58">
            <text:p><text:s/>1<text:s/></text:p>
          </table:table-cell>
          <table:table-cell office:value-type="float" office:value="1.21418" table:formula="of:=SUM([.E132:.H132])" table:style-name="ce61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994.06263000000024" table:formula="of:=SUM([.E130:.E132])" table:style-name="ce65">
            <text:p><text:s/>994<text:s/></text:p>
          </table:table-cell>
          <table:table-cell office:value-type="float" office:value="611.33313999999996" table:formula="of:=SUM([.F130:.F132])" table:style-name="ce65">
            <text:p><text:s/>611<text:s/></text:p>
          </table:table-cell>
          <table:table-cell office:value-type="float" office:value="762.27267000000029" table:formula="of:=SUM([.G130:.G132])" table:style-name="ce65">
            <text:p><text:s/>762<text:s/></text:p>
          </table:table-cell>
          <table:table-cell office:value-type="float" office:value="1074.8730299999997" table:formula="of:=SUM([.H130:.H132])" table:style-name="ce65">
            <text:p><text:s/>1,075<text:s/></text:p>
          </table:table-cell>
          <table:table-cell office:value-type="float" office:value="3442.5414700000001" table:formula="of:=SUM([.I130:.I132])" table:style-name="ce66">
            <text:p><text:s/>3,4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40.56700000000001" table:style-name="ce58">
            <text:p><text:s/>141<text:s/></text:p>
          </table:table-cell>
          <table:table-cell office:value-type="float" office:value="122.00203" table:style-name="ce58">
            <text:p><text:s/>122<text:s/></text:p>
          </table:table-cell>
          <table:table-cell office:value-type="float" office:value="517.89656999999988" table:style-name="ce58">
            <text:p><text:s/>518<text:s/></text:p>
          </table:table-cell>
          <table:table-cell office:value-type="float" office:value="337.95143999999993" table:style-name="ce58">
            <text:p><text:s/>338<text:s/></text:p>
          </table:table-cell>
          <table:table-cell office:value-type="float" office:value="1118.4170399999998" table:formula="of:=SUM([.E134:.H134])" table:style-name="ce61">
            <text:p><text:s/>1,1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6.585450000000002" table:style-name="ce58">
            <text:p><text:s/>17<text:s/></text:p>
          </table:table-cell>
          <table:table-cell office:value-type="float" office:value="0.88014999999999999" table:style-name="ce58">
            <text:p><text:s/>1<text:s/></text:p>
          </table:table-cell>
          <table:table-cell office:value-type="float" office:value="0.93500000000000005" table:style-name="ce58">
            <text:p><text:s/>1<text:s/></text:p>
          </table:table-cell>
          <table:table-cell office:value-type="float" office:value="0.23" table:style-name="ce58">
            <text:p><text:s/>0<text:s/></text:p>
          </table:table-cell>
          <table:table-cell office:value-type="float" office:value="18.630600000000001" table:formula="of:=SUM([.E135:.H135])" table:style-name="ce61">
            <text:p><text:s/>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9.0000003576278683E-5" table:style-name="ce58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9.0000003576278683E-5" table:formula="of:=SUM([.E136:.H136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157.1525400000036" table:formula="of:=SUM([.E134:.E136])" table:style-name="ce65">
            <text:p><text:s/>157<text:s/></text:p>
          </table:table-cell>
          <table:table-cell office:value-type="float" office:value="122.88218000000001" table:formula="of:=SUM([.F134:.F136])" table:style-name="ce65">
            <text:p><text:s/>123<text:s/></text:p>
          </table:table-cell>
          <table:table-cell office:value-type="float" office:value="518.83156999999983" table:formula="of:=SUM([.G134:.G136])" table:style-name="ce65">
            <text:p><text:s/>519<text:s/></text:p>
          </table:table-cell>
          <table:table-cell office:value-type="float" office:value="338.18143999999995" table:formula="of:=SUM([.H134:.H136])" table:style-name="ce65">
            <text:p><text:s/>338<text:s/></text:p>
          </table:table-cell>
          <table:table-cell office:value-type="float" office:value="1137.0477300000034" table:formula="of:=SUM([.I134:.I136])" table:style-name="ce66">
            <text:p><text:s/>1,13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2.7532000000000001" table:style-name="ce58">
            <text:p><text:s/>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11141" table:style-name="ce58">
            <text:p><text:s/>1<text:s/></text:p>
          </table:table-cell>
          <table:table-cell office:value-type="float" office:value="36.016040000000004" table:style-name="ce58">
            <text:p><text:s/>36<text:s/></text:p>
          </table:table-cell>
          <table:table-cell office:value-type="float" office:value="39.880650000000003" table:formula="of:=SUM([.E138:.H138])" table:style-name="ce61">
            <text:p><text:s/>4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57.99325000000002" table:style-name="ce58">
            <text:p><text:s/>158<text:s/></text:p>
          </table:table-cell>
          <table:table-cell office:value-type="float" office:value="921.23468000000003" table:style-name="ce58">
            <text:p><text:s/>921<text:s/></text:p>
          </table:table-cell>
          <table:table-cell office:value-type="float" office:value="17.506040000000002" table:style-name="ce58">
            <text:p><text:s/>18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096.73397" table:formula="of:=SUM([.E139:.H139])" table:style-name="ce61">
            <text:p><text:s/>1,09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.1032" table:style-name="ce58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.0756999999999994" table:style-name="ce58">
            <text:p><text:s/>5<text:s/></text:p>
          </table:table-cell>
          <table:table-cell office:value-type="float" office:value="5.1788999999999996" table:formula="of:=SUM([.E140:.H140])" table:style-name="ce61">
            <text:p><text:s/>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160.84965" table:formula="of:=SUM([.E138:.E140])" table:style-name="ce65">
            <text:p><text:s/>161<text:s/></text:p>
          </table:table-cell>
          <table:table-cell office:value-type="float" office:value="921.23468000000003" table:formula="of:=SUM([.F138:.F140])" table:style-name="ce65">
            <text:p><text:s/>921<text:s/></text:p>
          </table:table-cell>
          <table:table-cell office:value-type="float" office:value="18.617450000000002" table:formula="of:=SUM([.G138:.G140])" table:style-name="ce65">
            <text:p><text:s/>19<text:s/></text:p>
          </table:table-cell>
          <table:table-cell office:value-type="float" office:value="41.091740000000001" table:formula="of:=SUM([.H138:.H140])" table:style-name="ce65">
            <text:p><text:s/>41<text:s/></text:p>
          </table:table-cell>
          <table:table-cell office:value-type="float" office:value="1141.7935200000002" table:formula="of:=SUM([.I138:.I140])" table:style-name="ce66">
            <text:p><text:s/>1,14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9 Total</text:p>
          </table:table-cell>
          <table:table-cell table:style-name="ce72"/>
          <table:table-cell table:style-name="ce77"/>
          <table:table-cell office:value-type="float" office:value="1369.2204700000036" table:formula="of:=+[.E141]+[.E137]+[.E133]+[.E129]" table:style-name="ce43">
            <text:p><text:s/>1,369<text:s/></text:p>
          </table:table-cell>
          <table:table-cell office:value-type="float" office:value="1655.45" table:formula="of:=+[.F141]+[.F137]+[.F133]+[.F129]" table:style-name="ce43">
            <text:p><text:s/>1,655<text:s/></text:p>
          </table:table-cell>
          <table:table-cell office:value-type="float" office:value="1299.7216900000001" table:formula="of:=+[.G141]+[.G137]+[.G133]+[.G129]" table:style-name="ce43">
            <text:p><text:s/>1,300<text:s/></text:p>
          </table:table-cell>
          <table:table-cell office:value-type="float" office:value="1454.1462099999997" table:formula="of:=+[.H141]+[.H137]+[.H133]+[.H129]" table:style-name="ce43">
            <text:p><text:s/>1,454<text:s/></text:p>
          </table:table-cell>
          <table:table-cell office:value-type="float" office:value="5778.5383700000029" table:formula="of:=+[.I141]+[.I137]+[.I133]+[.I129]" table:style-name="ce74">
            <text:p><text:s/>5,779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0" table:number-columns-spanned="1" table:number-rows-spanned="16" table:style-name="ce347">
            <text:p>2010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17.606000000000002" table:style-name="ce89">
            <text:p><text:s/>18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7.606000000000002" table:formula="of:=SUM([.E143:.H143])" table:style-name="ce61">
            <text:p><text:s/>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formula="of:=SUM([.E144:.H144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28.059000000000005" table:style-name="ce89">
            <text:p><text:s/>28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28.059000000000005" table:formula="of:=SUM([.E145:.H145])" table:style-name="ce61">
            <text:p><text:s/>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45.665000000000006" table:formula="of:=SUM([.E143:.E145])" table:style-name="ce65">
            <text:p><text:s/>46<text:s/></text:p>
          </table:table-cell>
          <table:table-cell office:value-type="float" office:value="0" table:formula="of:=SUM([.F143:.F145])" table:style-name="ce65">
            <text:p><text:s/>-<text:s/></text:p>
          </table:table-cell>
          <table:table-cell office:value-type="float" office:value="0" table:formula="of:=SUM([.G143:.G145])" table:style-name="ce65">
            <text:p><text:s/>-<text:s/></text:p>
          </table:table-cell>
          <table:table-cell office:value-type="float" office:value="0" table:formula="of:=SUM([.H143:.H145])" table:style-name="ce65">
            <text:p><text:s/>-<text:s/></text:p>
          </table:table-cell>
          <table:table-cell office:value-type="float" office:value="45.665000000000006" table:formula="of:=SUM([.I143:.I145])" table:style-name="ce66">
            <text:p><text:s/>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72.13900000000001" table:style-name="ce58">
            <text:p><text:s/>72<text:s/></text:p>
          </table:table-cell>
          <table:table-cell office:value-type="float" office:value="255.34300000000002" table:style-name="ce58">
            <text:p><text:s/>255<text:s/></text:p>
          </table:table-cell>
          <table:table-cell office:value-type="float" office:value="186.13699999999997" table:style-name="ce58">
            <text:p><text:s/>186<text:s/></text:p>
          </table:table-cell>
          <table:table-cell office:value-type="float" office:value="361.0630000000001" table:style-name="ce58">
            <text:p><text:s/>361<text:s/></text:p>
          </table:table-cell>
          <table:table-cell office:value-type="float" office:value="874.68200000000013" table:formula="of:=SUM([.E147:.H147])" table:style-name="ce61">
            <text:p><text:s/>87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725.66499999999996" table:style-name="ce58">
            <text:p><text:s/>726<text:s/></text:p>
          </table:table-cell>
          <table:table-cell office:value-type="float" office:value="410.89399999999995" table:style-name="ce58">
            <text:p><text:s/>411<text:s/></text:p>
          </table:table-cell>
          <table:table-cell office:value-type="float" office:value="505.51200000000006" table:style-name="ce58">
            <text:p><text:s/>506<text:s/></text:p>
          </table:table-cell>
          <table:table-cell office:value-type="float" office:value="839.56700000000001" table:style-name="ce58">
            <text:p><text:s/>840<text:s/></text:p>
          </table:table-cell>
          <table:table-cell office:value-type="float" office:value="2481.6379999999999" table:formula="of:=SUM([.E148:.H148])" table:style-name="ce61">
            <text:p><text:s/>2,4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6.8759999999999986" table:style-name="ce58">
            <text:p><text:s/>7<text:s/></text:p>
          </table:table-cell>
          <table:table-cell office:value-type="float" office:value="6.8759999999999986" table:formula="of:=SUM([.E149:.H149])" table:style-name="ce61">
            <text:p><text:s/>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797.80399999999997" table:formula="of:=SUM([.E147:.E149])" table:style-name="ce65">
            <text:p><text:s/>798<text:s/></text:p>
          </table:table-cell>
          <table:table-cell office:value-type="float" office:value="666.23699999999997" table:formula="of:=SUM([.F147:.F149])" table:style-name="ce65">
            <text:p><text:s/>666<text:s/></text:p>
          </table:table-cell>
          <table:table-cell office:value-type="float" office:value="691.649" table:formula="of:=SUM([.G147:.G149])" table:style-name="ce65">
            <text:p><text:s/>692<text:s/></text:p>
          </table:table-cell>
          <table:table-cell office:value-type="float" office:value="1207.5060000000001" table:formula="of:=SUM([.H147:.H149])" table:style-name="ce65">
            <text:p><text:s/>1,208<text:s/></text:p>
          </table:table-cell>
          <table:table-cell office:value-type="float" office:value="3363.1960000000004" table:formula="of:=SUM([.I147:.I149])" table:style-name="ce66">
            <text:p><text:s/>3,3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212.02599999999998" table:style-name="ce58">
            <text:p><text:s/>212<text:s/></text:p>
          </table:table-cell>
          <table:table-cell office:value-type="float" office:value="148.68299999999999" table:style-name="ce58">
            <text:p><text:s/>149<text:s/></text:p>
          </table:table-cell>
          <table:table-cell office:value-type="float" office:value="205.34299999999999" table:style-name="ce58">
            <text:p><text:s/>205<text:s/></text:p>
          </table:table-cell>
          <table:table-cell office:value-type="float" office:value="405.94399999999996" table:style-name="ce58">
            <text:p><text:s/>406<text:s/></text:p>
          </table:table-cell>
          <table:table-cell office:value-type="float" office:value="971.99599999999987" table:formula="of:=SUM([.E151:.H151])" table:style-name="ce61">
            <text:p><text:s/>97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8.072999999999997" table:style-name="ce58">
            <text:p><text:s/>18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8.072999999999997" table:formula="of:=SUM([.E152:.H152])" table:style-name="ce61">
            <text:p><text:s/>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53:.H153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230.09899999999999" table:formula="of:=SUM([.E151:.E153])" table:style-name="ce65">
            <text:p><text:s/>230<text:s/></text:p>
          </table:table-cell>
          <table:table-cell office:value-type="float" office:value="148.68299999999999" table:formula="of:=SUM([.F151:.F153])" table:style-name="ce65">
            <text:p><text:s/>149<text:s/></text:p>
          </table:table-cell>
          <table:table-cell office:value-type="float" office:value="205.34299999999999" table:formula="of:=SUM([.G151:.G153])" table:style-name="ce65">
            <text:p><text:s/>205<text:s/></text:p>
          </table:table-cell>
          <table:table-cell office:value-type="float" office:value="405.94399999999996" table:formula="of:=SUM([.H151:.H153])" table:style-name="ce65">
            <text:p><text:s/>406<text:s/></text:p>
          </table:table-cell>
          <table:table-cell office:value-type="float" office:value="990.06899999999985" table:formula="of:=SUM([.I151:.I153])" table:style-name="ce66">
            <text:p><text:s/>9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.71499999999999997" table:style-name="ce58">
            <text:p><text:s/>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.628000000000001" table:style-name="ce58">
            <text:p><text:s/>6<text:s/></text:p>
          </table:table-cell>
          <table:table-cell office:value-type="float" office:value="9.2769999999999992" table:style-name="ce58">
            <text:p><text:s/>9<text:s/></text:p>
          </table:table-cell>
          <table:table-cell office:value-type="float" office:value="15.620000000000001" table:formula="of:=SUM([.E155:.H155])" table:style-name="ce61">
            <text:p><text:s/>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17.06599999999999" table:style-name="ce58">
            <text:p><text:s/>117<text:s/></text:p>
          </table:table-cell>
          <table:table-cell office:value-type="float" office:value="712.577" table:style-name="ce58">
            <text:p><text:s/>713<text:s/></text:p>
          </table:table-cell>
          <table:table-cell office:value-type="float" office:value="17.250999999999998" table:style-name="ce58">
            <text:p><text:s/>17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46.89400000000001" table:formula="of:=SUM([.E156:.H156])" table:style-name="ce61">
            <text:p><text:s/>8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.14100000000000001" table:style-name="ce58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14100000000000001" table:formula="of:=SUM([.E157:.H157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117.922" table:formula="of:=SUM([.E155:.E157])" table:style-name="ce65">
            <text:p><text:s/>118<text:s/></text:p>
          </table:table-cell>
          <table:table-cell office:value-type="float" office:value="712.577" table:formula="of:=SUM([.F155:.F157])" table:style-name="ce65">
            <text:p><text:s/>713<text:s/></text:p>
          </table:table-cell>
          <table:table-cell office:value-type="float" office:value="22.878999999999998" table:formula="of:=SUM([.G155:.G157])" table:style-name="ce65">
            <text:p><text:s/>23<text:s/></text:p>
          </table:table-cell>
          <table:table-cell office:value-type="float" office:value="9.2769999999999992" table:formula="of:=SUM([.H155:.H157])" table:style-name="ce65">
            <text:p><text:s/>9<text:s/></text:p>
          </table:table-cell>
          <table:table-cell office:value-type="float" office:value="862.65499999999997" table:formula="of:=SUM([.I155:.I157])" table:style-name="ce66">
            <text:p><text:s/>863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0 Total</text:p>
          </table:table-cell>
          <table:table-cell table:style-name="ce72"/>
          <table:table-cell table:style-name="ce77"/>
          <table:table-cell office:value-type="float" office:value="1191.4899999999998" table:formula="of:=+[.E158]+[.E154]+[.E150]+[.E146]" table:style-name="ce43">
            <text:p><text:s/>1,191<text:s/></text:p>
          </table:table-cell>
          <table:table-cell office:value-type="float" office:value="1527.4969999999998" table:formula="of:=+[.F158]+[.F154]+[.F150]+[.F146]" table:style-name="ce43">
            <text:p><text:s/>1,527<text:s/></text:p>
          </table:table-cell>
          <table:table-cell office:value-type="float" office:value="919.87099999999998" table:formula="of:=+[.G158]+[.G154]+[.G150]+[.G146]" table:style-name="ce43">
            <text:p><text:s/>920<text:s/></text:p>
          </table:table-cell>
          <table:table-cell office:value-type="float" office:value="1622.7270000000001" table:formula="of:=+[.H158]+[.H154]+[.H150]+[.H146]" table:style-name="ce43">
            <text:p><text:s/>1,623<text:s/></text:p>
          </table:table-cell>
          <table:table-cell office:value-type="float" office:value="5261.585" table:formula="of:=+[.I158]+[.I154]+[.I150]+[.I146]" table:style-name="ce74">
            <text:p><text:s/>5,262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1" table:number-columns-spanned="1" table:number-rows-spanned="16" table:style-name="ce347">
            <text:p>2011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10.683960000000001" table:style-name="ce89">
            <text:p><text:s/>11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35.301650000000002" table:style-name="ce89">
            <text:p><text:s/>35<text:s/></text:p>
          </table:table-cell>
          <table:table-cell office:value-type="float" office:value="45.985610000000001" table:formula="of:=SUM([.E160:.H160])" table:style-name="ce61">
            <text:p><text:s/>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.1183999999999998" table:style-name="ce89">
            <text:p><text:s/>1<text:s/></text:p>
          </table:table-cell>
          <table:table-cell office:value-type="float" office:value="1.1183999999999998" table:formula="of:=SUM([.E161:.H161])" table:style-name="ce61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6.494140000000002" table:style-name="ce89">
            <text:p><text:s/>16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22.441189999999999" table:style-name="ce89">
            <text:p><text:s/>22<text:s/></text:p>
          </table:table-cell>
          <table:table-cell office:value-type="float" office:value="38.93533" table:formula="of:=SUM([.E162:.H162])" table:style-name="ce61">
            <text:p><text:s/>3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27.178100000000001" table:formula="of:=SUM([.E160:.E162])" table:style-name="ce65">
            <text:p><text:s/>27<text:s/></text:p>
          </table:table-cell>
          <table:table-cell office:value-type="float" office:value="0" table:formula="of:=SUM([.F160:.F162])" table:style-name="ce65">
            <text:p><text:s/>-<text:s/></text:p>
          </table:table-cell>
          <table:table-cell office:value-type="float" office:value="0" table:formula="of:=SUM([.G160:.G162])" table:style-name="ce65">
            <text:p><text:s/>-<text:s/></text:p>
          </table:table-cell>
          <table:table-cell office:value-type="float" office:value="58.861240000000002" table:formula="of:=SUM([.H160:.H162])" table:style-name="ce65">
            <text:p><text:s/>59<text:s/></text:p>
          </table:table-cell>
          <table:table-cell office:value-type="float" office:value="86.03934000000001" table:formula="of:=SUM([.I160:.I162])" table:style-name="ce66">
            <text:p><text:s/>8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12.16231399999998" table:style-name="ce58">
            <text:p><text:s/>212<text:s/></text:p>
          </table:table-cell>
          <table:table-cell office:value-type="float" office:value="203.668801" table:style-name="ce58">
            <text:p><text:s/>204<text:s/></text:p>
          </table:table-cell>
          <table:table-cell office:value-type="float" office:value="130.72855000000001" table:style-name="ce58">
            <text:p><text:s/>131<text:s/></text:p>
          </table:table-cell>
          <table:table-cell office:value-type="float" office:value="362.28709900000001" table:style-name="ce58">
            <text:p><text:s/>362<text:s/></text:p>
          </table:table-cell>
          <table:table-cell office:value-type="float" office:value="908.84676400000001" table:formula="of:=SUM([.E164:.H164])" table:style-name="ce61">
            <text:p><text:s/>9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018.4144880000002" table:style-name="ce58">
            <text:p><text:s/>1,018<text:s/></text:p>
          </table:table-cell>
          <table:table-cell office:value-type="float" office:value="398.01803499999988" table:style-name="ce58">
            <text:p><text:s/>398<text:s/></text:p>
          </table:table-cell>
          <table:table-cell office:value-type="float" office:value="514.13623100000007" table:style-name="ce58">
            <text:p><text:s/>514<text:s/></text:p>
          </table:table-cell>
          <table:table-cell office:value-type="float" office:value="751.09390399999995" table:style-name="ce58">
            <text:p><text:s/>751<text:s/></text:p>
          </table:table-cell>
          <table:table-cell office:value-type="float" office:value="2681.6626580000002" table:formula="of:=SUM([.E165:.H165])" table:style-name="ce61">
            <text:p><text:s/>2,6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.6672799999999999" table:style-name="ce58">
            <text:p><text:s/>8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.9999999999999998E-4" table:style-name="ce58">
            <text:p><text:s/>0<text:s/></text:p>
          </table:table-cell>
          <table:table-cell office:value-type="float" office:value="6.2661999999999995" table:style-name="ce58">
            <text:p><text:s/>6<text:s/></text:p>
          </table:table-cell>
          <table:table-cell office:value-type="float" office:value="13.934379999999999" table:formula="of:=SUM([.E166:.H166])" table:style-name="ce61">
            <text:p><text:s/>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1238.2440820000002" table:formula="of:=SUM([.E164:.E166])" table:style-name="ce65">
            <text:p><text:s/>1,238<text:s/></text:p>
          </table:table-cell>
          <table:table-cell office:value-type="float" office:value="601.68683599999986" table:formula="of:=SUM([.F164:.F166])" table:style-name="ce65">
            <text:p><text:s/>602<text:s/></text:p>
          </table:table-cell>
          <table:table-cell office:value-type="float" office:value="644.86568100000011" table:formula="of:=SUM([.G164:.G166])" table:style-name="ce65">
            <text:p><text:s/>645<text:s/></text:p>
          </table:table-cell>
          <table:table-cell office:value-type="float" office:value="1119.647203" table:formula="of:=SUM([.H164:.H166])" table:style-name="ce65">
            <text:p><text:s/>1,120<text:s/></text:p>
          </table:table-cell>
          <table:table-cell office:value-type="float" office:value="3604.4438020000002" table:formula="of:=SUM([.I164:.I166])" table:style-name="ce66">
            <text:p><text:s/>3,6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222.53975100000002" table:style-name="ce58">
            <text:p><text:s/>223<text:s/></text:p>
          </table:table-cell>
          <table:table-cell office:value-type="float" office:value="269.023393" table:style-name="ce58">
            <text:p><text:s/>269<text:s/></text:p>
          </table:table-cell>
          <table:table-cell office:value-type="float" office:value="107.809" table:style-name="ce58">
            <text:p><text:s/>108<text:s/></text:p>
          </table:table-cell>
          <table:table-cell office:value-type="float" office:value="290.96210199999996" table:style-name="ce58">
            <text:p><text:s/>291<text:s/></text:p>
          </table:table-cell>
          <table:table-cell office:value-type="float" office:value="890.33424600000001" table:formula="of:=SUM([.E168:.H168])" table:style-name="ce61">
            <text:p><text:s/>8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5.202449999999999" table:style-name="ce58">
            <text:p><text:s/>15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5.202449999999999" table:formula="of:=SUM([.E169:.H169])" table:style-name="ce61">
            <text:p><text:s/>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3.112" table:style-name="ce58">
            <text:p><text:s/>1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3.112" table:formula="of:=SUM([.E170:.H170])" table:style-name="ce61">
            <text:p><text:s/>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237.74220100000002" table:formula="of:=SUM([.E168:.E170])" table:style-name="ce65">
            <text:p><text:s/>238<text:s/></text:p>
          </table:table-cell>
          <table:table-cell office:value-type="float" office:value="282.13539300000002" table:formula="of:=SUM([.F168:.F170])" table:style-name="ce65">
            <text:p><text:s/>282<text:s/></text:p>
          </table:table-cell>
          <table:table-cell office:value-type="float" office:value="107.809" table:formula="of:=SUM([.G168:.G170])" table:style-name="ce65">
            <text:p><text:s/>108<text:s/></text:p>
          </table:table-cell>
          <table:table-cell office:value-type="float" office:value="290.96210199999996" table:formula="of:=SUM([.H168:.H170])" table:style-name="ce65">
            <text:p><text:s/>291<text:s/></text:p>
          </table:table-cell>
          <table:table-cell office:value-type="float" office:value="918.64869599999997" table:formula="of:=SUM([.I168:.I170])" table:style-name="ce66">
            <text:p><text:s/>9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2.0599400000000001" table:style-name="ce58">
            <text:p><text:s/>2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84121" table:style-name="ce58">
            <text:p><text:s/>2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.9011500000000003" table:formula="of:=SUM([.E172:.H172])" table:style-name="ce61">
            <text:p><text:s/>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17.60849999999999" table:style-name="ce58">
            <text:p><text:s/>118<text:s/></text:p>
          </table:table-cell>
          <table:table-cell office:value-type="float" office:value="861.45249999999999" table:style-name="ce58">
            <text:p><text:s/>861<text:s/></text:p>
          </table:table-cell>
          <table:table-cell office:value-type="float" office:value="20.865169999999999" table:style-name="ce58">
            <text:p><text:s/>2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999.92616999999996" table:formula="of:=SUM([.E173:.H173])" table:style-name="ce61">
            <text:p><text:s/>1,00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.25306000000000001" table:style-name="ce58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25306000000000001" table:formula="of:=SUM([.E174:.H174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119.92149999999999" table:formula="of:=SUM([.E172:.E174])" table:style-name="ce65">
            <text:p><text:s/>120<text:s/></text:p>
          </table:table-cell>
          <table:table-cell office:value-type="float" office:value="861.45249999999999" table:formula="of:=SUM([.F172:.F174])" table:style-name="ce65">
            <text:p><text:s/>861<text:s/></text:p>
          </table:table-cell>
          <table:table-cell office:value-type="float" office:value="22.706379999999999" table:formula="of:=SUM([.G172:.G174])" table:style-name="ce65">
            <text:p><text:s/>23<text:s/></text:p>
          </table:table-cell>
          <table:table-cell office:value-type="float" office:value="0" table:formula="of:=SUM([.H172:.H174])" table:style-name="ce65">
            <text:p><text:s/>-<text:s/></text:p>
          </table:table-cell>
          <table:table-cell office:value-type="float" office:value="1004.08038" table:formula="of:=SUM([.I172:.I174])" table:style-name="ce66">
            <text:p><text:s/>1,004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1 Total</text:p>
          </table:table-cell>
          <table:table-cell table:style-name="ce72"/>
          <table:table-cell table:style-name="ce77"/>
          <table:table-cell office:value-type="float" office:value="1623.0858830000002" table:formula="of:=+[.E175]+[.E171]+[.E167]+[.E163]" table:style-name="ce43">
            <text:p><text:s/>1,623<text:s/></text:p>
          </table:table-cell>
          <table:table-cell office:value-type="float" office:value="1745.2747289999998" table:formula="of:=+[.F175]+[.F171]+[.F167]+[.F163]" table:style-name="ce43">
            <text:p><text:s/>1,745<text:s/></text:p>
          </table:table-cell>
          <table:table-cell office:value-type="float" office:value="775.38106100000005" table:formula="of:=+[.G175]+[.G171]+[.G167]+[.G163]" table:style-name="ce43">
            <text:p><text:s/>775<text:s/></text:p>
          </table:table-cell>
          <table:table-cell office:value-type="float" office:value="1469.4705449999999" table:formula="of:=+[.H175]+[.H171]+[.H167]+[.H163]" table:style-name="ce43">
            <text:p><text:s/>1,469<text:s/></text:p>
          </table:table-cell>
          <table:table-cell office:value-type="float" office:value="5613.2122180000006" table:formula="of:=+[.I175]+[.I171]+[.I167]+[.I163]" table:style-name="ce74">
            <text:p><text:s/>5,613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2" table:number-columns-spanned="1" table:number-rows-spanned="16" table:style-name="ce347">
            <text:p>2012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20.10904" table:style-name="ce33">
            <text:p><text:s/>2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8.89228999999999" table:style-name="ce33">
            <text:p><text:s/>109<text:s/></text:p>
          </table:table-cell>
          <table:table-cell office:value-type="float" office:value="129.00133" table:formula="of:=SUM([.E177:.H177])" table:style-name="ce61">
            <text:p><text:s/>1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.062060000000002" table:style-name="ce33">
            <text:p><text:s/>13<text:s/></text:p>
          </table:table-cell>
          <table:table-cell office:value-type="float" office:value="13.062060000000002" table:formula="of:=SUM([.E178:.H178])" table:style-name="ce61">
            <text:p><text:s/>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32.888629999999999" table:style-name="ce33">
            <text:p><text:s/>3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7.372249999999994" table:style-name="ce33">
            <text:p><text:s/>47<text:s/></text:p>
          </table:table-cell>
          <table:table-cell office:value-type="float" office:value="80.260879999999986" table:formula="of:=SUM([.E179:.H179])" table:style-name="ce61">
            <text:p><text:s/>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52.997669999999999" table:formula="of:=SUM([.E177:.E179])" table:style-name="ce65">
            <text:p><text:s/>53<text:s/></text:p>
          </table:table-cell>
          <table:table-cell office:value-type="float" office:value="0" table:formula="of:=SUM([.F177:.F179])" table:style-name="ce65">
            <text:p><text:s/>-<text:s/></text:p>
          </table:table-cell>
          <table:table-cell office:value-type="float" office:value="0" table:formula="of:=SUM([.G177:.G179])" table:style-name="ce65">
            <text:p><text:s/>-<text:s/></text:p>
          </table:table-cell>
          <table:table-cell office:value-type="float" office:value="169.32659999999998" table:formula="of:=SUM([.H177:.H179])" table:style-name="ce65">
            <text:p><text:s/>169<text:s/></text:p>
          </table:table-cell>
          <table:table-cell office:value-type="float" office:value="222.32426999999998" table:formula="of:=SUM([.I177:.I179])" table:style-name="ce66">
            <text:p><text:s/>22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36.56352999999999" table:style-name="ce33">
            <text:p><text:s/>237<text:s/></text:p>
          </table:table-cell>
          <table:table-cell office:value-type="float" office:value="130.41102900000001" table:style-name="ce33">
            <text:p><text:s/>130<text:s/></text:p>
          </table:table-cell>
          <table:table-cell office:value-type="float" office:value="150.73894999999999" table:style-name="ce33">
            <text:p><text:s/>151<text:s/></text:p>
          </table:table-cell>
          <table:table-cell office:value-type="float" office:value="311.31189899999993" table:style-name="ce33">
            <text:p><text:s/>311<text:s/></text:p>
          </table:table-cell>
          <table:table-cell office:value-type="float" office:value="829.02540799999986" table:formula="of:=SUM([.E181:.H181])" table:style-name="ce61">
            <text:p><text:s/>8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803.4994989999999" table:style-name="ce33">
            <text:p><text:s/>803<text:s/></text:p>
          </table:table-cell>
          <table:table-cell office:value-type="float" office:value="419.82228400000014" table:style-name="ce33">
            <text:p><text:s/>420<text:s/></text:p>
          </table:table-cell>
          <table:table-cell office:value-type="float" office:value="490.68623500000001" table:style-name="ce33">
            <text:p><text:s/>491<text:s/></text:p>
          </table:table-cell>
          <table:table-cell office:value-type="float" office:value="666.3605110000002" table:style-name="ce33">
            <text:p><text:s/>666<text:s/></text:p>
          </table:table-cell>
          <table:table-cell office:value-type="float" office:value="2380.3685290000003" table:formula="of:=SUM([.E182:.H182])" table:style-name="ce61">
            <text:p><text:s/>2,3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3.02101" table:style-name="ce33">
            <text:p><text:s/>3<text:s/></text:p>
          </table:table-cell>
          <table:table-cell office:value-type="string" table:style-name="ce33">
            <text:p>-</text:p>
          </table:table-cell>
          <table:table-cell office:value-type="float" office:value="9.9600000000000001E-3" table:style-name="ce33">
            <text:p><text:s/>0<text:s/></text:p>
          </table:table-cell>
          <table:table-cell office:value-type="float" office:value="4.2751200000000003" table:style-name="ce33">
            <text:p><text:s/>4<text:s/></text:p>
          </table:table-cell>
          <table:table-cell office:value-type="float" office:value="7.3060900000000002" table:formula="of:=SUM([.E183:.H183])" table:style-name="ce61">
            <text:p><text:s/>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1043.0840389999998" table:formula="of:=SUM([.E181:.E183])" table:style-name="ce65">
            <text:p><text:s/>1,043<text:s/></text:p>
          </table:table-cell>
          <table:table-cell office:value-type="float" office:value="550.23331300000018" table:formula="of:=SUM([.F181:.F183])" table:style-name="ce65">
            <text:p><text:s/>550<text:s/></text:p>
          </table:table-cell>
          <table:table-cell office:value-type="float" office:value="641.43514500000003" table:formula="of:=SUM([.G181:.G183])" table:style-name="ce65">
            <text:p><text:s/>641<text:s/></text:p>
          </table:table-cell>
          <table:table-cell office:value-type="float" office:value="981.94753000000014" table:formula="of:=SUM([.H181:.H183])" table:style-name="ce65">
            <text:p><text:s/>982<text:s/></text:p>
          </table:table-cell>
          <table:table-cell office:value-type="float" office:value="3216.7000270000003" table:formula="of:=SUM([.I181:.I183])" table:style-name="ce66">
            <text:p><text:s/>3,2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241.95868999999999" table:style-name="ce33">
            <text:p><text:s/>242<text:s/></text:p>
          </table:table-cell>
          <table:table-cell office:value-type="float" office:value="352.42418099999998" table:style-name="ce33">
            <text:p><text:s/>352<text:s/></text:p>
          </table:table-cell>
          <table:table-cell office:value-type="float" office:value="2.0920000000000001" table:style-name="ce33">
            <text:p><text:s/>2<text:s/></text:p>
          </table:table-cell>
          <table:table-cell office:value-type="float" office:value="224.61216999999999" table:style-name="ce33">
            <text:p><text:s/>225<text:s/></text:p>
          </table:table-cell>
          <table:table-cell office:value-type="float" office:value="821.087041" table:formula="of:=SUM([.E185:.H185])" table:style-name="ce61">
            <text:p><text:s/>8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9.1999999999999993" table:style-name="ce33">
            <text:p><text:s/>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.1999999999999993" table:formula="of:=SUM([.E186:.H186])" table:style-name="ce61">
            <text:p><text:s/>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87:.H187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251.15868999999998" table:formula="of:=SUM([.E185:.E187])" table:style-name="ce65">
            <text:p><text:s/>251<text:s/></text:p>
          </table:table-cell>
          <table:table-cell office:value-type="float" office:value="352.42418099999998" table:formula="of:=SUM([.F185:.F187])" table:style-name="ce65">
            <text:p><text:s/>352<text:s/></text:p>
          </table:table-cell>
          <table:table-cell office:value-type="float" office:value="2.0920000000000001" table:formula="of:=SUM([.G185:.G187])" table:style-name="ce65">
            <text:p><text:s/>2<text:s/></text:p>
          </table:table-cell>
          <table:table-cell office:value-type="float" office:value="224.61216999999999" table:formula="of:=SUM([.H185:.H187])" table:style-name="ce65">
            <text:p><text:s/>225<text:s/></text:p>
          </table:table-cell>
          <table:table-cell office:value-type="float" office:value="830.28704100000004" table:formula="of:=SUM([.I185:.I187])" table:style-name="ce66">
            <text:p><text:s/>83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13.776599999999998" table:style-name="ce33">
            <text:p><text:s/>1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1310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.907619999999998" table:formula="of:=SUM([.E189:.H189])" table:style-name="ce61">
            <text:p><text:s/>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69.858100000000007" table:style-name="ce33">
            <text:p><text:s/>70<text:s/></text:p>
          </table:table-cell>
          <table:table-cell office:value-type="float" office:value="1304.695144" table:style-name="ce33">
            <text:p><text:s/>1,305<text:s/></text:p>
          </table:table-cell>
          <table:table-cell office:value-type="float" office:value="14.7166" table:style-name="ce33">
            <text:p><text:s/>1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89.2698439999999" table:formula="of:=SUM([.E190:.H190])" table:style-name="ce61">
            <text:p><text:s/>1,3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.7700000000000005E-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.7700000000000005E-2" table:formula="of:=SUM([.E191:.H191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83.712400000000002" table:formula="of:=SUM([.E189:.E191])" table:style-name="ce65">
            <text:p><text:s/>84<text:s/></text:p>
          </table:table-cell>
          <table:table-cell office:value-type="float" office:value="1304.695144" table:formula="of:=SUM([.F189:.F191])" table:style-name="ce65">
            <text:p><text:s/>1,305<text:s/></text:p>
          </table:table-cell>
          <table:table-cell office:value-type="float" office:value="14.847619999999999" table:formula="of:=SUM([.G189:.G191])" table:style-name="ce65">
            <text:p><text:s/>15<text:s/></text:p>
          </table:table-cell>
          <table:table-cell office:value-type="float" office:value="0" table:formula="of:=SUM([.H189:.H191])" table:style-name="ce65">
            <text:p><text:s/>-<text:s/></text:p>
          </table:table-cell>
          <table:table-cell office:value-type="float" office:value="1403.2551639999999" table:formula="of:=SUM([.I189:.I191])" table:style-name="ce66">
            <text:p><text:s/>1,403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2 Total</text:p>
          </table:table-cell>
          <table:table-cell table:style-name="ce72"/>
          <table:table-cell table:style-name="ce77"/>
          <table:table-cell office:value-type="float" office:value="1430.9527989999999" table:formula="of:=+[.E192]+[.E188]+[.E184]+[.E180]" table:style-name="ce43">
            <text:p><text:s/>1,431<text:s/></text:p>
          </table:table-cell>
          <table:table-cell office:value-type="float" office:value="2207.3526380000003" table:formula="of:=+[.F192]+[.F188]+[.F184]+[.F180]" table:style-name="ce43">
            <text:p><text:s/>2,207<text:s/></text:p>
          </table:table-cell>
          <table:table-cell office:value-type="float" office:value="658.37476500000002" table:formula="of:=+[.G192]+[.G188]+[.G184]+[.G180]" table:style-name="ce43">
            <text:p><text:s/>658<text:s/></text:p>
          </table:table-cell>
          <table:table-cell office:value-type="float" office:value="1375.8863000000001" table:formula="of:=+[.H192]+[.H188]+[.H184]+[.H180]" table:style-name="ce43">
            <text:p><text:s/>1,376<text:s/></text:p>
          </table:table-cell>
          <table:table-cell office:value-type="float" office:value="5672.5665020000006" table:formula="of:=+[.I192]+[.I188]+[.I184]+[.I180]" table:style-name="ce74">
            <text:p><text:s/>5,673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3" table:number-columns-spanned="1" table:number-rows-spanned="16" table:style-name="ce347">
            <text:p>2013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7.8103699999999998" table:style-name="ce33">
            <text:p><text:s/>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1.615499999999997" table:style-name="ce33">
            <text:p><text:s/>72<text:s/></text:p>
          </table:table-cell>
          <table:table-cell office:value-type="float" office:value="79.425870000000003" table:formula="of:=SUM([.E194:.H194])" table:style-name="ce61">
            <text:p><text:s/>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5.7600000000000005E-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string" table:style-name="ce33">
            <text:p>-</text:p>
          </table:table-cell>
          <table:table-cell office:value-type="float" office:value="5.7600000000000005E-2" table:formula="of:=SUM([.E195:.H195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.9176800000000007" table:style-name="ce33">
            <text:p><text:s/>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2.197640999999976" table:style-name="ce33">
            <text:p><text:s/>92<text:s/></text:p>
          </table:table-cell>
          <table:table-cell office:value-type="float" office:value="100.11532099999998" table:formula="of:=SUM([.E196:.H196])" table:style-name="ce61">
            <text:p><text:s/>10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15.78565" table:formula="of:=SUM([.E194:.E196])" table:style-name="ce65">
            <text:p><text:s/>16<text:s/></text:p>
          </table:table-cell>
          <table:table-cell office:value-type="float" office:value="0" table:formula="of:=SUM([.F194:.F196])" table:style-name="ce65">
            <text:p><text:s/>-<text:s/></text:p>
          </table:table-cell>
          <table:table-cell office:value-type="float" office:value="0" table:formula="of:=SUM([.G194:.G196])" table:style-name="ce65">
            <text:p><text:s/>-<text:s/></text:p>
          </table:table-cell>
          <table:table-cell office:value-type="float" office:value="163.81314099999997" table:formula="of:=SUM([.H194:.H196])" table:style-name="ce65">
            <text:p><text:s/>164<text:s/></text:p>
          </table:table-cell>
          <table:table-cell office:value-type="float" office:value="179.59879099999998" table:formula="of:=SUM([.I194:.I196])" table:style-name="ce66">
            <text:p><text:s/>1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28.51437899999999" table:style-name="ce33">
            <text:p><text:s/>129<text:s/></text:p>
          </table:table-cell>
          <table:table-cell office:value-type="float" office:value="128.52626299999997" table:style-name="ce33">
            <text:p><text:s/>129<text:s/></text:p>
          </table:table-cell>
          <table:table-cell office:value-type="float" office:value="149.39325700000003" table:style-name="ce33">
            <text:p><text:s/>149<text:s/></text:p>
          </table:table-cell>
          <table:table-cell office:value-type="float" office:value="506.817251" table:style-name="ce33">
            <text:p><text:s/>507<text:s/></text:p>
          </table:table-cell>
          <table:table-cell office:value-type="float" office:value="913.25115000000005" table:formula="of:=SUM([.E198:.H198])" table:style-name="ce61">
            <text:p><text:s/>9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705.54932299999996" table:style-name="ce33">
            <text:p><text:s/>706<text:s/></text:p>
          </table:table-cell>
          <table:table-cell office:value-type="float" office:value="332.26937299999992" table:style-name="ce33">
            <text:p><text:s/>332<text:s/></text:p>
          </table:table-cell>
          <table:table-cell office:value-type="float" office:value="424.89463699999988" table:style-name="ce33">
            <text:p><text:s/>425<text:s/></text:p>
          </table:table-cell>
          <table:table-cell office:value-type="float" office:value="581.26730400000008" table:style-name="ce33">
            <text:p><text:s/>581<text:s/></text:p>
          </table:table-cell>
          <table:table-cell office:value-type="float" office:value="2043.9806369999997" table:formula="of:=SUM([.E199:.H199])" table:style-name="ce61">
            <text:p><text:s/>2,04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.60246" table:style-name="ce33">
            <text:p><text:s/>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.1036810000000008" table:style-name="ce33">
            <text:p><text:s/>7<text:s/></text:p>
          </table:table-cell>
          <table:table-cell office:value-type="float" office:value="7.7061410000000006" table:formula="of:=SUM([.E200:.H200])" table:style-name="ce61">
            <text:p><text:s/>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834.66616199999987" table:formula="of:=SUM([.E198:.E200])" table:style-name="ce65">
            <text:p><text:s/>835<text:s/></text:p>
          </table:table-cell>
          <table:table-cell office:value-type="float" office:value="460.79563599999989" table:formula="of:=SUM([.F198:.F200])" table:style-name="ce65">
            <text:p><text:s/>461<text:s/></text:p>
          </table:table-cell>
          <table:table-cell office:value-type="float" office:value="574.28789399999994" table:formula="of:=SUM([.G198:.G200])" table:style-name="ce65">
            <text:p><text:s/>574<text:s/></text:p>
          </table:table-cell>
          <table:table-cell office:value-type="float" office:value="1095.1882360000002" table:formula="of:=SUM([.H198:.H200])" table:style-name="ce65">
            <text:p><text:s/>1,095<text:s/></text:p>
          </table:table-cell>
          <table:table-cell office:value-type="float" office:value="2964.9379279999998" table:formula="of:=SUM([.I198:.I200])" table:style-name="ce66">
            <text:p><text:s/>2,96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73.012439999999998" table:style-name="ce33">
            <text:p><text:s/>73<text:s/></text:p>
          </table:table-cell>
          <table:table-cell office:value-type="float" office:value="477.60013200000003" table:style-name="ce33">
            <text:p><text:s/>478<text:s/></text:p>
          </table:table-cell>
          <table:table-cell office:value-type="float" office:value="16.526394999999997" table:style-name="ce33">
            <text:p><text:s/>17<text:s/></text:p>
          </table:table-cell>
          <table:table-cell office:value-type="float" office:value="105.54385000000001" table:style-name="ce33">
            <text:p><text:s/>106<text:s/></text:p>
          </table:table-cell>
          <table:table-cell office:value-type="float" office:value="672.682817" table:formula="of:=SUM([.E202:.H202])" table:style-name="ce61">
            <text:p><text:s/>67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9.062690000000003" table:style-name="ce33">
            <text:p><text:s/>19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9.062690000000003" table:formula="of:=SUM([.E203:.H203])" table:style-name="ce61">
            <text:p><text:s/>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04:.H204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92.075130000000001" table:formula="of:=SUM([.E202:.E204])" table:style-name="ce65">
            <text:p><text:s/>92<text:s/></text:p>
          </table:table-cell>
          <table:table-cell office:value-type="float" office:value="477.60013200000003" table:formula="of:=SUM([.F202:.F204])" table:style-name="ce65">
            <text:p><text:s/>478<text:s/></text:p>
          </table:table-cell>
          <table:table-cell office:value-type="float" office:value="16.526394999999997" table:formula="of:=SUM([.G202:.G204])" table:style-name="ce65">
            <text:p><text:s/>17<text:s/></text:p>
          </table:table-cell>
          <table:table-cell office:value-type="float" office:value="105.54385000000001" table:formula="of:=SUM([.H202:.H204])" table:style-name="ce65">
            <text:p><text:s/>106<text:s/></text:p>
          </table:table-cell>
          <table:table-cell office:value-type="float" office:value="691.74550699999998" table:formula="of:=SUM([.I202:.I204])" table:style-name="ce66">
            <text:p><text:s/>69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7.1963799999999996" table:style-name="ce33">
            <text:p><text:s/>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10690999999999999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.3032899999999996" table:formula="of:=SUM([.E206:.H206])" table:style-name="ce61">
            <text:p><text:s/>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78.902619999999999" table:style-name="ce33">
            <text:p><text:s/>79<text:s/></text:p>
          </table:table-cell>
          <table:table-cell office:value-type="float" office:value="998.62393100000008" table:style-name="ce33">
            <text:p><text:s/>999<text:s/></text:p>
          </table:table-cell>
          <table:table-cell office:value-type="float" office:value="13.093910000000001" table:style-name="ce33">
            <text:p><text:s/>1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90.6204610000002" table:formula="of:=SUM([.E207:.H207])" table:style-name="ce61">
            <text:p><text:s/>1,09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.7700000000000005E-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.7700000000000005E-2" table:formula="of:=SUM([.E208:.H208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86.176699999999997" table:formula="of:=SUM([.E206:.E208])" table:style-name="ce65">
            <text:p><text:s/>86<text:s/></text:p>
          </table:table-cell>
          <table:table-cell office:value-type="float" office:value="998.62393100000008" table:formula="of:=SUM([.F206:.F208])" table:style-name="ce65">
            <text:p><text:s/>999<text:s/></text:p>
          </table:table-cell>
          <table:table-cell office:value-type="float" office:value="13.20082" table:formula="of:=SUM([.G206:.G208])" table:style-name="ce65">
            <text:p><text:s/>13<text:s/></text:p>
          </table:table-cell>
          <table:table-cell office:value-type="float" office:value="0" table:formula="of:=SUM([.H206:.H208])" table:style-name="ce65">
            <text:p><text:s/>-<text:s/></text:p>
          </table:table-cell>
          <table:table-cell office:value-type="float" office:value="1098.0014510000003" table:formula="of:=SUM([.I206:.I208])" table:style-name="ce66">
            <text:p><text:s/>1,098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3 Total</text:p>
          </table:table-cell>
          <table:table-cell table:style-name="ce72"/>
          <table:table-cell table:style-name="ce77"/>
          <table:table-cell office:value-type="float" office:value="1028.7036419999999" table:formula="of:=+[.E209]+[.E205]+[.E201]+[.E197]" table:style-name="ce43">
            <text:p><text:s/>1,029<text:s/></text:p>
          </table:table-cell>
          <table:table-cell office:value-type="float" office:value="1937.0196989999999" table:formula="of:=+[.F209]+[.F205]+[.F201]+[.F197]" table:style-name="ce43">
            <text:p><text:s/>1,937<text:s/></text:p>
          </table:table-cell>
          <table:table-cell office:value-type="float" office:value="604.01510899999994" table:formula="of:=+[.G209]+[.G205]+[.G201]+[.G197]" table:style-name="ce43">
            <text:p><text:s/>604<text:s/></text:p>
          </table:table-cell>
          <table:table-cell office:value-type="float" office:value="1364.5452270000001" table:formula="of:=+[.H209]+[.H205]+[.H201]+[.H197]" table:style-name="ce43">
            <text:p><text:s/>1,365<text:s/></text:p>
          </table:table-cell>
          <table:table-cell office:value-type="float" office:value="4934.2836770000004" table:formula="of:=+[.I209]+[.I205]+[.I201]+[.I197]" table:style-name="ce74">
            <text:p><text:s/>4,934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4" table:number-columns-spanned="1" table:number-rows-spanned="16" table:style-name="ce347">
            <text:p>2014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2.3352200000000005" table:style-name="ce33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3.307499999999997" table:style-name="ce33">
            <text:p><text:s/>23<text:s/></text:p>
          </table:table-cell>
          <table:table-cell office:value-type="float" office:value="25.642719999999997" table:formula="of:=SUM([.E211:.H211])" table:style-name="ce61">
            <text:p><text:s/>2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4.8079999999999998E-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.8079999999999998E-2" table:formula="of:=SUM([.E212:.H212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4.4834200000000015" table:style-name="ce33">
            <text:p><text:s/>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4.125089" table:style-name="ce33">
            <text:p><text:s/>104<text:s/></text:p>
          </table:table-cell>
          <table:table-cell office:value-type="float" office:value="108.608509" table:formula="of:=SUM([.E213:.H213])" table:style-name="ce61">
            <text:p><text:s/>1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6.8667200000000026" table:formula="of:=SUM([.E211:.E213])" table:style-name="ce65">
            <text:p><text:s/>7<text:s/></text:p>
          </table:table-cell>
          <table:table-cell office:value-type="float" office:value="0" table:formula="of:=SUM([.F211:.F213])" table:style-name="ce65">
            <text:p><text:s/>-<text:s/></text:p>
          </table:table-cell>
          <table:table-cell office:value-type="float" office:value="0" table:formula="of:=SUM([.G211:.G213])" table:style-name="ce65">
            <text:p><text:s/>-<text:s/></text:p>
          </table:table-cell>
          <table:table-cell office:value-type="float" office:value="127.43258900000001" table:formula="of:=SUM([.H211:.H213])" table:style-name="ce65">
            <text:p><text:s/>127<text:s/></text:p>
          </table:table-cell>
          <table:table-cell office:value-type="float" office:value="134.29930899999999" table:formula="of:=SUM([.I211:.I213])" table:style-name="ce66">
            <text:p><text:s/>1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78.278100000000009" table:style-name="ce33">
            <text:p><text:s/>78<text:s/></text:p>
          </table:table-cell>
          <table:table-cell office:value-type="float" office:value="133.41066599999999" table:style-name="ce33">
            <text:p><text:s/>133<text:s/></text:p>
          </table:table-cell>
          <table:table-cell office:value-type="float" office:value="248.121681" table:style-name="ce33">
            <text:p><text:s/>248<text:s/></text:p>
          </table:table-cell>
          <table:table-cell office:value-type="float" office:value="606.91623100000004" table:style-name="ce33">
            <text:p><text:s/>607<text:s/></text:p>
          </table:table-cell>
          <table:table-cell office:value-type="float" office:value="1066.726678" table:formula="of:=SUM([.E215:.H215])" table:style-name="ce61">
            <text:p><text:s/>1,0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600.86624899999993" table:style-name="ce33">
            <text:p><text:s/>601<text:s/></text:p>
          </table:table-cell>
          <table:table-cell office:value-type="float" office:value="294.92590900000005" table:style-name="ce33">
            <text:p><text:s/>295<text:s/></text:p>
          </table:table-cell>
          <table:table-cell office:value-type="float" office:value="295.95919499999991" table:style-name="ce33">
            <text:p><text:s/>296<text:s/></text:p>
          </table:table-cell>
          <table:table-cell office:value-type="float" office:value="560.40393400000005" table:style-name="ce33">
            <text:p><text:s/>560<text:s/></text:p>
          </table:table-cell>
          <table:table-cell office:value-type="float" office:value="1752.155287" table:formula="of:=SUM([.E216:.H216])" table:style-name="ce61">
            <text:p><text:s/>1,75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.58942" table:style-name="ce33">
            <text:p><text:s/>12<text:s/></text:p>
          </table:table-cell>
          <table:table-cell office:value-type="float" office:value="11.58942" table:formula="of:=SUM([.E217:.H217])" table:style-name="ce61">
            <text:p><text:s/>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679.14434899999992" table:formula="of:=SUM([.E215:.E217])" table:style-name="ce65">
            <text:p><text:s/>679<text:s/></text:p>
          </table:table-cell>
          <table:table-cell office:value-type="float" office:value="428.33657500000004" table:formula="of:=SUM([.F215:.F217])" table:style-name="ce65">
            <text:p><text:s/>428<text:s/></text:p>
          </table:table-cell>
          <table:table-cell office:value-type="float" office:value="544.08087599999988" table:formula="of:=SUM([.G215:.G217])" table:style-name="ce65">
            <text:p><text:s/>544<text:s/></text:p>
          </table:table-cell>
          <table:table-cell office:value-type="float" office:value="1178.9095850000001" table:formula="of:=SUM([.H215:.H217])" table:style-name="ce65">
            <text:p><text:s/>1,179<text:s/></text:p>
          </table:table-cell>
          <table:table-cell office:value-type="float" office:value="2830.4713849999998" table:formula="of:=SUM([.I215:.I217])" table:style-name="ce66">
            <text:p><text:s/>2,83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96.127499999999998" table:style-name="ce33">
            <text:p><text:s/>96<text:s/></text:p>
          </table:table-cell>
          <table:table-cell office:value-type="float" office:value="366.75480000000005" table:style-name="ce33">
            <text:p><text:s/>367<text:s/></text:p>
          </table:table-cell>
          <table:table-cell office:value-type="float" office:value="1.3705400000000001" table:style-name="ce33">
            <text:p><text:s/>1<text:s/></text:p>
          </table:table-cell>
          <table:table-cell office:value-type="float" office:value="117.28021" table:style-name="ce33">
            <text:p><text:s/>117<text:s/></text:p>
          </table:table-cell>
          <table:table-cell office:value-type="float" office:value="581.53305" table:formula="of:=SUM([.E219:.H219])" table:style-name="ce61">
            <text:p><text:s/>5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6.7511999999999999" table:style-name="ce33">
            <text:p><text:s/>7<text:s/></text:p>
          </table:table-cell>
          <table:table-cell office:value-type="float" office:value="2.0579200000000002" table:style-name="ce33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.8091200000000001" table:formula="of:=SUM([.E220:.H220])" table:style-name="ce61">
            <text:p><text:s/>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.39674999999999999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39674999999999999" table:formula="of:=SUM([.E221:.H221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103.27544999999999" table:formula="of:=SUM([.E219:.E221])" table:style-name="ce65">
            <text:p><text:s/>103<text:s/></text:p>
          </table:table-cell>
          <table:table-cell office:value-type="float" office:value="368.81272000000007" table:formula="of:=SUM([.F219:.F221])" table:style-name="ce65">
            <text:p><text:s/>369<text:s/></text:p>
          </table:table-cell>
          <table:table-cell office:value-type="float" office:value="1.3705400000000001" table:formula="of:=SUM([.G219:.G221])" table:style-name="ce65">
            <text:p><text:s/>1<text:s/></text:p>
          </table:table-cell>
          <table:table-cell office:value-type="float" office:value="117.28021" table:formula="of:=SUM([.H219:.H221])" table:style-name="ce65">
            <text:p><text:s/>117<text:s/></text:p>
          </table:table-cell>
          <table:table-cell office:value-type="float" office:value="590.73892000000001" table:formula="of:=SUM([.I219:.I221])" table:style-name="ce66">
            <text:p><text:s/>59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14.12528" table:style-name="ce33">
            <text:p><text:s/>1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11510999999999999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4.24039" table:formula="of:=SUM([.E223:.H223])" table:style-name="ce61">
            <text:p><text:s/>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96.485900000000001" table:style-name="ce33">
            <text:p><text:s/>96<text:s/></text:p>
          </table:table-cell>
          <table:table-cell office:value-type="float" office:value="652.42463699999996" table:style-name="ce33">
            <text:p><text:s/>652<text:s/></text:p>
          </table:table-cell>
          <table:table-cell office:value-type="float" office:value="12.790929999999999" table:style-name="ce33">
            <text:p><text:s/>1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61.70146699999998" table:formula="of:=SUM([.E224:.H224])" table:style-name="ce61">
            <text:p><text:s/>76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25:.H225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110.61118" table:formula="of:=SUM([.E223:.E225])" table:style-name="ce65">
            <text:p><text:s/>111<text:s/></text:p>
          </table:table-cell>
          <table:table-cell office:value-type="float" office:value="652.42463699999996" table:formula="of:=SUM([.F223:.F225])" table:style-name="ce65">
            <text:p><text:s/>652<text:s/></text:p>
          </table:table-cell>
          <table:table-cell office:value-type="float" office:value="12.906039999999999" table:formula="of:=SUM([.G223:.G225])" table:style-name="ce65">
            <text:p><text:s/>13<text:s/></text:p>
          </table:table-cell>
          <table:table-cell office:value-type="float" office:value="0" table:formula="of:=SUM([.H223:.H225])" table:style-name="ce65">
            <text:p><text:s/>-<text:s/></text:p>
          </table:table-cell>
          <table:table-cell office:value-type="float" office:value="775.94185700000003" table:formula="of:=SUM([.I223:.I225])" table:style-name="ce66">
            <text:p><text:s/>776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4 Total</text:p>
          </table:table-cell>
          <table:table-cell table:style-name="ce72"/>
          <table:table-cell table:style-name="ce77"/>
          <table:table-cell office:value-type="float" office:value="899.89769899999988" table:formula="of:=+[.E226]+[.E222]+[.E218]+[.E214]" table:style-name="ce43">
            <text:p><text:s/>900<text:s/></text:p>
          </table:table-cell>
          <table:table-cell office:value-type="float" office:value="1449.573932" table:formula="of:=+[.F226]+[.F222]+[.F218]+[.F214]" table:style-name="ce43">
            <text:p><text:s/>1,450<text:s/></text:p>
          </table:table-cell>
          <table:table-cell office:value-type="float" office:value="558.35745599999984" table:formula="of:=+[.G226]+[.G222]+[.G218]+[.G214]" table:style-name="ce43">
            <text:p><text:s/>558<text:s/></text:p>
          </table:table-cell>
          <table:table-cell office:value-type="float" office:value="1423.622384" table:formula="of:=+[.H226]+[.H222]+[.H218]+[.H214]" table:style-name="ce43">
            <text:p><text:s/>1,424<text:s/></text:p>
          </table:table-cell>
          <table:table-cell office:value-type="float" office:value="4331.4514710000003" table:formula="of:=+[.I226]+[.I222]+[.I218]+[.I214]" table:style-name="ce74">
            <text:p><text:s/>4,33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5" table:number-columns-spanned="1" table:number-rows-spanned="16" table:style-name="ce347">
            <text:p>2015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4.8079999999999998E-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1" table:style-name="ce33">
            <text:p><text:s/>41<text:s/></text:p>
          </table:table-cell>
          <table:table-cell office:value-type="float" office:value="41.048079999999999" table:formula="of:=SUM([.E228:.H228])" table:style-name="ce61">
            <text:p><text:s/>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4.8079999999999998E-2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.8079999999999998E-2" table:formula="of:=SUM([.E229:.H229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2" table:style-name="ce33">
            <text:p><text:s/>1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17" table:style-name="ce33">
            <text:p><text:s/>217<text:s/></text:p>
          </table:table-cell>
          <table:table-cell office:value-type="float" office:value="229" table:formula="of:=SUM([.E230:.H230])" table:style-name="ce61">
            <text:p><text:s/>2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12.096159999999999" table:formula="of:=SUM([.E228:.E230])" table:style-name="ce65">
            <text:p><text:s/>12<text:s/></text:p>
          </table:table-cell>
          <table:table-cell office:value-type="float" office:value="0" table:formula="of:=SUM([.F228:.F230])" table:style-name="ce65">
            <text:p><text:s/>-<text:s/></text:p>
          </table:table-cell>
          <table:table-cell office:value-type="float" office:value="0" table:formula="of:=SUM([.G228:.G230])" table:style-name="ce65">
            <text:p><text:s/>-<text:s/></text:p>
          </table:table-cell>
          <table:table-cell office:value-type="float" office:value="258" table:formula="of:=SUM([.H228:.H230])" table:style-name="ce65">
            <text:p><text:s/>258<text:s/></text:p>
          </table:table-cell>
          <table:table-cell office:value-type="float" office:value="270.09616" table:formula="of:=SUM([.I228:.I230])" table:style-name="ce66">
            <text:p><text:s/>27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36.67569799999998" table:style-name="ce33">
            <text:p><text:s/>237<text:s/></text:p>
          </table:table-cell>
          <table:table-cell office:value-type="float" office:value="120.74495200000003" table:style-name="ce33">
            <text:p><text:s/>121<text:s/></text:p>
          </table:table-cell>
          <table:table-cell office:value-type="float" office:value="279.5986079999999" table:style-name="ce33">
            <text:p><text:s/>280<text:s/></text:p>
          </table:table-cell>
          <table:table-cell office:value-type="float" office:value="891.72964200000001" table:style-name="ce33">
            <text:p><text:s/>892<text:s/></text:p>
          </table:table-cell>
          <table:table-cell office:value-type="float" office:value="1528.7489" table:formula="of:=SUM([.E232:.H232])" table:style-name="ce61">
            <text:p><text:s/>1,5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535.49726099999987" table:style-name="ce33">
            <text:p><text:s/>535<text:s/></text:p>
          </table:table-cell>
          <table:table-cell office:value-type="float" office:value="333.42279200000013" table:style-name="ce33">
            <text:p><text:s/>333<text:s/></text:p>
          </table:table-cell>
          <table:table-cell office:value-type="float" office:value="208.81524099999993" table:style-name="ce33">
            <text:p><text:s/>209<text:s/></text:p>
          </table:table-cell>
          <table:table-cell office:value-type="float" office:value="535.756169" table:style-name="ce33">
            <text:p><text:s/>536<text:s/></text:p>
          </table:table-cell>
          <table:table-cell office:value-type="float" office:value="1613.4914630000001" table:formula="of:=SUM([.E233:.H233])" table:style-name="ce61">
            <text:p><text:s/>1,6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.9108000000000001" table:style-name="ce33">
            <text:p><text:s/>2<text:s/></text:p>
          </table:table-cell>
          <table:table-cell office:value-type="float" office:value="3.2500000000000001E-2" table:style-name="ce33">
            <text:p><text:s/>0<text:s/></text:p>
          </table:table-cell>
          <table:table-cell office:value-type="float" office:value="0.875" table:style-name="ce33">
            <text:p><text:s/>1<text:s/></text:p>
          </table:table-cell>
          <table:table-cell office:value-type="float" office:value="20.009820000000001" table:style-name="ce33">
            <text:p><text:s/>20<text:s/></text:p>
          </table:table-cell>
          <table:table-cell office:value-type="float" office:value="22.828120000000002" table:formula="of:=SUM([.E234:.H234])" table:style-name="ce61">
            <text:p><text:s/>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774.08375899999987" table:formula="of:=SUM([.E232:.E234])" table:style-name="ce65">
            <text:p><text:s/>774<text:s/></text:p>
          </table:table-cell>
          <table:table-cell office:value-type="float" office:value="454.20024400000017" table:formula="of:=SUM([.F232:.F234])" table:style-name="ce65">
            <text:p><text:s/>454<text:s/></text:p>
          </table:table-cell>
          <table:table-cell office:value-type="float" office:value="489.2888489999998" table:formula="of:=SUM([.G232:.G234])" table:style-name="ce65">
            <text:p><text:s/>489<text:s/></text:p>
          </table:table-cell>
          <table:table-cell office:value-type="float" office:value="1447.495631" table:formula="of:=SUM([.H232:.H234])" table:style-name="ce65">
            <text:p><text:s/>1,447<text:s/></text:p>
          </table:table-cell>
          <table:table-cell office:value-type="float" office:value="3165.068483" table:formula="of:=SUM([.I232:.I234])" table:style-name="ce66">
            <text:p><text:s/>3,16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02" table:style-name="ce33">
            <text:p><text:s/>102<text:s/></text:p>
          </table:table-cell>
          <table:table-cell office:value-type="float" office:value="380" table:style-name="ce33">
            <text:p><text:s/>380<text:s/></text:p>
          </table:table-cell>
          <table:table-cell office:value-type="float" office:value="132" table:style-name="ce33">
            <text:p><text:s/>132<text:s/></text:p>
          </table:table-cell>
          <table:table-cell office:value-type="float" office:value="186" table:style-name="ce33">
            <text:p><text:s/>186<text:s/></text:p>
          </table:table-cell>
          <table:table-cell office:value-type="float" office:value="800" table:formula="of:=SUM([.E236:.H236])" table:style-name="ce61">
            <text:p><text:s/>80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47" table:style-name="ce33">
            <text:p><text:s/>4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7" table:formula="of:=SUM([.E237:.H237])" table:style-name="ce61">
            <text:p><text:s/>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38:.H238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149" table:formula="of:=SUM([.E236:.E238])" table:style-name="ce65">
            <text:p><text:s/>149<text:s/></text:p>
          </table:table-cell>
          <table:table-cell office:value-type="float" office:value="380" table:formula="of:=SUM([.F236:.F238])" table:style-name="ce65">
            <text:p><text:s/>380<text:s/></text:p>
          </table:table-cell>
          <table:table-cell office:value-type="float" office:value="132" table:formula="of:=SUM([.G236:.G238])" table:style-name="ce65">
            <text:p><text:s/>132<text:s/></text:p>
          </table:table-cell>
          <table:table-cell office:value-type="float" office:value="186" table:formula="of:=SUM([.H236:.H238])" table:style-name="ce65">
            <text:p><text:s/>186<text:s/></text:p>
          </table:table-cell>
          <table:table-cell office:value-type="float" office:value="847" table:formula="of:=SUM([.I236:.I238])" table:style-name="ce66">
            <text:p><text:s/>8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12.571980000000002" table:style-name="ce33">
            <text:p><text:s/>1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.1500000000000001E-3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2.579130000000001" table:formula="of:=SUM([.E240:.H240])" table:style-name="ce61">
            <text:p><text:s/>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07.18252" table:style-name="ce33">
            <text:p><text:s/>107<text:s/></text:p>
          </table:table-cell>
          <table:table-cell office:value-type="float" office:value="381.28640200000001" table:style-name="ce33">
            <text:p><text:s/>381<text:s/></text:p>
          </table:table-cell>
          <table:table-cell office:value-type="float" office:value="15.388439999999999" table:style-name="ce33">
            <text:p><text:s/>1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03.85736200000002" table:formula="of:=SUM([.E241:.H241])" table:style-name="ce61">
            <text:p><text:s/>5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42:.H242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119.75449999999999" table:formula="of:=SUM([.E240:.E242])" table:style-name="ce65">
            <text:p><text:s/>120<text:s/></text:p>
          </table:table-cell>
          <table:table-cell office:value-type="float" office:value="381.28640200000001" table:formula="of:=SUM([.F240:.F242])" table:style-name="ce65">
            <text:p><text:s/>381<text:s/></text:p>
          </table:table-cell>
          <table:table-cell office:value-type="float" office:value="15.395589999999999" table:formula="of:=SUM([.G240:.G242])" table:style-name="ce65">
            <text:p><text:s/>15<text:s/></text:p>
          </table:table-cell>
          <table:table-cell office:value-type="float" office:value="0" table:formula="of:=SUM([.H240:.H242])" table:style-name="ce65">
            <text:p><text:s/>-<text:s/></text:p>
          </table:table-cell>
          <table:table-cell office:value-type="float" office:value="516.43649200000004" table:formula="of:=SUM([.I240:.I242])" table:style-name="ce66">
            <text:p><text:s/>516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5 Total</text:p>
          </table:table-cell>
          <table:table-cell table:style-name="ce72"/>
          <table:table-cell table:style-name="ce77"/>
          <table:table-cell office:value-type="float" office:value="1054.9344189999999" table:formula="of:=+[.E243]+[.E239]+[.E235]+[.E231]" table:style-name="ce43">
            <text:p><text:s/>1,055<text:s/></text:p>
          </table:table-cell>
          <table:table-cell office:value-type="float" office:value="1215.4866460000001" table:formula="of:=+[.F243]+[.F239]+[.F235]+[.F231]" table:style-name="ce43">
            <text:p><text:s/>1,215<text:s/></text:p>
          </table:table-cell>
          <table:table-cell office:value-type="float" office:value="636.68443899999977" table:formula="of:=+[.G243]+[.G239]+[.G235]+[.G231]" table:style-name="ce43">
            <text:p><text:s/>637<text:s/></text:p>
          </table:table-cell>
          <table:table-cell office:value-type="float" office:value="1891.495631" table:formula="of:=+[.H243]+[.H239]+[.H235]+[.H231]" table:style-name="ce43">
            <text:p><text:s/>1,891<text:s/></text:p>
          </table:table-cell>
          <table:table-cell office:value-type="float" office:value="4798.6011349999999" table:formula="of:=+[.I243]+[.I239]+[.I235]+[.I231]" table:style-name="ce74">
            <text:p><text:s/>4,799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6" table:number-columns-spanned="1" table:number-rows-spanned="16" table:style-name="ce347">
            <text:p>2016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11" table:style-name="ce33">
            <text:p><text:s/>1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.44" table:style-name="ce33">
            <text:p><text:s/>3<text:s/></text:p>
          </table:table-cell>
          <table:table-cell office:value-type="float" office:value="14.44" table:formula="of:=SUM([.E245:.H245])" table:style-name="ce61">
            <text:p><text:s/>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46:.H246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4.34" table:style-name="ce33">
            <text:p><text:s/>1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2.36" table:style-name="ce33">
            <text:p><text:s/>62<text:s/></text:p>
          </table:table-cell>
          <table:table-cell office:value-type="float" office:value="76.7" table:formula="of:=SUM([.E247:.H247])" table:style-name="ce61">
            <text:p><text:s/>7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25.34" table:formula="of:=SUM([.E245:.E247])" table:style-name="ce65">
            <text:p><text:s/>25<text:s/></text:p>
          </table:table-cell>
          <table:table-cell office:value-type="float" office:value="0" table:formula="of:=SUM([.F245:.F247])" table:style-name="ce65">
            <text:p><text:s/>-<text:s/></text:p>
          </table:table-cell>
          <table:table-cell office:value-type="float" office:value="0" table:formula="of:=SUM([.G245:.G247])" table:style-name="ce65">
            <text:p><text:s/>-<text:s/></text:p>
          </table:table-cell>
          <table:table-cell office:value-type="float" office:value="65.8" table:formula="of:=SUM([.H245:.H247])" table:style-name="ce65">
            <text:p><text:s/>66<text:s/></text:p>
          </table:table-cell>
          <table:table-cell office:value-type="float" office:value="91.14" table:formula="of:=SUM([.I245:.I247])" table:style-name="ce66">
            <text:p><text:s/>9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75.375328" table:style-name="ce33">
            <text:p><text:s/>175<text:s/></text:p>
          </table:table-cell>
          <table:table-cell office:value-type="float" office:value="104.18323900000003" table:style-name="ce33">
            <text:p><text:s/>104<text:s/></text:p>
          </table:table-cell>
          <table:table-cell office:value-type="float" office:value="128.67824100000004" table:style-name="ce33">
            <text:p><text:s/>129<text:s/></text:p>
          </table:table-cell>
          <table:table-cell office:value-type="float" office:value="879.76805900000045" table:style-name="ce33">
            <text:p><text:s/>880<text:s/></text:p>
          </table:table-cell>
          <table:table-cell office:value-type="float" office:value="1288.0048670000006" table:formula="of:=SUM([.E249:.H249])" table:style-name="ce61">
            <text:p><text:s/>1,28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667.69780699999956" table:style-name="ce33">
            <text:p><text:s/>668<text:s/></text:p>
          </table:table-cell>
          <table:table-cell office:value-type="float" office:value="277.63372899999996" table:style-name="ce33">
            <text:p><text:s/>278<text:s/></text:p>
          </table:table-cell>
          <table:table-cell office:value-type="float" office:value="178.11242999999996" table:style-name="ce33">
            <text:p><text:s/>178<text:s/></text:p>
          </table:table-cell>
          <table:table-cell office:value-type="float" office:value="717.95495200000005" table:style-name="ce33">
            <text:p><text:s/>718<text:s/></text:p>
          </table:table-cell>
          <table:table-cell office:value-type="float" office:value="1841.3989179999994" table:formula="of:=SUM([.E250:.H250])" table:style-name="ce61">
            <text:p><text:s/>1,8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.24" table:style-name="ce33">
            <text:p><text:s/>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6.939170000000004" table:style-name="ce33">
            <text:p><text:s/>37<text:s/></text:p>
          </table:table-cell>
          <table:table-cell office:value-type="float" office:value="44.179170000000006" table:formula="of:=SUM([.E251:.H251])" table:style-name="ce61">
            <text:p><text:s/>4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850.31313499999953" table:formula="of:=SUM([.E249:.E251])" table:style-name="ce65">
            <text:p><text:s/>850<text:s/></text:p>
          </table:table-cell>
          <table:table-cell office:value-type="float" office:value="381.81696799999997" table:formula="of:=SUM([.F249:.F251])" table:style-name="ce65">
            <text:p><text:s/>382<text:s/></text:p>
          </table:table-cell>
          <table:table-cell office:value-type="float" office:value="306.79067099999997" table:formula="of:=SUM([.G249:.G251])" table:style-name="ce65">
            <text:p><text:s/>307<text:s/></text:p>
          </table:table-cell>
          <table:table-cell office:value-type="float" office:value="1634.6621810000006" table:formula="of:=SUM([.H249:.H251])" table:style-name="ce65">
            <text:p><text:s/>1,635<text:s/></text:p>
          </table:table-cell>
          <table:table-cell office:value-type="float" office:value="3173.5829549999999" table:formula="of:=SUM([.I249:.I251])" table:style-name="ce66">
            <text:p><text:s/>3,17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68.04205000000002" table:style-name="ce33">
            <text:p><text:s/>168<text:s/></text:p>
          </table:table-cell>
          <table:table-cell office:value-type="float" office:value="510.43926500000003" table:style-name="ce33">
            <text:p><text:s/>510<text:s/></text:p>
          </table:table-cell>
          <table:table-cell office:value-type="float" office:value="162.66582899999997" table:style-name="ce33">
            <text:p><text:s/>163<text:s/></text:p>
          </table:table-cell>
          <table:table-cell office:value-type="float" office:value="406.82871" table:style-name="ce33">
            <text:p><text:s/>407<text:s/></text:p>
          </table:table-cell>
          <table:table-cell office:value-type="float" office:value="1247.975854" table:formula="of:=SUM([.E253:.H253])" table:style-name="ce61">
            <text:p><text:s/>1,24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8.93" table:style-name="ce33">
            <text:p><text:s/>1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8.93" table:formula="of:=SUM([.E254:.H254])" table:style-name="ce61">
            <text:p><text:s/>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55:.H255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186.97205000000002" table:formula="of:=SUM([.E253:.E255])" table:style-name="ce65">
            <text:p><text:s/>187<text:s/></text:p>
          </table:table-cell>
          <table:table-cell office:value-type="float" office:value="510.43926500000003" table:formula="of:=SUM([.F253:.F255])" table:style-name="ce65">
            <text:p><text:s/>510<text:s/></text:p>
          </table:table-cell>
          <table:table-cell office:value-type="float" office:value="162.66582899999997" table:formula="of:=SUM([.G253:.G255])" table:style-name="ce65">
            <text:p><text:s/>163<text:s/></text:p>
          </table:table-cell>
          <table:table-cell office:value-type="float" office:value="406.82871" table:formula="of:=SUM([.H253:.H255])" table:style-name="ce65">
            <text:p><text:s/>407<text:s/></text:p>
          </table:table-cell>
          <table:table-cell office:value-type="float" office:value="1266.9058540000001" table:formula="of:=SUM([.I253:.I255])" table:style-name="ce66">
            <text:p><text:s/>1,2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308" table:style-name="ce33">
            <text:p><text:s/>0<text:s/></text:p>
          </table:table-cell>
          <table:table-cell office:value-type="float" office:value="0.21975" table:style-name="ce33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.52774999999999994" table:formula="of:=SUM([.E257:.H257])" table:style-name="ce61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2.843000000000004" table:style-name="ce33">
            <text:p><text:s/>33<text:s/></text:p>
          </table:table-cell>
          <table:table-cell office:value-type="float" office:value="127.51472600000001" table:style-name="ce33">
            <text:p><text:s/>128<text:s/></text:p>
          </table:table-cell>
          <table:table-cell office:value-type="float" office:value="57.422830000000005" table:style-name="ce33">
            <text:p><text:s/>57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17.78055600000002" table:formula="of:=SUM([.E258:.H258])" table:style-name="ce61">
            <text:p><text:s/>2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59:.H259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32.843000000000004" table:formula="of:=SUM([.E257:.E259])" table:style-name="ce65">
            <text:p><text:s/>33<text:s/></text:p>
          </table:table-cell>
          <table:table-cell office:value-type="float" office:value="127.82272600000002" table:formula="of:=SUM([.F257:.F259])" table:style-name="ce65">
            <text:p><text:s/>128<text:s/></text:p>
          </table:table-cell>
          <table:table-cell office:value-type="float" office:value="57.642580000000002" table:formula="of:=SUM([.G257:.G259])" table:style-name="ce65">
            <text:p><text:s/>58<text:s/></text:p>
          </table:table-cell>
          <table:table-cell office:value-type="float" office:value="0" table:formula="of:=SUM([.H257:.H259])" table:style-name="ce65">
            <text:p><text:s/>-<text:s/></text:p>
          </table:table-cell>
          <table:table-cell office:value-type="float" office:value="218.30830600000002" table:formula="of:=SUM([.I257:.I259])" table:style-name="ce66">
            <text:p><text:s/>218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6 Total</text:p>
          </table:table-cell>
          <table:table-cell table:style-name="ce72"/>
          <table:table-cell table:style-name="ce77"/>
          <table:table-cell office:value-type="float" office:value="1095.4681849999995" table:formula="of:=+[.E260]+[.E256]+[.E252]+[.E248]" table:style-name="ce43">
            <text:p><text:s/>1,095<text:s/></text:p>
          </table:table-cell>
          <table:table-cell office:value-type="float" office:value="1020.0789590000001" table:formula="of:=+[.F260]+[.F256]+[.F252]+[.F248]" table:style-name="ce43">
            <text:p><text:s/>1,020<text:s/></text:p>
          </table:table-cell>
          <table:table-cell office:value-type="float" office:value="527.09907999999996" table:formula="of:=+[.G260]+[.G256]+[.G252]+[.G248]" table:style-name="ce43">
            <text:p><text:s/>527<text:s/></text:p>
          </table:table-cell>
          <table:table-cell office:value-type="float" office:value="2107.2908910000006" table:formula="of:=+[.H260]+[.H256]+[.H252]+[.H248]" table:style-name="ce43">
            <text:p><text:s/>2,107<text:s/></text:p>
          </table:table-cell>
          <table:table-cell office:value-type="float" office:value="4749.9371149999997" table:formula="of:=+[.I260]+[.I256]+[.I252]+[.I248]" table:style-name="ce74">
            <text:p><text:s/>4,750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7" table:number-columns-spanned="1" table:number-rows-spanned="16" table:style-name="ce347">
            <text:p>2017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7.7335799999999999" table:style-name="ce33">
            <text:p><text:s/>8<text:s/>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float" office:value="9.5579999999999998E-2" table:style-name="ce33">
            <text:p><text:s/>0<text:s/></text:p>
          </table:table-cell>
          <table:table-cell office:value-type="float" office:value="7.8291599999999999" table:formula="of:=SUM([.E262:.H262])" table:style-name="ce61">
            <text:p><text:s/>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float" office:value="2.52E-2" table:style-name="ce33">
            <text:p><text:s/>0<text:s/></text:p>
          </table:table-cell>
          <table:table-cell office:value-type="float" office:value="2.52E-2" table:formula="of:=SUM([.E263:.H263])" table:style-name="ce61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.6373600000000001" table:style-name="ce33">
            <text:p><text:s/>8<text:s/>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float" office:value="57.618099999999998" table:style-name="ce33">
            <text:p><text:s/>58<text:s/></text:p>
          </table:table-cell>
          <table:table-cell office:value-type="float" office:value="65.255459999999999" table:formula="of:=SUM([.E264:.H264])" table:style-name="ce61">
            <text:p><text:s/>6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15.370940000000001" table:formula="of:=SUM([.E262:.E264])" table:style-name="ce65">
            <text:p><text:s/>15<text:s/></text:p>
          </table:table-cell>
          <table:table-cell office:value-type="float" office:value="0" table:formula="of:=SUM([.F262:.F264])" table:style-name="ce65">
            <text:p><text:s/>-<text:s/></text:p>
          </table:table-cell>
          <table:table-cell office:value-type="float" office:value="0" table:formula="of:=SUM([.G262:.G264])" table:style-name="ce65">
            <text:p><text:s/>-<text:s/></text:p>
          </table:table-cell>
          <table:table-cell office:value-type="float" office:value="57.738880000000002" table:formula="of:=SUM([.H262:.H264])" table:style-name="ce65">
            <text:p><text:s/>58<text:s/></text:p>
          </table:table-cell>
          <table:table-cell office:value-type="float" office:value="73.109819999999999" table:formula="of:=SUM([.I262:.I264])" table:style-name="ce66">
            <text:p><text:s/>7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81.116190000000017" table:style-name="ce33">
            <text:p><text:s/>81<text:s/></text:p>
          </table:table-cell>
          <table:table-cell office:value-type="float" office:value="92.675240000000002" table:style-name="ce33">
            <text:p><text:s/>93<text:s/></text:p>
          </table:table-cell>
          <table:table-cell office:value-type="float" office:value="187.35507899999999" table:style-name="ce33">
            <text:p><text:s/>187<text:s/></text:p>
          </table:table-cell>
          <table:table-cell office:value-type="float" office:value="648.29539" table:style-name="ce33">
            <text:p><text:s/>648<text:s/></text:p>
          </table:table-cell>
          <table:table-cell office:value-type="float" office:value="1009.441899" table:formula="of:=SUM([.E266:.H266])" table:style-name="ce61">
            <text:p><text:s/>1,0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663.52918300000044" table:style-name="ce33">
            <text:p><text:s/>664<text:s/></text:p>
          </table:table-cell>
          <table:table-cell office:value-type="float" office:value="247.77426900000006" table:style-name="ce33">
            <text:p><text:s/>248<text:s/></text:p>
          </table:table-cell>
          <table:table-cell office:value-type="float" office:value="155.77500900000013" table:style-name="ce33">
            <text:p><text:s/>156<text:s/></text:p>
          </table:table-cell>
          <table:table-cell office:value-type="float" office:value="761.10616499999992" table:style-name="ce33">
            <text:p><text:s/>761<text:s/></text:p>
          </table:table-cell>
          <table:table-cell office:value-type="float" office:value="1828.1846260000007" table:formula="of:=SUM([.E267:.H267])" table:style-name="ce61">
            <text:p><text:s/>1,8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5.0716000000000001" table:style-name="ce33">
            <text:p><text:s/>5<text:s/>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float" office:value="36.649209999999997" table:style-name="ce33">
            <text:p><text:s/>37<text:s/></text:p>
          </table:table-cell>
          <table:table-cell office:value-type="float" office:value="41.72081" table:formula="of:=SUM([.E268:.H268])" table:style-name="ce61">
            <text:p><text:s/>4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749.71697300000051" table:formula="of:=SUM([.E266:.E268])" table:style-name="ce65">
            <text:p><text:s/>750<text:s/></text:p>
          </table:table-cell>
          <table:table-cell office:value-type="float" office:value="340.44950900000003" table:formula="of:=SUM([.F266:.F268])" table:style-name="ce65">
            <text:p><text:s/>340<text:s/></text:p>
          </table:table-cell>
          <table:table-cell office:value-type="float" office:value="343.13008800000011" table:formula="of:=SUM([.G266:.G268])" table:style-name="ce65">
            <text:p><text:s/>343<text:s/></text:p>
          </table:table-cell>
          <table:table-cell office:value-type="float" office:value="1446.050765" table:formula="of:=SUM([.H266:.H268])" table:style-name="ce65">
            <text:p><text:s/>1,446<text:s/></text:p>
          </table:table-cell>
          <table:table-cell office:value-type="float" office:value="2879.3473350000004" table:formula="of:=SUM([.I266:.I268])" table:style-name="ce66">
            <text:p><text:s/>2,8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214.94259999999997" table:style-name="ce33">
            <text:p><text:s/>215<text:s/></text:p>
          </table:table-cell>
          <table:table-cell office:value-type="float" office:value="211.97330000000002" table:style-name="ce33">
            <text:p><text:s/>212<text:s/></text:p>
          </table:table-cell>
          <table:table-cell office:value-type="float" office:value="162.15187100000003" table:style-name="ce33">
            <text:p><text:s/>162<text:s/></text:p>
          </table:table-cell>
          <table:table-cell office:value-type="float" office:value="227.28548999999998" table:style-name="ce33">
            <text:p><text:s/>227<text:s/></text:p>
          </table:table-cell>
          <table:table-cell office:value-type="float" office:value="816.35326099999997" table:formula="of:=SUM([.E270:.H270])" table:style-name="ce61">
            <text:p><text:s/>8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float" office:value="0" table:formula="of:=SUM([.E271:.H271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72:.H272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214.94259999999997" table:formula="of:=SUM([.E270:.E272])" table:style-name="ce65">
            <text:p><text:s/>215<text:s/></text:p>
          </table:table-cell>
          <table:table-cell office:value-type="float" office:value="211.97330000000002" table:formula="of:=SUM([.F270:.F272])" table:style-name="ce65">
            <text:p><text:s/>212<text:s/></text:p>
          </table:table-cell>
          <table:table-cell office:value-type="float" office:value="162.15187100000003" table:formula="of:=SUM([.G270:.G272])" table:style-name="ce65">
            <text:p><text:s/>162<text:s/></text:p>
          </table:table-cell>
          <table:table-cell office:value-type="float" office:value="227.28548999999998" table:formula="of:=SUM([.H270:.H272])" table:style-name="ce65">
            <text:p><text:s/>227<text:s/></text:p>
          </table:table-cell>
          <table:table-cell office:value-type="float" office:value="816.35326099999997" table:formula="of:=SUM([.I270:.I272])" table:style-name="ce66">
            <text:p><text:s/>8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string" table:style-name="ce33">
            <text:p>-</text:p>
          </table:table-cell>
          <table:table-cell office:value-type="float" office:value="33.707999999999998" table:style-name="ce33">
            <text:p><text:s/>34<text:s/></text:p>
          </table:table-cell>
          <table:table-cell office:value-type="float" office:value="2.538E-2" table:style-name="ce33">
            <text:p><text:s/>0<text:s/></text:p>
          </table:table-cell>
          <table:table-cell office:value-type="string" table:style-name="ce33">
            <text:p>-</text:p>
          </table:table-cell>
          <table:table-cell office:value-type="float" office:value="33.733379999999997" table:formula="of:=SUM([.E274:.H274])" table:style-name="ce61">
            <text:p><text:s/>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0.182" table:style-name="ce33">
            <text:p><text:s/>10<text:s/></text:p>
          </table:table-cell>
          <table:table-cell office:value-type="float" office:value="235.01760100000001" table:style-name="ce33">
            <text:p><text:s/>235<text:s/></text:p>
          </table:table-cell>
          <table:table-cell office:value-type="float" office:value="12.990190000000002" table:style-name="ce33">
            <text:p><text:s/>13<text:s/></text:p>
          </table:table-cell>
          <table:table-cell office:value-type="string" table:style-name="ce33">
            <text:p>-</text:p>
          </table:table-cell>
          <table:table-cell office:value-type="float" office:value="258.18979100000001" table:formula="of:=SUM([.E275:.H275])" table:style-name="ce61">
            <text:p><text:s/>2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76:.H276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10.182" table:formula="of:=SUM([.E274:.E276])" table:style-name="ce65">
            <text:p><text:s/>10<text:s/></text:p>
          </table:table-cell>
          <table:table-cell office:value-type="float" office:value="268.72560099999998" table:formula="of:=SUM([.F274:.F276])" table:style-name="ce65">
            <text:p><text:s/>269<text:s/></text:p>
          </table:table-cell>
          <table:table-cell office:value-type="float" office:value="13.015570000000002" table:formula="of:=SUM([.G274:.G276])" table:style-name="ce65">
            <text:p><text:s/>13<text:s/></text:p>
          </table:table-cell>
          <table:table-cell office:value-type="float" office:value="0" table:formula="of:=SUM([.H274:.H276])" table:style-name="ce65">
            <text:p><text:s/>-<text:s/></text:p>
          </table:table-cell>
          <table:table-cell office:value-type="float" office:value="291.92317100000002" table:formula="of:=SUM([.I274:.I276])" table:style-name="ce66">
            <text:p><text:s/>29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7 Total</text:p>
          </table:table-cell>
          <table:table-cell table:style-name="ce72"/>
          <table:table-cell table:style-name="ce77"/>
          <table:table-cell office:value-type="float" office:value="990.21251300000051" table:formula="of:=+[.E277]+[.E273]+[.E269]+[.E265]" table:style-name="ce43">
            <text:p><text:s/>990<text:s/></text:p>
          </table:table-cell>
          <table:table-cell office:value-type="float" office:value="821.14841000000001" table:formula="of:=+[.F277]+[.F273]+[.F269]+[.F265]" table:style-name="ce43">
            <text:p><text:s/>821<text:s/></text:p>
          </table:table-cell>
          <table:table-cell office:value-type="float" office:value="518.29752900000017" table:formula="of:=+[.G277]+[.G273]+[.G269]+[.G265]" table:style-name="ce43">
            <text:p><text:s/>518<text:s/></text:p>
          </table:table-cell>
          <table:table-cell office:value-type="float" office:value="1731.075135" table:formula="of:=+[.H277]+[.H273]+[.H269]+[.H265]" table:style-name="ce43">
            <text:p><text:s/>1,731<text:s/></text:p>
          </table:table-cell>
          <table:table-cell office:value-type="float" office:value="4060.7335870000006" table:formula="of:=+[.I277]+[.I273]+[.I269]+[.I265]" table:style-name="ce74">
            <text:p><text:s/>4,06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8" table:number-columns-spanned="1" table:number-rows-spanned="16" table:style-name="ce347">
            <text:p>2018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13.8" table:style-name="ce33">
            <text:p><text:s/>1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5.2" table:style-name="ce33">
            <text:p><text:s/>25<text:s/></text:p>
          </table:table-cell>
          <table:table-cell office:value-type="float" office:value="39" table:formula="of:=SUM([.E279:.H279])" table:style-name="ce61">
            <text:p><text:s/>3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80:.H280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0.7" table:style-name="ce33">
            <text:p><text:s/>1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5.9" table:style-name="ce33">
            <text:p><text:s/>46<text:s/></text:p>
          </table:table-cell>
          <table:table-cell office:value-type="float" office:value="56.599999999999994" table:formula="of:=SUM([.E281:.H281])" table:style-name="ce61">
            <text:p><text:s/>5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24.5" table:formula="of:=SUM([.E279:.E281])" table:style-name="ce65">
            <text:p><text:s/>25<text:s/></text:p>
          </table:table-cell>
          <table:table-cell office:value-type="float" office:value="0" table:formula="of:=SUM([.F279:.F281])" table:style-name="ce65">
            <text:p><text:s/>-<text:s/></text:p>
          </table:table-cell>
          <table:table-cell office:value-type="float" office:value="0" table:formula="of:=SUM([.G279:.G281])" table:style-name="ce65">
            <text:p><text:s/>-<text:s/></text:p>
          </table:table-cell>
          <table:table-cell office:value-type="float" office:value="71.099999999999994" table:formula="of:=SUM([.H279:.H281])" table:style-name="ce65">
            <text:p><text:s/>71<text:s/></text:p>
          </table:table-cell>
          <table:table-cell office:value-type="float" office:value="95.6" table:formula="of:=SUM([.I279:.I281])" table:style-name="ce66">
            <text:p><text:s/>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19.8" table:style-name="ce33">
            <text:p><text:s/>120<text:s/></text:p>
          </table:table-cell>
          <table:table-cell office:value-type="float" office:value="135.69999999999999" table:style-name="ce33">
            <text:p><text:s/>136<text:s/></text:p>
          </table:table-cell>
          <table:table-cell office:value-type="float" office:value="88.8" table:style-name="ce33">
            <text:p><text:s/>89<text:s/></text:p>
          </table:table-cell>
          <table:table-cell office:value-type="float" office:value="848.2" table:style-name="ce33">
            <text:p><text:s/>848<text:s/></text:p>
          </table:table-cell>
          <table:table-cell office:value-type="float" office:value="1192.5" table:formula="of:=SUM([.E283:.H283])" table:style-name="ce61">
            <text:p><text:s/>1,19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744.4" table:style-name="ce33">
            <text:p><text:s/>744<text:s/></text:p>
          </table:table-cell>
          <table:table-cell office:value-type="float" office:value="105.7" table:style-name="ce33">
            <text:p><text:s/>106<text:s/></text:p>
          </table:table-cell>
          <table:table-cell office:value-type="float" office:value="174.3" table:style-name="ce33">
            <text:p><text:s/>174<text:s/></text:p>
          </table:table-cell>
          <table:table-cell office:value-type="float" office:value="603.29999999999995" table:style-name="ce33">
            <text:p><text:s/>603<text:s/></text:p>
          </table:table-cell>
          <table:table-cell office:value-type="float" office:value="1627.7" table:formula="of:=SUM([.E284:.H284])" table:style-name="ce61">
            <text:p><text:s/>1,6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.4" table:style-name="ce33">
            <text:p><text:s/>2<text:s/></text:p>
          </table:table-cell>
          <table:table-cell office:value-type="float" office:value="20.399999999999999" table:style-name="ce33">
            <text:p><text:s/>20<text:s/></text:p>
          </table:table-cell>
          <table:table-cell office:value-type="float" office:value="22.799999999999997" table:formula="of:=SUM([.E285:.H285])" table:style-name="ce61">
            <text:p><text:s/>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864.19999999999993" table:formula="of:=SUM([.E283:.E285])" table:style-name="ce65">
            <text:p><text:s/>864<text:s/></text:p>
          </table:table-cell>
          <table:table-cell office:value-type="float" office:value="241.39999999999998" table:formula="of:=SUM([.F283:.F285])" table:style-name="ce65">
            <text:p><text:s/>241<text:s/></text:p>
          </table:table-cell>
          <table:table-cell office:value-type="float" office:value="265.5" table:formula="of:=SUM([.G283:.G285])" table:style-name="ce65">
            <text:p><text:s/>266<text:s/></text:p>
          </table:table-cell>
          <table:table-cell office:value-type="float" office:value="1471.9" table:formula="of:=SUM([.H283:.H285])" table:style-name="ce65">
            <text:p><text:s/>1,472<text:s/></text:p>
          </table:table-cell>
          <table:table-cell office:value-type="float" office:value="2843" table:formula="of:=SUM([.I283:.I285])" table:style-name="ce66">
            <text:p><text:s/>2,8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427.6" table:style-name="ce33">
            <text:p><text:s/>428<text:s/></text:p>
          </table:table-cell>
          <table:table-cell office:value-type="float" office:value="201.2" table:style-name="ce33">
            <text:p><text:s/>201<text:s/></text:p>
          </table:table-cell>
          <table:table-cell office:value-type="float" office:value="79.5" table:style-name="ce33">
            <text:p><text:s/>80<text:s/></text:p>
          </table:table-cell>
          <table:table-cell office:value-type="float" office:value="250.6" table:style-name="ce33">
            <text:p><text:s/>251<text:s/></text:p>
          </table:table-cell>
          <table:table-cell office:value-type="float" office:value="958.9" table:formula="of:=SUM([.E287:.H287])" table:style-name="ce61">
            <text:p><text:s/>95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88:.H288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89:.H289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427.6" table:formula="of:=SUM([.E287:.E289])" table:style-name="ce65">
            <text:p><text:s/>428<text:s/></text:p>
          </table:table-cell>
          <table:table-cell office:value-type="float" office:value="201.2" table:formula="of:=SUM([.F287:.F289])" table:style-name="ce65">
            <text:p><text:s/>201<text:s/></text:p>
          </table:table-cell>
          <table:table-cell office:value-type="float" office:value="79.5" table:formula="of:=SUM([.G287:.G289])" table:style-name="ce65">
            <text:p><text:s/>80<text:s/></text:p>
          </table:table-cell>
          <table:table-cell office:value-type="float" office:value="250.6" table:formula="of:=SUM([.H287:.H289])" table:style-name="ce65">
            <text:p><text:s/>251<text:s/></text:p>
          </table:table-cell>
          <table:table-cell office:value-type="float" office:value="958.9" table:formula="of:=SUM([.I287:.I289])" table:style-name="ce66">
            <text:p><text:s/>95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.9" table:style-name="ce33">
            <text:p><text:s/>1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.9" table:formula="of:=SUM([.E291:.H291])" table:style-name="ce61">
            <text:p><text:s/>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7.7" table:style-name="ce33">
            <text:p><text:s/>18<text:s/></text:p>
          </table:table-cell>
          <table:table-cell office:value-type="float" office:value="240.1" table:style-name="ce33">
            <text:p><text:s/>24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57.8" table:formula="of:=SUM([.E292:.H292])" table:style-name="ce61">
            <text:p><text:s/>2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293:.H293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17.7" table:formula="of:=SUM([.E291:.E293])" table:style-name="ce65">
            <text:p><text:s/>18<text:s/></text:p>
          </table:table-cell>
          <table:table-cell office:value-type="float" office:value="256" table:formula="of:=SUM([.F291:.F293])" table:style-name="ce65">
            <text:p><text:s/>256<text:s/></text:p>
          </table:table-cell>
          <table:table-cell office:value-type="float" office:value="0" table:formula="of:=SUM([.G291:.G293])" table:style-name="ce65">
            <text:p><text:s/>-<text:s/></text:p>
          </table:table-cell>
          <table:table-cell office:value-type="float" office:value="0" table:formula="of:=SUM([.H291:.H293])" table:style-name="ce65">
            <text:p><text:s/>-<text:s/></text:p>
          </table:table-cell>
          <table:table-cell office:value-type="float" office:value="273.7" table:formula="of:=SUM([.I291:.I293])" table:style-name="ce66">
            <text:p><text:s/>274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8 Total</text:p>
          </table:table-cell>
          <table:table-cell table:style-name="ce72"/>
          <table:table-cell table:style-name="ce77"/>
          <table:table-cell office:value-type="float" office:value="1334" table:formula="of:=+[.E294]+[.E290]+[.E286]+[.E282]" table:style-name="ce43">
            <text:p><text:s/>1,334<text:s/></text:p>
          </table:table-cell>
          <table:table-cell office:value-type="float" office:value="698.59999999999991" table:formula="of:=+[.F294]+[.F290]+[.F286]+[.F282]" table:style-name="ce43">
            <text:p><text:s/>699<text:s/></text:p>
          </table:table-cell>
          <table:table-cell office:value-type="float" office:value="345" table:formula="of:=+[.G294]+[.G290]+[.G286]+[.G282]" table:style-name="ce43">
            <text:p><text:s/>345<text:s/></text:p>
          </table:table-cell>
          <table:table-cell office:value-type="float" office:value="1793.6" table:formula="of:=+[.H294]+[.H290]+[.H286]+[.H282]" table:style-name="ce43">
            <text:p><text:s/>1,794<text:s/></text:p>
          </table:table-cell>
          <table:table-cell office:value-type="float" office:value="4171.2" table:formula="of:=+[.I294]+[.I290]+[.I286]+[.I282]" table:style-name="ce74">
            <text:p><text:s/>4,17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9" table:number-columns-spanned="1" table:number-rows-spanned="16" table:style-name="ce347">
            <text:p>2019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7" table:style-name="ce33">
            <text:p><text:s/>7<text:s/></text:p>
          </table:table-cell>
          <table:table-cell table:number-columns-repeated="2" table:style-name="ce33"/>
          <table:table-cell office:value-type="float" office:value="34" table:style-name="ce33">
            <text:p><text:s/>34<text:s/></text:p>
          </table:table-cell>
          <table:table-cell office:value-type="float" office:value="41" table:formula="of:=SUM([.E296:.H296])" table:style-name="ce61">
            <text:p><text:s/>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table:number-columns-repeated="4" table:style-name="ce33"/>
          <table:table-cell office:value-type="float" office:value="0" table:formula="of:=SUM([.E297:.H297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9" table:style-name="ce33">
            <text:p><text:s/>9<text:s/></text:p>
          </table:table-cell>
          <table:table-cell table:number-columns-repeated="2" table:style-name="ce33"/>
          <table:table-cell office:value-type="float" office:value="54" table:style-name="ce33">
            <text:p><text:s/>54<text:s/></text:p>
          </table:table-cell>
          <table:table-cell office:value-type="float" office:value="63" table:formula="of:=SUM([.E298:.H298])" table:style-name="ce61">
            <text:p><text:s/>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16" table:formula="of:=SUM([.E296:.E298])" table:style-name="ce65">
            <text:p><text:s/>16<text:s/></text:p>
          </table:table-cell>
          <table:table-cell office:value-type="float" office:value="0" table:formula="of:=SUM([.F296:.F298])" table:style-name="ce65">
            <text:p><text:s/>-<text:s/></text:p>
          </table:table-cell>
          <table:table-cell office:value-type="float" office:value="0" table:formula="of:=SUM([.G296:.G298])" table:style-name="ce65">
            <text:p><text:s/>-<text:s/></text:p>
          </table:table-cell>
          <table:table-cell office:value-type="float" office:value="88" table:formula="of:=SUM([.H296:.H298])" table:style-name="ce65">
            <text:p><text:s/>88<text:s/></text:p>
          </table:table-cell>
          <table:table-cell office:value-type="float" office:value="104" table:formula="of:=SUM([.I296:.I298])" table:style-name="ce66">
            <text:p><text:s/>1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40" table:style-name="ce33">
            <text:p><text:s/>240<text:s/></text:p>
          </table:table-cell>
          <table:table-cell office:value-type="float" office:value="136" table:style-name="ce33">
            <text:p><text:s/>136<text:s/></text:p>
          </table:table-cell>
          <table:table-cell office:value-type="float" office:value="28" table:style-name="ce33">
            <text:p><text:s/>28<text:s/></text:p>
          </table:table-cell>
          <table:table-cell office:value-type="float" office:value="686" table:style-name="ce33">
            <text:p><text:s/>686<text:s/></text:p>
          </table:table-cell>
          <table:table-cell office:value-type="float" office:value="1090" table:formula="of:=SUM([.E300:.H300])" table:style-name="ce61">
            <text:p><text:s/>1,0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999" table:style-name="ce33">
            <text:p><text:s/>999<text:s/></text:p>
          </table:table-cell>
          <table:table-cell office:value-type="float" office:value="8" table:style-name="ce33">
            <text:p><text:s/>8<text:s/></text:p>
          </table:table-cell>
          <table:table-cell office:value-type="float" office:value="161" table:style-name="ce33">
            <text:p><text:s/>161<text:s/></text:p>
          </table:table-cell>
          <table:table-cell office:value-type="float" office:value="440" table:style-name="ce33">
            <text:p><text:s/>440<text:s/></text:p>
          </table:table-cell>
          <table:table-cell office:value-type="float" office:value="1608" table:formula="of:=SUM([.E301:.H301])" table:style-name="ce61">
            <text:p><text:s/>1,60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table:number-columns-repeated="3" table:style-name="ce33"/>
          <table:table-cell office:value-type="float" office:value="41" table:style-name="ce33">
            <text:p><text:s/>41<text:s/></text:p>
          </table:table-cell>
          <table:table-cell office:value-type="float" office:value="41" table:formula="of:=SUM([.E302:.H302])" table:style-name="ce61">
            <text:p><text:s/>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1239" table:formula="of:=SUM([.E300:.E302])" table:style-name="ce65">
            <text:p><text:s/>1,239<text:s/></text:p>
          </table:table-cell>
          <table:table-cell office:value-type="float" office:value="144" table:formula="of:=SUM([.F300:.F302])" table:style-name="ce65">
            <text:p><text:s/>144<text:s/></text:p>
          </table:table-cell>
          <table:table-cell office:value-type="float" office:value="189" table:formula="of:=SUM([.G300:.G302])" table:style-name="ce65">
            <text:p><text:s/>189<text:s/></text:p>
          </table:table-cell>
          <table:table-cell office:value-type="float" office:value="1167" table:formula="of:=SUM([.H300:.H302])" table:style-name="ce65">
            <text:p><text:s/>1,167<text:s/></text:p>
          </table:table-cell>
          <table:table-cell office:value-type="float" office:value="2739" table:formula="of:=SUM([.I300:.I302])" table:style-name="ce66">
            <text:p><text:s/>2,73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421" table:style-name="ce33">
            <text:p><text:s/>421<text:s/></text:p>
          </table:table-cell>
          <table:table-cell office:value-type="float" office:value="420" table:style-name="ce33">
            <text:p><text:s/>420<text:s/></text:p>
          </table:table-cell>
          <table:table-cell office:value-type="float" office:value="83" table:style-name="ce33">
            <text:p><text:s/>83<text:s/></text:p>
          </table:table-cell>
          <table:table-cell table:style-name="ce33"/>
          <table:table-cell office:value-type="float" office:value="924" table:formula="of:=SUM([.E304:.H304])" table:style-name="ce61">
            <text:p><text:s/>924<text:s/>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table:number-columns-repeated="2" table:style-name="ce33"/>
          <table:table-cell office:value-type="float" office:value="1" table:style-name="ce33">
            <text:p><text:s/>1<text:s/></text:p>
          </table:table-cell>
          <table:table-cell table:style-name="ce33"/>
          <table:table-cell office:value-type="float" office:value="1" table:formula="of:=SUM([.E305:.H305])" table:style-name="ce61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table:number-columns-repeated="4" table:style-name="ce33"/>
          <table:table-cell office:value-type="float" office:value="0" table:formula="of:=SUM([.E306:.H306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421" table:formula="of:=SUM([.E304:.E306])" table:style-name="ce65">
            <text:p><text:s/>421<text:s/></text:p>
          </table:table-cell>
          <table:table-cell office:value-type="float" office:value="420" table:formula="of:=SUM([.F304:.F306])" table:style-name="ce65">
            <text:p><text:s/>420<text:s/></text:p>
          </table:table-cell>
          <table:table-cell office:value-type="float" office:value="84" table:formula="of:=SUM([.G304:.G306])" table:style-name="ce65">
            <text:p><text:s/>84<text:s/></text:p>
          </table:table-cell>
          <table:table-cell office:value-type="float" office:value="0" table:formula="of:=SUM([.H304:.H306])" table:style-name="ce65">
            <text:p><text:s/>-<text:s/></text:p>
          </table:table-cell>
          <table:table-cell office:value-type="float" office:value="925" table:formula="of:=SUM([.I304:.I306])" table:style-name="ce66">
            <text:p><text:s/>92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7" table:style-name="ce33">
            <text:p><text:s/>7<text:s/></text:p>
          </table:table-cell>
          <table:table-cell table:style-name="ce33"/>
          <table:table-cell office:value-type="float" office:value="10" table:style-name="ce33">
            <text:p><text:s/>10<text:s/></text:p>
          </table:table-cell>
          <table:table-cell office:value-type="float" office:value="814" table:style-name="ce33">
            <text:p><text:s/>814<text:s/></text:p>
          </table:table-cell>
          <table:table-cell office:value-type="float" office:value="831" table:formula="of:=SUM([.E308:.H308])" table:style-name="ce61">
            <text:p><text:s/>83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5" table:style-name="ce33">
            <text:p><text:s/>35<text:s/></text:p>
          </table:table-cell>
          <table:table-cell office:value-type="float" office:value="203" table:style-name="ce33">
            <text:p><text:s/>203<text:s/></text:p>
          </table:table-cell>
          <table:table-cell table:number-columns-repeated="2" table:style-name="ce33"/>
          <table:table-cell office:value-type="float" office:value="238" table:formula="of:=SUM([.E309:.H309])" table:style-name="ce61">
            <text:p><text:s/>23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table:number-columns-repeated="2" table:style-name="ce33"/>
          <table:table-cell office:value-type="float" office:value="1" table:style-name="ce33">
            <text:p><text:s/>1<text:s/></text:p>
          </table:table-cell>
          <table:table-cell table:style-name="ce33"/>
          <table:table-cell office:value-type="float" office:value="1" table:formula="of:=SUM([.E310:.H310])" table:style-name="ce61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42" table:formula="of:=SUM([.E308:.E310])" table:style-name="ce65">
            <text:p><text:s/>42<text:s/></text:p>
          </table:table-cell>
          <table:table-cell office:value-type="float" office:value="203" table:formula="of:=SUM([.F308:.F310])" table:style-name="ce65">
            <text:p><text:s/>203<text:s/></text:p>
          </table:table-cell>
          <table:table-cell office:value-type="float" office:value="11" table:formula="of:=SUM([.G308:.G310])" table:style-name="ce65">
            <text:p><text:s/>11<text:s/></text:p>
          </table:table-cell>
          <table:table-cell office:value-type="float" office:value="814" table:formula="of:=SUM([.H308:.H310])" table:style-name="ce65">
            <text:p><text:s/>814<text:s/></text:p>
          </table:table-cell>
          <table:table-cell office:value-type="float" office:value="1070" table:formula="of:=SUM([.I308:.I310])" table:style-name="ce66">
            <text:p><text:s/>1,07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9 Total</text:p>
          </table:table-cell>
          <table:table-cell table:style-name="ce72"/>
          <table:table-cell table:style-name="ce77"/>
          <table:table-cell office:value-type="float" office:value="1718" table:formula="of:=+[.E311]+[.E307]+[.E303]+[.E299]" table:style-name="ce43">
            <text:p><text:s/>1,718<text:s/></text:p>
          </table:table-cell>
          <table:table-cell office:value-type="float" office:value="767" table:formula="of:=+[.F311]+[.F307]+[.F303]+[.F299]" table:style-name="ce43">
            <text:p><text:s/>767<text:s/></text:p>
          </table:table-cell>
          <table:table-cell office:value-type="float" office:value="284" table:formula="of:=+[.G311]+[.G307]+[.G303]+[.G299]" table:style-name="ce43">
            <text:p><text:s/>284<text:s/></text:p>
          </table:table-cell>
          <table:table-cell office:value-type="float" office:value="2069" table:formula="of:=+[.H311]+[.H307]+[.H303]+[.H299]" table:style-name="ce43">
            <text:p><text:s/>2,069<text:s/></text:p>
          </table:table-cell>
          <table:table-cell office:value-type="float" office:value="4838" table:formula="of:=+[.I311]+[.I307]+[.I303]+[.I299]" table:style-name="ce74">
            <text:p><text:s/>4,83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0" table:number-columns-spanned="1" table:number-rows-spanned="16" table:style-name="ce347">
            <text:p>2020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4" table:style-name="ce33">
            <text:p><text:s/>4<text:s/></text:p>
          </table:table-cell>
          <table:table-cell table:number-columns-repeated="2" table:style-name="ce33"/>
          <table:table-cell office:value-type="float" office:value="24" table:style-name="ce33">
            <text:p><text:s/>24<text:s/></text:p>
          </table:table-cell>
          <table:table-cell office:value-type="float" office:value="28" table:formula="of:=SUM([.E313:.H313])" table:style-name="ce61">
            <text:p><text:s/>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table:number-columns-repeated="4" table:style-name="ce33"/>
          <table:table-cell office:value-type="float" office:value="0" table:formula="of:=SUM([.E314:.H314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" table:style-name="ce33">
            <text:p><text:s/>7<text:s/></text:p>
          </table:table-cell>
          <table:table-cell table:number-columns-repeated="2" table:style-name="ce33"/>
          <table:table-cell office:value-type="float" office:value="29" table:style-name="ce33">
            <text:p><text:s/>29<text:s/></text:p>
          </table:table-cell>
          <table:table-cell office:value-type="float" office:value="36" table:formula="of:=SUM([.E315:.H315])" table:style-name="ce61">
            <text:p><text:s/>3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11" table:formula="of:=SUM([.E313:.E315])" table:style-name="ce65">
            <text:p><text:s/>11<text:s/></text:p>
          </table:table-cell>
          <table:table-cell office:value-type="float" office:value="0" table:formula="of:=SUM([.F313:.F315])" table:style-name="ce65">
            <text:p><text:s/>-<text:s/></text:p>
          </table:table-cell>
          <table:table-cell office:value-type="float" office:value="0" table:formula="of:=SUM([.G313:.G315])" table:style-name="ce65">
            <text:p><text:s/>-<text:s/></text:p>
          </table:table-cell>
          <table:table-cell office:value-type="float" office:value="53" table:formula="of:=SUM([.H313:.H315])" table:style-name="ce65">
            <text:p><text:s/>53<text:s/></text:p>
          </table:table-cell>
          <table:table-cell office:value-type="float" office:value="64" table:formula="of:=SUM([.I313:.I315])" table:style-name="ce66">
            <text:p><text:s/>6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65" table:style-name="ce33">
            <text:p><text:s/>165<text:s/></text:p>
          </table:table-cell>
          <table:table-cell office:value-type="float" office:value="113" table:style-name="ce33">
            <text:p><text:s/>113<text:s/></text:p>
          </table:table-cell>
          <table:table-cell office:value-type="float" office:value="115" table:style-name="ce33">
            <text:p><text:s/>115<text:s/></text:p>
          </table:table-cell>
          <table:table-cell office:value-type="float" office:value="445" table:style-name="ce33">
            <text:p><text:s/>445<text:s/></text:p>
          </table:table-cell>
          <table:table-cell office:value-type="float" office:value="838" table:formula="of:=SUM([.E317:.H317])" table:style-name="ce61">
            <text:p><text:s/>83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009" table:style-name="ce33">
            <text:p><text:s/>1,009<text:s/></text:p>
          </table:table-cell>
          <table:table-cell office:value-type="float" office:value="13" table:style-name="ce33">
            <text:p><text:s/>13<text:s/></text:p>
          </table:table-cell>
          <table:table-cell office:value-type="float" office:value="178" table:style-name="ce33">
            <text:p><text:s/>178<text:s/></text:p>
          </table:table-cell>
          <table:table-cell office:value-type="float" office:value="349" table:style-name="ce33">
            <text:p><text:s/>349<text:s/></text:p>
          </table:table-cell>
          <table:table-cell office:value-type="float" office:value="1549" table:formula="of:=SUM([.E318:.H318])" table:style-name="ce61">
            <text:p><text:s/>1,54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table:number-columns-repeated="3" table:style-name="ce33"/>
          <table:table-cell office:value-type="float" office:value="14" table:style-name="ce33">
            <text:p><text:s/>14<text:s/></text:p>
          </table:table-cell>
          <table:table-cell office:value-type="float" office:value="14" table:formula="of:=SUM([.E319:.H319])" table:style-name="ce61">
            <text:p><text:s/>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1174" table:formula="of:=SUM([.E317:.E319])" table:style-name="ce65">
            <text:p><text:s/>1,174<text:s/></text:p>
          </table:table-cell>
          <table:table-cell office:value-type="float" office:value="126" table:formula="of:=SUM([.F317:.F319])" table:style-name="ce65">
            <text:p><text:s/>126<text:s/></text:p>
          </table:table-cell>
          <table:table-cell office:value-type="float" office:value="293" table:formula="of:=SUM([.G317:.G319])" table:style-name="ce65">
            <text:p><text:s/>293<text:s/></text:p>
          </table:table-cell>
          <table:table-cell office:value-type="float" office:value="808" table:formula="of:=SUM([.H317:.H319])" table:style-name="ce65">
            <text:p><text:s/>808<text:s/></text:p>
          </table:table-cell>
          <table:table-cell office:value-type="float" office:value="2401" table:formula="of:=SUM([.I317:.I319])" table:style-name="ce66">
            <text:p><text:s/>2,4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320" table:style-name="ce33">
            <text:p><text:s/>320<text:s/></text:p>
          </table:table-cell>
          <table:table-cell office:value-type="float" office:value="237" table:style-name="ce33">
            <text:p><text:s/>237<text:s/></text:p>
          </table:table-cell>
          <table:table-cell office:value-type="float" office:value="68" table:style-name="ce33">
            <text:p><text:s/>68<text:s/></text:p>
          </table:table-cell>
          <table:table-cell office:value-type="float" office:value="407" table:style-name="ce33">
            <text:p><text:s/>407<text:s/></text:p>
          </table:table-cell>
          <table:table-cell office:value-type="float" office:value="1032" table:formula="of:=SUM([.E321:.H321])" table:style-name="ce61">
            <text:p><text:s/>1,03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table:number-columns-repeated="4" table:style-name="ce33"/>
          <table:table-cell office:value-type="float" office:value="0" table:formula="of:=SUM([.E322:.H322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23:.H323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320" table:formula="of:=SUM([.E321:.E323])" table:style-name="ce65">
            <text:p><text:s/>320<text:s/></text:p>
          </table:table-cell>
          <table:table-cell office:value-type="float" office:value="237" table:formula="of:=SUM([.F321:.F323])" table:style-name="ce65">
            <text:p><text:s/>237<text:s/></text:p>
          </table:table-cell>
          <table:table-cell office:value-type="float" office:value="68" table:formula="of:=SUM([.G321:.G323])" table:style-name="ce65">
            <text:p><text:s/>68<text:s/></text:p>
          </table:table-cell>
          <table:table-cell office:value-type="float" office:value="407" table:formula="of:=SUM([.H321:.H323])" table:style-name="ce65">
            <text:p><text:s/>407<text:s/></text:p>
          </table:table-cell>
          <table:table-cell office:value-type="float" office:value="1032" table:formula="of:=SUM([.I321:.I323])" table:style-name="ce66">
            <text:p><text:s/>1,03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25:.H325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47" table:style-name="ce33">
            <text:p><text:s/>247<text:s/></text:p>
          </table:table-cell>
          <table:table-cell office:value-type="float" office:value="8" table:style-name="ce33">
            <text:p><text:s/>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55" table:formula="of:=SUM([.E326:.H326])" table:style-name="ce61">
            <text:p><text:s/>25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27:.H327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0" table:formula="of:=SUM([.E325:.E327])" table:style-name="ce65">
            <text:p><text:s/>-<text:s/></text:p>
          </table:table-cell>
          <table:table-cell office:value-type="float" office:value="247" table:formula="of:=SUM([.F325:.F327])" table:style-name="ce65">
            <text:p><text:s/>247<text:s/></text:p>
          </table:table-cell>
          <table:table-cell office:value-type="float" office:value="8" table:formula="of:=SUM([.G325:.G327])" table:style-name="ce65">
            <text:p><text:s/>8<text:s/></text:p>
          </table:table-cell>
          <table:table-cell office:value-type="float" office:value="0" table:formula="of:=SUM([.H325:.H327])" table:style-name="ce65">
            <text:p><text:s/>-<text:s/></text:p>
          </table:table-cell>
          <table:table-cell office:value-type="float" office:value="255" table:formula="of:=SUM([.I325:.I327])" table:style-name="ce66">
            <text:p><text:s/>255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0 Total</text:p>
          </table:table-cell>
          <table:table-cell table:style-name="ce72"/>
          <table:table-cell table:style-name="ce77"/>
          <table:table-cell office:value-type="float" office:value="1505" table:formula="of:=+[.E328]+[.E324]+[.E320]+[.E316]" table:style-name="ce43">
            <text:p><text:s/>1,505<text:s/></text:p>
          </table:table-cell>
          <table:table-cell office:value-type="float" office:value="610" table:formula="of:=+[.F328]+[.F324]+[.F320]+[.F316]" table:style-name="ce43">
            <text:p><text:s/>610<text:s/></text:p>
          </table:table-cell>
          <table:table-cell office:value-type="float" office:value="369" table:formula="of:=+[.G328]+[.G324]+[.G320]+[.G316]" table:style-name="ce43">
            <text:p><text:s/>369<text:s/></text:p>
          </table:table-cell>
          <table:table-cell office:value-type="float" office:value="1268" table:formula="of:=+[.H328]+[.H324]+[.H320]+[.H316]" table:style-name="ce43">
            <text:p><text:s/>1,268<text:s/></text:p>
          </table:table-cell>
          <table:table-cell office:value-type="float" office:value="3752" table:formula="of:=+[.I328]+[.I324]+[.I320]+[.I316]" table:style-name="ce74">
            <text:p><text:s/>3,752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1" table:number-columns-spanned="1" table:number-rows-spanned="16" table:style-name="ce347">
            <text:p>2021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2" table:style-name="ce33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45.4" table:style-name="ce33">
            <text:p><text:s/>145<text:s/></text:p>
          </table:table-cell>
          <table:table-cell office:value-type="float" office:value="147.4" table:formula="of:=SUM([.E330:.H330])" table:style-name="ce61">
            <text:p><text:s/>1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" table:style-name="ce33">
            <text:p><text:s/>1<text:s/></text:p>
          </table:table-cell>
          <table:table-cell office:value-type="float" office:value="1" table:formula="of:=SUM([.E331:.H331])" table:style-name="ce61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8" table:style-name="ce33">
            <text:p><text:s/>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3" table:style-name="ce33">
            <text:p><text:s/>33<text:s/></text:p>
          </table:table-cell>
          <table:table-cell office:value-type="float" office:value="41" table:formula="of:=SUM([.E332:.H332])" table:style-name="ce61">
            <text:p><text:s/>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10" table:formula="of:=SUM([.E330:.E332])" table:style-name="ce65">
            <text:p><text:s/>10<text:s/></text:p>
          </table:table-cell>
          <table:table-cell office:value-type="float" office:value="0" table:formula="of:=SUM([.F330:.F332])" table:style-name="ce65">
            <text:p><text:s/>-<text:s/></text:p>
          </table:table-cell>
          <table:table-cell office:value-type="float" office:value="0" table:formula="of:=SUM([.G330:.G332])" table:style-name="ce65">
            <text:p><text:s/>-<text:s/></text:p>
          </table:table-cell>
          <table:table-cell office:value-type="float" office:value="179.4" table:formula="of:=SUM([.H330:.H332])" table:style-name="ce65">
            <text:p><text:s/>179<text:s/></text:p>
          </table:table-cell>
          <table:table-cell office:value-type="float" office:value="189.4" table:formula="of:=SUM([.I330:.I332])" table:style-name="ce66">
            <text:p><text:s/>1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24" table:style-name="ce33">
            <text:p><text:s/>124<text:s/></text:p>
          </table:table-cell>
          <table:table-cell office:value-type="float" office:value="82" table:style-name="ce33">
            <text:p><text:s/>8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38" table:style-name="ce33">
            <text:p><text:s/>438<text:s/></text:p>
          </table:table-cell>
          <table:table-cell office:value-type="float" office:value="644" table:formula="of:=SUM([.E334:.H334])" table:style-name="ce61">
            <text:p><text:s/>64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309" table:style-name="ce33">
            <text:p><text:s/>1,309<text:s/></text:p>
          </table:table-cell>
          <table:table-cell office:value-type="float" office:value="191" table:style-name="ce33">
            <text:p><text:s/>191<text:s/></text:p>
          </table:table-cell>
          <table:table-cell office:value-type="float" office:value="161" table:style-name="ce33">
            <text:p><text:s/>161<text:s/></text:p>
          </table:table-cell>
          <table:table-cell office:value-type="float" office:value="436" table:style-name="ce33">
            <text:p><text:s/>436<text:s/></text:p>
          </table:table-cell>
          <table:table-cell office:value-type="float" office:value="2097" table:formula="of:=SUM([.E335:.H335])" table:style-name="ce61">
            <text:p><text:s/>2,09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59" table:style-name="ce33">
            <text:p><text:s/>259<text:s/></text:p>
          </table:table-cell>
          <table:table-cell office:value-type="float" office:value="15" table:style-name="ce33">
            <text:p><text:s/>15<text:s/></text:p>
          </table:table-cell>
          <table:table-cell office:value-type="float" office:value="274" table:formula="of:=SUM([.E336:.H336])" table:style-name="ce61">
            <text:p><text:s/>27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1433" table:formula="of:=SUM([.E334:.E336])" table:style-name="ce65">
            <text:p><text:s/>1,433<text:s/></text:p>
          </table:table-cell>
          <table:table-cell office:value-type="float" office:value="273" table:formula="of:=SUM([.F334:.F336])" table:style-name="ce65">
            <text:p><text:s/>273<text:s/></text:p>
          </table:table-cell>
          <table:table-cell office:value-type="float" office:value="420" table:formula="of:=SUM([.G334:.G336])" table:style-name="ce65">
            <text:p><text:s/>420<text:s/></text:p>
          </table:table-cell>
          <table:table-cell office:value-type="float" office:value="889" table:formula="of:=SUM([.H334:.H336])" table:style-name="ce65">
            <text:p><text:s/>889<text:s/></text:p>
          </table:table-cell>
          <table:table-cell office:value-type="float" office:value="3015" table:formula="of:=SUM([.I334:.I336])" table:style-name="ce66">
            <text:p><text:s/>3,0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307.39999999999998" table:style-name="ce33">
            <text:p><text:s/>307<text:s/></text:p>
          </table:table-cell>
          <table:table-cell office:value-type="float" office:value="389.1" table:style-name="ce33">
            <text:p><text:s/>389<text:s/></text:p>
          </table:table-cell>
          <table:table-cell office:value-type="float" office:value="43.1" table:style-name="ce33">
            <text:p><text:s/>43<text:s/></text:p>
          </table:table-cell>
          <table:table-cell office:value-type="float" office:value="546.4" table:style-name="ce33">
            <text:p><text:s/>546<text:s/></text:p>
          </table:table-cell>
          <table:table-cell office:value-type="float" office:value="1286" table:formula="of:=SUM([.E338:.H338])" table:style-name="ce61">
            <text:p><text:s/>1,28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" table:style-name="ce33">
            <text:p><text:s/>1<text:s/></text:p>
          </table:table-cell>
          <table:table-cell office:value-type="float" office:value="1" table:formula="of:=SUM([.E339:.H339])" table:style-name="ce61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40:.H340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307.39999999999998" table:formula="of:=SUM([.E338:.E340])" table:style-name="ce65">
            <text:p><text:s/>307<text:s/></text:p>
          </table:table-cell>
          <table:table-cell office:value-type="float" office:value="389.1" table:formula="of:=SUM([.F338:.F340])" table:style-name="ce65">
            <text:p><text:s/>389<text:s/></text:p>
          </table:table-cell>
          <table:table-cell office:value-type="float" office:value="43.1" table:formula="of:=SUM([.G338:.G340])" table:style-name="ce65">
            <text:p><text:s/>43<text:s/></text:p>
          </table:table-cell>
          <table:table-cell office:value-type="float" office:value="547.4" table:formula="of:=SUM([.H338:.H340])" table:style-name="ce65">
            <text:p><text:s/>547<text:s/></text:p>
          </table:table-cell>
          <table:table-cell office:value-type="float" office:value="1287" table:formula="of:=SUM([.I338:.I340])" table:style-name="ce66">
            <text:p><text:s/>1,28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42:.H342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" table:style-name="ce33">
            <text:p><text:s/>1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" table:formula="of:=SUM([.E343:.H343])" table:style-name="ce61">
            <text:p><text:s/>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formula="of:=SUM([.E344:.H344])" table:style-name="ce61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0" table:formula="of:=SUM([.E342:.E344])" table:style-name="ce65">
            <text:p><text:s/>-<text:s/></text:p>
          </table:table-cell>
          <table:table-cell office:value-type="float" office:value="0" table:formula="of:=SUM([.F342:.F344])" table:style-name="ce65">
            <text:p><text:s/>-<text:s/></text:p>
          </table:table-cell>
          <table:table-cell office:value-type="float" office:value="10" table:formula="of:=SUM([.G342:.G344])" table:style-name="ce65">
            <text:p><text:s/>10<text:s/></text:p>
          </table:table-cell>
          <table:table-cell office:value-type="float" office:value="0" table:formula="of:=SUM([.H342:.H344])" table:style-name="ce65">
            <text:p><text:s/>-<text:s/></text:p>
          </table:table-cell>
          <table:table-cell office:value-type="float" office:value="10" table:formula="of:=SUM([.I342:.I344])" table:style-name="ce66">
            <text:p><text:s/>1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1 Total</text:p>
          </table:table-cell>
          <table:table-cell table:style-name="ce72"/>
          <table:table-cell table:style-name="ce77"/>
          <table:table-cell office:value-type="float" office:value="1750.4" table:formula="of:=+[.E345]+[.E341]+[.E337]+[.E333]" table:style-name="ce43">
            <text:p><text:s/>1,750<text:s/></text:p>
          </table:table-cell>
          <table:table-cell office:value-type="float" office:value="662.1" table:formula="of:=+[.F345]+[.F341]+[.F337]+[.F333]" table:style-name="ce43">
            <text:p><text:s/>662<text:s/></text:p>
          </table:table-cell>
          <table:table-cell office:value-type="float" office:value="473.1" table:formula="of:=+[.G345]+[.G341]+[.G337]+[.G333]" table:style-name="ce43">
            <text:p><text:s/>473<text:s/></text:p>
          </table:table-cell>
          <table:table-cell office:value-type="float" office:value="1615.8000000000002" table:formula="of:=+[.H345]+[.H341]+[.H337]+[.H333]" table:style-name="ce43">
            <text:p><text:s/>1,616<text:s/></text:p>
          </table:table-cell>
          <table:table-cell office:value-type="float" office:value="4501.3999999999996" table:formula="of:=+[.I345]+[.I341]+[.I337]+[.I333]" table:style-name="ce74">
            <text:p><text:s/>4,50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2" table:number-columns-spanned="1" table:number-rows-spanned="16" table:style-name="ce347">
            <text:p>2022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7684.9599999999991" table:style-name="ce261">
            <text:p><text:s text:c="2"/>8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259249.69999999998" table:style-name="ce261">
            <text:p><text:s text:c="2"/>259</text:p>
          </table:table-cell>
          <table:table-cell office:value-type="float" office:value="266934.65999999997" table:formula="of:=SUM([.E347:.H347])" table:style-name="ce276">
            <text:p><text:s text:c="2"/>267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7021.8400000000011" table:style-name="ce261">
            <text:p><text:s text:c="2"/>7</text:p>
          </table:table-cell>
          <table:table-cell office:value-type="float" office:value="7021.8400000000011" table:formula="of:=SUM([.E348:.H348])" table:style-name="ce276">
            <text:p><text:s text:c="2"/>7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8135.800000000002" table:style-name="ce261">
            <text:p><text:s text:c="2"/>8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22480.139999999996" table:style-name="ce261">
            <text:p><text:s text:c="2"/>22</text:p>
          </table:table-cell>
          <table:table-cell office:value-type="float" office:value="30615.94" table:formula="of:=SUM([.E349:.H349])" table:style-name="ce276">
            <text:p><text:s text:c="2"/>31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15820.760000000002" table:formula="of:=SUM([.E347:.E349])" table:style-name="ce275">
            <text:p><text:s text:c="2"/>16</text:p>
          </table:table-cell>
          <table:table-cell office:value-type="float" office:value="0" table:formula="of:=SUM([.F347:.F349])" table:style-name="ce274">
            <text:p><text:s/>-<text:s/></text:p>
          </table:table-cell>
          <table:table-cell office:value-type="float" office:value="0" table:formula="of:=SUM([.G347:.G349])" table:style-name="ce274">
            <text:p><text:s/>-<text:s/></text:p>
          </table:table-cell>
          <table:table-cell office:value-type="float" office:value="288751.68" table:formula="of:=SUM([.H347:.H349])" table:style-name="ce275">
            <text:p><text:s text:c="2"/>289</text:p>
          </table:table-cell>
          <table:table-cell office:value-type="float" office:value="304572.44" table:formula="of:=SUM([.I347:.I349])" table:style-name="ce277">
            <text:p><text:s text:c="2"/>305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10383.81" table:style-name="ce261">
            <text:p><text:s text:c="2"/>210</text:p>
          </table:table-cell>
          <table:table-cell office:value-type="float" office:value="156418.36000000002" table:style-name="ce261">
            <text:p><text:s text:c="2"/>156</text:p>
          </table:table-cell>
          <table:table-cell office:value-type="float" office:value="503021.23" table:style-name="ce261">
            <text:p><text:s text:c="2"/>503</text:p>
          </table:table-cell>
          <table:table-cell office:value-type="float" office:value="575008.61" table:style-name="ce264">
            <text:p><text:s text:c="2"/>575</text:p>
          </table:table-cell>
          <table:table-cell office:value-type="float" office:value="1444832.01" table:formula="of:=SUM([.E351:.H351])" table:style-name="ce276">
            <text:p><text:s text:c="2"/>1,445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126347.76" table:style-name="ce261">
            <text:p><text:s text:c="2"/>1,126</text:p>
          </table:table-cell>
          <table:table-cell office:value-type="float" office:value="9989.85" table:style-name="ce261">
            <text:p><text:s text:c="2"/>10</text:p>
          </table:table-cell>
          <table:table-cell office:value-type="float" office:value="159708.74000000005" table:style-name="ce261">
            <text:p><text:s text:c="2"/>160</text:p>
          </table:table-cell>
          <table:table-cell office:value-type="float" office:value="314050.7" table:style-name="ce264">
            <text:p><text:s text:c="2"/>314</text:p>
          </table:table-cell>
          <table:table-cell office:value-type="float" office:value="1610097.05" table:formula="of:=SUM([.E352:.H352])" table:style-name="ce276">
            <text:p><text:s text:c="2"/>1,61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40238.480000000003" table:style-name="ce264">
            <text:p><text:s text:c="2"/>40</text:p>
          </table:table-cell>
          <table:table-cell office:value-type="float" office:value="40238.480000000003" table:formula="of:=SUM([.E353:.H353])" table:style-name="ce276">
            <text:p><text:s text:c="2"/>40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1336731.57" table:formula="of:=SUM([.E351:.E353])" table:style-name="ce275">
            <text:p><text:s text:c="2"/>1,337</text:p>
          </table:table-cell>
          <table:table-cell office:value-type="float" office:value="166408.21000000002" table:formula="of:=SUM([.F351:.F353])" table:style-name="ce275">
            <text:p><text:s text:c="2"/>166</text:p>
          </table:table-cell>
          <table:table-cell office:value-type="float" office:value="662729.97" table:formula="of:=SUM([.G351:.G353])" table:style-name="ce275">
            <text:p><text:s text:c="2"/>663</text:p>
          </table:table-cell>
          <table:table-cell office:value-type="float" office:value="929297.79" table:formula="of:=SUM([.H351:.H353])" table:style-name="ce275">
            <text:p><text:s text:c="2"/>929</text:p>
          </table:table-cell>
          <table:table-cell office:value-type="float" office:value="3095167.54" table:formula="of:=SUM([.I351:.I353])" table:style-name="ce277">
            <text:p><text:s text:c="2"/>3,095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344278" table:style-name="ce261">
            <text:p><text:s text:c="2"/>344</text:p>
          </table:table-cell>
          <table:table-cell office:value-type="float" office:value="190147.25" table:style-name="ce261">
            <text:p><text:s text:c="2"/>190</text:p>
          </table:table-cell>
          <table:table-cell office:value-type="float" office:value="0" table:style-name="ce264">
            <text:p><text:s text:c="2"/>0</text:p>
          </table:table-cell>
          <table:table-cell office:value-type="float" office:value="588777.59699999983" table:style-name="ce261">
            <text:p><text:s text:c="2"/>589</text:p>
          </table:table-cell>
          <table:table-cell office:value-type="float" office:value="1123202.8469999998" table:formula="of:=SUM([.E355:.H355])" table:style-name="ce276">
            <text:p><text:s text:c="2"/>1,123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955.68" table:style-name="ce261">
            <text:p><text:s text:c="2"/>1</text:p>
          </table:table-cell>
          <table:table-cell office:value-type="float" office:value="955.68" table:formula="of:=SUM([.E356:.H356])" table:style-name="ce276">
            <text:p><text:s text:c="2"/>1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57:.H357])" table:style-name="ce273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344278" table:formula="of:=SUM([.E355:.E357])" table:style-name="ce275">
            <text:p><text:s text:c="2"/>344</text:p>
          </table:table-cell>
          <table:table-cell office:value-type="float" office:value="190147.25" table:formula="of:=SUM([.F355:.F357])" table:style-name="ce275">
            <text:p><text:s text:c="2"/>190</text:p>
          </table:table-cell>
          <table:table-cell office:value-type="float" office:value="0" table:formula="of:=SUM([.G355:.G357])" table:style-name="ce274">
            <text:p><text:s/>-<text:s/></text:p>
          </table:table-cell>
          <table:table-cell office:value-type="float" office:value="589733.27699999989" table:formula="of:=SUM([.H355:.H357])" table:style-name="ce275">
            <text:p><text:s text:c="2"/>590</text:p>
          </table:table-cell>
          <table:table-cell office:value-type="float" office:value="1124158.5269999998" table:formula="of:=SUM([.I355:.I357])" table:style-name="ce277">
            <text:p><text:s text:c="2"/>1,124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59:.H359])" table:style-name="ce273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65792.658" table:style-name="ce261">
            <text:p><text:s text:c="2"/>166</text:p>
          </table:table-cell>
          <table:table-cell office:value-type="float" office:value="9879.2780000000002" table:style-name="ce261">
            <text:p><text:s text:c="2"/>10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75671.93599999999" table:formula="of:=SUM([.E360:.H360])" table:style-name="ce276">
            <text:p><text:s text:c="2"/>176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61:.H361])" table:style-name="ce273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0" table:formula="of:=SUM([.E359:.E361])" table:style-name="ce274">
            <text:p><text:s/>-<text:s/></text:p>
          </table:table-cell>
          <table:table-cell office:value-type="float" office:value="165792.658" table:formula="of:=SUM([.F359:.F361])" table:style-name="ce275">
            <text:p><text:s text:c="2"/>166</text:p>
          </table:table-cell>
          <table:table-cell office:value-type="float" office:value="9879.2780000000002" table:formula="of:=SUM([.G359:.G361])" table:style-name="ce275">
            <text:p><text:s text:c="2"/>10</text:p>
          </table:table-cell>
          <table:table-cell office:value-type="float" office:value="0" table:formula="of:=SUM([.H359:.H361])" table:style-name="ce274">
            <text:p><text:s/>-<text:s/></text:p>
          </table:table-cell>
          <table:table-cell office:value-type="float" office:value="175671.93599999999" table:formula="of:=SUM([.I359:.I361])" table:style-name="ce277">
            <text:p><text:s text:c="2"/>176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2 Total</text:p>
          </table:table-cell>
          <table:table-cell table:style-name="ce72"/>
          <table:table-cell table:style-name="ce77"/>
          <table:table-cell office:value-type="float" office:value="1696830.33" table:formula="of:=+[.E362]+[.E358]+[.E354]+[.E350]" table:style-name="ce271">
            <text:p><text:s text:c="2"/>1,697</text:p>
          </table:table-cell>
          <table:table-cell office:value-type="float" office:value="522348.11800000002" table:formula="of:=+[.F362]+[.F358]+[.F354]+[.F350]" table:style-name="ce271">
            <text:p><text:s text:c="2"/>522</text:p>
          </table:table-cell>
          <table:table-cell office:value-type="float" office:value="672609.24800000002" table:formula="of:=+[.G362]+[.G358]+[.G354]+[.G350]" table:style-name="ce271">
            <text:p><text:s text:c="2"/>673</text:p>
          </table:table-cell>
          <table:table-cell office:value-type="float" office:value="1807782.7469999997" table:formula="of:=+[.H362]+[.H358]+[.H354]+[.H350]" table:style-name="ce271">
            <text:p><text:s text:c="2"/>1,808</text:p>
          </table:table-cell>
          <table:table-cell office:value-type="float" office:value="4699570.443" table:formula="of:=+[.I362]+[.I358]+[.I354]+[.I350]" table:style-name="ce278">
            <text:p><text:s text:c="2"/>4,700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3" table:number-columns-spanned="1" table:number-rows-spanned="16" table:style-name="ce347">
            <text:p>2023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9650.14" table:style-name="ce261">
            <text:p><text:s text:c="2"/>10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34387.1" table:style-name="ce261">
            <text:p><text:s text:c="2"/>134</text:p>
          </table:table-cell>
          <table:table-cell office:value-type="float" office:value="144037.24" table:formula="of:=SUM([.E364:.H364])" table:style-name="ce276">
            <text:p><text:s text:c="2"/>14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65:.H365])" table:style-name="ce27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9398.43" table:style-name="ce261">
            <text:p><text:s text:c="2"/>9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9830.34" table:style-name="ce261">
            <text:p><text:s text:c="2"/>10</text:p>
          </table:table-cell>
          <table:table-cell office:value-type="float" office:value="19228.77" table:formula="of:=SUM([.E366:.H366])" table:style-name="ce276">
            <text:p><text:s text:c="2"/>19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19048.57" table:formula="of:=SUM([.E364:.E366])" table:style-name="ce275">
            <text:p><text:s text:c="2"/>19</text:p>
          </table:table-cell>
          <table:table-cell office:value-type="float" office:value="0" table:formula="of:=SUM([.F364:.F366])" table:style-name="ce274">
            <text:p><text:s/>-<text:s/></text:p>
          </table:table-cell>
          <table:table-cell office:value-type="float" office:value="0" table:formula="of:=SUM([.G364:.G366])" table:style-name="ce274">
            <text:p><text:s/>-<text:s/></text:p>
          </table:table-cell>
          <table:table-cell office:value-type="float" office:value="144217.44" table:formula="of:=SUM([.H364:.H366])" table:style-name="ce275">
            <text:p><text:s text:c="2"/>144</text:p>
          </table:table-cell>
          <table:table-cell office:value-type="float" office:value="163266.00999999998" table:formula="of:=SUM([.I364:.I366])" table:style-name="ce277">
            <text:p><text:s text:c="2"/>163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79686.13" table:style-name="ce261">
            <text:p><text:s text:c="2"/>180</text:p>
          </table:table-cell>
          <table:table-cell office:value-type="float" office:value="60274.32" table:style-name="ce261">
            <text:p><text:s text:c="2"/>60</text:p>
          </table:table-cell>
          <table:table-cell office:value-type="float" office:value="490499.01" table:style-name="ce261">
            <text:p><text:s text:c="2"/>490</text:p>
          </table:table-cell>
          <table:table-cell office:value-type="float" office:value="323475" table:style-name="ce264">
            <text:p><text:s text:c="2"/>323</text:p>
          </table:table-cell>
          <table:table-cell office:value-type="float" office:value="1053934.46" table:formula="of:=SUM([.E368:.H368])" table:style-name="ce276">
            <text:p><text:s text:c="2"/>1,05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55363.18" table:style-name="ce261">
            <text:p><text:s text:c="2"/>355</text:p>
          </table:table-cell>
          <table:table-cell office:value-type="float" office:value="12426.24" table:style-name="ce261">
            <text:p><text:s text:c="2"/>12</text:p>
          </table:table-cell>
          <table:table-cell office:value-type="float" office:value="142721.15" table:style-name="ce261">
            <text:p><text:s text:c="2"/>143</text:p>
          </table:table-cell>
          <table:table-cell office:value-type="float" office:value="235523" table:style-name="ce264">
            <text:p><text:s text:c="2"/>236</text:p>
          </table:table-cell>
          <table:table-cell office:value-type="float" office:value="746033.57" table:formula="of:=SUM([.E369:.H369])" table:style-name="ce276">
            <text:p><text:s text:c="2"/>746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59348" table:style-name="ce264">
            <text:p><text:s text:c="2"/>59</text:p>
          </table:table-cell>
          <table:table-cell office:value-type="float" office:value="59348" table:formula="of:=SUM([.E370:.H370])" table:style-name="ce276">
            <text:p><text:s text:c="2"/>59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535049.31000000006" table:formula="of:=SUM([.E368:.E370])" table:style-name="ce275">
            <text:p><text:s text:c="2"/>535</text:p>
          </table:table-cell>
          <table:table-cell office:value-type="float" office:value="72700.56" table:formula="of:=SUM([.F368:.F370])" table:style-name="ce275">
            <text:p><text:s text:c="2"/>73</text:p>
          </table:table-cell>
          <table:table-cell office:value-type="float" office:value="633220.16" table:formula="of:=SUM([.G368:.G370])" table:style-name="ce275">
            <text:p><text:s text:c="2"/>633</text:p>
          </table:table-cell>
          <table:table-cell office:value-type="float" office:value="618346" table:formula="of:=SUM([.H368:.H370])" table:style-name="ce275">
            <text:p><text:s text:c="2"/>618</text:p>
          </table:table-cell>
          <table:table-cell office:value-type="float" office:value="1859316.0299999998" table:formula="of:=SUM([.I368:.I370])" table:style-name="ce277">
            <text:p><text:s text:c="2"/>1,859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96339" table:style-name="ce261">
            <text:p><text:s text:c="2"/>196</text:p>
          </table:table-cell>
          <table:table-cell office:value-type="float" office:value="140299.32" table:style-name="ce261">
            <text:p><text:s text:c="2"/>140</text:p>
          </table:table-cell>
          <table:table-cell office:value-type="float" office:value="11673.1" table:style-name="ce264">
            <text:p><text:s text:c="2"/>12</text:p>
          </table:table-cell>
          <table:table-cell office:value-type="float" office:value="336576.696" table:style-name="ce261">
            <text:p><text:s text:c="2"/>337</text:p>
          </table:table-cell>
          <table:table-cell office:value-type="float" office:value="684888.11599999992" table:formula="of:=SUM([.E372:.H372])" table:style-name="ce276">
            <text:p><text:s text:c="2"/>685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300" table:style-name="ce264">
            <text:p><text:s text:c="2"/>0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0528.2" table:style-name="ce261">
            <text:p><text:s text:c="2"/>11</text:p>
          </table:table-cell>
          <table:table-cell office:value-type="float" office:value="10828.2" table:formula="of:=SUM([.E373:.H373])" table:style-name="ce276">
            <text:p><text:s text:c="2"/>11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74:.H374])" table:style-name="ce273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196339" table:formula="of:=SUM([.E372:.E374])" table:style-name="ce275">
            <text:p><text:s text:c="2"/>196</text:p>
          </table:table-cell>
          <table:table-cell office:value-type="float" office:value="140599.32" table:formula="of:=SUM([.F372:.F374])" table:style-name="ce275">
            <text:p><text:s text:c="2"/>141</text:p>
          </table:table-cell>
          <table:table-cell office:value-type="float" office:value="11673.1" table:formula="of:=SUM([.G372:.G374])" table:style-name="ce274">
            <text:p><text:s/>11,673<text:s/></text:p>
          </table:table-cell>
          <table:table-cell office:value-type="float" office:value="347104.89600000001" table:formula="of:=SUM([.H372:.H374])" table:style-name="ce275">
            <text:p><text:s text:c="2"/>347</text:p>
          </table:table-cell>
          <table:table-cell office:value-type="float" office:value="695716.31599999988" table:formula="of:=SUM([.I372:.I374])" table:style-name="ce277">
            <text:p><text:s text:c="2"/>696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76:.H376])" table:style-name="ce273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41139.23000000001" table:style-name="ce261">
            <text:p><text:s text:c="2"/>141</text:p>
          </table:table-cell>
          <table:table-cell office:value-type="float" office:value="10406.057000000001" table:style-name="ce261">
            <text:p><text:s text:c="2"/>10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51545.28700000001" table:formula="of:=SUM([.E377:.H377])" table:style-name="ce276">
            <text:p><text:s text:c="2"/>152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78:.H378])" table:style-name="ce273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0" table:formula="of:=SUM([.E376:.E378])" table:style-name="ce274">
            <text:p><text:s/>-<text:s/></text:p>
          </table:table-cell>
          <table:table-cell office:value-type="float" office:value="141139.23000000001" table:formula="of:=SUM([.F376:.F378])" table:style-name="ce275">
            <text:p><text:s text:c="2"/>141</text:p>
          </table:table-cell>
          <table:table-cell office:value-type="float" office:value="10406.057000000001" table:formula="of:=SUM([.G376:.G378])" table:style-name="ce275">
            <text:p><text:s text:c="2"/>10</text:p>
          </table:table-cell>
          <table:table-cell office:value-type="float" office:value="0" table:formula="of:=SUM([.H376:.H378])" table:style-name="ce274">
            <text:p><text:s/>-<text:s/></text:p>
          </table:table-cell>
          <table:table-cell office:value-type="float" office:value="151545.28700000001" table:formula="of:=SUM([.I376:.I378])" table:style-name="ce277">
            <text:p><text:s text:c="2"/>152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3 Total</text:p>
          </table:table-cell>
          <table:table-cell table:style-name="ce72"/>
          <table:table-cell table:style-name="ce77"/>
          <table:table-cell office:value-type="float" office:value="750436.88" table:formula="of:=+[.E379]+[.E375]+[.E371]+[.E367]" table:style-name="ce271">
            <text:p><text:s text:c="2"/>750</text:p>
          </table:table-cell>
          <table:table-cell office:value-type="float" office:value="354439.11000000004" table:formula="of:=+[.F379]+[.F375]+[.F371]+[.F367]" table:style-name="ce271">
            <text:p><text:s text:c="2"/>354</text:p>
          </table:table-cell>
          <table:table-cell office:value-type="float" office:value="655299.31700000004" table:formula="of:=+[.G379]+[.G375]+[.G371]+[.G367]" table:style-name="ce271">
            <text:p><text:s text:c="2"/>655</text:p>
          </table:table-cell>
          <table:table-cell office:value-type="float" office:value="1109668.3359999999" table:formula="of:=+[.H379]+[.H375]+[.H371]+[.H367]" table:style-name="ce271">
            <text:p><text:s text:c="2"/>1,110</text:p>
          </table:table-cell>
          <table:table-cell office:value-type="float" office:value="2869843.6429999992" table:formula="of:=+[.I379]+[.I375]+[.I371]+[.I367]" table:style-name="ce278">
            <text:p><text:s text:c="2"/>2,870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4" table:number-columns-spanned="1" table:number-rows-spanned="16" table:style-name="ce347">
            <text:p>2024</text:p>
          </table:table-cell>
          <table:table-cell office:value-type="string" table:number-columns-spanned="1" table:number-rows-spanned="3" table:style-name="ce348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15100.96" table:style-name="ce261">
            <text:p><text:s text:c="2"/>15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95548.699999999895" table:style-name="ce261">
            <text:p><text:s text:c="2"/>96</text:p>
          </table:table-cell>
          <table:table-cell office:value-type="float" office:value="110649.65999999989" table:formula="of:=SUM([.E381:.H381])" table:style-name="ce276">
            <text:p><text:s text:c="2"/>111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82:.H382])" table:style-name="ce27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505.61" table:style-name="ce261">
            <text:p><text:s text:c="2"/>8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4913.3" table:style-name="ce261">
            <text:p><text:s text:c="2"/>5</text:p>
          </table:table-cell>
          <table:table-cell office:value-type="float" office:value="12418.91" table:formula="of:=SUM([.E383:.H383])" table:style-name="ce276">
            <text:p><text:s text:c="2"/>12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90"/>
          <table:table-cell office:value-type="float" office:value="22606.57" table:formula="of:=SUM([.E381:.E383])" table:style-name="ce275">
            <text:p><text:s text:c="2"/>23</text:p>
          </table:table-cell>
          <table:table-cell office:value-type="float" office:value="0" table:formula="of:=SUM([.F381:.F383])" table:style-name="ce274">
            <text:p><text:s/>-<text:s/></text:p>
          </table:table-cell>
          <table:table-cell office:value-type="float" office:value="0" table:formula="of:=SUM([.G381:.G383])" table:style-name="ce274">
            <text:p><text:s/>-<text:s/></text:p>
          </table:table-cell>
          <table:table-cell office:value-type="float" office:value="100461.9999999999" table:formula="of:=SUM([.H381:.H383])" table:style-name="ce275">
            <text:p><text:s text:c="2"/>100</text:p>
          </table:table-cell>
          <table:table-cell office:value-type="float" office:value="123068.56999999989" table:formula="of:=SUM([.I381:.I383])" table:style-name="ce277">
            <text:p><text:s text:c="2"/>123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70708.71000000002" table:style-name="ce261">
            <text:p><text:s text:c="2"/>271</text:p>
          </table:table-cell>
          <table:table-cell office:value-type="float" office:value="51810.34" table:style-name="ce261">
            <text:p><text:s text:c="2"/>52</text:p>
          </table:table-cell>
          <table:table-cell office:value-type="float" office:value="271074" table:style-name="ce261">
            <text:p><text:s text:c="2"/>271</text:p>
          </table:table-cell>
          <table:table-cell office:value-type="float" office:value="439005" table:style-name="ce264">
            <text:p><text:s text:c="2"/>439</text:p>
          </table:table-cell>
          <table:table-cell office:value-type="float" office:value="1032598.05" table:formula="of:=SUM([.E385:.H385])" table:style-name="ce276">
            <text:p><text:s text:c="2"/>1,033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71750.87" table:style-name="ce261">
            <text:p><text:s text:c="2"/>272</text:p>
          </table:table-cell>
          <table:table-cell office:value-type="float" office:value="34400.939999999995" table:style-name="ce261">
            <text:p><text:s text:c="2"/>34</text:p>
          </table:table-cell>
          <table:table-cell office:value-type="float" office:value="258650.91" table:style-name="ce261">
            <text:p><text:s text:c="2"/>259</text:p>
          </table:table-cell>
          <table:table-cell office:value-type="float" office:value="129088" table:style-name="ce264">
            <text:p><text:s text:c="2"/>129</text:p>
          </table:table-cell>
          <table:table-cell office:value-type="float" office:value="693890.72" table:formula="of:=SUM([.E386:.H386])" table:style-name="ce276">
            <text:p><text:s text:c="2"/>69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47889.48" table:style-name="ce264">
            <text:p><text:s text:c="2"/>48</text:p>
          </table:table-cell>
          <table:table-cell office:value-type="float" office:value="47889.48" table:formula="of:=SUM([.E387:.H387])" table:style-name="ce276">
            <text:p><text:s text:c="2"/>48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90"/>
          <table:table-cell office:value-type="float" office:value="542459.58000000007" table:formula="of:=SUM([.E385:.E387])" table:style-name="ce275">
            <text:p><text:s text:c="2"/>542</text:p>
          </table:table-cell>
          <table:table-cell office:value-type="float" office:value="86211.28" table:formula="of:=SUM([.F385:.F387])" table:style-name="ce275">
            <text:p><text:s text:c="2"/>86</text:p>
          </table:table-cell>
          <table:table-cell office:value-type="float" office:value="529724.91" table:formula="of:=SUM([.G385:.G387])" table:style-name="ce275">
            <text:p><text:s text:c="2"/>530</text:p>
          </table:table-cell>
          <table:table-cell office:value-type="float" office:value="615982.48" table:formula="of:=SUM([.H385:.H387])" table:style-name="ce275">
            <text:p><text:s text:c="2"/>616</text:p>
          </table:table-cell>
          <table:table-cell office:value-type="float" office:value="1774378.25" table:formula="of:=SUM([.I385:.I387])" table:style-name="ce277">
            <text:p><text:s text:c="2"/>1,774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50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311411" table:style-name="ce261">
            <text:p><text:s text:c="2"/>311</text:p>
          </table:table-cell>
          <table:table-cell office:value-type="float" office:value="106533.37000000001" table:style-name="ce261">
            <text:p><text:s text:c="2"/>107</text:p>
          </table:table-cell>
          <table:table-cell office:value-type="float" office:value="24827" table:style-name="ce264">
            <text:p><text:s text:c="2"/>25</text:p>
          </table:table-cell>
          <table:table-cell office:value-type="float" office:value="254784.43900000007" table:style-name="ce261">
            <text:p><text:s text:c="2"/>255</text:p>
          </table:table-cell>
          <table:table-cell office:value-type="float" office:value="697555.80900000012" table:formula="of:=SUM([.E389:.H389])" table:style-name="ce276">
            <text:p><text:s text:c="2"/>698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22110.27" table:style-name="ce252">
            <text:p>22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9840.339999999997" table:style-name="ce261">
            <text:p><text:s text:c="2"/>20</text:p>
          </table:table-cell>
          <table:table-cell office:value-type="float" office:value="41950.61" table:formula="of:=SUM([.E390:.H390])" table:style-name="ce276">
            <text:p><text:s text:c="2"/>42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91:.H391])" table:style-name="ce273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90"/>
          <table:table-cell office:value-type="float" office:value="311411" table:formula="of:=SUM([.E389:.E391])" table:style-name="ce275">
            <text:p><text:s text:c="2"/>311</text:p>
          </table:table-cell>
          <table:table-cell office:value-type="float" office:value="128643.64000000001" table:formula="of:=SUM([.F389:.F391])" table:style-name="ce275">
            <text:p><text:s text:c="2"/>129</text:p>
          </table:table-cell>
          <table:table-cell office:value-type="float" office:value="24827" table:formula="of:=SUM([.G389:.G391])" table:style-name="ce335">
            <text:p>25</text:p>
          </table:table-cell>
          <table:table-cell office:value-type="float" office:value="274624.7790000001" table:formula="of:=SUM([.H389:.H391])" table:style-name="ce275">
            <text:p><text:s text:c="2"/>275</text:p>
          </table:table-cell>
          <table:table-cell office:value-type="float" office:value="739506.41900000011" table:formula="of:=SUM([.I389:.I391])" table:style-name="ce277">
            <text:p><text:s text:c="2"/>740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49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93:.H393])" table:style-name="ce273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238618.6" table:style-name="ce261">
            <text:p><text:s text:c="2"/>239</text:p>
          </table:table-cell>
          <table:table-cell office:value-type="float" office:value="13087.679" table:style-name="ce261">
            <text:p><text:s text:c="2"/>13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251706.27900000001" table:formula="of:=SUM([.E394:.H394])" table:style-name="ce276">
            <text:p><text:s text:c="2"/>252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E395:.H395])" table:style-name="ce273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90"/>
          <table:table-cell office:value-type="float" office:value="0" table:formula="of:=SUM([.E393:.E395])" table:style-name="ce274">
            <text:p><text:s/>-<text:s/></text:p>
          </table:table-cell>
          <table:table-cell office:value-type="float" office:value="238618.6" table:formula="of:=SUM([.F393:.F395])" table:style-name="ce275">
            <text:p><text:s text:c="2"/>239</text:p>
          </table:table-cell>
          <table:table-cell office:value-type="float" office:value="13087.679" table:formula="of:=SUM([.G393:.G395])" table:style-name="ce275">
            <text:p><text:s text:c="2"/>13</text:p>
          </table:table-cell>
          <table:table-cell office:value-type="float" office:value="0" table:formula="of:=SUM([.H393:.H395])" table:style-name="ce274">
            <text:p><text:s/>-<text:s/></text:p>
          </table:table-cell>
          <table:table-cell office:value-type="float" office:value="251706.27900000001" table:formula="of:=SUM([.I393:.I395])" table:style-name="ce277">
            <text:p><text:s text:c="2"/>252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4 Total</text:p>
          </table:table-cell>
          <table:table-cell table:style-name="ce72"/>
          <table:table-cell table:style-name="ce77"/>
          <table:table-cell office:value-type="float" office:value="876477.15" table:formula="of:=+[.E396]+[.E392]+[.E388]+[.E384]" table:style-name="ce271">
            <text:p><text:s text:c="2"/>876</text:p>
          </table:table-cell>
          <table:table-cell office:value-type="float" office:value="453473.52" table:formula="of:=+[.F396]+[.F392]+[.F388]+[.F384]" table:style-name="ce271">
            <text:p><text:s text:c="2"/>453</text:p>
          </table:table-cell>
          <table:table-cell office:value-type="float" office:value="567639.58900000004" table:formula="of:=+[.G396]+[.G392]+[.G388]+[.G384]" table:style-name="ce271">
            <text:p><text:s text:c="2"/>568</text:p>
          </table:table-cell>
          <table:table-cell office:value-type="float" office:value="991069.25899999996" table:formula="of:=+[.H396]+[.H392]+[.H388]+[.H384]" table:style-name="ce271">
            <text:p><text:s text:c="2"/>991</text:p>
          </table:table-cell>
          <table:table-cell office:value-type="float" office:value="2888659.5179999997" table:formula="of:=+[.I396]+[.I392]+[.I388]+[.I384]" table:style-name="ce278">
            <text:p><text:s text:c="2"/>2,889</text:p>
          </table:table-cell>
          <table:table-cell table:number-columns-repeated="16375"/>
        </table:table-row>
        <table:table-row table:number-rows-repeated="1048179" table:style-name="ro5">
          <table:table-cell table:number-columns-repeated="16384"/>
        </table:table-row>
      </table:table>
      <table:table table:name="Landfill_Capacity" table:style-name="ta2">
        <table:table-column table:style-name="co5" table:default-cell-style-name="ce15"/>
        <table:table-column table:style-name="co6" table:default-cell-style-name="ce15"/>
        <table:table-column table:style-name="co8" table:default-cell-style-name="ce15"/>
        <table:table-column table:style-name="co9" table:default-cell-style-name="ce15"/>
        <table:table-column table:style-name="co27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default-cell-style-name="ce15"/>
        <table:table-column table:style-name="co16" table:number-columns-repeated="4" table:default-cell-style-name="ce15"/>
        <table:table-column table:style-name="co17" table:default-cell-style-name="ce15"/>
        <table:table-column table:style-name="co16" table:default-cell-style-name="ce15"/>
        <table:table-column table:style-name="co14" table:number-columns-repeated="16367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14">
          <table:table-cell table:style-name="ce15"/>
          <table:table-cell office:value-type="string" table:style-name="ce16">
            <text:p>Yorkshire and the Humber: Landfill capacity 2024</text:p>
          </table:table-cell>
          <table:table-cell table:style-name="ce91"/>
          <table:table-cell table:style-name="ce17"/>
          <table:table-cell table:style-name="ce91"/>
          <table:table-cell table:style-name="ce15"/>
          <table:table-cell table:style-name="ce91"/>
          <table:table-cell table:style-name="ce92"/>
          <table:table-cell table:number-columns-repeated="16376"/>
        </table:table-row>
        <table:table-row table:style-name="ro6">
          <table:table-cell table:style-name="ce15"/>
          <table:table-cell office:value-type="string" table:style-name="ce18">
            <text:p>All figures are provided in 000s cubic metres</text:p>
          </table:table-cell>
          <table:table-cell table:number-columns-repeated="3" table:style-name="ce91"/>
          <table:table-cell table:style-name="ce15"/>
          <table:table-cell table:style-name="ce91"/>
          <table:table-cell table:style-name="ce92"/>
          <table:table-cell table:number-columns-repeated="16376"/>
        </table:table-row>
        <table:table-row table:style-name="ro5">
          <table:table-cell table:style-name="ce15"/>
          <table:table-cell table:style-name="ce93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43">
            <text:p>Landfill Type</text:p>
          </table:table-cell>
          <table:table-cell office:value-type="string" table:number-columns-spanned="4" table:number-rows-spanned="1" table:style-name="ce351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353">
            <text:p>YORKSHIRE AND THE HUMBER</text:p>
          </table:table-cell>
          <table:table-cell table:number-columns-repeated="16377" table:style-name="ce15"/>
        </table:table-row>
        <table:table-row table:style-name="ro9">
          <table:table-cell table:style-name="ce15"/>
          <table:covered-table-cell/>
          <table:table-cell office:value-type="string" table:style-name="ce23">
            <text:p>Former Humberside</text:p>
          </table:table-cell>
          <table:table-cell office:value-type="string" table:style-name="ce2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54">
            <text:p>West Yorkshire</text:p>
          </table:table-cell>
          <table:covered-table-cell/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94">
            <text:p>Hazardous Merchant</text:p>
          </table:table-cell>
          <table:table-cell office:value-type="float" office:value="449789" table:style-name="ce251">
            <text:p>450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449789" table:formula="of:=+SUM([.C7:.F7])" table:style-name="ce309">
            <text:p>450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95">
            <text:p>Hazardous Restricted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+SUM([.C8:.F8])" table:style-name="ce309">
            <text:p>0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95">
            <text:p>Non Hazardous with SNRHW cell*</text:p>
          </table:table-cell>
          <table:table-cell office:value-type="float" office:value="1243333" table:style-name="ce251">
            <text:p>1,243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243333" table:formula="of:=+SUM([.C9:.F9])" table:style-name="ce309">
            <text:p>1,243</text:p>
          </table:table-cell>
          <table:table-cell table:style-name="ce24"/>
          <table:table-cell table:number-columns-repeated="16376"/>
        </table:table-row>
        <table:table-row table:style-name="ro10">
          <table:table-cell table:style-name="ce15"/>
          <table:table-cell office:value-type="string" table:style-name="ce95">
            <text:p>Non Hazardous</text:p>
          </table:table-cell>
          <table:table-cell office:value-type="float" office:value="16573551" table:style-name="ce251">
            <text:p>16,574</text:p>
          </table:table-cell>
          <table:table-cell office:value-type="float" office:value="17838645" table:style-name="ce251">
            <text:p>17,839</text:p>
          </table:table-cell>
          <table:table-cell office:value-type="float" office:value="3018626" table:style-name="ce251">
            <text:p>3,019</text:p>
          </table:table-cell>
          <table:table-cell office:value-type="float" office:value="200208" table:style-name="ce251">
            <text:p>200</text:p>
          </table:table-cell>
          <table:table-cell office:value-type="float" office:value="37631030" table:formula="of:=+SUM([.C10:.F10])" table:style-name="ce309">
            <text:p>37,631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96">
            <text:p>Non Hazardous Restricted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+SUM([.C11:.F11])" table:style-name="ce309">
            <text:p>0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97">
            <text:p>Inert</text:p>
          </table:table-cell>
          <table:table-cell office:value-type="float" office:value="3667927" table:style-name="ce308">
            <text:p>3,668</text:p>
          </table:table-cell>
          <table:table-cell office:value-type="float" office:value="1196605" table:style-name="ce308">
            <text:p>1,197</text:p>
          </table:table-cell>
          <table:table-cell office:value-type="float" office:value="6334250" table:style-name="ce308">
            <text:p>6,334</text:p>
          </table:table-cell>
          <table:table-cell office:value-type="float" office:value="3188642" table:style-name="ce308">
            <text:p>3,189</text:p>
          </table:table-cell>
          <table:table-cell office:value-type="float" office:value="14387424" table:formula="of:=+SUM([.C12:.F12])" table:style-name="ce309">
            <text:p>14,387</text:p>
          </table:table-cell>
          <table:table-cell table:number-columns-repeated="16377" table:style-name="ce15"/>
        </table:table-row>
        <table:table-row table:style-name="ro10">
          <table:table-cell table:style-name="ce15"/>
          <table:table-cell office:value-type="string" table:style-name="ce41">
            <text:p>Total</text:p>
          </table:table-cell>
          <table:table-cell office:value-type="float" office:value="21934600" table:formula="of:=SUM([.C7:.C12])" table:style-name="ce253">
            <text:p>21,935</text:p>
          </table:table-cell>
          <table:table-cell office:value-type="float" office:value="19035250" table:formula="of:=SUM([.D7:.D12])" table:style-name="ce253">
            <text:p>19,035</text:p>
          </table:table-cell>
          <table:table-cell office:value-type="float" office:value="9352876" table:formula="of:=SUM([.E7:.E12])" table:style-name="ce253">
            <text:p>9,353</text:p>
          </table:table-cell>
          <table:table-cell office:value-type="float" office:value="3388850" table:formula="of:=SUM([.F7:.F12])" table:style-name="ce253">
            <text:p>3,389</text:p>
          </table:table-cell>
          <table:table-cell office:value-type="float" office:value="53711576" table:formula="of:=+SUM([.G7:.G12])" table:style-name="ce310">
            <text:p>53,712</text:p>
          </table:table-cell>
          <table:table-cell table:number-columns-repeated="16377" table:style-name="ce15"/>
        </table:table-row>
        <table:table-row table:style-name="ro10">
          <table:table-cell table:style-name="ce311"/>
          <table:table-cell table:style-name="ce312"/>
          <table:table-cell table:number-columns-repeated="5" table:style-name="ce313"/>
          <table:table-cell table:number-columns-repeated="16377" table:style-name="ce311"/>
        </table:table-row>
        <table:table-row table:style-name="ro5">
          <table:table-cell table:style-name="ce15"/>
          <table:table-cell office:value-type="string" table:style-name="ce15">
            <text:p>*Some non-hazardous sites can accept some Stable Non Reactive Hazardous Wastes (SNRHW) into a dedicated cell, but this is usually a small part of the overall capacity of the site.</text:p>
          </table:table-cell>
          <table:table-cell table:number-columns-repeated="5" table:style-name="ce15"/>
          <table:table-cell table:style-name="ce99"/>
          <table:table-cell table:number-columns-repeated="16376"/>
        </table:table-row>
        <table:table-row table:style-name="ro15">
          <table:table-cell table:number-columns-repeated="7" table:style-name="ce15"/>
          <table:table-cell table:style-name="ce99"/>
          <table:table-cell table:number-columns-repeated="16376"/>
        </table:table-row>
        <table:table-row table:style-name="ro5">
          <table:table-cell/>
          <table:table-cell office:value-type="string" table:style-name="ce44">
            <text:p>Table Notes:</text:p>
          </table:table-cell>
          <table:table-cell table:number-columns-repeated="5" table:style-name="ce46"/>
          <table:table-cell table:style-name="ce99"/>
          <table:table-cell table:number-columns-repeated="16376"/>
        </table:table-row>
        <table:table-row table:style-name="ro5">
          <table:table-cell/>
          <table:table-cell office:value-type="string" table:style-name="ce15">
            <text:p>Data for 2021 is classified into Landfill Directive categories..</text:p>
          </table:table-cell>
          <table:table-cell table:number-columns-repeated="5" table:style-name="ce46"/>
          <table:table-cell table:style-name="ce99"/>
          <table:table-cell table:number-columns-repeated="16376"/>
        </table:table-row>
        <table:table-row table:style-name="ro5">
          <table:table-cell/>
          <table:table-cell office:value-type="string" table:style-name="ce15">
            <text:p>2021 landfill capacity data was obtained from environmental monitoring reports required by permits or directly from the operator.</text:p>
          </table:table-cell>
          <table:table-cell table:number-columns-repeated="5" table:style-name="ce15"/>
          <table:table-cell table:style-name="ce99"/>
          <table:table-cell table:number-columns-repeated="16376"/>
        </table:table-row>
        <table:table-row table:style-name="ro16">
          <table:table-cell/>
          <table:table-cell table:number-columns-spanned="6" table:number-rows-spanned="1" table:style-name="ce355"/>
          <table:covered-table-cell table:number-columns-repeated="5"/>
          <table:table-cell table:style-name="ce99"/>
          <table:table-cell table:number-columns-repeated="16376"/>
        </table:table-row>
        <table:table-row table:style-name="ro8">
          <table:table-cell/>
          <table:table-cell table:number-columns-spanned="6" table:number-rows-spanned="1" table:style-name="ce355"/>
          <table:covered-table-cell table:number-columns-repeated="5"/>
          <table:table-cell table:style-name="ce99"/>
          <table:table-cell table:number-columns-repeated="16376"/>
        </table:table-row>
        <table:table-row table:number-rows-repeated="1048555" table:style-name="ro5">
          <table:table-cell table:number-columns-repeated="16384"/>
        </table:table-row>
        <table:named-expressions>
          <table:named-range table:name="Print_Area" table:cell-range-address="Landfill_Capacity.$B$2:Landfill_Capacity.$H$22" table:base-cell-address="Landfill_Capacity.$A$1"/>
        </table:named-expressions>
      </table:table>
      <table:table table:name="Landfill_Capacity_Trends" table:style-name="ta1">
        <table:table-column table:style-name="co28" table:default-cell-style-name="ce15"/>
        <table:table-column table:style-name="co26" table:default-cell-style-name="ce15"/>
        <table:table-column table:style-name="co29" table:default-cell-style-name="ce15"/>
        <table:table-column table:style-name="co24" table:default-cell-style-name="ce15"/>
        <table:table-column table:style-name="co30" table:default-cell-style-name="ce15"/>
        <table:table-column table:style-name="co31" table:default-cell-style-name="ce15"/>
        <table:table-column table:style-name="co8" table:default-cell-style-name="ce15"/>
        <table:table-column table:style-name="co21" table:default-cell-style-name="ce15"/>
        <table:table-column table:style-name="co32" table:default-cell-style-name="ce15"/>
        <table:table-column table:style-name="co33" table:default-cell-style-name="ce15"/>
        <table:table-column table:style-name="co14" table:number-columns-repeated="16374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Yorkshire and the Humber: Landfill capacity trends from 1998/99 to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cubic metres</text:p>
          </table:table-cell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style-name="ce100">
            <text:p><text:s/></text:p>
          </table:table-cell>
          <table:table-cell office:value-type="string" table:style-name="ce49">
            <text:p><text:s/></text:p>
          </table:table-cell>
          <table:table-cell office:value-type="string" table:number-columns-spanned="4" table:number-rows-spanned="1" table:style-name="ce344">
            <text:p>Sub Region</text:p>
          </table:table-cell>
          <table:covered-table-cell table:number-columns-repeated="3"/>
          <table:table-cell table:style-name="ce50"/>
          <table:table-cell table:number-columns-repeated="16376"/>
        </table:table-row>
        <table:table-row table:style-name="ro3">
          <table:table-cell table:style-name="ce15"/>
          <table:table-cell office:value-type="string" table:style-name="ce101">
            <text:p>Year</text:p>
          </table:table-cell>
          <table:table-cell office:value-type="string" table:style-name="ce102">
            <text:p>Site Type</text:p>
          </table:table-cell>
          <table:table-cell office:value-type="string" table:style-name="ce23">
            <text:p>Former Humberside</text:p>
          </table:table-cell>
          <table:table-cell office:value-type="string" table:style-name="ce2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54">
            <text:p>West Yorkshire</text:p>
          </table:table-cell>
          <table:table-cell office:value-type="string" table:style-name="ce103">
            <text:p>YORKSHIRE AND THE HUMBER</text:p>
          </table:table-cell>
          <table:table-cell table:number-columns-repeated="16376"/>
        </table:table-row>
        <table:table-row table:style-name="ro5">
          <table:table-cell table:style-name="ce15"/>
          <table:table-cell office:value-type="string" table:number-columns-spanned="1" table:number-rows-spanned="3" table:style-name="ce356">
            <text:p>1998/99</text:p>
          </table:table-cell>
          <table:table-cell office:value-type="string" table:style-name="ce104">
            <text:p>Inert</text:p>
          </table:table-cell>
          <table:table-cell office:value-type="float" office:value="3242" table:style-name="ce28">
            <text:p><text:s/>3,242<text:s/></text:p>
          </table:table-cell>
          <table:table-cell office:value-type="float" office:value="1005" table:style-name="ce29">
            <text:p><text:s/>1,005<text:s/></text:p>
          </table:table-cell>
          <table:table-cell office:value-type="float" office:value="516" table:style-name="ce29">
            <text:p><text:s/>516<text:s/></text:p>
          </table:table-cell>
          <table:table-cell office:value-type="float" office:value="3710" table:style-name="ce29">
            <text:p><text:s/>3,710<text:s/></text:p>
          </table:table-cell>
          <table:table-cell office:value-type="float" office:value="8473" table:formula="of:=SUM([.D7:.G7])" table:style-name="ce59">
            <text:p><text:s/>8,473<text:s/></text:p>
          </table:table-cell>
          <table:table-cell table:number-columns-repeated="16376"/>
        </table:table-row>
        <table:table-row table:style-name="ro5">
          <table:table-cell table:style-name="ce15"/>
          <table:covered-table-cell/>
          <table:table-cell office:value-type="string" table:style-name="ce105">
            <text:p>Non-Inert</text:p>
          </table:table-cell>
          <table:table-cell office:value-type="float" office:value="24148" table:style-name="ce32">
            <text:p><text:s/>24,148<text:s/></text:p>
          </table:table-cell>
          <table:table-cell office:value-type="float" office:value="11336" table:style-name="ce33">
            <text:p><text:s/>11,336<text:s/></text:p>
          </table:table-cell>
          <table:table-cell office:value-type="float" office:value="16956" table:style-name="ce33">
            <text:p><text:s/>16,956<text:s/></text:p>
          </table:table-cell>
          <table:table-cell office:value-type="float" office:value="26175" table:style-name="ce33">
            <text:p><text:s/>26,175<text:s/></text:p>
          </table:table-cell>
          <table:table-cell office:value-type="float" office:value="78615" table:formula="of:=SUM([.D8:.G8])" table:style-name="ce61">
            <text:p><text:s/>78,615<text:s/></text:p>
          </table:table-cell>
          <table:table-cell table:number-columns-repeated="16376"/>
        </table:table-row>
        <table:table-row table:style-name="ro5">
          <table:table-cell table:style-name="ce15"/>
          <table:covered-table-cell/>
          <table:table-cell office:value-type="string" table:style-name="ce105">
            <text:p>Restricted User</text:p>
          </table:table-cell>
          <table:table-cell office:value-type="float" office:value="1456" table:style-name="ce32">
            <text:p><text:s/>1,456<text:s/></text:p>
          </table:table-cell>
          <table:table-cell office:value-type="float" office:value="18156" table:style-name="ce33">
            <text:p><text:s/>18,156<text:s/></text:p>
          </table:table-cell>
          <table:table-cell office:value-type="float" office:value="6490" table:style-name="ce33">
            <text:p><text:s/>6,490<text:s/></text:p>
          </table:table-cell>
          <table:table-cell office:value-type="float" office:value="12799" table:style-name="ce33">
            <text:p><text:s/>12,799<text:s/></text:p>
          </table:table-cell>
          <table:table-cell office:value-type="float" office:value="38901" table:formula="of:=SUM([.D9:.G9])" table:style-name="ce61">
            <text:p><text:s/>38,901<text:s/></text:p>
          </table:table-cell>
          <table:table-cell table:number-columns-repeated="16376"/>
        </table:table-row>
        <table:table-row table:style-name="ro5">
          <table:table-cell table:style-name="ce15"/>
          <table:table-cell office:value-type="string" table:style-name="ce106">
            <text:p><text:s/></text:p>
          </table:table-cell>
          <table:table-cell table:style-name="ce72"/>
          <table:table-cell office:value-type="float" office:value="28846" table:formula="of:=SUBTOTAL(9;[.D7:.D9])" table:style-name="ce43">
            <text:p><text:s/>28,846<text:s/></text:p>
          </table:table-cell>
          <table:table-cell office:value-type="float" office:value="30497" table:formula="of:=SUBTOTAL(9;[.E7:.E9])" table:style-name="ce43">
            <text:p><text:s/>30,497<text:s/></text:p>
          </table:table-cell>
          <table:table-cell office:value-type="float" office:value="23962" table:formula="of:=SUBTOTAL(9;[.F7:.F9])" table:style-name="ce43">
            <text:p><text:s/>23,962<text:s/></text:p>
          </table:table-cell>
          <table:table-cell office:value-type="float" office:value="42684" table:formula="of:=SUBTOTAL(9;[.G7:.G9])" table:style-name="ce43">
            <text:p><text:s/>42,684<text:s/></text:p>
          </table:table-cell>
          <table:table-cell office:value-type="float" office:value="125989" table:formula="of:=SUBTOTAL(9;[.H7:.H9])" table:style-name="ce74">
            <text:p><text:s/>125,989<text:s/></text:p>
          </table:table-cell>
          <table:table-cell table:number-columns-repeated="16376"/>
        </table:table-row>
        <table:table-row table:style-name="ro5">
          <table:table-cell table:style-name="ce15"/>
          <table:table-cell office:value-type="string" table:number-columns-spanned="1" table:number-rows-spanned="3" table:style-name="ce356">
            <text:p>2000/01</text:p>
          </table:table-cell>
          <table:table-cell office:value-type="string" table:style-name="ce105">
            <text:p>Inert</text:p>
          </table:table-cell>
          <table:table-cell office:value-type="float" office:value="3050" table:style-name="ce32">
            <text:p><text:s/>3,050<text:s/></text:p>
          </table:table-cell>
          <table:table-cell office:value-type="float" office:value="990" table:style-name="ce33">
            <text:p><text:s/>990<text:s/></text:p>
          </table:table-cell>
          <table:table-cell office:value-type="float" office:value="1165" table:style-name="ce33">
            <text:p><text:s/>1,165<text:s/></text:p>
          </table:table-cell>
          <table:table-cell office:value-type="float" office:value="3232" table:style-name="ce34">
            <text:p><text:s/>3,232<text:s/></text:p>
          </table:table-cell>
          <table:table-cell office:value-type="float" office:value="8437" table:formula="of:=SUM([.D11:.G11])" table:style-name="ce61">
            <text:p><text:s/>8,437<text:s/></text:p>
          </table:table-cell>
          <table:table-cell table:number-columns-repeated="16376"/>
        </table:table-row>
        <table:table-row table:style-name="ro5">
          <table:table-cell table:style-name="ce15"/>
          <table:covered-table-cell/>
          <table:table-cell office:value-type="string" table:style-name="ce105">
            <text:p>Non-Inert</text:p>
          </table:table-cell>
          <table:table-cell office:value-type="float" office:value="17769" table:style-name="ce32">
            <text:p><text:s/>17,769<text:s/></text:p>
          </table:table-cell>
          <table:table-cell office:value-type="float" office:value="9017" table:style-name="ce33">
            <text:p><text:s/>9,017<text:s/></text:p>
          </table:table-cell>
          <table:table-cell office:value-type="float" office:value="14038" table:style-name="ce33">
            <text:p><text:s/>14,038<text:s/></text:p>
          </table:table-cell>
          <table:table-cell office:value-type="float" office:value="25112" table:style-name="ce34">
            <text:p><text:s/>25,112<text:s/></text:p>
          </table:table-cell>
          <table:table-cell office:value-type="float" office:value="65936" table:formula="of:=SUM([.D12:.G12])" table:style-name="ce61">
            <text:p><text:s/>65,936<text:s/></text:p>
          </table:table-cell>
          <table:table-cell table:number-columns-repeated="16376"/>
        </table:table-row>
        <table:table-row table:style-name="ro5">
          <table:table-cell table:style-name="ce15"/>
          <table:covered-table-cell/>
          <table:table-cell office:value-type="string" table:style-name="ce97">
            <text:p>Restricted User</text:p>
          </table:table-cell>
          <table:table-cell office:value-type="float" office:value="10118" table:style-name="ce38">
            <text:p><text:s/>10,118<text:s/></text:p>
          </table:table-cell>
          <table:table-cell office:value-type="float" office:value="15982" table:style-name="ce39">
            <text:p><text:s/>15,982<text:s/></text:p>
          </table:table-cell>
          <table:table-cell office:value-type="float" office:value="7079" table:style-name="ce39">
            <text:p><text:s/>7,079<text:s/></text:p>
          </table:table-cell>
          <table:table-cell office:value-type="float" office:value="10312" table:style-name="ce40">
            <text:p><text:s/>10,312<text:s/></text:p>
          </table:table-cell>
          <table:table-cell office:value-type="float" office:value="43491" table:formula="of:=SUM([.D13:.G13])" table:style-name="ce76">
            <text:p><text:s/>43,491<text:s/></text:p>
          </table:table-cell>
          <table:table-cell table:number-columns-repeated="16376"/>
        </table:table-row>
        <table:table-row table:style-name="ro5">
          <table:table-cell table:style-name="ce15"/>
          <table:table-cell office:value-type="string" table:style-name="ce106">
            <text:p><text:s/></text:p>
          </table:table-cell>
          <table:table-cell table:style-name="ce72"/>
          <table:table-cell office:value-type="float" office:value="30937" table:formula="of:=SUBTOTAL(9;[.D11:.D13])" table:style-name="ce43">
            <text:p><text:s/>30,937<text:s/></text:p>
          </table:table-cell>
          <table:table-cell office:value-type="float" office:value="25989" table:formula="of:=SUBTOTAL(9;[.E11:.E13])" table:style-name="ce43">
            <text:p><text:s/>25,989<text:s/></text:p>
          </table:table-cell>
          <table:table-cell office:value-type="float" office:value="22282" table:formula="of:=SUBTOTAL(9;[.F11:.F13])" table:style-name="ce43">
            <text:p><text:s/>22,282<text:s/></text:p>
          </table:table-cell>
          <table:table-cell office:value-type="float" office:value="38656" table:formula="of:=SUBTOTAL(9;[.G11:.G13])" table:style-name="ce107">
            <text:p><text:s/>38,656<text:s/></text:p>
          </table:table-cell>
          <table:table-cell office:value-type="float" office:value="117864" table:formula="of:=SUBTOTAL(9;[.H11:.H13])" table:style-name="ce74">
            <text:p><text:s/>117,864<text:s/></text:p>
          </table:table-cell>
          <table:table-cell table:number-columns-repeated="16376"/>
        </table:table-row>
        <table:table-row table:style-name="ro5">
          <table:table-cell table:style-name="ce15"/>
          <table:table-cell office:value-type="float" office:value="2004" table:number-columns-spanned="1" table:number-rows-spanned="3" table:style-name="ce356">
            <text:p>2004</text:p>
          </table:table-cell>
          <table:table-cell office:value-type="string" table:style-name="ce105">
            <text:p>Inert</text:p>
          </table:table-cell>
          <table:table-cell office:value-type="float" office:value="3697.6089999999999" table:style-name="ce32">
            <text:p><text:s/>3,698<text:s/></text:p>
          </table:table-cell>
          <table:table-cell office:value-type="float" office:value="1571.6410000000001" table:style-name="ce33">
            <text:p><text:s/>1,572<text:s/></text:p>
          </table:table-cell>
          <table:table-cell office:value-type="float" office:value="5922.4549999999999" table:style-name="ce33">
            <text:p><text:s/>5,922<text:s/></text:p>
          </table:table-cell>
          <table:table-cell office:value-type="float" office:value="3737.1695800000007" table:style-name="ce34">
            <text:p><text:s/>3,737<text:s/></text:p>
          </table:table-cell>
          <table:table-cell office:value-type="float" office:value="14928.87458" table:formula="of:=SUM([.D15:.G15])" table:style-name="ce61">
            <text:p><text:s/>14,929<text:s/></text:p>
          </table:table-cell>
          <table:table-cell table:number-columns-repeated="16376"/>
        </table:table-row>
        <table:table-row table:style-name="ro5">
          <table:table-cell table:style-name="ce15"/>
          <table:covered-table-cell/>
          <table:table-cell office:value-type="string" table:style-name="ce105">
            <text:p>Non-Inert</text:p>
          </table:table-cell>
          <table:table-cell office:value-type="float" office:value="18648.067999999999" table:style-name="ce32">
            <text:p><text:s/>18,648<text:s/></text:p>
          </table:table-cell>
          <table:table-cell office:value-type="float" office:value="11959.655999999999" table:style-name="ce33">
            <text:p><text:s/>11,960<text:s/></text:p>
          </table:table-cell>
          <table:table-cell office:value-type="float" office:value="18122.183000000001" table:style-name="ce33">
            <text:p><text:s/>18,122<text:s/></text:p>
          </table:table-cell>
          <table:table-cell office:value-type="float" office:value="25533.066000000003" table:style-name="ce34">
            <text:p><text:s/>25,533<text:s/></text:p>
          </table:table-cell>
          <table:table-cell office:value-type="float" office:value="74262.972999999998" table:formula="of:=SUM([.D16:.G16])" table:style-name="ce61">
            <text:p><text:s/>74,263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9053.8529999999992" table:style-name="ce32">
            <text:p><text:s/>9,054<text:s/></text:p>
          </table:table-cell>
          <table:table-cell office:value-type="float" office:value="8896.3979999999992" table:style-name="ce33">
            <text:p><text:s/>8,896<text:s/></text:p>
          </table:table-cell>
          <table:table-cell office:value-type="float" office:value="449.173" table:style-name="ce33">
            <text:p><text:s/>449<text:s/></text:p>
          </table:table-cell>
          <table:table-cell office:value-type="float" office:value="98.15" table:style-name="ce34">
            <text:p><text:s/>98<text:s/></text:p>
          </table:table-cell>
          <table:table-cell office:value-type="float" office:value="18497.573999999997" table:formula="of:=SUM([.D17:.G17])" table:style-name="ce61">
            <text:p><text:s/>18,498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1399.53" table:formula="of:=SUBTOTAL(9;[.D15:.D17])" table:style-name="ce43">
            <text:p><text:s/>31,400<text:s/></text:p>
          </table:table-cell>
          <table:table-cell office:value-type="float" office:value="22427.695" table:formula="of:=SUBTOTAL(9;[.E15:.E17])" table:style-name="ce43">
            <text:p><text:s/>22,428<text:s/></text:p>
          </table:table-cell>
          <table:table-cell office:value-type="float" office:value="24493.810999999998" table:formula="of:=SUBTOTAL(9;[.F15:.F17])" table:style-name="ce43">
            <text:p><text:s/>24,494<text:s/></text:p>
          </table:table-cell>
          <table:table-cell office:value-type="float" office:value="29368.385580000006" table:formula="of:=SUBTOTAL(9;[.G15:.G17])" table:style-name="ce43">
            <text:p><text:s/>29,368<text:s/></text:p>
          </table:table-cell>
          <table:table-cell office:value-type="float" office:value="107689.42157999999" table:formula="of:=SUBTOTAL(9;[.H15:.H17])" table:style-name="ce74">
            <text:p><text:s/>107,689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5" table:number-columns-spanned="1" table:number-rows-spanned="3" table:style-name="ce356">
            <text:p>2005</text:p>
          </table:table-cell>
          <table:table-cell office:value-type="string" table:style-name="ce105">
            <text:p>Inert</text:p>
          </table:table-cell>
          <table:table-cell office:value-type="float" office:value="1927.3389999999999" table:style-name="ce33">
            <text:p><text:s/>1,927<text:s/></text:p>
          </table:table-cell>
          <table:table-cell office:value-type="float" office:value="1321.9749999999999" table:style-name="ce33">
            <text:p><text:s/>1,322<text:s/></text:p>
          </table:table-cell>
          <table:table-cell office:value-type="float" office:value="1416.575" table:style-name="ce33">
            <text:p><text:s/>1,417<text:s/></text:p>
          </table:table-cell>
          <table:table-cell office:value-type="float" office:value="3001.4119999999998" table:style-name="ce33">
            <text:p><text:s/>3,001<text:s/></text:p>
          </table:table-cell>
          <table:table-cell office:value-type="float" office:value="7667.3009999999995" table:formula="of:=SUM([.D19:.G19])" table:style-name="ce61">
            <text:p><text:s/>7,66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7759.873" table:style-name="ce33">
            <text:p><text:s/>27,760<text:s/></text:p>
          </table:table-cell>
          <table:table-cell office:value-type="float" office:value="11048.535" table:style-name="ce33">
            <text:p><text:s/>11,049<text:s/></text:p>
          </table:table-cell>
          <table:table-cell office:value-type="float" office:value="20095.911" table:style-name="ce33">
            <text:p><text:s/>20,096<text:s/></text:p>
          </table:table-cell>
          <table:table-cell office:value-type="float" office:value="22011.545999999998" table:style-name="ce33">
            <text:p><text:s/>22,012<text:s/></text:p>
          </table:table-cell>
          <table:table-cell office:value-type="float" office:value="80915.864999999991" table:formula="of:=SUM([.D20:.G20])" table:style-name="ce61">
            <text:p><text:s/>80,916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374.9030000000002" table:style-name="ce33">
            <text:p><text:s/>5,375<text:s/></text:p>
          </table:table-cell>
          <table:table-cell office:value-type="float" office:value="8375.5540000000001" table:style-name="ce33">
            <text:p><text:s/>8,376<text:s/></text:p>
          </table:table-cell>
          <table:table-cell office:value-type="float" office:value="46.481000000000002" table:style-name="ce33">
            <text:p><text:s/>46<text:s/></text:p>
          </table:table-cell>
          <table:table-cell office:value-type="float" office:value="2630.1019999999999" table:style-name="ce33">
            <text:p><text:s/>2,630<text:s/></text:p>
          </table:table-cell>
          <table:table-cell office:value-type="float" office:value="16427.04" table:formula="of:=SUM([.D21:.G21])" table:style-name="ce61">
            <text:p><text:s/>16,427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5062.114999999998" table:formula="of:=SUBTOTAL(9;[.D19:.D21])" table:style-name="ce43">
            <text:p><text:s/>35,062<text:s/></text:p>
          </table:table-cell>
          <table:table-cell office:value-type="float" office:value="20746.063999999998" table:formula="of:=SUBTOTAL(9;[.E19:.E21])" table:style-name="ce43">
            <text:p><text:s/>20,746<text:s/></text:p>
          </table:table-cell>
          <table:table-cell office:value-type="float" office:value="21558.967000000001" table:formula="of:=SUBTOTAL(9;[.F19:.F21])" table:style-name="ce43">
            <text:p><text:s/>21,559<text:s/></text:p>
          </table:table-cell>
          <table:table-cell office:value-type="float" office:value="27643.059999999998" table:formula="of:=SUBTOTAL(9;[.G19:.G21])" table:style-name="ce43">
            <text:p><text:s/>27,643<text:s/></text:p>
          </table:table-cell>
          <table:table-cell office:value-type="float" office:value="105010.20600000001" table:formula="of:=SUBTOTAL(9;[.H19:.H21])" table:style-name="ce107">
            <text:p><text:s/>105,010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6" table:number-columns-spanned="1" table:number-rows-spanned="3" table:style-name="ce356">
            <text:p>2006</text:p>
          </table:table-cell>
          <table:table-cell office:value-type="string" table:style-name="ce105">
            <text:p>Inert</text:p>
          </table:table-cell>
          <table:table-cell office:value-type="float" office:value="2122.65" table:style-name="ce33">
            <text:p><text:s/>2,123<text:s/></text:p>
          </table:table-cell>
          <table:table-cell office:value-type="float" office:value="1266.07" table:style-name="ce33">
            <text:p><text:s/>1,266<text:s/></text:p>
          </table:table-cell>
          <table:table-cell office:value-type="float" office:value="3898.1550000000002" table:style-name="ce33">
            <text:p><text:s/>3,898<text:s/></text:p>
          </table:table-cell>
          <table:table-cell office:value-type="float" office:value="2556.5520000000001" table:style-name="ce33">
            <text:p><text:s/>2,557<text:s/></text:p>
          </table:table-cell>
          <table:table-cell office:value-type="float" office:value="9843.4269999999997" table:formula="of:=SUM([.D23:.G23])" table:style-name="ce61">
            <text:p><text:s/>9,843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31917.142" table:style-name="ce33">
            <text:p><text:s/>31,917<text:s/></text:p>
          </table:table-cell>
          <table:table-cell office:value-type="float" office:value="8937.2420000000002" table:style-name="ce33">
            <text:p><text:s/>8,937<text:s/></text:p>
          </table:table-cell>
          <table:table-cell office:value-type="float" office:value="18448.359" table:style-name="ce33">
            <text:p><text:s/>18,448<text:s/></text:p>
          </table:table-cell>
          <table:table-cell office:value-type="float" office:value="20143.530999999999" table:style-name="ce33">
            <text:p><text:s/>20,144<text:s/></text:p>
          </table:table-cell>
          <table:table-cell office:value-type="float" office:value="79446.274000000005" table:formula="of:=SUM([.D24:.G24])" table:style-name="ce61">
            <text:p><text:s/>79,446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4987.5240000000003" table:style-name="ce33">
            <text:p><text:s/>4,988<text:s/></text:p>
          </table:table-cell>
          <table:table-cell office:value-type="float" office:value="7969.8410000000003" table:style-name="ce33">
            <text:p><text:s/>7,970<text:s/></text:p>
          </table:table-cell>
          <table:table-cell office:value-type="float" office:value="10.438000000000001" table:style-name="ce33">
            <text:p><text:s/>10<text:s/></text:p>
          </table:table-cell>
          <table:table-cell office:value-type="float" office:value="2170.402" table:style-name="ce33">
            <text:p><text:s/>2,170<text:s/></text:p>
          </table:table-cell>
          <table:table-cell office:value-type="float" office:value="15138.205000000002" table:formula="of:=SUM([.D25:.G25])" table:style-name="ce61">
            <text:p><text:s/>15,138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9027.315999999999" table:formula="of:=SUBTOTAL(9;[.D23:.D25])" table:style-name="ce43">
            <text:p><text:s/>39,027<text:s/></text:p>
          </table:table-cell>
          <table:table-cell office:value-type="float" office:value="18173.152999999998" table:formula="of:=SUBTOTAL(9;[.E23:.E25])" table:style-name="ce43">
            <text:p><text:s/>18,173<text:s/></text:p>
          </table:table-cell>
          <table:table-cell office:value-type="float" office:value="22356.951999999997" table:formula="of:=SUBTOTAL(9;[.F23:.F25])" table:style-name="ce43">
            <text:p><text:s/>22,357<text:s/></text:p>
          </table:table-cell>
          <table:table-cell office:value-type="float" office:value="24870.485000000001" table:formula="of:=SUBTOTAL(9;[.G23:.G25])" table:style-name="ce43">
            <text:p><text:s/>24,870<text:s/></text:p>
          </table:table-cell>
          <table:table-cell office:value-type="float" office:value="104427.906" table:formula="of:=SUBTOTAL(9;[.H23:.H25])" table:style-name="ce107">
            <text:p><text:s/>104,428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7" table:number-columns-spanned="1" table:number-rows-spanned="3" table:style-name="ce356">
            <text:p>2007</text:p>
          </table:table-cell>
          <table:table-cell office:value-type="string" table:style-name="ce105">
            <text:p>Inert</text:p>
          </table:table-cell>
          <table:table-cell office:value-type="float" office:value="1642.509" table:style-name="ce33">
            <text:p><text:s/>1,643<text:s/></text:p>
          </table:table-cell>
          <table:table-cell office:value-type="float" office:value="1593.04" table:style-name="ce33">
            <text:p><text:s/>1,593<text:s/></text:p>
          </table:table-cell>
          <table:table-cell office:value-type="float" office:value="4761.12" table:style-name="ce33">
            <text:p><text:s/>4,761<text:s/></text:p>
          </table:table-cell>
          <table:table-cell office:value-type="float" office:value="3107.8429999999998" table:style-name="ce33">
            <text:p><text:s/>3,108<text:s/></text:p>
          </table:table-cell>
          <table:table-cell office:value-type="float" office:value="11104.511999999999" table:formula="of:=SUM([.D27:.G27])" table:style-name="ce61">
            <text:p><text:s/>11,105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30978.965" table:formula="of:=30964.415+14.55" table:style-name="ce33">
            <text:p><text:s/>30,979<text:s/></text:p>
          </table:table-cell>
          <table:table-cell office:value-type="float" office:value="7928.0159999999996" table:style-name="ce33">
            <text:p><text:s/>7,928<text:s/></text:p>
          </table:table-cell>
          <table:table-cell office:value-type="float" office:value="18447.485000000001" table:style-name="ce33">
            <text:p><text:s/>18,447<text:s/></text:p>
          </table:table-cell>
          <table:table-cell office:value-type="float" office:value="17966.005000000001" table:formula="of:=17716.005+250" table:style-name="ce33">
            <text:p><text:s/>17,966<text:s/></text:p>
          </table:table-cell>
          <table:table-cell office:value-type="float" office:value="75320.471000000005" table:formula="of:=SUM([.D28:.G28])" table:style-name="ce61">
            <text:p><text:s/>75,32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836.3090000000002" table:style-name="ce33">
            <text:p><text:s/>5,836<text:s/></text:p>
          </table:table-cell>
          <table:table-cell office:value-type="float" office:value="11756.284" table:style-name="ce33">
            <text:p><text:s/>11,756<text:s/></text:p>
          </table:table-cell>
          <table:table-cell office:value-type="float" office:value="10.438000000000001" table:style-name="ce33">
            <text:p><text:s/>10<text:s/></text:p>
          </table:table-cell>
          <table:table-cell office:value-type="float" office:value="2072.328" table:style-name="ce33">
            <text:p><text:s/>2,072<text:s/></text:p>
          </table:table-cell>
          <table:table-cell office:value-type="float" office:value="19675.359" table:formula="of:=SUM([.D29:.G29])" table:style-name="ce61">
            <text:p><text:s/>19,675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8457.783000000003" table:formula="of:=SUBTOTAL(9;[.D27:.D29])" table:style-name="ce43">
            <text:p><text:s/>38,458<text:s/></text:p>
          </table:table-cell>
          <table:table-cell office:value-type="float" office:value="21277.34" table:formula="of:=SUBTOTAL(9;[.E27:.E29])" table:style-name="ce43">
            <text:p><text:s/>21,277<text:s/></text:p>
          </table:table-cell>
          <table:table-cell office:value-type="float" office:value="23219.042999999998" table:formula="of:=SUBTOTAL(9;[.F27:.F29])" table:style-name="ce43">
            <text:p><text:s/>23,219<text:s/></text:p>
          </table:table-cell>
          <table:table-cell office:value-type="float" office:value="23146.176000000003" table:formula="of:=SUBTOTAL(9;[.G27:.G29])" table:style-name="ce43">
            <text:p><text:s/>23,146<text:s/></text:p>
          </table:table-cell>
          <table:table-cell office:value-type="float" office:value="106100.342" table:formula="of:=SUBTOTAL(9;[.H27:.H29])" table:style-name="ce107">
            <text:p><text:s/>106,100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8" table:number-columns-spanned="1" table:number-rows-spanned="3" table:style-name="ce356">
            <text:p>2008</text:p>
          </table:table-cell>
          <table:table-cell office:value-type="string" table:style-name="ce105">
            <text:p>Inert</text:p>
          </table:table-cell>
          <table:table-cell office:value-type="float" office:value="646.5" table:style-name="ce28">
            <text:p><text:s/>647<text:s/></text:p>
          </table:table-cell>
          <table:table-cell office:value-type="float" office:value="1084.788" table:style-name="ce29">
            <text:p><text:s/>1,085<text:s/></text:p>
          </table:table-cell>
          <table:table-cell office:value-type="float" office:value="8776.7019999999993" table:style-name="ce29">
            <text:p><text:s/>8,777<text:s/></text:p>
          </table:table-cell>
          <table:table-cell office:value-type="float" office:value="1940" table:style-name="ce29">
            <text:p><text:s/>1,940<text:s/></text:p>
          </table:table-cell>
          <table:table-cell office:value-type="float" office:value="12447.99" table:formula="of:=SUM([.D31:.G31])" table:style-name="ce61">
            <text:p><text:s/>12,448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5978.080999999998" table:style-name="ce32">
            <text:p><text:s/>25,978<text:s/></text:p>
          </table:table-cell>
          <table:table-cell office:value-type="float" office:value="7516.3810000000003" table:style-name="ce33">
            <text:p><text:s/>7,516<text:s/></text:p>
          </table:table-cell>
          <table:table-cell office:value-type="float" office:value="18062.325000000001" table:style-name="ce33">
            <text:p><text:s/>18,062<text:s/></text:p>
          </table:table-cell>
          <table:table-cell office:value-type="float" office:value="18727.147000000001" table:style-name="ce33">
            <text:p><text:s/>18,727<text:s/></text:p>
          </table:table-cell>
          <table:table-cell office:value-type="float" office:value="70283.933999999994" table:formula="of:=SUM([.D32:.G32])" table:style-name="ce61">
            <text:p><text:s/>70,28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70" table:style-name="ce32">
            <text:p><text:s/>570<text:s/></text:p>
          </table:table-cell>
          <table:table-cell office:value-type="float" office:value="11815.319" table:style-name="ce33">
            <text:p><text:s/>11,81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170.402" table:style-name="ce33">
            <text:p><text:s/>2,170<text:s/></text:p>
          </table:table-cell>
          <table:table-cell office:value-type="float" office:value="14555.721" table:formula="of:=SUM([.D33:.G33])" table:style-name="ce61">
            <text:p><text:s/>14,556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27194.580999999998" table:formula="of:=SUBTOTAL(9;[.D31:.D33])" table:style-name="ce43">
            <text:p><text:s/>27,195<text:s/></text:p>
          </table:table-cell>
          <table:table-cell office:value-type="float" office:value="20416.487999999998" table:formula="of:=SUBTOTAL(9;[.E31:.E33])" table:style-name="ce43">
            <text:p><text:s/>20,416<text:s/></text:p>
          </table:table-cell>
          <table:table-cell office:value-type="float" office:value="26839.027000000002" table:formula="of:=SUBTOTAL(9;[.F31:.F33])" table:style-name="ce43">
            <text:p><text:s/>26,839<text:s/></text:p>
          </table:table-cell>
          <table:table-cell office:value-type="float" office:value="22837.548999999999" table:formula="of:=SUBTOTAL(9;[.G31:.G33])" table:style-name="ce43">
            <text:p><text:s/>22,838<text:s/></text:p>
          </table:table-cell>
          <table:table-cell office:value-type="float" office:value="97287.645000000004" table:formula="of:=SUBTOTAL(9;[.H31:.H33])" table:style-name="ce107">
            <text:p><text:s/>97,288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9" table:number-columns-spanned="1" table:number-rows-spanned="3" table:style-name="ce356">
            <text:p>2009</text:p>
          </table:table-cell>
          <table:table-cell office:value-type="string" table:style-name="ce105">
            <text:p>Inert</text:p>
          </table:table-cell>
          <table:table-cell office:value-type="float" office:value="3905" table:style-name="ce28">
            <text:p><text:s/>3,905<text:s/></text:p>
          </table:table-cell>
          <table:table-cell office:value-type="float" office:value="2594.2170000000001" table:style-name="ce29">
            <text:p><text:s/>2,594<text:s/></text:p>
          </table:table-cell>
          <table:table-cell office:value-type="float" office:value="7673.0129999999999" table:style-name="ce29">
            <text:p><text:s/>7,673<text:s/></text:p>
          </table:table-cell>
          <table:table-cell office:value-type="float" office:value="2747.4450000000002" table:style-name="ce29">
            <text:p><text:s/>2,747<text:s/></text:p>
          </table:table-cell>
          <table:table-cell office:value-type="float" office:value="16919.674999999999" table:formula="of:=SUM([.D35:.G35])" table:style-name="ce61">
            <text:p><text:s/>16,92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6124.933000000001" table:style-name="ce32">
            <text:p><text:s/>26,125<text:s/></text:p>
          </table:table-cell>
          <table:table-cell office:value-type="float" office:value="6702.2929999999997" table:style-name="ce33">
            <text:p><text:s/>6,702<text:s/></text:p>
          </table:table-cell>
          <table:table-cell office:value-type="float" office:value="12834.21" table:style-name="ce33">
            <text:p><text:s/>12,834<text:s/></text:p>
          </table:table-cell>
          <table:table-cell office:value-type="float" office:value="15520.651" table:style-name="ce33">
            <text:p><text:s/>15,521<text:s/></text:p>
          </table:table-cell>
          <table:table-cell office:value-type="float" office:value="61182.087" table:formula="of:=SUM([.D36:.G36])" table:style-name="ce61">
            <text:p><text:s/>61,182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706.3329999999996" table:style-name="ce32">
            <text:p><text:s/>5,706<text:s/></text:p>
          </table:table-cell>
          <table:table-cell office:value-type="float" office:value="18203.560000000001" table:style-name="ce33">
            <text:p><text:s/>18,20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170.402" table:style-name="ce33">
            <text:p><text:s/>2,170<text:s/></text:p>
          </table:table-cell>
          <table:table-cell office:value-type="float" office:value="26080.294999999998" table:formula="of:=SUM([.D37:.G37])" table:style-name="ce61">
            <text:p><text:s/>26,080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5736.266000000003" table:formula="of:=SUBTOTAL(9;[.D35:.D37])" table:style-name="ce43">
            <text:p><text:s/>35,736<text:s/></text:p>
          </table:table-cell>
          <table:table-cell office:value-type="float" office:value="27500.07" table:formula="of:=SUBTOTAL(9;[.E35:.E37])" table:style-name="ce43">
            <text:p><text:s/>27,500<text:s/></text:p>
          </table:table-cell>
          <table:table-cell office:value-type="float" office:value="20507.222999999998" table:formula="of:=SUBTOTAL(9;[.F35:.F37])" table:style-name="ce43">
            <text:p><text:s/>20,507<text:s/></text:p>
          </table:table-cell>
          <table:table-cell office:value-type="float" office:value="20438.498" table:formula="of:=SUBTOTAL(9;[.G35:.G37])" table:style-name="ce43">
            <text:p><text:s/>20,438<text:s/></text:p>
          </table:table-cell>
          <table:table-cell office:value-type="float" office:value="104182.057" table:formula="of:=SUBTOTAL(9;[.H35:.H37])" table:style-name="ce107">
            <text:p><text:s/>104,182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0" table:number-columns-spanned="1" table:number-rows-spanned="3" table:style-name="ce356">
            <text:p>2010</text:p>
          </table:table-cell>
          <table:table-cell office:value-type="string" table:style-name="ce105">
            <text:p>Inert</text:p>
          </table:table-cell>
          <table:table-cell office:value-type="float" office:value="4524.1530000000002" table:style-name="ce28">
            <text:p><text:s/>4,524<text:s/></text:p>
          </table:table-cell>
          <table:table-cell office:value-type="float" office:value="1167.242" table:style-name="ce29">
            <text:p><text:s/>1,167<text:s/></text:p>
          </table:table-cell>
          <table:table-cell office:value-type="float" office:value="7419.9830000000002" table:style-name="ce29">
            <text:p><text:s/>7,420<text:s/></text:p>
          </table:table-cell>
          <table:table-cell office:value-type="float" office:value="2725.79" table:style-name="ce29">
            <text:p><text:s/>2,726<text:s/></text:p>
          </table:table-cell>
          <table:table-cell office:value-type="float" office:value="15837.168000000001" table:formula="of:=SUM([.D39:.G39])" table:style-name="ce61">
            <text:p><text:s/>15,83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5473.550999999999" table:style-name="ce32">
            <text:p><text:s/>25,474<text:s/></text:p>
          </table:table-cell>
          <table:table-cell office:value-type="float" office:value="6106.59" table:style-name="ce33">
            <text:p><text:s/>6,107<text:s/></text:p>
          </table:table-cell>
          <table:table-cell office:value-type="float" office:value="10236.183000000001" table:style-name="ce33">
            <text:p><text:s/>10,236<text:s/></text:p>
          </table:table-cell>
          <table:table-cell office:value-type="float" office:value="14836.592000000001" table:style-name="ce33">
            <text:p><text:s/>14,837<text:s/></text:p>
          </table:table-cell>
          <table:table-cell office:value-type="float" office:value="56652.915999999997" table:formula="of:=SUM([.D40:.G40])" table:style-name="ce61">
            <text:p><text:s/>56,653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655.9849999999997" table:style-name="ce32">
            <text:p><text:s/>5,656<text:s/></text:p>
          </table:table-cell>
          <table:table-cell office:value-type="float" office:value="17893.883000000002" table:style-name="ce33">
            <text:p><text:s/>17,894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075.848" table:style-name="ce33">
            <text:p><text:s/>2,076<text:s/></text:p>
          </table:table-cell>
          <table:table-cell office:value-type="float" office:value="25625.716" table:formula="of:=SUM([.D41:.G41])" table:style-name="ce61">
            <text:p><text:s/>25,626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5653.688999999998" table:formula="of:=SUBTOTAL(9;[.D39:.D41])" table:style-name="ce43">
            <text:p><text:s/>35,654<text:s/></text:p>
          </table:table-cell>
          <table:table-cell office:value-type="float" office:value="25167.715000000004" table:formula="of:=SUBTOTAL(9;[.E39:.E41])" table:style-name="ce43">
            <text:p><text:s/>25,168<text:s/></text:p>
          </table:table-cell>
          <table:table-cell office:value-type="float" office:value="17656.166000000001" table:formula="of:=SUBTOTAL(9;[.F39:.F41])" table:style-name="ce43">
            <text:p><text:s/>17,656<text:s/></text:p>
          </table:table-cell>
          <table:table-cell office:value-type="float" office:value="19638.230000000003" table:formula="of:=SUBTOTAL(9;[.G39:.G41])" table:style-name="ce43">
            <text:p><text:s/>19,638<text:s/></text:p>
          </table:table-cell>
          <table:table-cell office:value-type="float" office:value="98115.8" table:formula="of:=SUBTOTAL(9;[.H39:.H41])" table:style-name="ce107">
            <text:p><text:s/>98,116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1" table:number-columns-spanned="1" table:number-rows-spanned="3" table:style-name="ce356">
            <text:p>2011</text:p>
          </table:table-cell>
          <table:table-cell office:value-type="string" table:style-name="ce105">
            <text:p>Inert</text:p>
          </table:table-cell>
          <table:table-cell office:value-type="float" office:value="4427.2950000000001" table:style-name="ce28">
            <text:p><text:s/>4,427<text:s/></text:p>
          </table:table-cell>
          <table:table-cell office:value-type="float" office:value="1614.02" table:style-name="ce29">
            <text:p><text:s/>1,614<text:s/></text:p>
          </table:table-cell>
          <table:table-cell office:value-type="float" office:value="7373.5630000000001" table:style-name="ce29">
            <text:p><text:s/>7,374<text:s/></text:p>
          </table:table-cell>
          <table:table-cell office:value-type="float" office:value="2882.3850000000002" table:style-name="ce29">
            <text:p><text:s/>2,882<text:s/></text:p>
          </table:table-cell>
          <table:table-cell office:value-type="float" office:value="16297.263000000001" table:formula="of:=SUM([.D43:.G43])" table:style-name="ce61">
            <text:p><text:s/>16,29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4853.797999999999" table:style-name="ce32">
            <text:p><text:s/>24,854<text:s/></text:p>
          </table:table-cell>
          <table:table-cell office:value-type="float" office:value="5455.5349999999999" table:style-name="ce33">
            <text:p><text:s/>5,456<text:s/></text:p>
          </table:table-cell>
          <table:table-cell office:value-type="float" office:value="15757.143" table:style-name="ce33">
            <text:p><text:s/>15,757<text:s/></text:p>
          </table:table-cell>
          <table:table-cell office:value-type="float" office:value="14174.07" table:style-name="ce33">
            <text:p><text:s/>14,174<text:s/></text:p>
          </table:table-cell>
          <table:table-cell office:value-type="float" office:value="60240.545999999995" table:formula="of:=SUM([.D44:.G44])" table:style-name="ce61">
            <text:p><text:s/>60,241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604.7" table:style-name="ce32">
            <text:p><text:s/>5,605<text:s/></text:p>
          </table:table-cell>
          <table:table-cell office:value-type="float" office:value="17345.779000000002" table:style-name="ce33">
            <text:p><text:s/>17,346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719.568" table:style-name="ce33">
            <text:p><text:s/>1,720<text:s/></text:p>
          </table:table-cell>
          <table:table-cell office:value-type="float" office:value="24670.047000000002" table:formula="of:=SUM([.D45:.G45])" table:style-name="ce61">
            <text:p><text:s/>24,670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4885.792999999998" table:formula="of:=SUBTOTAL(9;[.D43:.D45])" table:style-name="ce43">
            <text:p><text:s/>34,886<text:s/></text:p>
          </table:table-cell>
          <table:table-cell office:value-type="float" office:value="24415.334000000003" table:formula="of:=SUBTOTAL(9;[.E43:.E45])" table:style-name="ce43">
            <text:p><text:s/>24,415<text:s/></text:p>
          </table:table-cell>
          <table:table-cell office:value-type="float" office:value="23130.705999999998" table:formula="of:=SUBTOTAL(9;[.F43:.F45])" table:style-name="ce43">
            <text:p><text:s/>23,131<text:s/></text:p>
          </table:table-cell>
          <table:table-cell office:value-type="float" office:value="18776.023000000001" table:formula="of:=SUBTOTAL(9;[.G43:.G45])" table:style-name="ce43">
            <text:p><text:s/>18,776<text:s/></text:p>
          </table:table-cell>
          <table:table-cell office:value-type="float" office:value="101207.856" table:formula="of:=SUBTOTAL(9;[.H43:.H45])" table:style-name="ce107">
            <text:p><text:s/>101,208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2" table:number-columns-spanned="1" table:number-rows-spanned="3" table:style-name="ce356">
            <text:p>2012</text:p>
          </table:table-cell>
          <table:table-cell office:value-type="string" table:style-name="ce105">
            <text:p>Inert</text:p>
          </table:table-cell>
          <table:table-cell office:value-type="float" office:value="4344.0859999999993" table:style-name="ce28">
            <text:p><text:s/>4,344<text:s/></text:p>
          </table:table-cell>
          <table:table-cell office:value-type="float" office:value="1169.376" table:style-name="ce29">
            <text:p><text:s/>1,169<text:s/></text:p>
          </table:table-cell>
          <table:table-cell office:value-type="float" office:value="7182.23" table:style-name="ce29">
            <text:p><text:s/>7,182<text:s/></text:p>
          </table:table-cell>
          <table:table-cell office:value-type="float" office:value="2671.8449999999998" table:style-name="ce29">
            <text:p><text:s/>2,672<text:s/></text:p>
          </table:table-cell>
          <table:table-cell office:value-type="float" office:value="15367.536999999998" table:formula="of:=SUM([.D47:.G47])" table:style-name="ce61">
            <text:p><text:s/>15,368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3777.644" table:style-name="ce32">
            <text:p><text:s/>23,778<text:s/></text:p>
          </table:table-cell>
          <table:table-cell office:value-type="float" office:value="4852.4639999999999" table:style-name="ce33">
            <text:p><text:s/>4,852<text:s/></text:p>
          </table:table-cell>
          <table:table-cell office:value-type="float" office:value="14095.450999999999" table:style-name="ce33">
            <text:p><text:s/>14,095<text:s/></text:p>
          </table:table-cell>
          <table:table-cell office:value-type="float" office:value="13621.181999999999" table:style-name="ce33">
            <text:p><text:s/>13,621<text:s/></text:p>
          </table:table-cell>
          <table:table-cell office:value-type="float" office:value="56346.741000000002" table:formula="of:=SUM([.D48:.G48])" table:style-name="ce61">
            <text:p><text:s/>56,34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574.8879999999999" table:style-name="ce32">
            <text:p><text:s/>5,575<text:s/></text:p>
          </table:table-cell>
          <table:table-cell office:value-type="float" office:value="15601.845000000001" table:style-name="ce33">
            <text:p><text:s/>15,60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83.4860000000001" table:style-name="ce33">
            <text:p><text:s/>1,583<text:s/></text:p>
          </table:table-cell>
          <table:table-cell office:value-type="float" office:value="22760.219000000001" table:formula="of:=SUM([.D49:.G49])" table:style-name="ce61">
            <text:p><text:s/>22,760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3696.618000000002" table:formula="of:=SUBTOTAL(9;[.D47:.D49])" table:style-name="ce43">
            <text:p><text:s/>33,697<text:s/></text:p>
          </table:table-cell>
          <table:table-cell office:value-type="float" office:value="21623.685000000001" table:formula="of:=SUBTOTAL(9;[.E47:.E49])" table:style-name="ce43">
            <text:p><text:s/>21,624<text:s/></text:p>
          </table:table-cell>
          <table:table-cell office:value-type="float" office:value="21277.680999999997" table:formula="of:=SUBTOTAL(9;[.F47:.F49])" table:style-name="ce43">
            <text:p><text:s/>21,278<text:s/></text:p>
          </table:table-cell>
          <table:table-cell office:value-type="float" office:value="17876.512999999999" table:formula="of:=SUBTOTAL(9;[.G47:.G49])" table:style-name="ce43">
            <text:p><text:s/>17,877<text:s/></text:p>
          </table:table-cell>
          <table:table-cell office:value-type="float" office:value="94474.497000000003" table:formula="of:=SUBTOTAL(9;[.H47:.H49])" table:style-name="ce107">
            <text:p><text:s/>94,474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3" table:number-columns-spanned="1" table:number-rows-spanned="3" table:style-name="ce356">
            <text:p>2013</text:p>
          </table:table-cell>
          <table:table-cell office:value-type="string" table:style-name="ce105">
            <text:p>Inert</text:p>
          </table:table-cell>
          <table:table-cell office:value-type="float" office:value="4186.201" table:style-name="ce28">
            <text:p><text:s/>4,186<text:s/></text:p>
          </table:table-cell>
          <table:table-cell office:value-type="float" office:value="1079.3620000000001" table:style-name="ce29">
            <text:p><text:s/>1,079<text:s/></text:p>
          </table:table-cell>
          <table:table-cell office:value-type="float" office:value="7312.201" table:style-name="ce29">
            <text:p><text:s/>7,312<text:s/></text:p>
          </table:table-cell>
          <table:table-cell office:value-type="float" office:value="3655.3139999999999" table:style-name="ce29">
            <text:p><text:s/>3,655<text:s/></text:p>
          </table:table-cell>
          <table:table-cell office:value-type="float" office:value="16233.078" table:formula="of:=SUM([.D51:.G51])" table:style-name="ce61">
            <text:p><text:s/>16,233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2716.049999999996" table:style-name="ce32">
            <text:p><text:s/>22,716<text:s/></text:p>
          </table:table-cell>
          <table:table-cell office:value-type="float" office:value="4643.2219999999998" table:style-name="ce33">
            <text:p><text:s/>4,643<text:s/></text:p>
          </table:table-cell>
          <table:table-cell office:value-type="float" office:value="10374.788" table:style-name="ce33">
            <text:p><text:s/>10,375<text:s/></text:p>
          </table:table-cell>
          <table:table-cell office:value-type="float" office:value="15470.253000000001" table:style-name="ce33">
            <text:p><text:s/>15,470<text:s/></text:p>
          </table:table-cell>
          <table:table-cell office:value-type="float" office:value="53204.312999999995" table:formula="of:=SUM([.D52:.G52])" table:style-name="ce61">
            <text:p><text:s/>53,20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537.0519999999997" table:style-name="ce32">
            <text:p><text:s/>5,537<text:s/></text:p>
          </table:table-cell>
          <table:table-cell office:value-type="float" office:value="14538.314999999999" table:style-name="ce33">
            <text:p><text:s/>14,53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20075.366999999998" table:formula="of:=SUM([.D53:.G53])" table:style-name="ce61">
            <text:p><text:s/>20,075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2439.302999999996" table:formula="of:=SUBTOTAL(9;[.D51:.D53])" table:style-name="ce43">
            <text:p><text:s/>32,439<text:s/></text:p>
          </table:table-cell>
          <table:table-cell office:value-type="float" office:value="20260.898999999998" table:formula="of:=SUBTOTAL(9;[.E51:.E53])" table:style-name="ce43">
            <text:p><text:s/>20,261<text:s/></text:p>
          </table:table-cell>
          <table:table-cell office:value-type="float" office:value="17686.989000000001" table:formula="of:=SUBTOTAL(9;[.F51:.F53])" table:style-name="ce43">
            <text:p><text:s/>17,687<text:s/></text:p>
          </table:table-cell>
          <table:table-cell office:value-type="float" office:value="19125.566999999999" table:formula="of:=SUBTOTAL(9;[.G51:.G53])" table:style-name="ce43">
            <text:p><text:s/>19,126<text:s/></text:p>
          </table:table-cell>
          <table:table-cell office:value-type="float" office:value="89512.757999999987" table:formula="of:=SUBTOTAL(9;[.H51:.H53])" table:style-name="ce107">
            <text:p><text:s/>89,513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4" table:number-columns-spanned="1" table:number-rows-spanned="3" table:style-name="ce356">
            <text:p>2014</text:p>
          </table:table-cell>
          <table:table-cell office:value-type="string" table:style-name="ce105">
            <text:p>Inert</text:p>
          </table:table-cell>
          <table:table-cell office:value-type="float" office:value="4183.7170000000006" table:style-name="ce28">
            <text:p><text:s/>4,184<text:s/></text:p>
          </table:table-cell>
          <table:table-cell office:value-type="float" office:value="858.49199999999996" table:style-name="ce29">
            <text:p><text:s/>858<text:s/></text:p>
          </table:table-cell>
          <table:table-cell office:value-type="float" office:value="7074.7330000000002" table:style-name="ce29">
            <text:p><text:s/>7,075<text:s/></text:p>
          </table:table-cell>
          <table:table-cell office:value-type="float" office:value="3526.71" table:style-name="ce29">
            <text:p><text:s/>3,527<text:s/></text:p>
          </table:table-cell>
          <table:table-cell office:value-type="float" office:value="15643.652000000002" table:formula="of:=SUM([.D55:.G55])" table:style-name="ce61">
            <text:p><text:s/>15,64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2058.34" table:style-name="ce32">
            <text:p><text:s/>22,058<text:s/></text:p>
          </table:table-cell>
          <table:table-cell office:value-type="float" office:value="4257.0959999999995" table:style-name="ce33">
            <text:p><text:s/>4,257<text:s/></text:p>
          </table:table-cell>
          <table:table-cell office:value-type="float" office:value="9771.6919999999991" table:style-name="ce33">
            <text:p><text:s/>9,772<text:s/></text:p>
          </table:table-cell>
          <table:table-cell office:value-type="float" office:value="17959.905999999999" table:style-name="ce33">
            <text:p><text:s/>17,960<text:s/></text:p>
          </table:table-cell>
          <table:table-cell office:value-type="float" office:value="54047.034" table:formula="of:=SUM([.D56:.G56])" table:style-name="ce61">
            <text:p><text:s/>54,04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487.6040000000003" table:style-name="ce32">
            <text:p><text:s/>5,488<text:s/></text:p>
          </table:table-cell>
          <table:table-cell office:value-type="float" office:value="14460.706" table:style-name="ce33">
            <text:p><text:s/>14,46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9948.310000000001" table:formula="of:=SUM([.D57:.G57])" table:style-name="ce61">
            <text:p><text:s/>19,948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1729.661" table:formula="of:=SUBTOTAL(9;[.D55:.D57])" table:style-name="ce43">
            <text:p><text:s/>31,730<text:s/></text:p>
          </table:table-cell>
          <table:table-cell office:value-type="float" office:value="19576.294000000002" table:formula="of:=SUBTOTAL(9;[.E55:.E57])" table:style-name="ce43">
            <text:p><text:s/>19,576<text:s/></text:p>
          </table:table-cell>
          <table:table-cell office:value-type="float" office:value="16846.424999999999" table:formula="of:=SUBTOTAL(9;[.F55:.F57])" table:style-name="ce43">
            <text:p><text:s/>16,846<text:s/></text:p>
          </table:table-cell>
          <table:table-cell office:value-type="float" office:value="21486.615999999998" table:formula="of:=SUBTOTAL(9;[.G55:.G57])" table:style-name="ce43">
            <text:p><text:s/>21,487<text:s/></text:p>
          </table:table-cell>
          <table:table-cell office:value-type="float" office:value="89638.995999999999" table:formula="of:=SUBTOTAL(9;[.H55:.H57])" table:style-name="ce107">
            <text:p><text:s/>89,639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5" table:number-columns-spanned="1" table:number-rows-spanned="3" table:style-name="ce356">
            <text:p>2015</text:p>
          </table:table-cell>
          <table:table-cell office:value-type="string" table:style-name="ce105">
            <text:p>Inert</text:p>
          </table:table-cell>
          <table:table-cell office:value-type="float" office:value="3526.2889999999998" table:style-name="ce28">
            <text:p><text:s/>3,526<text:s/></text:p>
          </table:table-cell>
          <table:table-cell office:value-type="float" office:value="1481.6969999999999" table:style-name="ce29">
            <text:p><text:s/>1,482<text:s/></text:p>
          </table:table-cell>
          <table:table-cell office:value-type="float" office:value="8750.6170000000002" table:style-name="ce29">
            <text:p><text:s/>8,751<text:s/></text:p>
          </table:table-cell>
          <table:table-cell office:value-type="float" office:value="3431.2919999999999" table:style-name="ce29">
            <text:p><text:s/>3,431<text:s/></text:p>
          </table:table-cell>
          <table:table-cell office:value-type="float" office:value="17189.895" table:formula="of:=SUM([.D59:.G59])" table:style-name="ce61">
            <text:p><text:s/>17,19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1034.428" table:style-name="ce32">
            <text:p><text:s/>21,034<text:s/></text:p>
          </table:table-cell>
          <table:table-cell office:value-type="float" office:value="5141.0859999999993" table:style-name="ce33">
            <text:p><text:s/>5,141<text:s/></text:p>
          </table:table-cell>
          <table:table-cell office:value-type="float" office:value="8895.8870000000006" table:style-name="ce33">
            <text:p><text:s/>8,896<text:s/></text:p>
          </table:table-cell>
          <table:table-cell office:value-type="float" office:value="17632.909000000003" table:style-name="ce33">
            <text:p><text:s/>17,633<text:s/></text:p>
          </table:table-cell>
          <table:table-cell office:value-type="float" office:value="52704.31" table:formula="of:=SUM([.D60:.G60])" table:style-name="ce61">
            <text:p><text:s/>52,70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5476.93" table:style-name="ce32">
            <text:p><text:s/>5,477<text:s/></text:p>
          </table:table-cell>
          <table:table-cell office:value-type="float" office:value="14062.344000000001" table:style-name="ce33">
            <text:p><text:s/>14,06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9539.274000000001" table:formula="of:=SUM([.D61:.G61])" table:style-name="ce61">
            <text:p><text:s/>19,539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0037.647000000001" table:formula="of:=SUBTOTAL(9;[.D59:.D61])" table:style-name="ce43">
            <text:p><text:s/>30,038<text:s/></text:p>
          </table:table-cell>
          <table:table-cell office:value-type="float" office:value="20685.127" table:formula="of:=SUBTOTAL(9;[.E59:.E61])" table:style-name="ce43">
            <text:p><text:s/>20,685<text:s/></text:p>
          </table:table-cell>
          <table:table-cell office:value-type="float" office:value="17646.504000000001" table:formula="of:=SUBTOTAL(9;[.F59:.F61])" table:style-name="ce43">
            <text:p><text:s/>17,647<text:s/></text:p>
          </table:table-cell>
          <table:table-cell office:value-type="float" office:value="21064.201000000005" table:formula="of:=SUBTOTAL(9;[.G59:.G61])" table:style-name="ce43">
            <text:p><text:s/>21,064<text:s/></text:p>
          </table:table-cell>
          <table:table-cell office:value-type="float" office:value="89433.479000000007" table:formula="of:=SUBTOTAL(9;[.H59:.H61])" table:style-name="ce107">
            <text:p><text:s/>89,433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6" table:number-columns-spanned="1" table:number-rows-spanned="3" table:style-name="ce356">
            <text:p>2016</text:p>
          </table:table-cell>
          <table:table-cell office:value-type="string" table:style-name="ce105">
            <text:p>Inert</text:p>
          </table:table-cell>
          <table:table-cell office:value-type="float" office:value="3473.9409999999998" table:style-name="ce28">
            <text:p><text:s/>3,474<text:s/></text:p>
          </table:table-cell>
          <table:table-cell office:value-type="float" office:value="1399.6573900000001" table:style-name="ce29">
            <text:p><text:s/>1,400<text:s/></text:p>
          </table:table-cell>
          <table:table-cell office:value-type="float" office:value="8662.2890000000007" table:style-name="ce29">
            <text:p><text:s/>8,662<text:s/></text:p>
          </table:table-cell>
          <table:table-cell office:value-type="float" office:value="3210.77" table:style-name="ce29">
            <text:p><text:s/>3,211<text:s/></text:p>
          </table:table-cell>
          <table:table-cell office:value-type="float" office:value="16746.65739" table:formula="of:=SUM([.D63:.G63])" table:style-name="ce61">
            <text:p><text:s/>16,74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6061.695999999996" table:style-name="ce32">
            <text:p><text:s/>26,062<text:s/></text:p>
          </table:table-cell>
          <table:table-cell office:value-type="float" office:value="3731.1130000000003" table:style-name="ce33">
            <text:p><text:s/>3,731<text:s/></text:p>
          </table:table-cell>
          <table:table-cell office:value-type="float" office:value="4055.0569999999998" table:style-name="ce33">
            <text:p><text:s/>4,055<text:s/></text:p>
          </table:table-cell>
          <table:table-cell office:value-type="float" office:value="14931.724" table:style-name="ce33">
            <text:p><text:s/>14,932<text:s/></text:p>
          </table:table-cell>
          <table:table-cell office:value-type="float" office:value="48779.59" table:formula="of:=SUM([.D64:.G64])" table:style-name="ce61">
            <text:p><text:s/>48,78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921.922999999999" table:style-name="ce33">
            <text:p><text:s/>13,92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3921.922999999999" table:formula="of:=SUM([.D65:.G65])" table:style-name="ce61">
            <text:p><text:s/>13,922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29535.636999999995" table:formula="of:=SUBTOTAL(9;[.D63:.D65])" table:style-name="ce43">
            <text:p><text:s/>29,536<text:s/></text:p>
          </table:table-cell>
          <table:table-cell office:value-type="float" office:value="19052.69339" table:formula="of:=SUBTOTAL(9;[.E63:.E65])" table:style-name="ce43">
            <text:p><text:s/>19,053<text:s/></text:p>
          </table:table-cell>
          <table:table-cell office:value-type="float" office:value="12717.346000000001" table:formula="of:=SUBTOTAL(9;[.F63:.F65])" table:style-name="ce43">
            <text:p><text:s/>12,717<text:s/></text:p>
          </table:table-cell>
          <table:table-cell office:value-type="float" office:value="18142.493999999999" table:formula="of:=SUBTOTAL(9;[.G63:.G65])" table:style-name="ce43">
            <text:p><text:s/>18,142<text:s/></text:p>
          </table:table-cell>
          <table:table-cell office:value-type="float" office:value="79448.170389999999" table:formula="of:=SUBTOTAL(9;[.H63:.H65])" table:style-name="ce107">
            <text:p><text:s/>79,448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7" table:number-columns-spanned="1" table:number-rows-spanned="3" table:style-name="ce356">
            <text:p>2017</text:p>
          </table:table-cell>
          <table:table-cell office:value-type="string" table:style-name="ce105">
            <text:p>Inert</text:p>
          </table:table-cell>
          <table:table-cell office:value-type="float" office:value="3393" table:style-name="ce28">
            <text:p><text:s/>3,393<text:s/></text:p>
          </table:table-cell>
          <table:table-cell office:value-type="float" office:value="1161.943" table:style-name="ce29">
            <text:p><text:s/>1,162<text:s/></text:p>
          </table:table-cell>
          <table:table-cell office:value-type="float" office:value="6573" table:style-name="ce29">
            <text:p><text:s/>6,573<text:s/></text:p>
          </table:table-cell>
          <table:table-cell office:value-type="float" office:value="3008" table:style-name="ce29">
            <text:p><text:s/>3,008<text:s/></text:p>
          </table:table-cell>
          <table:table-cell office:value-type="float" office:value="14135.942999999999" table:formula="of:=SUM([.D67:.G67])" table:style-name="ce61">
            <text:p><text:s/>14,136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4007" table:style-name="ce32">
            <text:p><text:s/>24,007<text:s/></text:p>
          </table:table-cell>
          <table:table-cell office:value-type="float" office:value="3683.8720000000003" table:style-name="ce33">
            <text:p><text:s/>3,684<text:s/></text:p>
          </table:table-cell>
          <table:table-cell office:value-type="float" office:value="3867" table:style-name="ce33">
            <text:p><text:s/>3,867<text:s/></text:p>
          </table:table-cell>
          <table:table-cell office:value-type="float" office:value="14400" table:style-name="ce33">
            <text:p><text:s/>14,400<text:s/></text:p>
          </table:table-cell>
          <table:table-cell office:value-type="float" office:value="45957.872000000003" table:formula="of:=SUM([.D68:.G68])" table:style-name="ce61">
            <text:p><text:s/>45,958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1642" table:style-name="ce33">
            <text:p><text:s/>1,642<text:s/></text:p>
          </table:table-cell>
          <table:table-cell office:value-type="float" office:value="14095.948" table:style-name="ce33">
            <text:p><text:s/>14,096<text:s/>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float" office:value="15737.948" table:formula="of:=SUM([.D69:.G69])" table:style-name="ce61">
            <text:p><text:s/>15,738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29042" table:formula="of:=SUBTOTAL(9;[.D67:.D69])" table:style-name="ce43">
            <text:p><text:s/>29,042<text:s/></text:p>
          </table:table-cell>
          <table:table-cell office:value-type="float" office:value="18941.762999999999" table:formula="of:=SUBTOTAL(9;[.E67:.E69])" table:style-name="ce43">
            <text:p><text:s/>18,942<text:s/></text:p>
          </table:table-cell>
          <table:table-cell office:value-type="float" office:value="10440" table:formula="of:=SUBTOTAL(9;[.F67:.F69])" table:style-name="ce43">
            <text:p><text:s/>10,440<text:s/></text:p>
          </table:table-cell>
          <table:table-cell office:value-type="float" office:value="17408" table:formula="of:=SUBTOTAL(9;[.G67:.G69])" table:style-name="ce43">
            <text:p><text:s/>17,408<text:s/></text:p>
          </table:table-cell>
          <table:table-cell office:value-type="float" office:value="75831.763000000006" table:formula="of:=SUBTOTAL(9;[.H67:.H69])" table:style-name="ce107">
            <text:p><text:s/>75,832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8" table:number-columns-spanned="1" table:number-rows-spanned="3" table:style-name="ce356">
            <text:p>2018</text:p>
          </table:table-cell>
          <table:table-cell office:value-type="string" table:style-name="ce105">
            <text:p>Inert</text:p>
          </table:table-cell>
          <table:table-cell office:value-type="float" office:value="2992.2869999999998" table:style-name="ce28">
            <text:p><text:s/>2,992<text:s/></text:p>
          </table:table-cell>
          <table:table-cell office:value-type="float" office:value="985.57899999999995" table:style-name="ce29">
            <text:p><text:s/>986<text:s/></text:p>
          </table:table-cell>
          <table:table-cell office:value-type="float" office:value="6490.9560000000001" table:style-name="ce29">
            <text:p><text:s/>6,491<text:s/></text:p>
          </table:table-cell>
          <table:table-cell office:value-type="float" office:value="2970.4349999999999" table:style-name="ce29">
            <text:p><text:s/>2,970<text:s/></text:p>
          </table:table-cell>
          <table:table-cell office:value-type="float" office:value="13439.257" table:formula="of:=SUM([.D71:.G71])" table:style-name="ce61">
            <text:p><text:s/>13,439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6481.276999999998" table:style-name="ce32">
            <text:p><text:s/>26,481<text:s/></text:p>
          </table:table-cell>
          <table:table-cell office:value-type="float" office:value="2761.4720000000002" table:style-name="ce33">
            <text:p><text:s/>2,761<text:s/></text:p>
          </table:table-cell>
          <table:table-cell office:value-type="float" office:value="3925.9450000000002" table:style-name="ce33">
            <text:p><text:s/>3,926<text:s/></text:p>
          </table:table-cell>
          <table:table-cell office:value-type="float" office:value="8636.9410000000007" table:style-name="ce33">
            <text:p><text:s/>8,637<text:s/></text:p>
          </table:table-cell>
          <table:table-cell office:value-type="float" office:value="41805.635000000002" table:formula="of:=SUM([.D72:.G72])" table:style-name="ce61">
            <text:p><text:s/>41,806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1641.7360000000001" table:style-name="ce33">
            <text:p><text:s/>1,642<text:s/></text:p>
          </table:table-cell>
          <table:table-cell office:value-type="float" office:value="14241.102000000001" table:style-name="ce33">
            <text:p><text:s/>14,24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882.838000000002" table:formula="of:=SUM([.D73:.G73])" table:style-name="ce61">
            <text:p><text:s/>15,883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1115.3" table:formula="of:=SUBTOTAL(9;[.D71:.D73])" table:style-name="ce43">
            <text:p><text:s/>31,115<text:s/></text:p>
          </table:table-cell>
          <table:table-cell office:value-type="float" office:value="17988.153000000002" table:formula="of:=SUBTOTAL(9;[.E71:.E73])" table:style-name="ce43">
            <text:p><text:s/>17,988<text:s/></text:p>
          </table:table-cell>
          <table:table-cell office:value-type="float" office:value="10416.901" table:formula="of:=SUBTOTAL(9;[.F71:.F73])" table:style-name="ce43">
            <text:p><text:s/>10,417<text:s/></text:p>
          </table:table-cell>
          <table:table-cell office:value-type="float" office:value="11607.376" table:formula="of:=SUBTOTAL(9;[.G71:.G73])" table:style-name="ce43">
            <text:p><text:s/>11,607<text:s/></text:p>
          </table:table-cell>
          <table:table-cell office:value-type="float" office:value="71127.73" table:formula="of:=SUBTOTAL(9;[.H71:.H73])" table:style-name="ce107">
            <text:p><text:s/>71,128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9" table:number-columns-spanned="1" table:number-rows-spanned="3" table:style-name="ce356">
            <text:p>2019</text:p>
          </table:table-cell>
          <table:table-cell office:value-type="string" table:style-name="ce105">
            <text:p>Inert</text:p>
          </table:table-cell>
          <table:table-cell office:value-type="float" office:value="15340" table:style-name="ce32">
            <text:p><text:s/>15,340<text:s/></text:p>
          </table:table-cell>
          <table:table-cell office:value-type="float" office:value="1258" table:style-name="ce33">
            <text:p><text:s/>1,258<text:s/></text:p>
          </table:table-cell>
          <table:table-cell office:value-type="float" office:value="5744" table:style-name="ce33">
            <text:p><text:s/>5,744<text:s/></text:p>
          </table:table-cell>
          <table:table-cell office:value-type="float" office:value="3131" table:style-name="ce33">
            <text:p><text:s/>3,131<text:s/></text:p>
          </table:table-cell>
          <table:table-cell office:value-type="float" office:value="25473" table:formula="of:=SUM([.D75:.G75])" table:style-name="ce61">
            <text:p><text:s/>25,473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3692" table:style-name="ce33">
            <text:p><text:s/>23,692<text:s/></text:p>
          </table:table-cell>
          <table:table-cell office:value-type="float" office:value="2761" table:style-name="ce33">
            <text:p><text:s/>2,761<text:s/></text:p>
          </table:table-cell>
          <table:table-cell office:value-type="float" office:value="1715" table:style-name="ce33">
            <text:p><text:s/>1,715<text:s/></text:p>
          </table:table-cell>
          <table:table-cell office:value-type="float" office:value="3067" table:style-name="ce33">
            <text:p><text:s/>3,067<text:s/></text:p>
          </table:table-cell>
          <table:table-cell office:value-type="float" office:value="31235" table:formula="of:=SUM([.D76:.G76])" table:style-name="ce61">
            <text:p><text:s/>31,235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1642" table:style-name="ce33">
            <text:p><text:s/>1,642<text:s/></text:p>
          </table:table-cell>
          <table:table-cell office:value-type="float" office:value="14340" table:style-name="ce33">
            <text:p><text:s/>14,34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5982" table:formula="of:=SUM([.D77:.G77])" table:style-name="ce61">
            <text:p><text:s/>15,982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40674" table:formula="of:=SUBTOTAL(9;[.D75:.D77])" table:style-name="ce43">
            <text:p><text:s/>40,674<text:s/></text:p>
          </table:table-cell>
          <table:table-cell office:value-type="float" office:value="18359" table:formula="of:=SUBTOTAL(9;[.E75:.E77])" table:style-name="ce43">
            <text:p><text:s/>18,359<text:s/></text:p>
          </table:table-cell>
          <table:table-cell office:value-type="float" office:value="7459" table:formula="of:=SUBTOTAL(9;[.F75:.F77])" table:style-name="ce43">
            <text:p><text:s/>7,459<text:s/></text:p>
          </table:table-cell>
          <table:table-cell office:value-type="float" office:value="6198" table:formula="of:=SUBTOTAL(9;[.G75:.G77])" table:style-name="ce43">
            <text:p><text:s/>6,198<text:s/></text:p>
          </table:table-cell>
          <table:table-cell office:value-type="float" office:value="72690" table:formula="of:=SUBTOTAL(9;[.H75:.H77])" table:style-name="ce107">
            <text:p><text:s/>72,690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20" table:number-columns-spanned="1" table:number-rows-spanned="3" table:style-name="ce356">
            <text:p>2020</text:p>
          </table:table-cell>
          <table:table-cell office:value-type="string" table:style-name="ce105">
            <text:p>Inert</text:p>
          </table:table-cell>
          <table:table-cell office:value-type="float" office:value="15680" table:style-name="ce32">
            <text:p><text:s/>15,680<text:s/></text:p>
          </table:table-cell>
          <table:table-cell office:value-type="float" office:value="1105" table:style-name="ce33">
            <text:p><text:s/>1,105<text:s/></text:p>
          </table:table-cell>
          <table:table-cell office:value-type="float" office:value="5669" table:style-name="ce33">
            <text:p><text:s/>5,669<text:s/></text:p>
          </table:table-cell>
          <table:table-cell office:value-type="float" office:value="2586" table:style-name="ce33">
            <text:p><text:s/>2,586<text:s/></text:p>
          </table:table-cell>
          <table:table-cell office:value-type="float" office:value="25040" table:formula="of:=SUM([.D79:.G79])" table:style-name="ce61">
            <text:p><text:s/>25,04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2232" table:style-name="ce33">
            <text:p><text:s/>22,232<text:s/></text:p>
          </table:table-cell>
          <table:table-cell office:value-type="float" office:value="2761" table:style-name="ce33">
            <text:p><text:s/>2,761<text:s/></text:p>
          </table:table-cell>
          <table:table-cell office:value-type="float" office:value="1681" table:style-name="ce33">
            <text:p><text:s/>1,681<text:s/></text:p>
          </table:table-cell>
          <table:table-cell office:value-type="float" office:value="2554" table:style-name="ce33">
            <text:p><text:s/>2,554<text:s/></text:p>
          </table:table-cell>
          <table:table-cell office:value-type="float" office:value="29228" table:formula="of:=SUM([.D80:.G80])" table:style-name="ce61">
            <text:p><text:s/>29,228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1642" table:style-name="ce33">
            <text:p><text:s/>1,642<text:s/></text:p>
          </table:table-cell>
          <table:table-cell office:value-type="float" office:value="14823" table:style-name="ce33">
            <text:p><text:s/>14,82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6465" table:formula="of:=SUM([.D81:.G81])" table:style-name="ce61">
            <text:p><text:s/>16,465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9554" table:formula="of:=SUBTOTAL(9;[.D79:.D81])" table:style-name="ce43">
            <text:p><text:s/>39,554<text:s/></text:p>
          </table:table-cell>
          <table:table-cell office:value-type="float" office:value="18689" table:formula="of:=SUBTOTAL(9;[.E79:.E81])" table:style-name="ce43">
            <text:p><text:s/>18,689<text:s/></text:p>
          </table:table-cell>
          <table:table-cell office:value-type="float" office:value="7350" table:formula="of:=SUBTOTAL(9;[.F79:.F81])" table:style-name="ce43">
            <text:p><text:s/>7,350<text:s/></text:p>
          </table:table-cell>
          <table:table-cell office:value-type="float" office:value="5140" table:formula="of:=SUBTOTAL(9;[.G79:.G81])" table:style-name="ce43">
            <text:p><text:s/>5,140<text:s/></text:p>
          </table:table-cell>
          <table:table-cell office:value-type="float" office:value="70733" table:formula="of:=SUBTOTAL(9;[.H79:.H81])" table:style-name="ce107">
            <text:p><text:s/>70,733<text:s/></text:p>
          </table:table-cell>
          <table:table-cell table:number-columns-repeated="16376"/>
        </table:table-row>
        <table:table-row table:style-name="ro5">
          <table:table-cell table:style-name="ce108"/>
          <table:table-cell office:value-type="float" office:value="2021" table:number-columns-spanned="1" table:number-rows-spanned="3" table:style-name="ce356">
            <text:p>2021</text:p>
          </table:table-cell>
          <table:table-cell office:value-type="string" table:style-name="ce105">
            <text:p>Inert</text:p>
          </table:table-cell>
          <table:table-cell office:value-type="float" office:value="15372" table:style-name="ce32">
            <text:p><text:s/>15,372<text:s/></text:p>
          </table:table-cell>
          <table:table-cell office:value-type="float" office:value="978" table:style-name="ce33">
            <text:p><text:s/>978<text:s/></text:p>
          </table:table-cell>
          <table:table-cell office:value-type="float" office:value="5650.3" table:style-name="ce33">
            <text:p><text:s/>5,650<text:s/></text:p>
          </table:table-cell>
          <table:table-cell office:value-type="float" office:value="3282" table:style-name="ce33">
            <text:p><text:s/>3,282<text:s/></text:p>
          </table:table-cell>
          <table:table-cell office:value-type="float" office:value="25282.3" table:formula="of:=SUM([.D83:.G83])" table:style-name="ce61">
            <text:p><text:s/>25,282<text:s/></text:p>
          </table:table-cell>
          <table:table-cell table:number-columns-repeated="16376" table:style-name="ce108"/>
        </table:table-row>
        <table:table-row table:style-name="ro5">
          <table:table-cell table:style-name="ce108"/>
          <table:covered-table-cell/>
          <table:table-cell office:value-type="string" table:style-name="ce105">
            <text:p>Non-Inert</text:p>
          </table:table-cell>
          <table:table-cell office:value-type="float" office:value="22553" table:style-name="ce33">
            <text:p><text:s/>22,553<text:s/></text:p>
          </table:table-cell>
          <table:table-cell office:value-type="float" office:value="17475" table:style-name="ce33">
            <text:p><text:s/>17,475<text:s/></text:p>
          </table:table-cell>
          <table:table-cell office:value-type="float" office:value="6524.4" table:style-name="ce33">
            <text:p><text:s/>6,524<text:s/></text:p>
          </table:table-cell>
          <table:table-cell office:value-type="float" office:value="587" table:style-name="ce33">
            <text:p><text:s/>587<text:s/></text:p>
          </table:table-cell>
          <table:table-cell office:value-type="float" office:value="47139.4" table:formula="of:=SUM([.D84:.G84])" table:style-name="ce61">
            <text:p><text:s/>47,139<text:s/></text:p>
          </table:table-cell>
          <table:table-cell table:number-columns-repeated="16376" table:style-name="ce108"/>
        </table:table-row>
        <table:table-row table:style-name="ro5">
          <table:table-cell table:style-name="ce108"/>
          <table:covered-table-cell/>
          <table:table-cell office:value-type="string" table:style-name="ce105">
            <text:p>Restricted User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465" table:style-name="ce33">
            <text:p><text:s/>1,465<text:s/></text:p>
          </table:table-cell>
          <table:table-cell office:value-type="float" office:value="1465" table:formula="of:=SUM([.D85:.G85])" table:style-name="ce61">
            <text:p><text:s/>1,465<text:s/></text:p>
          </table:table-cell>
          <table:table-cell table:number-columns-repeated="16376" table:style-name="ce108"/>
        </table:table-row>
        <table:table-row table:style-name="ro5">
          <table:table-cell table:style-name="ce108"/>
          <table:table-cell office:value-type="string" table:style-name="ce106">
            <text:p><text:s/></text:p>
          </table:table-cell>
          <table:table-cell table:style-name="ce72"/>
          <table:table-cell office:value-type="float" office:value="37925" table:formula="of:=SUBTOTAL(9;[.D83:.D85])" table:style-name="ce43">
            <text:p><text:s/>37,925<text:s/></text:p>
          </table:table-cell>
          <table:table-cell office:value-type="float" office:value="18453" table:formula="of:=SUBTOTAL(9;[.E83:.E85])" table:style-name="ce43">
            <text:p><text:s/>18,453<text:s/></text:p>
          </table:table-cell>
          <table:table-cell office:value-type="float" office:value="12174.7" table:formula="of:=SUBTOTAL(9;[.F83:.F85])" table:style-name="ce43">
            <text:p><text:s/>12,175<text:s/></text:p>
          </table:table-cell>
          <table:table-cell office:value-type="float" office:value="5334" table:formula="of:=SUBTOTAL(9;[.G83:.G85])" table:style-name="ce43">
            <text:p><text:s/>5,334<text:s/></text:p>
          </table:table-cell>
          <table:table-cell office:value-type="float" office:value="73886.7" table:formula="of:=SUBTOTAL(9;[.H83:.H85])" table:style-name="ce107">
            <text:p><text:s/>73,887<text:s/></text:p>
          </table:table-cell>
          <table:table-cell table:number-columns-repeated="16376" table:style-name="ce108"/>
        </table:table-row>
        <table:table-row table:style-name="ro5">
          <table:table-cell table:style-name="ce108"/>
          <table:table-cell office:value-type="float" office:value="2022" table:number-columns-spanned="1" table:number-rows-spanned="3" table:style-name="ce356">
            <text:p>2022</text:p>
          </table:table-cell>
          <table:table-cell office:value-type="string" table:style-name="ce105">
            <text:p>Inert</text:p>
          </table:table-cell>
          <table:table-cell office:value-type="float" office:value="15029314" table:style-name="ce251">
            <text:p>15,029</text:p>
          </table:table-cell>
          <table:table-cell office:value-type="float" office:value="864420" table:style-name="ce251">
            <text:p>864</text:p>
          </table:table-cell>
          <table:table-cell office:value-type="float" office:value="5650265" table:style-name="ce251">
            <text:p>5,650</text:p>
          </table:table-cell>
          <table:table-cell office:value-type="float" office:value="3384485.52" table:style-name="ce251">
            <text:p>3,384</text:p>
          </table:table-cell>
          <table:table-cell office:value-type="float" office:value="24928484.52" table:formula="of:=SUM([.D87:.G87])" table:style-name="ce254">
            <text:p>24,928</text:p>
          </table:table-cell>
          <table:table-cell table:number-columns-repeated="16376" table:style-name="ce108"/>
        </table:table-row>
        <table:table-row table:style-name="ro5">
          <table:table-cell table:style-name="ce108"/>
          <table:covered-table-cell/>
          <table:table-cell office:value-type="string" table:style-name="ce105">
            <text:p>Non-Inert</text:p>
          </table:table-cell>
          <table:table-cell office:value-type="float" office:value="21347665" table:style-name="ce252">
            <text:p>21,348</text:p>
          </table:table-cell>
          <table:table-cell office:value-type="float" office:value="17573742" table:style-name="ce251">
            <text:p>17,574</text:p>
          </table:table-cell>
          <table:table-cell office:value-type="float" office:value="3226392.64" table:style-name="ce251">
            <text:p>3,226</text:p>
          </table:table-cell>
          <table:table-cell office:value-type="float" office:value="151703.21" table:style-name="ce251">
            <text:p>152</text:p>
          </table:table-cell>
          <table:table-cell office:value-type="float" office:value="42299502.850000001" table:formula="of:=SUM([.D88:.G88])" table:style-name="ce254">
            <text:p>42,300</text:p>
          </table:table-cell>
          <table:table-cell table:number-columns-repeated="16376" table:style-name="ce108"/>
        </table:table-row>
        <table:table-row table:style-name="ro5">
          <table:table-cell table:style-name="ce108"/>
          <table:covered-table-cell/>
          <table:table-cell office:value-type="string" table:style-name="ce105">
            <text:p>Restricted User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D89:.G89])" table:style-name="ce254">
            <text:p>0</text:p>
          </table:table-cell>
          <table:table-cell table:number-columns-repeated="16376" table:style-name="ce108"/>
        </table:table-row>
        <table:table-row table:style-name="ro5">
          <table:table-cell table:style-name="ce108"/>
          <table:table-cell office:value-type="string" table:style-name="ce106">
            <text:p><text:s/></text:p>
          </table:table-cell>
          <table:table-cell table:style-name="ce72"/>
          <table:table-cell office:value-type="float" office:value="36376979" table:formula="of:=SUBTOTAL(9;[.D87:.D89])" table:style-name="ce253">
            <text:p>36,377</text:p>
          </table:table-cell>
          <table:table-cell office:value-type="float" office:value="18438162" table:formula="of:=SUBTOTAL(9;[.E87:.E89])" table:style-name="ce253">
            <text:p>18,438</text:p>
          </table:table-cell>
          <table:table-cell office:value-type="float" office:value="8876657.6400000006" table:formula="of:=SUBTOTAL(9;[.F87:.F89])" table:style-name="ce253">
            <text:p>8,877</text:p>
          </table:table-cell>
          <table:table-cell office:value-type="float" office:value="3536188.73" table:formula="of:=SUBTOTAL(9;[.G87:.G89])" table:style-name="ce253">
            <text:p>3,536</text:p>
          </table:table-cell>
          <table:table-cell office:value-type="float" office:value="67227987.370000005" table:formula="of:=SUBTOTAL(9;[.H87:.H89])" table:style-name="ce255">
            <text:p>67,228</text:p>
          </table:table-cell>
          <table:table-cell table:number-columns-repeated="16376" table:style-name="ce108"/>
        </table:table-row>
        <table:table-row table:style-name="ro5">
          <table:table-cell/>
          <table:table-cell office:value-type="float" office:value="2023" table:number-columns-spanned="1" table:number-rows-spanned="3" table:style-name="ce356">
            <text:p>2023</text:p>
          </table:table-cell>
          <table:table-cell office:value-type="string" table:style-name="ce105">
            <text:p>Inert</text:p>
          </table:table-cell>
          <table:table-cell office:value-type="float" office:value="14590" table:style-name="ce304">
            <text:p>14,590</text:p>
          </table:table-cell>
          <table:table-cell office:value-type="float" office:value="1243253" table:style-name="ce251">
            <text:p>1,243</text:p>
          </table:table-cell>
          <table:table-cell office:value-type="float" office:value="5622945" table:style-name="ce251">
            <text:p>5,623</text:p>
          </table:table-cell>
          <table:table-cell office:value-type="float" office:value="3409624" table:style-name="ce251">
            <text:p>3,410</text:p>
          </table:table-cell>
          <table:table-cell office:value-type="float" office:value="24865.5" table:style-name="ce294">
            <text:p>24,866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21395" table:style-name="ce306">
            <text:p>21,395</text:p>
          </table:table-cell>
          <table:table-cell office:value-type="float" office:value="17930495" table:style-name="ce251">
            <text:p>17,930</text:p>
          </table:table-cell>
          <table:table-cell office:value-type="float" office:value="2951981" table:style-name="ce251">
            <text:p>2,952</text:p>
          </table:table-cell>
          <table:table-cell office:value-type="float" office:value="246665" table:style-name="ce251">
            <text:p>247</text:p>
          </table:table-cell>
          <table:table-cell office:value-type="float" office:value="42523.5" table:style-name="ce294">
            <text:p>42,524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D93:.G93])" table:style-name="ce254">
            <text:p>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35985" table:formula="of:=SUBTOTAL(9;[.D91:.D93])" table:style-name="ce305">
            <text:p>35,985</text:p>
          </table:table-cell>
          <table:table-cell office:value-type="float" office:value="19173748" table:formula="of:=SUBTOTAL(9;[.E91:.E93])" table:style-name="ce253">
            <text:p>19,174</text:p>
          </table:table-cell>
          <table:table-cell office:value-type="float" office:value="8574926" table:formula="of:=SUBTOTAL(9;[.F91:.F93])" table:style-name="ce253">
            <text:p>8,575</text:p>
          </table:table-cell>
          <table:table-cell office:value-type="float" office:value="3656289" table:formula="of:=SUBTOTAL(9;[.G91:.G93])" table:style-name="ce253">
            <text:p>3,656</text:p>
          </table:table-cell>
          <table:table-cell office:value-type="float" office:value="67389" table:formula="of:=SUBTOTAL(9;[.H91:.H93])" table:style-name="ce307">
            <text:p>67,389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24" table:number-columns-spanned="1" table:number-rows-spanned="3" table:style-name="ce356">
            <text:p>2024</text:p>
          </table:table-cell>
          <table:table-cell office:value-type="string" table:style-name="ce105">
            <text:p>Inert</text:p>
          </table:table-cell>
          <table:table-cell office:value-type="float" office:value="3667927" table:style-name="ce251">
            <text:p>3,668</text:p>
          </table:table-cell>
          <table:table-cell office:value-type="float" office:value="1196605" table:style-name="ce251">
            <text:p>1,197</text:p>
          </table:table-cell>
          <table:table-cell office:value-type="float" office:value="6334250" table:style-name="ce251">
            <text:p>6,334</text:p>
          </table:table-cell>
          <table:table-cell office:value-type="float" office:value="3188642" table:style-name="ce251">
            <text:p>3,189</text:p>
          </table:table-cell>
          <table:table-cell office:value-type="float" office:value="14387424" table:formula="of:=+SUM([.D95:.G95])" table:style-name="ce254">
            <text:p>14,387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Non-Inert</text:p>
          </table:table-cell>
          <table:table-cell office:value-type="float" office:value="18266673" table:style-name="ce252">
            <text:p>18,267</text:p>
          </table:table-cell>
          <table:table-cell office:value-type="float" office:value="17838645" table:style-name="ce251">
            <text:p>17,839</text:p>
          </table:table-cell>
          <table:table-cell office:value-type="float" office:value="3018626" table:style-name="ce251">
            <text:p>3,019</text:p>
          </table:table-cell>
          <table:table-cell office:value-type="float" office:value="200208" table:style-name="ce251">
            <text:p>200</text:p>
          </table:table-cell>
          <table:table-cell office:value-type="float" office:value="39324152" table:formula="of:=+SUM([.D96:.G96])" table:style-name="ce254">
            <text:p>39,324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05">
            <text:p>Restricted User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formula="of:=SUM([.D97:.G97])" table:style-name="ce254">
            <text:p>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6">
            <text:p><text:s/></text:p>
          </table:table-cell>
          <table:table-cell table:style-name="ce72"/>
          <table:table-cell office:value-type="float" office:value="21934600" table:formula="of:=SUBTOTAL(9;[.D95:.D97])" table:style-name="ce253">
            <text:p>21,935</text:p>
          </table:table-cell>
          <table:table-cell office:value-type="float" office:value="19035250" table:formula="of:=SUBTOTAL(9;[.E95:.E97])" table:style-name="ce253">
            <text:p>19,035</text:p>
          </table:table-cell>
          <table:table-cell office:value-type="float" office:value="9352876" table:formula="of:=SUBTOTAL(9;[.F95:.F97])" table:style-name="ce253">
            <text:p>9,353</text:p>
          </table:table-cell>
          <table:table-cell office:value-type="float" office:value="3388850" table:formula="of:=SUBTOTAL(9;[.G95:.G97])" table:style-name="ce253">
            <text:p>3,389</text:p>
          </table:table-cell>
          <table:table-cell office:value-type="float" office:value="53711576" table:formula="of:=SUBTOTAL(9;[.H95:.H97])" table:style-name="ce255">
            <text:p>53,712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5">
            <text:p>Non -Inert: <text:s/>Non hazardous landfill sites, non-hazardous landfill sites with a Stable Non Reactive Hazardous Waste Cell(SNHRW), merchant hazardous landfill sites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5">
            <text:p>Restricted User: <text:s/>Non-hazardous and hazardous restricted landfill sites</text:p>
          </table:table-cell>
          <table:table-cell table:number-columns-repeated="16382" table:style-name="ce15"/>
        </table:table-row>
        <table:table-row table:number-rows-repeated="1048476" table:style-name="ro5">
          <table:table-cell table:number-columns-repeated="16384"/>
        </table:table-row>
      </table:table>
      <table:table table:name="Transfer_Treatment_&amp;_MRS_Inputs" table:style-name="ta2">
        <table:table-column table:style-name="co5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24" table:default-cell-style-name="ce15"/>
        <table:table-column table:style-name="co2" table:default-cell-style-name="ce15"/>
        <table:table-column table:style-name="co14" table:number-columns-repeated="8" table:default-cell-style-name="ce15"/>
        <table:table-column table:style-name="co22" table:default-cell-style-name="ce15"/>
        <table:table-column table:style-name="co14" table:number-columns-repeated="16367" table:default-cell-style-name="ce15"/>
        <table:table-row table:style-name="ro8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Yorkshire and the Humber: Transfer, treatment and metal recycling site inputs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style-name="ce15"/>
          <table:table-cell table:style-name="ce17"/>
          <table:table-cell table:number-columns-repeated="16380" table:style-name="ce15"/>
        </table:table-row>
        <table:table-row table:style-name="ro5">
          <table:table-cell table:style-name="ce15"/>
          <table:table-cell table:style-name="ce44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43">
            <text:p>Site Type</text:p>
          </table:table-cell>
          <table:table-cell office:value-type="string" table:number-columns-spanned="4" table:number-rows-spanned="1" table:style-name="ce3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345">
            <text:p>YORKSHIRE AND THE HUMBER</text:p>
          </table:table-cell>
          <table:table-cell table:number-columns-repeated="16377"/>
        </table:table-row>
        <table:table-row table:style-name="ro17">
          <table:table-cell table:style-name="ce109"/>
          <table:covered-table-cell/>
          <table:table-cell office:value-type="string" table:style-name="ce23">
            <text:p>Former Humberside</text:p>
          </table:table-cell>
          <table:table-cell office:value-type="string" table:style-name="ce2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23">
            <text:p>West Yorkshire</text:p>
          </table:table-cell>
          <table:covered-table-cell/>
          <table:table-cell table:number-columns-repeated="16377" table:style-name="ce109"/>
        </table:table-row>
        <table:table-row table:style-name="ro18">
          <table:table-cell table:style-name="ce15"/>
          <table:table-cell office:value-type="string" table:style-name="ce110">
            <text:p>Hazardous waste</text:p>
          </table:table-cell>
          <table:table-cell office:value-type="float" office:value="109018.17188499999" table:style-name="ce259">
            <text:p><text:s text:c="2"/>109</text:p>
          </table:table-cell>
          <table:table-cell office:value-type="float" office:value="30749.699999999997" table:style-name="ce261">
            <text:p><text:s text:c="2"/>31</text:p>
          </table:table-cell>
          <table:table-cell office:value-type="float" office:value="524171.92859000002" table:style-name="ce261">
            <text:p><text:s text:c="2"/>524</text:p>
          </table:table-cell>
          <table:table-cell office:value-type="float" office:value="170771.16072399996" table:style-name="ce261">
            <text:p><text:s text:c="2"/>171</text:p>
          </table:table-cell>
          <table:table-cell office:value-type="float" office:value="834710.9611989999" table:formula="of:=SUM([.C7:.F7])" table:style-name="ce266">
            <text:p><text:s text:c="2"/>835</text:p>
          </table:table-cell>
          <table:table-cell table:number-columns-repeated="16377"/>
        </table:table-row>
        <table:table-row table:style-name="ro18">
          <table:table-cell table:style-name="ce15"/>
          <table:table-cell office:value-type="string" table:style-name="ce111">
            <text:p>HlC</text:p>
          </table:table-cell>
          <table:table-cell office:value-type="float" office:value="709604.44099999988" table:style-name="ce267">
            <text:p><text:s text:c="2"/>710</text:p>
          </table:table-cell>
          <table:table-cell office:value-type="float" office:value="498612.15450000012" table:style-name="ce261">
            <text:p><text:s text:c="2"/>499</text:p>
          </table:table-cell>
          <table:table-cell office:value-type="float" office:value="998161.26352400053" table:style-name="ce261">
            <text:p><text:s text:c="2"/>998</text:p>
          </table:table-cell>
          <table:table-cell office:value-type="float" office:value="1137649.6059959999" table:style-name="ce261">
            <text:p><text:s text:c="2"/>1,138</text:p>
          </table:table-cell>
          <table:table-cell office:value-type="float" office:value="3344027.46502" table:formula="of:=SUM([.C8:.F8])" table:style-name="ce266">
            <text:p><text:s text:c="2"/>3,344</text:p>
          </table:table-cell>
          <table:table-cell table:number-columns-repeated="16377"/>
        </table:table-row>
        <table:table-row table:style-name="ro18">
          <table:table-cell table:style-name="ce15"/>
          <table:table-cell office:value-type="string" table:style-name="ce112">
            <text:p>Clinical</text:p>
          </table:table-cell>
          <table:table-cell office:value-type="float" office:value="97.643000000000001" table:style-name="ce261">
            <text:p><text:s text:c="2"/>0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271.87592599999999" table:style-name="ce261">
            <text:p><text:s text:c="2"/>0</text:p>
          </table:table-cell>
          <table:table-cell office:value-type="float" office:value="15016.036059999999" table:style-name="ce261">
            <text:p><text:s text:c="2"/>15</text:p>
          </table:table-cell>
          <table:table-cell office:value-type="float" office:value="15385.554985999999" table:formula="of:=SUM([.C9:.F9])" table:style-name="ce266">
            <text:p><text:s text:c="2"/>15</text:p>
          </table:table-cell>
          <table:table-cell table:number-columns-repeated="16377"/>
        </table:table-row>
        <table:table-row table:style-name="ro18">
          <table:table-cell table:style-name="ce15"/>
          <table:table-cell office:value-type="string" table:style-name="ce113">
            <text:p>Civic amenity site</text:p>
          </table:table-cell>
          <table:table-cell office:value-type="float" office:value="115453.14800000003" table:style-name="ce261">
            <text:p><text:s text:c="2"/>115</text:p>
          </table:table-cell>
          <table:table-cell office:value-type="float" office:value="67463.786000000066" table:style-name="ce261">
            <text:p><text:s text:c="2"/>67</text:p>
          </table:table-cell>
          <table:table-cell office:value-type="float" office:value="65977.018460000021" table:style-name="ce261">
            <text:p><text:s text:c="2"/>66</text:p>
          </table:table-cell>
          <table:table-cell office:value-type="float" office:value="224266.56897899997" table:style-name="ce261">
            <text:p><text:s text:c="2"/>224</text:p>
          </table:table-cell>
          <table:table-cell office:value-type="float" office:value="473160.52143900009" table:formula="of:=SUM([.C10:.F10])" table:style-name="ce266">
            <text:p><text:s text:c="2"/>473</text:p>
          </table:table-cell>
          <table:table-cell table:number-columns-repeated="16377"/>
        </table:table-row>
        <table:table-row table:style-name="ro18">
          <table:table-cell table:style-name="ce15"/>
          <table:table-cell office:value-type="string" table:style-name="ce114">
            <text:p>Non Biodegradable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16322" table:style-name="ce261">
            <text:p><text:s text:c="2"/>16</text:p>
          </table:table-cell>
          <table:table-cell office:value-type="float" office:value="351939.01" table:style-name="ce261">
            <text:p><text:s text:c="2"/>352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368261.01" table:formula="of:=SUM([.C11:.F11])" table:style-name="ce266">
            <text:p><text:s text:c="2"/>368</text:p>
          </table:table-cell>
          <table:table-cell table:number-columns-repeated="16377"/>
        </table:table-row>
        <table:table-row table:style-name="ro18">
          <table:table-cell table:style-name="ce15"/>
          <table:table-cell office:value-type="string" table:style-name="ce41">
            <text:p>Transfer Total</text:p>
          </table:table-cell>
          <table:table-cell office:value-type="float" office:value="934173.40388499992" table:formula="of:=SUM([.C7:.C11])" table:style-name="ce271">
            <text:p><text:s text:c="2"/>934</text:p>
          </table:table-cell>
          <table:table-cell office:value-type="float" office:value="613147.64050000021" table:formula="of:=SUM([.D7:.D11])" table:style-name="ce271">
            <text:p><text:s text:c="2"/>613</text:p>
          </table:table-cell>
          <table:table-cell office:value-type="float" office:value="1940521.0965000007" table:formula="of:=SUM([.E7:.E11])" table:style-name="ce271">
            <text:p><text:s text:c="2"/>1,941</text:p>
          </table:table-cell>
          <table:table-cell office:value-type="float" office:value="1547703.3717589998" table:formula="of:=SUM([.F7:.F11])" table:style-name="ce271">
            <text:p><text:s text:c="2"/>1,548</text:p>
          </table:table-cell>
          <table:table-cell office:value-type="float" office:value="5035545.5126440004" table:formula="of:=SUM([.G7:.G11])" table:style-name="ce278">
            <text:p><text:s text:c="2"/>5,036</text:p>
          </table:table-cell>
          <table:table-cell table:number-columns-repeated="16377"/>
        </table:table-row>
        <table:table-row table:style-name="ro18">
          <table:table-cell table:style-name="ce15"/>
          <table:table-cell office:value-type="string" table:style-name="ce27">
            <text:p>Material recovery</text:p>
          </table:table-cell>
          <table:table-cell office:value-type="float" office:value="315251" table:style-name="ce282">
            <text:p><text:s text:c="2"/>315</text:p>
          </table:table-cell>
          <table:table-cell office:value-type="float" office:value="78165" table:style-name="ce260">
            <text:p><text:s text:c="2"/>78</text:p>
          </table:table-cell>
          <table:table-cell office:value-type="float" office:value="302632" table:style-name="ce260">
            <text:p><text:s text:c="2"/>303</text:p>
          </table:table-cell>
          <table:table-cell office:value-type="float" office:value="2804673" table:style-name="ce261">
            <text:p><text:s text:c="2"/>2,805</text:p>
          </table:table-cell>
          <table:table-cell office:value-type="float" office:value="3500721" table:formula="of:=SUM([.C13:.F13])" table:style-name="ce283">
            <text:p><text:s text:c="2"/>3,501</text:p>
          </table:table-cell>
          <table:table-cell table:number-columns-repeated="16377"/>
        </table:table-row>
        <table:table-row table:style-name="ro18">
          <table:table-cell table:style-name="ce15"/>
          <table:table-cell office:value-type="string" table:style-name="ce31">
            <text:p>Physical</text:p>
          </table:table-cell>
          <table:table-cell office:value-type="float" office:value="2803145" table:style-name="ce263">
            <text:p><text:s text:c="2"/>2,803</text:p>
          </table:table-cell>
          <table:table-cell office:value-type="float" office:value="559749" table:style-name="ce264">
            <text:p><text:s text:c="2"/>560</text:p>
          </table:table-cell>
          <table:table-cell office:value-type="float" office:value="1683192" table:style-name="ce264">
            <text:p><text:s text:c="2"/>1,683</text:p>
          </table:table-cell>
          <table:table-cell office:value-type="float" office:value="1838002" table:style-name="ce265">
            <text:p><text:s text:c="2"/>1,838</text:p>
          </table:table-cell>
          <table:table-cell office:value-type="float" office:value="6884088" table:formula="of:=SUM([.C14:.F14])" table:style-name="ce283">
            <text:p><text:s text:c="2"/>6,884</text:p>
          </table:table-cell>
          <table:table-cell table:number-columns-repeated="16377"/>
        </table:table-row>
        <table:table-row table:style-name="ro18">
          <table:table-cell table:style-name="ce15"/>
          <table:table-cell office:value-type="string" table:style-name="ce31">
            <text:p>Physico-chemical</text:p>
          </table:table-cell>
          <table:table-cell office:value-type="float" office:value="225467.10650400002" table:style-name="ce284">
            <text:p><text:s text:c="2"/>225</text:p>
          </table:table-cell>
          <table:table-cell office:value-type="float" office:value="20346" table:style-name="ce261">
            <text:p><text:s text:c="2"/>20</text:p>
          </table:table-cell>
          <table:table-cell office:value-type="float" office:value="14560.150659999999" table:style-name="ce261">
            <text:p><text:s text:c="2"/>15</text:p>
          </table:table-cell>
          <table:table-cell office:value-type="float" office:value="123654.87606099987" table:style-name="ce261">
            <text:p><text:s text:c="2"/>124</text:p>
          </table:table-cell>
          <table:table-cell office:value-type="float" office:value="384028.13322499988" table:formula="of:=SUM([.C15:.F15])" table:style-name="ce283">
            <text:p><text:s text:c="2"/>384</text:p>
          </table:table-cell>
          <table:table-cell table:number-columns-repeated="16377"/>
        </table:table-row>
        <table:table-row table:style-name="ro18">
          <table:table-cell table:style-name="ce15"/>
          <table:table-cell office:value-type="string" table:style-name="ce111">
            <text:p>Chemical</text:p>
          </table:table-cell>
          <table:table-cell office:value-type="float" office:value="54505.977999999981" table:style-name="ce284">
            <text:p><text:s text:c="2"/>55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59174.779335999992" table:style-name="ce261">
            <text:p><text:s text:c="2"/>59</text:p>
          </table:table-cell>
          <table:table-cell office:value-type="float" office:value="183581" table:style-name="ce265">
            <text:p><text:s text:c="2"/>184</text:p>
          </table:table-cell>
          <table:table-cell office:value-type="float" office:value="297261.75733599998" table:formula="of:=SUM([.C16:.F16])" table:style-name="ce283">
            <text:p><text:s text:c="2"/>297</text:p>
          </table:table-cell>
          <table:table-cell table:number-columns-repeated="16377"/>
        </table:table-row>
        <table:table-row table:style-name="ro18">
          <table:table-cell/>
          <table:table-cell office:value-type="string" table:style-name="ce111">
            <text:p>Composting</text:p>
          </table:table-cell>
          <table:table-cell office:value-type="float" office:value="109017.39" table:style-name="ce284">
            <text:p><text:s text:c="2"/>109</text:p>
          </table:table-cell>
          <table:table-cell office:value-type="float" office:value="74134.812000000005" table:style-name="ce261">
            <text:p><text:s text:c="2"/>74</text:p>
          </table:table-cell>
          <table:table-cell office:value-type="float" office:value="89936.09" table:style-name="ce261">
            <text:p><text:s text:c="2"/>90</text:p>
          </table:table-cell>
          <table:table-cell office:value-type="float" office:value="125297.89" table:style-name="ce261">
            <text:p><text:s text:c="2"/>125</text:p>
          </table:table-cell>
          <table:table-cell office:value-type="float" office:value="398386.18200000003" table:formula="of:=SUM([.C17:.F17])" table:style-name="ce283">
            <text:p><text:s text:c="2"/>398</text:p>
          </table:table-cell>
          <table:table-cell table:number-columns-repeated="16377" table:style-name="ce15"/>
        </table:table-row>
        <table:table-row table:style-name="ro18">
          <table:table-cell/>
          <table:table-cell office:value-type="string" table:style-name="ce115">
            <text:p>Biological</text:p>
          </table:table-cell>
          <table:table-cell office:value-type="float" office:value="733116" table:style-name="ce285">
            <text:p><text:s text:c="2"/>733</text:p>
          </table:table-cell>
          <table:table-cell office:value-type="float" office:value="228764" table:style-name="ce286">
            <text:p><text:s text:c="2"/>229</text:p>
          </table:table-cell>
          <table:table-cell office:value-type="float" office:value="290854" table:style-name="ce261">
            <text:p><text:s text:c="2"/>291</text:p>
          </table:table-cell>
          <table:table-cell office:value-type="float" office:value="331896" table:style-name="ce287">
            <text:p><text:s text:c="2"/>332</text:p>
          </table:table-cell>
          <table:table-cell office:value-type="float" office:value="1584630" table:formula="of:=SUM([.C18:.F18])" table:style-name="ce283">
            <text:p><text:s text:c="2"/>1,585</text:p>
          </table:table-cell>
          <table:table-cell table:number-columns-repeated="16377" table:style-name="ce15"/>
        </table:table-row>
        <table:table-row table:style-name="ro18">
          <table:table-cell/>
          <table:table-cell office:value-type="string" table:style-name="ce41">
            <text:p>Treatment Total</text:p>
          </table:table-cell>
          <table:table-cell office:value-type="float" office:value="4240502.4745039996" table:formula="of:=SUM([.C13:.C18])" table:style-name="ce288">
            <text:p><text:s text:c="2"/>4,241</text:p>
          </table:table-cell>
          <table:table-cell office:value-type="float" office:value="961158.81200000003" table:formula="of:=SUM([.D13:.D18])" table:style-name="ce288">
            <text:p><text:s text:c="2"/>961</text:p>
          </table:table-cell>
          <table:table-cell office:value-type="float" office:value="2440349.019996" table:formula="of:=SUM([.E13:.E18])" table:style-name="ce288">
            <text:p><text:s text:c="2"/>2,440</text:p>
          </table:table-cell>
          <table:table-cell office:value-type="float" office:value="5407104.7660609996" table:formula="of:=SUM([.F13:.F18])" table:style-name="ce288">
            <text:p><text:s text:c="2"/>5,407</text:p>
          </table:table-cell>
          <table:table-cell office:value-type="float" office:value="13049115.072561" table:formula="of:=SUM([.G13:.G18])" table:style-name="ce289">
            <text:p><text:s text:c="2"/>13,049</text:p>
          </table:table-cell>
          <table:table-cell table:number-columns-repeated="16377" table:style-name="ce15"/>
        </table:table-row>
        <table:table-row table:style-name="ro19">
          <table:table-cell/>
          <table:table-cell office:value-type="string" table:style-name="ce117">
            <text:p>Vehicle depollution</text:p>
          </table:table-cell>
          <table:table-cell office:value-type="float" office:value="28572" table:style-name="ce282">
            <text:p><text:s text:c="2"/>29</text:p>
          </table:table-cell>
          <table:table-cell office:value-type="float" office:value="16492" table:style-name="ce264">
            <text:p><text:s text:c="2"/>16</text:p>
          </table:table-cell>
          <table:table-cell office:value-type="float" office:value="47277" table:style-name="ce264">
            <text:p><text:s text:c="2"/>47</text:p>
          </table:table-cell>
          <table:table-cell office:value-type="float" office:value="29953" table:style-name="ce264">
            <text:p><text:s text:c="2"/>30</text:p>
          </table:table-cell>
          <table:table-cell office:value-type="float" office:value="122294" table:formula="of:=SUM([.C20:.F20])" table:style-name="ce266">
            <text:p><text:s text:c="2"/>122</text:p>
          </table:table-cell>
          <table:table-cell table:number-columns-repeated="16377" table:style-name="ce15"/>
        </table:table-row>
        <table:table-row table:style-name="ro20">
          <table:table-cell/>
          <table:table-cell office:value-type="string" table:style-name="ce36">
            <text:p>Metal recycling site</text:p>
          </table:table-cell>
          <table:table-cell office:value-type="float" office:value="635824.10968500061" table:style-name="ce268">
            <text:p><text:s text:c="2"/>636</text:p>
          </table:table-cell>
          <table:table-cell office:value-type="float" office:value="36835.232900000017" table:style-name="ce261">
            <text:p><text:s text:c="2"/>37</text:p>
          </table:table-cell>
          <table:table-cell office:value-type="float" office:value="590316.20451799931" table:style-name="ce261">
            <text:p><text:s text:c="2"/>590</text:p>
          </table:table-cell>
          <table:table-cell office:value-type="float" office:value="291319.94009999989" table:style-name="ce261">
            <text:p><text:s text:c="2"/>291</text:p>
          </table:table-cell>
          <table:table-cell office:value-type="float" office:value="1554295.4872029996" table:formula="of:=SUM([.C21:.F21])" table:style-name="ce266">
            <text:p><text:s text:c="2"/>1,554</text:p>
          </table:table-cell>
          <table:table-cell table:number-columns-repeated="16377" table:style-name="ce15"/>
        </table:table-row>
        <table:table-row table:style-name="ro20">
          <table:table-cell/>
          <table:table-cell office:value-type="string" table:style-name="ce41">
            <text:p>Metal Recycling Sector Total</text:p>
          </table:table-cell>
          <table:table-cell office:value-type="float" office:value="664396.10968500061" table:formula="of:=SUM([.C20:.C21])" table:style-name="ce290">
            <text:p><text:s text:c="2"/>664</text:p>
          </table:table-cell>
          <table:table-cell office:value-type="float" office:value="53327.232900000017" table:formula="of:=SUM([.D20:.D21])" table:style-name="ce271">
            <text:p><text:s text:c="2"/>53</text:p>
          </table:table-cell>
          <table:table-cell office:value-type="float" office:value="637593.20451799931" table:formula="of:=SUM([.E20:.E21])" table:style-name="ce271">
            <text:p><text:s text:c="2"/>638</text:p>
          </table:table-cell>
          <table:table-cell office:value-type="float" office:value="321272.94009999989" table:formula="of:=SUM([.F20:.F21])" table:style-name="ce271">
            <text:p><text:s text:c="2"/>321</text:p>
          </table:table-cell>
          <table:table-cell office:value-type="float" office:value="1676589.4872029996" table:formula="of:=SUM([.G20:.G21])" table:style-name="ce278">
            <text:p><text:s text:c="2"/>1,677</text:p>
          </table:table-cell>
          <table:table-cell table:number-columns-repeated="16377" table:style-name="ce15"/>
        </table:table-row>
        <table:table-row table:style-name="ro5">
          <table:table-cell/>
          <table:table-cell table:style-name="ce15"/>
          <table:table-cell table:number-columns-repeated="11" table:style-name="ce119"/>
          <table:table-cell table:number-columns-repeated="16371"/>
        </table:table-row>
        <table:table-row table:number-rows-repeated="1048553" table:style-name="ro5">
          <table:table-cell table:number-columns-repeated="16384"/>
        </table:table-row>
      </table:table>
      <table:table table:name="Transfer_Treatment_&amp;_MRS_Trends" table:style-name="ta1">
        <table:table-column table:style-name="co18" table:default-cell-style-name="ce15"/>
        <table:table-column table:style-name="co33" table:default-cell-style-name="ce15"/>
        <table:table-column table:style-name="co10" table:default-cell-style-name="ce15"/>
        <table:table-column table:style-name="co36" table:default-cell-style-name="ce15"/>
        <table:table-column table:style-name="co19" table:default-cell-style-name="ce15"/>
        <table:table-column table:style-name="co8" table:default-cell-style-name="ce15"/>
        <table:table-column table:style-name="co31" table:default-cell-style-name="ce15"/>
        <table:table-column table:style-name="co39" table:default-cell-style-name="ce15"/>
        <table:table-column table:style-name="co11" table:default-cell-style-name="ce15"/>
        <table:table-column table:style-name="co31" table:default-cell-style-name="ce15"/>
        <table:table-column table:style-name="co23" table:default-cell-style-name="ce15"/>
        <table:table-column table:style-name="co14" table:number-columns-repeated="16373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20">
            <text:p>Yorkshire and the Humber: Waste deposit trends: Transfer and treatment deposits by site type, waste type and sub-region from 2000/1 to 2024</text:p>
          </table:table-cell>
          <table:table-cell table:number-columns-repeated="2" table:style-name="ce24"/>
          <table:table-cell table:number-columns-repeated="7" table:style-name="ce109"/>
          <table:table-cell table:number-columns-repeated="16373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2" table:style-name="ce24"/>
          <table:table-cell table:number-columns-repeated="7" table:style-name="ce109"/>
          <table:table-cell table:number-columns-repeated="16373"/>
        </table:table-row>
        <table:table-row table:style-name="ro7">
          <table:table-cell table:style-name="ce15"/>
          <table:table-cell table:style-name="ce121"/>
          <table:table-cell table:number-columns-repeated="2" table:style-name="ce24"/>
          <table:table-cell table:number-columns-repeated="7" table:style-name="ce109"/>
          <table:table-cell table:number-columns-repeated="16373"/>
        </table:table-row>
        <table:table-row table:style-name="ro5">
          <table:table-cell table:style-name="ce15"/>
          <table:table-cell office:value-type="string" table:style-name="ce48">
            <text:p><text:s/></text:p>
          </table:table-cell>
          <table:table-cell office:value-type="string" table:style-name="ce122">
            <text:p><text:s/></text:p>
          </table:table-cell>
          <table:table-cell table:style-name="ce123"/>
          <table:table-cell office:value-type="string" table:number-columns-spanned="4" table:number-rows-spanned="1" table:style-name="ce358">
            <text:p>Sub Region</text:p>
          </table:table-cell>
          <table:covered-table-cell table:number-columns-repeated="3"/>
          <table:table-cell office:value-type="string" table:style-name="ce50">
            <text:p><text:s/></text:p>
          </table:table-cell>
          <table:table-cell table:number-columns-repeated="16375" table:style-name="ce15"/>
        </table:table-row>
        <table:table-row table:style-name="ro3">
          <table:table-cell table:style-name="ce15"/>
          <table:table-cell office:value-type="string" table:style-name="ce51">
            <text:p>Year</text:p>
          </table:table-cell>
          <table:table-cell office:value-type="string" table:style-name="ce124">
            <text:p>Site Type</text:p>
          </table:table-cell>
          <table:table-cell table:style-name="ce125"/>
          <table:table-cell office:value-type="string" table:style-name="ce23">
            <text:p>Former Humberside</text:p>
          </table:table-cell>
          <table:table-cell office:value-type="string" table:style-name="ce2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54">
            <text:p>West Yorkshire</text:p>
          </table:table-cell>
          <table:table-cell office:value-type="string" table:style-name="ce55">
            <text:p>YORKSHIRE AND THE HUMBER</text:p>
          </table:table-cell>
          <table:table-cell table:number-columns-repeated="16375" table:style-name="ce15"/>
        </table:table-row>
        <table:table-row table:style-name="ro5">
          <table:table-cell table:style-name="ce15"/>
          <table:table-cell office:value-type="string" table:number-columns-spanned="1" table:number-rows-spanned="11" table:style-name="ce356">
            <text:p>2000/1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08">
            <text:p>Transfer</text:p>
          </table:table-cell>
          <table:table-cell office:value-type="float" office:value="1166" table:style-name="ce32">
            <text:p><text:s/>1,166<text:s/></text:p>
          </table:table-cell>
          <table:table-cell office:value-type="float" office:value="74" table:style-name="ce33">
            <text:p><text:s/>74<text:s/></text:p>
          </table:table-cell>
          <table:table-cell office:value-type="float" office:value="1300" table:style-name="ce33">
            <text:p><text:s/>1,300<text:s/></text:p>
          </table:table-cell>
          <table:table-cell office:value-type="float" office:value="1542" table:style-name="ce34">
            <text:p><text:s/>1,542<text:s/></text:p>
          </table:table-cell>
          <table:table-cell office:value-type="float" office:value="4082" table:formula="of:=SUM([.E7:.H7])" table:style-name="ce61">
            <text:p><text:s/>4,082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08">
            <text:p>Civic amenity</text:p>
          </table:table-cell>
          <table:table-cell office:value-type="float" office:value="117" table:style-name="ce32">
            <text:p><text:s/>117<text:s/></text:p>
          </table:table-cell>
          <table:table-cell office:value-type="float" office:value="89" table:style-name="ce33">
            <text:p><text:s/>89<text:s/></text:p>
          </table:table-cell>
          <table:table-cell office:value-type="float" office:value="171" table:style-name="ce33">
            <text:p><text:s/>171<text:s/></text:p>
          </table:table-cell>
          <table:table-cell office:value-type="float" office:value="227" table:style-name="ce34">
            <text:p><text:s/>227<text:s/></text:p>
          </table:table-cell>
          <table:table-cell office:value-type="float" office:value="604" table:formula="of:=SUM([.E8:.H8])" table:style-name="ce61">
            <text:p><text:s/>604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covered-table-cell/>
          <table:table-cell office:value-type="string" table:style-name="ce68">
            <text:p>Transfer Total</text:p>
          </table:table-cell>
          <table:table-cell table:style-name="ce126"/>
          <table:table-cell office:value-type="float" office:value="1283" table:formula="of:=SUBTOTAL(9;[.E7:.E8])" table:style-name="ce127">
            <text:p><text:s/>1,283<text:s/></text:p>
          </table:table-cell>
          <table:table-cell office:value-type="float" office:value="163" table:formula="of:=SUBTOTAL(9;[.F7:.F8])" table:style-name="ce65">
            <text:p><text:s/>163<text:s/></text:p>
          </table:table-cell>
          <table:table-cell office:value-type="float" office:value="1471" table:formula="of:=SUBTOTAL(9;[.G7:.G8])" table:style-name="ce65">
            <text:p><text:s/>1,471<text:s/></text:p>
          </table:table-cell>
          <table:table-cell office:value-type="float" office:value="1769" table:formula="of:=SUBTOTAL(9;[.H7:.H8])" table:style-name="ce128">
            <text:p><text:s/>1,769<text:s/></text:p>
          </table:table-cell>
          <table:table-cell office:value-type="float" office:value="4686" table:formula="of:=SUBTOTAL(9;[.I7:.I8])" table:style-name="ce66">
            <text:p><text:s/>4,686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covered-table-cell/>
          <table:table-cell office:value-type="string" table:number-columns-spanned="1" table:number-rows-spanned="5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3.2" table:style-name="ce32">
            <text:p><text:s/>3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7" table:style-name="ce33">
            <text:p><text:s/>17<text:s/></text:p>
          </table:table-cell>
          <table:table-cell office:value-type="float" office:value="0.3" table:style-name="ce34">
            <text:p><text:s/>0<text:s/></text:p>
          </table:table-cell>
          <table:table-cell office:value-type="float" office:value="20.5" table:formula="of:=SUM([.E10:.H10])" table:style-name="ce61">
            <text:p><text:s/>21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183" table:style-name="ce32">
            <text:p><text:s/>183<text:s/></text:p>
          </table:table-cell>
          <table:table-cell office:value-type="float" office:value="27" table:style-name="ce33">
            <text:p><text:s/>27<text:s/></text:p>
          </table:table-cell>
          <table:table-cell office:value-type="float" office:value="94" table:style-name="ce33">
            <text:p><text:s/>94<text:s/></text:p>
          </table:table-cell>
          <table:table-cell office:value-type="float" office:value="383" table:style-name="ce34">
            <text:p><text:s/>383<text:s/></text:p>
          </table:table-cell>
          <table:table-cell office:value-type="float" office:value="687" table:formula="of:=SUM([.E11:.H11])" table:style-name="ce61">
            <text:p><text:s/>687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5" table:style-name="ce33">
            <text:p><text:s/>65<text:s/></text:p>
          </table:table-cell>
          <table:table-cell office:value-type="float" office:value="34" table:style-name="ce34">
            <text:p><text:s/>34<text:s/></text:p>
          </table:table-cell>
          <table:table-cell office:value-type="float" office:value="99" table:formula="of:=SUM([.E12:.H12])" table:style-name="ce61">
            <text:p><text:s/>99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" table:style-name="ce34">
            <text:p><text:s/>10<text:s/></text:p>
          </table:table-cell>
          <table:table-cell office:value-type="float" office:value="10" table:formula="of:=SUM([.E13:.H13])" table:style-name="ce61">
            <text:p><text:s/>10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11" table:style-name="ce32">
            <text:p><text:s/>1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1" table:formula="of:=SUM([.E14:.H14])" table:style-name="ce61">
            <text:p><text:s/>11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covered-table-cell/>
          <table:table-cell office:value-type="string" table:style-name="ce68">
            <text:p>Treatment Total</text:p>
          </table:table-cell>
          <table:table-cell table:style-name="ce126"/>
          <table:table-cell office:value-type="float" office:value="197.2" table:formula="of:=SUBTOTAL(9;[.E10:.E14])" table:style-name="ce127">
            <text:p><text:s/>197<text:s/></text:p>
          </table:table-cell>
          <table:table-cell office:value-type="float" office:value="27" table:formula="of:=SUBTOTAL(9;[.F10:.F14])" table:style-name="ce65">
            <text:p><text:s/>27<text:s/></text:p>
          </table:table-cell>
          <table:table-cell office:value-type="float" office:value="176" table:formula="of:=SUBTOTAL(9;[.G10:.G14])" table:style-name="ce65">
            <text:p><text:s/>176<text:s/></text:p>
          </table:table-cell>
          <table:table-cell office:value-type="float" office:value="427.3" table:formula="of:=SUBTOTAL(9;[.H10:.H14])" table:style-name="ce128">
            <text:p><text:s/>427<text:s/></text:p>
          </table:table-cell>
          <table:table-cell office:value-type="float" office:value="827.5" table:formula="of:=SUBTOTAL(9;[.I10:.I14])" table:style-name="ce66">
            <text:p><text:s/>828<text:s/></text:p>
          </table:table-cell>
          <table:table-cell table:number-columns-repeated="16375" table:style-name="ce15"/>
        </table:table-row>
        <table:table-row table:style-name="ro5">
          <table:table-cell table:style-name="ce15"/>
          <table:covered-table-cell/>
          <table:table-cell office:value-type="string" table:style-name="ce129">
            <text:p>MRS</text:p>
          </table:table-cell>
          <table:table-cell office:value-type="string" table:style-name="ce108">
            <text:p>Metal recycling</text:p>
          </table:table-cell>
          <table:table-cell office:value-type="float" office:value="105.158" table:style-name="ce32">
            <text:p><text:s/>105<text:s/></text:p>
          </table:table-cell>
          <table:table-cell office:value-type="float" office:value="23" table:style-name="ce33">
            <text:p><text:s/>23<text:s/></text:p>
          </table:table-cell>
          <table:table-cell office:value-type="float" office:value="612.6" table:style-name="ce33">
            <text:p><text:s/>613<text:s/></text:p>
          </table:table-cell>
          <table:table-cell office:value-type="float" office:value="503.7" table:style-name="ce34">
            <text:p><text:s/>504<text:s/></text:p>
          </table:table-cell>
          <table:table-cell office:value-type="float" office:value="1244.4580000000001" table:formula="of:=SUM([.E16:.H16])" table:style-name="ce61">
            <text:p><text:s/>1,244<text:s/></text:p>
          </table:table-cell>
          <table:table-cell table:number-columns-repeated="16375" table:style-name="ce15"/>
        </table:table-row>
        <table:table-row table:style-name="ro5">
          <table:table-cell/>
          <table:covered-table-cell/>
          <table:table-cell office:value-type="string" table:style-name="ce68">
            <text:p>MRS Total</text:p>
          </table:table-cell>
          <table:table-cell table:style-name="ce126"/>
          <table:table-cell office:value-type="float" office:value="105.158" table:formula="of:=SUBTOTAL(9;[.E16:.E16])" table:style-name="ce127">
            <text:p><text:s/>105<text:s/></text:p>
          </table:table-cell>
          <table:table-cell office:value-type="float" office:value="23" table:formula="of:=SUBTOTAL(9;[.F16:.F16])" table:style-name="ce65">
            <text:p><text:s/>23<text:s/></text:p>
          </table:table-cell>
          <table:table-cell office:value-type="float" office:value="612.6" table:formula="of:=SUBTOTAL(9;[.G16:.G16])" table:style-name="ce65">
            <text:p><text:s/>613<text:s/></text:p>
          </table:table-cell>
          <table:table-cell office:value-type="float" office:value="503.7" table:formula="of:=SUBTOTAL(9;[.H16:.H16])" table:style-name="ce128">
            <text:p><text:s/>504<text:s/></text:p>
          </table:table-cell>
          <table:table-cell office:value-type="float" office:value="1244.4580000000001" table:formula="of:=SUBTOTAL(9;[.I16:.I16])" table:style-name="ce66">
            <text:p><text:s/>1,244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06">
            <text:p>2000/1 Total</text:p>
          </table:table-cell>
          <table:table-cell table:number-columns-repeated="2" table:style-name="ce72"/>
          <table:table-cell office:value-type="float" office:value="1585.3579999999999" table:formula="of:=SUBTOTAL(9;[.E7:.E16])" table:style-name="ce118">
            <text:p><text:s/>1,585<text:s/></text:p>
          </table:table-cell>
          <table:table-cell office:value-type="float" office:value="213" table:formula="of:=SUBTOTAL(9;[.F7:.F16])" table:style-name="ce43">
            <text:p><text:s/>213<text:s/></text:p>
          </table:table-cell>
          <table:table-cell office:value-type="float" office:value="2259.6" table:formula="of:=SUBTOTAL(9;[.G7:.G16])" table:style-name="ce43">
            <text:p><text:s/>2,260<text:s/></text:p>
          </table:table-cell>
          <table:table-cell office:value-type="float" office:value="2700" table:formula="of:=SUBTOTAL(9;[.H7:.H16])" table:style-name="ce107">
            <text:p><text:s/>2,700<text:s/></text:p>
          </table:table-cell>
          <table:table-cell office:value-type="float" office:value="6757.9580000000005" table:formula="of:=SUBTOTAL(9;[.I7:.I16])" table:style-name="ce74">
            <text:p><text:s/>6,758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number-columns-spanned="1" table:number-rows-spanned="11" table:style-name="ce356">
            <text:p>2002/3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08">
            <text:p>Transfer</text:p>
          </table:table-cell>
          <table:table-cell office:value-type="float" office:value="1024.9022258123252" table:style-name="ce32">
            <text:p><text:s/>1,025<text:s/></text:p>
          </table:table-cell>
          <table:table-cell office:value-type="float" office:value="108.07882941393554" table:style-name="ce33">
            <text:p><text:s/>108<text:s/></text:p>
          </table:table-cell>
          <table:table-cell office:value-type="float" office:value="1250.8436456284562" table:style-name="ce33">
            <text:p><text:s/>1,251<text:s/></text:p>
          </table:table-cell>
          <table:table-cell office:value-type="float" office:value="1546.4407892085724" table:style-name="ce34">
            <text:p><text:s/>1,546<text:s/></text:p>
          </table:table-cell>
          <table:table-cell office:value-type="float" office:value="3930.2654900632892" table:formula="of:=SUM([.E19:.H19])" table:style-name="ce61">
            <text:p><text:s/>3,93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ivic amenity</text:p>
          </table:table-cell>
          <table:table-cell office:value-type="float" office:value="18.489999999999998" table:style-name="ce32">
            <text:p><text:s/>18<text:s/></text:p>
          </table:table-cell>
          <table:table-cell office:value-type="float" office:value="1.0999999999999999E-2" table:style-name="ce33">
            <text:p><text:s/>0<text:s/></text:p>
          </table:table-cell>
          <table:table-cell office:value-type="float" office:value="84.262" table:style-name="ce33">
            <text:p><text:s/>84<text:s/></text:p>
          </table:table-cell>
          <table:table-cell office:value-type="float" office:value="232.27" table:style-name="ce34">
            <text:p><text:s/>232<text:s/></text:p>
          </table:table-cell>
          <table:table-cell office:value-type="float" office:value="335.03300000000002" table:formula="of:=SUM([.E20:.H20])" table:style-name="ce61">
            <text:p><text:s/>33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6"/>
          <table:table-cell office:value-type="float" office:value="1043.3922258123253" table:formula="of:=SUBTOTAL(9;[.E19:.E20])" table:style-name="ce127">
            <text:p><text:s/>1,043<text:s/></text:p>
          </table:table-cell>
          <table:table-cell office:value-type="float" office:value="108.08982941393553" table:formula="of:=SUBTOTAL(9;[.F19:.F20])" table:style-name="ce65">
            <text:p><text:s/>108<text:s/></text:p>
          </table:table-cell>
          <table:table-cell office:value-type="float" office:value="1335.1056456284562" table:formula="of:=SUBTOTAL(9;[.G19:.G20])" table:style-name="ce65">
            <text:p><text:s/>1,335<text:s/></text:p>
          </table:table-cell>
          <table:table-cell office:value-type="float" office:value="1778.7107892085724" table:formula="of:=SUBTOTAL(9;[.H19:.H20])" table:style-name="ce128">
            <text:p><text:s/>1,779<text:s/></text:p>
          </table:table-cell>
          <table:table-cell office:value-type="float" office:value="4265.2984900632891" table:formula="of:=SUBTOTAL(9;[.I19:.I20])" table:style-name="ce66">
            <text:p><text:s/>4,26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5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28.378" table:style-name="ce32">
            <text:p><text:s/>28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81.071" table:style-name="ce33">
            <text:p><text:s/>181<text:s/></text:p>
          </table:table-cell>
          <table:table-cell office:value-type="float" office:value="515.91099999999994" table:style-name="ce34">
            <text:p><text:s/>516<text:s/></text:p>
          </table:table-cell>
          <table:table-cell office:value-type="float" office:value="725.3599999999999" table:formula="of:=SUM([.E22:.H22])" table:style-name="ce61">
            <text:p><text:s/>72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271.495" table:style-name="ce32">
            <text:p><text:s/>271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5.324000000000012" table:style-name="ce33">
            <text:p><text:s/>85<text:s/></text:p>
          </table:table-cell>
          <table:table-cell office:value-type="float" office:value="188.625" table:style-name="ce34">
            <text:p><text:s/>189<text:s/></text:p>
          </table:table-cell>
          <table:table-cell office:value-type="float" office:value="545.44399999999996" table:formula="of:=SUM([.E23:.H23])" table:style-name="ce61">
            <text:p><text:s/>54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29.79499999999999" table:style-name="ce33">
            <text:p><text:s/>130<text:s/></text:p>
          </table:table-cell>
          <table:table-cell office:value-type="float" office:value="26.617000000000001" table:style-name="ce34">
            <text:p><text:s/>27<text:s/></text:p>
          </table:table-cell>
          <table:table-cell office:value-type="float" office:value="156.41199999999998" table:formula="of:=SUM([.E24:.H24])" table:style-name="ce61">
            <text:p><text:s/>1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.5939999999999994" table:style-name="ce34">
            <text:p><text:s/>10<text:s/></text:p>
          </table:table-cell>
          <table:table-cell office:value-type="float" office:value="9.5939999999999994" table:formula="of:=SUM([.E25:.H25])" table:style-name="ce61">
            <text:p><text:s/>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2.0110000000000001" table:style-name="ce32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.0110000000000001" table:formula="of:=SUM([.E26:.H26])" table:style-name="ce61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6"/>
          <table:table-cell office:value-type="float" office:value="301.88400000000001" table:formula="of:=SUBTOTAL(9;[.E22:.E26])" table:style-name="ce127">
            <text:p><text:s/>302<text:s/></text:p>
          </table:table-cell>
          <table:table-cell office:value-type="float" office:value="0" table:formula="of:=SUBTOTAL(9;[.F22:.F26])" table:style-name="ce65">
            <text:p><text:s/>-<text:s/></text:p>
          </table:table-cell>
          <table:table-cell office:value-type="float" office:value="396.18999999999994" table:formula="of:=SUBTOTAL(9;[.G22:.G26])" table:style-name="ce65">
            <text:p><text:s/>396<text:s/></text:p>
          </table:table-cell>
          <table:table-cell office:value-type="float" office:value="740.74699999999996" table:formula="of:=SUBTOTAL(9;[.H22:.H26])" table:style-name="ce128">
            <text:p><text:s/>741<text:s/></text:p>
          </table:table-cell>
          <table:table-cell office:value-type="float" office:value="1438.8209999999999" table:formula="of:=SUBTOTAL(9;[.I22:.I26])" table:style-name="ce66">
            <text:p><text:s/>1,43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349">
            <text:p>MRS</text:p>
          </table:table-cell>
          <table:covered-table-cell/>
          <table:table-cell office:value-type="float" office:value="120.49752475980669" table:style-name="ce32">
            <text:p><text:s/>120<text:s/></text:p>
          </table:table-cell>
          <table:table-cell office:value-type="float" office:value="14.085102914104239" table:style-name="ce33">
            <text:p><text:s/>14<text:s/></text:p>
          </table:table-cell>
          <table:table-cell office:value-type="float" office:value="450.53499739820796" table:style-name="ce33">
            <text:p><text:s/>451<text:s/></text:p>
          </table:table-cell>
          <table:table-cell office:value-type="float" office:value="674.27293707013132" table:style-name="ce34">
            <text:p><text:s/>674<text:s/></text:p>
          </table:table-cell>
          <table:table-cell office:value-type="float" office:value="1259.3905621422502" table:formula="of:=SUM([.E28:.H28])" table:style-name="ce61">
            <text:p><text:s/>1,25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0"/>
          <table:table-cell office:value-type="float" office:value="120.49752475980669" table:formula="of:=SUBTOTAL(9;[.E28:.E28])" table:style-name="ce28">
            <text:p><text:s/>120<text:s/></text:p>
          </table:table-cell>
          <table:table-cell office:value-type="float" office:value="14.085102914104239" table:formula="of:=SUBTOTAL(9;[.F28:.F28])" table:style-name="ce29">
            <text:p><text:s/>14<text:s/></text:p>
          </table:table-cell>
          <table:table-cell office:value-type="float" office:value="450.53499739820796" table:formula="of:=SUBTOTAL(9;[.G28:.G28])" table:style-name="ce29">
            <text:p><text:s/>451<text:s/></text:p>
          </table:table-cell>
          <table:table-cell office:value-type="float" office:value="674.27293707013132" table:formula="of:=SUBTOTAL(9;[.H28:.H28])" table:style-name="ce30">
            <text:p><text:s/>674<text:s/></text:p>
          </table:table-cell>
          <table:table-cell office:value-type="float" office:value="1259.3905621422502" table:formula="of:=SUBTOTAL(9;[.I28:.I28])" table:style-name="ce59">
            <text:p><text:s/>1,259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06">
            <text:p>2002/3 Total</text:p>
          </table:table-cell>
          <table:table-cell table:number-columns-repeated="2" table:style-name="ce72"/>
          <table:table-cell office:value-type="float" office:value="1465.773750572132" table:formula="of:=SUBTOTAL(9;[.E19:.E28])" table:style-name="ce118">
            <text:p><text:s/>1,466<text:s/></text:p>
          </table:table-cell>
          <table:table-cell office:value-type="float" office:value="122.17493232803977" table:formula="of:=SUBTOTAL(9;[.F19:.F28])" table:style-name="ce43">
            <text:p><text:s/>122<text:s/></text:p>
          </table:table-cell>
          <table:table-cell office:value-type="float" office:value="2181.8306430266643" table:formula="of:=SUBTOTAL(9;[.G19:.G28])" table:style-name="ce43">
            <text:p><text:s/>2,182<text:s/></text:p>
          </table:table-cell>
          <table:table-cell office:value-type="float" office:value="3193.730726278704" table:formula="of:=SUBTOTAL(9;[.H19:.H28])" table:style-name="ce107">
            <text:p><text:s/>3,194<text:s/></text:p>
          </table:table-cell>
          <table:table-cell office:value-type="float" office:value="6963.51005220554" table:formula="of:=SUBTOTAL(9;[.I19:.I28])" table:style-name="ce74">
            <text:p><text:s/>6,964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number-columns-spanned="1" table:number-rows-spanned="13" table:style-name="ce347">
            <text:p>2004/5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08">
            <text:p>Transfer</text:p>
          </table:table-cell>
          <table:table-cell office:value-type="float" office:value="917.30975070589602" table:style-name="ce32">
            <text:p><text:s/>917<text:s/></text:p>
          </table:table-cell>
          <table:table-cell office:value-type="float" office:value="146.57230898372643" table:style-name="ce33">
            <text:p><text:s/>147<text:s/></text:p>
          </table:table-cell>
          <table:table-cell office:value-type="float" office:value="1470.2264796181537" table:style-name="ce33">
            <text:p><text:s/>1,470<text:s/></text:p>
          </table:table-cell>
          <table:table-cell office:value-type="float" office:value="1665.5646198321513" table:style-name="ce34">
            <text:p><text:s/>1,666<text:s/></text:p>
          </table:table-cell>
          <table:table-cell office:value-type="float" office:value="4199.6731591399275" table:formula="of:=SUM([.E31:.H31])" table:style-name="ce61">
            <text:p><text:s/>4,20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ivic amenity</text:p>
          </table:table-cell>
          <table:table-cell office:value-type="float" office:value="20.426779998350888" table:style-name="ce32">
            <text:p><text:s/>20<text:s/></text:p>
          </table:table-cell>
          <table:table-cell office:value-type="float" office:value="64.508744869779804" table:style-name="ce33">
            <text:p><text:s/>65<text:s/></text:p>
          </table:table-cell>
          <table:table-cell office:value-type="float" office:value="84.721854033872489" table:style-name="ce33">
            <text:p><text:s/>85<text:s/></text:p>
          </table:table-cell>
          <table:table-cell office:value-type="float" office:value="244.8481300354004" table:style-name="ce34">
            <text:p><text:s/>245<text:s/></text:p>
          </table:table-cell>
          <table:table-cell office:value-type="float" office:value="414.50550893740359" table:formula="of:=SUM([.E32:.H32])" table:style-name="ce61">
            <text:p><text:s/>4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6"/>
          <table:table-cell office:value-type="float" office:value="937.73653070424689" table:formula="of:=SUBTOTAL(9;[.E31:.E32])" table:style-name="ce127">
            <text:p><text:s/>938<text:s/></text:p>
          </table:table-cell>
          <table:table-cell office:value-type="float" office:value="211.08105385350623" table:formula="of:=SUBTOTAL(9;[.F31:.F32])" table:style-name="ce65">
            <text:p><text:s/>211<text:s/></text:p>
          </table:table-cell>
          <table:table-cell office:value-type="float" office:value="1554.9483336520261" table:formula="of:=SUBTOTAL(9;[.G31:.G32])" table:style-name="ce65">
            <text:p><text:s/>1,555<text:s/></text:p>
          </table:table-cell>
          <table:table-cell office:value-type="float" office:value="1910.4127498675516" table:formula="of:=SUBTOTAL(9;[.H31:.H32])" table:style-name="ce128">
            <text:p><text:s/>1,910<text:s/></text:p>
          </table:table-cell>
          <table:table-cell office:value-type="float" office:value="4614.1786680773312" table:formula="of:=SUBTOTAL(9;[.I31:.I32])" table:style-name="ce66">
            <text:p><text:s/>4,6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56.344379565641283" table:style-name="ce32">
            <text:p><text:s/>56<text:s/></text:p>
          </table:table-cell>
          <table:table-cell office:value-type="float" office:value="88.432649303019048" table:style-name="ce33">
            <text:p><text:s/>88<text:s/></text:p>
          </table:table-cell>
          <table:table-cell office:value-type="float" office:value="366.43436090314759" table:style-name="ce33">
            <text:p><text:s/>366<text:s/></text:p>
          </table:table-cell>
          <table:table-cell office:value-type="float" office:value="708.81983368086821" table:style-name="ce34">
            <text:p><text:s/>709<text:s/></text:p>
          </table:table-cell>
          <table:table-cell office:value-type="float" office:value="1220.0312234526762" table:formula="of:=SUM([.E34:.H34])" table:style-name="ce61">
            <text:p><text:s/>1,22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488.9424869738948" table:style-name="ce32">
            <text:p><text:s/>48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40.507580399513245" table:style-name="ce33">
            <text:p><text:s/>41<text:s/></text:p>
          </table:table-cell>
          <table:table-cell office:value-type="float" office:value="277.68863147048745" table:style-name="ce34">
            <text:p><text:s/>278<text:s/></text:p>
          </table:table-cell>
          <table:table-cell office:value-type="float" office:value="807.13869884389555" table:formula="of:=SUM([.E35:.H35])" table:style-name="ce61">
            <text:p><text:s/>8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0.44063301658630372" table:style-name="ce32">
            <text:p><text:s/>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.9829729965925216" table:style-name="ce33">
            <text:p><text:s/>2<text:s/></text:p>
          </table:table-cell>
          <table:table-cell office:value-type="float" office:value="100.91026109269262" table:style-name="ce34">
            <text:p><text:s/>101<text:s/></text:p>
          </table:table-cell>
          <table:table-cell office:value-type="float" office:value="103.33386710587145" table:formula="of:=SUM([.E36:.H36])" table:style-name="ce61">
            <text:p><text:s/>10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2.95839582976792" table:style-name="ce33">
            <text:p><text:s/>113<text:s/></text:p>
          </table:table-cell>
          <table:table-cell office:value-type="float" office:value="27.577239889383314" table:style-name="ce34">
            <text:p><text:s/>28<text:s/></text:p>
          </table:table-cell>
          <table:table-cell office:value-type="float" office:value="140.53563571915123" table:formula="of:=SUM([.E37:.H37])" table:style-name="ce61">
            <text:p><text:s/>1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6.0204799194335941" table:style-name="ce32">
            <text:p><text:s/>6<text:s/></text:p>
          </table:table-cell>
          <table:table-cell office:value-type="float" office:value="8.9027770576477057" table:style-name="ce33">
            <text:p><text:s/>9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4.9232569770813" table:formula="of:=SUM([.E38:.H38])" table:style-name="ce61">
            <text:p><text:s/>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3.8647700042724611" table:style-name="ce33">
            <text:p><text:s/>4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3.8647700042724611" table:formula="of:=SUM([.E39:.H39])" table:style-name="ce61">
            <text:p><text:s/>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6"/>
          <table:table-cell office:value-type="float" office:value="551.74797947555589" table:formula="of:=SUBTOTAL(9;[.E34:.E39])" table:style-name="ce127">
            <text:p><text:s/>552<text:s/></text:p>
          </table:table-cell>
          <table:table-cell office:value-type="float" office:value="97.335426360666759" table:formula="of:=SUBTOTAL(9;[.F34:.F39])" table:style-name="ce65">
            <text:p><text:s/>97<text:s/></text:p>
          </table:table-cell>
          <table:table-cell office:value-type="float" office:value="525.7480801332938" table:formula="of:=SUBTOTAL(9;[.G34:.G39])" table:style-name="ce65">
            <text:p><text:s/>526<text:s/></text:p>
          </table:table-cell>
          <table:table-cell office:value-type="float" office:value="1114.9959661334315" table:formula="of:=SUBTOTAL(9;[.H34:.H39])" table:style-name="ce128">
            <text:p><text:s/>1,115<text:s/></text:p>
          </table:table-cell>
          <table:table-cell office:value-type="float" office:value="2289.827452102948" table:formula="of:=SUBTOTAL(9;[.I34:.I39])" table:style-name="ce66">
            <text:p><text:s/>2,2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ismantler</text:p>
          </table:table-cell>
          <table:table-cell office:value-type="float" office:value="7.6275040006637571" table:style-name="ce32">
            <text:p><text:s/>8<text:s/></text:p>
          </table:table-cell>
          <table:table-cell office:value-type="float" office:value="5.8943809995651248" table:style-name="ce33">
            <text:p><text:s/>6<text:s/></text:p>
          </table:table-cell>
          <table:table-cell office:value-type="float" office:value="50.932405071914197" table:style-name="ce33">
            <text:p><text:s/>51<text:s/></text:p>
          </table:table-cell>
          <table:table-cell office:value-type="float" office:value="24.08648202845454" table:style-name="ce34">
            <text:p><text:s/>24<text:s/></text:p>
          </table:table-cell>
          <table:table-cell office:value-type="float" office:value="88.540772100597621" table:formula="of:=SUM([.E41:.H41])" table:style-name="ce61">
            <text:p><text:s/>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127.94898668122292" table:style-name="ce32">
            <text:p><text:s/>128<text:s/></text:p>
          </table:table-cell>
          <table:table-cell office:value-type="float" office:value="37.93831240100419" table:style-name="ce33">
            <text:p><text:s/>38<text:s/></text:p>
          </table:table-cell>
          <table:table-cell office:value-type="float" office:value="620.66414356849475" table:style-name="ce33">
            <text:p><text:s/>621<text:s/></text:p>
          </table:table-cell>
          <table:table-cell office:value-type="float" office:value="699.36952904647592" table:style-name="ce34">
            <text:p><text:s/>699<text:s/></text:p>
          </table:table-cell>
          <table:table-cell office:value-type="float" office:value="1485.9209716971977" table:formula="of:=SUM([.E42:.H42])" table:style-name="ce61">
            <text:p><text:s/>1,48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0"/>
          <table:table-cell office:value-type="float" office:value="135.57649068188667" table:formula="of:=SUBTOTAL(9;[.E41:.E42])" table:style-name="ce28">
            <text:p><text:s/>136<text:s/></text:p>
          </table:table-cell>
          <table:table-cell office:value-type="float" office:value="43.832693400569312" table:formula="of:=SUBTOTAL(9;[.F41:.F42])" table:style-name="ce29">
            <text:p><text:s/>44<text:s/></text:p>
          </table:table-cell>
          <table:table-cell office:value-type="float" office:value="671.59654864040897" table:formula="of:=SUBTOTAL(9;[.G41:.G42])" table:style-name="ce29">
            <text:p><text:s/>672<text:s/></text:p>
          </table:table-cell>
          <table:table-cell office:value-type="float" office:value="723.45601107493042" table:formula="of:=SUBTOTAL(9;[.H41:.H42])" table:style-name="ce30">
            <text:p><text:s/>723<text:s/></text:p>
          </table:table-cell>
          <table:table-cell office:value-type="float" office:value="1574.4617437977954" table:formula="of:=SUBTOTAL(9;[.I41:.I42])" table:style-name="ce59">
            <text:p><text:s/>1,574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4/5 Total</text:p>
          </table:table-cell>
          <table:table-cell table:number-columns-repeated="2" table:style-name="ce72"/>
          <table:table-cell office:value-type="float" office:value="1625.0610008616898" table:formula="of:=SUBTOTAL(9;[.E31:.E42])" table:style-name="ce118">
            <text:p><text:s/>1,625<text:s/></text:p>
          </table:table-cell>
          <table:table-cell office:value-type="float" office:value="352.24917361474223" table:formula="of:=SUBTOTAL(9;[.F31:.F42])" table:style-name="ce43">
            <text:p><text:s/>352<text:s/></text:p>
          </table:table-cell>
          <table:table-cell office:value-type="float" office:value="2752.2929624257285" table:formula="of:=SUBTOTAL(9;[.G31:.G42])" table:style-name="ce43">
            <text:p><text:s/>2,752<text:s/></text:p>
          </table:table-cell>
          <table:table-cell office:value-type="float" office:value="3748.8647270759138" table:formula="of:=SUBTOTAL(9;[.H31:.H42])" table:style-name="ce107">
            <text:p><text:s/>3,749<text:s/></text:p>
          </table:table-cell>
          <table:table-cell office:value-type="float" office:value="8478.4678639780741" table:formula="of:=SUBTOTAL(9;[.I31:.I42])" table:style-name="ce74">
            <text:p><text:s/>8,47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5" table:number-columns-spanned="1" table:number-rows-spanned="13" table:style-name="ce347">
            <text:p>2005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08">
            <text:p>Transfer</text:p>
          </table:table-cell>
          <table:table-cell office:value-type="float" office:value="929.66826819570701" table:style-name="ce32">
            <text:p><text:s/>930<text:s/></text:p>
          </table:table-cell>
          <table:table-cell office:value-type="float" office:value="221.35372735647601" table:style-name="ce33">
            <text:p><text:s/>221<text:s/></text:p>
          </table:table-cell>
          <table:table-cell office:value-type="float" office:value="1435.6490858018501" table:style-name="ce33">
            <text:p><text:s/>1,436<text:s/></text:p>
          </table:table-cell>
          <table:table-cell office:value-type="float" office:value="1495.76346073032" table:style-name="ce34">
            <text:p><text:s/>1,496<text:s/></text:p>
          </table:table-cell>
          <table:table-cell office:value-type="float" office:value="4082.4345420843529" table:formula="of:=SUM([.E45:.H45])" table:style-name="ce61">
            <text:p><text:s/>4,0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ivic amenity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37.13474336646101" table:style-name="ce33">
            <text:p><text:s/>137<text:s/></text:p>
          </table:table-cell>
          <table:table-cell office:value-type="float" office:value="84.202463155534105" table:style-name="ce33">
            <text:p><text:s/>84<text:s/></text:p>
          </table:table-cell>
          <table:table-cell office:value-type="float" office:value="199.35072631835899" table:style-name="ce34">
            <text:p><text:s/>199<text:s/></text:p>
          </table:table-cell>
          <table:table-cell office:value-type="float" office:value="420.68793284035411" table:formula="of:=SUM([.E46:.H46])" table:style-name="ce61">
            <text:p><text:s/>4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6"/>
          <table:table-cell office:value-type="float" office:value="929.66826819570701" table:formula="of:=SUBTOTAL(9;[.E45:.E46])" table:style-name="ce127">
            <text:p><text:s/>930<text:s/></text:p>
          </table:table-cell>
          <table:table-cell office:value-type="float" office:value="358.488470722937" table:formula="of:=SUBTOTAL(9;[.F45:.F46])" table:style-name="ce65">
            <text:p><text:s/>358<text:s/></text:p>
          </table:table-cell>
          <table:table-cell office:value-type="float" office:value="1519.8515489573842" table:formula="of:=SUBTOTAL(9;[.G45:.G46])" table:style-name="ce65">
            <text:p><text:s/>1,520<text:s/></text:p>
          </table:table-cell>
          <table:table-cell office:value-type="float" office:value="1695.114187048679" table:formula="of:=SUBTOTAL(9;[.H45:.H46])" table:style-name="ce128">
            <text:p><text:s/>1,695<text:s/></text:p>
          </table:table-cell>
          <table:table-cell office:value-type="float" office:value="4503.1224749247067" table:formula="of:=SUBTOTAL(9;[.I45:.I46])" table:style-name="ce66">
            <text:p><text:s/>4,50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73.005049664139705" table:style-name="ce32">
            <text:p><text:s/>73<text:s/></text:p>
          </table:table-cell>
          <table:table-cell office:value-type="float" office:value="93.170838307738293" table:style-name="ce33">
            <text:p><text:s/>93<text:s/></text:p>
          </table:table-cell>
          <table:table-cell office:value-type="float" office:value="366.34385151877899" table:style-name="ce33">
            <text:p><text:s/>366<text:s/></text:p>
          </table:table-cell>
          <table:table-cell office:value-type="float" office:value="716.97885818934401" table:style-name="ce34">
            <text:p><text:s/>717<text:s/></text:p>
          </table:table-cell>
          <table:table-cell office:value-type="float" office:value="1249.498597680001" table:formula="of:=SUM([.E48:.H48])" table:style-name="ce61">
            <text:p><text:s/>1,24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550.67210010338204" table:style-name="ce32">
            <text:p><text:s/>551<text:s/></text:p>
          </table:table-cell>
          <table:table-cell office:value-type="float" office:value="1.08" table:style-name="ce33">
            <text:p><text:s/>1<text:s/></text:p>
          </table:table-cell>
          <table:table-cell office:value-type="float" office:value="310.38133677387202" table:style-name="ce33">
            <text:p><text:s/>310<text:s/></text:p>
          </table:table-cell>
          <table:table-cell office:value-type="float" office:value="299.08030081290002" table:style-name="ce34">
            <text:p><text:s/>299<text:s/></text:p>
          </table:table-cell>
          <table:table-cell office:value-type="float" office:value="1161.2137376901542" table:formula="of:=SUM([.E49:.H49])" table:style-name="ce61">
            <text:p><text:s/>1,16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0.41880202212929701" table:style-name="ce32">
            <text:p><text:s/>0<text:s/></text:p>
          </table:table-cell>
          <table:table-cell office:value-type="float" office:value="3.0763399658203099" table:style-name="ce33">
            <text:p><text:s/>3<text:s/></text:p>
          </table:table-cell>
          <table:table-cell office:value-type="float" office:value="1.3815700058936999" table:style-name="ce33">
            <text:p><text:s/>1<text:s/></text:p>
          </table:table-cell>
          <table:table-cell office:value-type="float" office:value="107.84715130124501" table:style-name="ce34">
            <text:p><text:s/>108<text:s/></text:p>
          </table:table-cell>
          <table:table-cell office:value-type="float" office:value="112.72386329508831" table:formula="of:=SUM([.E50:.H50])" table:style-name="ce61">
            <text:p><text:s/>1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1.563759781230203" table:style-name="ce33">
            <text:p><text:s/>92<text:s/></text:p>
          </table:table-cell>
          <table:table-cell office:value-type="float" office:value="22.450799934387199" table:style-name="ce34">
            <text:p><text:s/>22<text:s/></text:p>
          </table:table-cell>
          <table:table-cell office:value-type="float" office:value="114.01455971561739" table:formula="of:=SUM([.E51:.H51])" table:style-name="ce61">
            <text:p><text:s/>1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19.787689743041899" table:style-name="ce32">
            <text:p><text:s/>20<text:s/></text:p>
          </table:table-cell>
          <table:table-cell office:value-type="float" office:value="21.677497903823799" table:style-name="ce33">
            <text:p><text:s/>2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1.465187646865701" table:formula="of:=SUM([.E52:.H52])" table:style-name="ce61">
            <text:p><text:s/>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.2658000907897904" table:style-name="ce33">
            <text:p><text:s/>6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6.2658000907897904" table:formula="of:=SUM([.E53:.H53])" table:style-name="ce61">
            <text:p><text:s/>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6"/>
          <table:table-cell office:value-type="float" office:value="643.88364153269299" table:formula="of:=SUBTOTAL(9;[.E48:.E53])" table:style-name="ce127">
            <text:p><text:s/>644<text:s/></text:p>
          </table:table-cell>
          <table:table-cell office:value-type="float" office:value="119.00467617738241" table:formula="of:=SUBTOTAL(9;[.F48:.F53])" table:style-name="ce65">
            <text:p><text:s/>119<text:s/></text:p>
          </table:table-cell>
          <table:table-cell office:value-type="float" office:value="775.93631817056462" table:formula="of:=SUBTOTAL(9;[.G48:.G53])" table:style-name="ce65">
            <text:p><text:s/>776<text:s/></text:p>
          </table:table-cell>
          <table:table-cell office:value-type="float" office:value="1146.3571102378764" table:formula="of:=SUBTOTAL(9;[.H48:.H53])" table:style-name="ce128">
            <text:p><text:s/>1,146<text:s/></text:p>
          </table:table-cell>
          <table:table-cell office:value-type="float" office:value="2685.1817461185169" table:formula="of:=SUBTOTAL(9;[.I48:.I53])" table:style-name="ce66">
            <text:p><text:s/>2,6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ismantler</text:p>
          </table:table-cell>
          <table:table-cell office:value-type="float" office:value="8.8303510742187505" table:style-name="ce32">
            <text:p><text:s/>9<text:s/></text:p>
          </table:table-cell>
          <table:table-cell office:value-type="float" office:value="24.260148626716799" table:style-name="ce33">
            <text:p><text:s/>24<text:s/></text:p>
          </table:table-cell>
          <table:table-cell office:value-type="float" office:value="62.422503487870003" table:style-name="ce33">
            <text:p><text:s/>62<text:s/></text:p>
          </table:table-cell>
          <table:table-cell office:value-type="float" office:value="35.431105851119298" table:style-name="ce34">
            <text:p><text:s/>35<text:s/></text:p>
          </table:table-cell>
          <table:table-cell office:value-type="float" office:value="130.94410903992485" table:formula="of:=SUM([.E55:.H55])" table:style-name="ce61">
            <text:p><text:s/>13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102.851209388614" table:style-name="ce32">
            <text:p><text:s/>103<text:s/></text:p>
          </table:table-cell>
          <table:table-cell office:value-type="float" office:value="25.262017533218401" table:style-name="ce33">
            <text:p><text:s/>25<text:s/></text:p>
          </table:table-cell>
          <table:table-cell office:value-type="float" office:value="317.05282273035999" table:style-name="ce33">
            <text:p><text:s/>317<text:s/></text:p>
          </table:table-cell>
          <table:table-cell office:value-type="float" office:value="488.67816494743499" table:style-name="ce34">
            <text:p><text:s/>489<text:s/></text:p>
          </table:table-cell>
          <table:table-cell office:value-type="float" office:value="933.84421459962732" table:formula="of:=SUM([.E56:.H56])" table:style-name="ce61">
            <text:p><text:s/>9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0"/>
          <table:table-cell office:value-type="float" office:value="111.68156046283275" table:formula="of:=SUBTOTAL(9;[.E55:.E56])" table:style-name="ce29">
            <text:p><text:s/>112<text:s/></text:p>
          </table:table-cell>
          <table:table-cell office:value-type="float" office:value="49.522166159935196" table:formula="of:=SUBTOTAL(9;[.F55:.F56])" table:style-name="ce29">
            <text:p><text:s/>50<text:s/></text:p>
          </table:table-cell>
          <table:table-cell office:value-type="float" office:value="379.47532621823001" table:formula="of:=SUBTOTAL(9;[.G55:.G56])" table:style-name="ce29">
            <text:p><text:s/>379<text:s/></text:p>
          </table:table-cell>
          <table:table-cell office:value-type="float" office:value="524.10927079855423" table:formula="of:=SUBTOTAL(9;[.H55:.H56])" table:style-name="ce29">
            <text:p><text:s/>524<text:s/></text:p>
          </table:table-cell>
          <table:table-cell office:value-type="float" office:value="1064.7883236395521" table:formula="of:=SUBTOTAL(9;[.I55:.I56])" table:style-name="ce59">
            <text:p><text:s/>1,065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5 Total</text:p>
          </table:table-cell>
          <table:table-cell table:number-columns-repeated="2" table:style-name="ce72"/>
          <table:table-cell office:value-type="float" office:value="1685.2334701912328" table:formula="of:=SUBTOTAL(9;[.E45:.E56])" table:style-name="ce43">
            <text:p><text:s/>1,685<text:s/></text:p>
          </table:table-cell>
          <table:table-cell office:value-type="float" office:value="527.01531306025458" table:formula="of:=SUBTOTAL(9;[.F45:.F56])" table:style-name="ce43">
            <text:p><text:s/>527<text:s/></text:p>
          </table:table-cell>
          <table:table-cell office:value-type="float" office:value="2675.2631933461789" table:formula="of:=SUBTOTAL(9;[.G45:.G56])" table:style-name="ce43">
            <text:p><text:s/>2,675<text:s/></text:p>
          </table:table-cell>
          <table:table-cell office:value-type="float" office:value="3365.5805680851099" table:formula="of:=SUBTOTAL(9;[.H45:.H56])" table:style-name="ce43">
            <text:p><text:s/>3,366<text:s/></text:p>
          </table:table-cell>
          <table:table-cell office:value-type="float" office:value="8253.092544682775" table:formula="of:=SUBTOTAL(9;[.I45:.I56])" table:style-name="ce74">
            <text:p><text:s/>8,253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6" table:number-columns-spanned="1" table:number-rows-spanned="13" table:style-name="ce347">
            <text:p>2006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08">
            <text:p>Transfer</text:p>
          </table:table-cell>
          <table:table-cell office:value-type="float" office:value="600.34004665761108" table:style-name="ce32">
            <text:p><text:s/>600<text:s/></text:p>
          </table:table-cell>
          <table:table-cell office:value-type="float" office:value="278.24589166423164" table:style-name="ce33">
            <text:p><text:s/>278<text:s/></text:p>
          </table:table-cell>
          <table:table-cell office:value-type="float" office:value="1424.5944166997699" table:style-name="ce33">
            <text:p><text:s/>1,425<text:s/></text:p>
          </table:table-cell>
          <table:table-cell office:value-type="float" office:value="1305.1938756698319" table:style-name="ce34">
            <text:p><text:s/>1,305<text:s/></text:p>
          </table:table-cell>
          <table:table-cell office:value-type="float" office:value="3608.3742306914446" table:formula="of:=SUM([.E59:.H59])" table:style-name="ce61">
            <text:p><text:s/>3,60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ivic amenity</text:p>
          </table:table-cell>
          <table:table-cell office:value-type="float" office:value="98.746970078945154" table:style-name="ce32">
            <text:p><text:s/>99<text:s/></text:p>
          </table:table-cell>
          <table:table-cell office:value-type="float" office:value="88.174892411625706" table:style-name="ce33">
            <text:p><text:s/>88<text:s/></text:p>
          </table:table-cell>
          <table:table-cell office:value-type="float" office:value="114.97244971698522" table:style-name="ce33">
            <text:p><text:s/>115<text:s/></text:p>
          </table:table-cell>
          <table:table-cell office:value-type="float" office:value="299.26233405995015" table:style-name="ce34">
            <text:p><text:s/>299<text:s/></text:p>
          </table:table-cell>
          <table:table-cell office:value-type="float" office:value="601.15664626750618" table:formula="of:=SUM([.E60:.H60])" table:style-name="ce61">
            <text:p><text:s/>6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6"/>
          <table:table-cell office:value-type="float" office:value="699.08701673655628" table:formula="of:=SUBTOTAL(9;[.E59:.E60])" table:style-name="ce127">
            <text:p><text:s/>699<text:s/></text:p>
          </table:table-cell>
          <table:table-cell office:value-type="float" office:value="366.42078407585734" table:formula="of:=SUBTOTAL(9;[.F59:.F60])" table:style-name="ce65">
            <text:p><text:s/>366<text:s/></text:p>
          </table:table-cell>
          <table:table-cell office:value-type="float" office:value="1539.5668664167551" table:formula="of:=SUBTOTAL(9;[.G59:.G60])" table:style-name="ce65">
            <text:p><text:s/>1,540<text:s/></text:p>
          </table:table-cell>
          <table:table-cell office:value-type="float" office:value="1604.4562097297821" table:formula="of:=SUBTOTAL(9;[.H59:.H60])" table:style-name="ce128">
            <text:p><text:s/>1,604<text:s/></text:p>
          </table:table-cell>
          <table:table-cell office:value-type="float" office:value="4209.530876958951" table:formula="of:=SUBTOTAL(9;[.I59:.I60])" table:style-name="ce66">
            <text:p><text:s/>4,2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162.72825150822104" table:style-name="ce32">
            <text:p><text:s/>163<text:s/></text:p>
          </table:table-cell>
          <table:table-cell office:value-type="float" office:value="71.052715030312541" table:style-name="ce33">
            <text:p><text:s/>71<text:s/></text:p>
          </table:table-cell>
          <table:table-cell office:value-type="float" office:value="233.57238190759625" table:style-name="ce33">
            <text:p><text:s/>234<text:s/></text:p>
          </table:table-cell>
          <table:table-cell office:value-type="float" office:value="727.85208984053884" table:style-name="ce34">
            <text:p><text:s/>728<text:s/></text:p>
          </table:table-cell>
          <table:table-cell office:value-type="float" office:value="1195.2054382866686" table:formula="of:=SUM([.E62:.H62])" table:style-name="ce61">
            <text:p><text:s/>1,1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497.431044383168" table:style-name="ce32">
            <text:p><text:s/>497<text:s/></text:p>
          </table:table-cell>
          <table:table-cell office:value-type="float" office:value="6.1244000015258786" table:style-name="ce33">
            <text:p><text:s/>6<text:s/></text:p>
          </table:table-cell>
          <table:table-cell office:value-type="float" office:value="808.39888251924515" table:style-name="ce33">
            <text:p><text:s/>808<text:s/></text:p>
          </table:table-cell>
          <table:table-cell office:value-type="float" office:value="250.93818966079129" table:style-name="ce34">
            <text:p><text:s/>251<text:s/></text:p>
          </table:table-cell>
          <table:table-cell office:value-type="float" office:value="1562.8925165647304" table:formula="of:=SUM([.E63:.H63])" table:style-name="ce61">
            <text:p><text:s/>1,5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0.20031731733679772" table:style-name="ce32">
            <text:p><text:s/>0<text:s/></text:p>
          </table:table-cell>
          <table:table-cell office:value-type="float" office:value="70.467269724756477" table:style-name="ce33">
            <text:p><text:s/>70<text:s/></text:p>
          </table:table-cell>
          <table:table-cell office:value-type="float" office:value="0.5066899995803833" table:style-name="ce33">
            <text:p><text:s/>1<text:s/></text:p>
          </table:table-cell>
          <table:table-cell office:value-type="float" office:value="145.42442695046776" table:style-name="ce34">
            <text:p><text:s/>145<text:s/></text:p>
          </table:table-cell>
          <table:table-cell office:value-type="float" office:value="216.59870399214142" table:formula="of:=SUM([.E64:.H64])" table:style-name="ce61">
            <text:p><text:s/>2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94.179641629220157" table:style-name="ce33">
            <text:p><text:s/>94<text:s/></text:p>
          </table:table-cell>
          <table:table-cell office:value-type="float" office:value="14.89963903074665" table:style-name="ce34">
            <text:p><text:s/>15<text:s/></text:p>
          </table:table-cell>
          <table:table-cell office:value-type="float" office:value="109.07928065996681" table:formula="of:=SUM([.E65:.H65])" table:style-name="ce61">
            <text:p><text:s/>1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40.31984964752197" table:style-name="ce32">
            <text:p><text:s/>40<text:s/></text:p>
          </table:table-cell>
          <table:table-cell office:value-type="float" office:value="29.159385986328125" table:style-name="ce33">
            <text:p><text:s/>29<text:s/></text:p>
          </table:table-cell>
          <table:table-cell office:value-type="float" office:value="59.166319458007813" table:style-name="ce33">
            <text:p><text:s/>59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28.64555509185791" table:formula="of:=SUM([.E66:.H66])" table:style-name="ce61">
            <text:p><text:s/>1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0.39204000091552732" table:style-name="ce32">
            <text:p><text:s/>0<text:s/></text:p>
          </table:table-cell>
          <table:table-cell office:value-type="float" office:value="1.8334700164794921" table:style-name="ce33">
            <text:p><text:s/>2<text:s/></text:p>
          </table:table-cell>
          <table:table-cell office:value-type="float" office:value="11.013169960021973" table:style-name="ce33">
            <text:p><text:s/>11<text:s/></text:p>
          </table:table-cell>
          <table:table-cell office:value-type="float" office:value="28.255830011367799" table:style-name="ce34">
            <text:p><text:s/>28<text:s/></text:p>
          </table:table-cell>
          <table:table-cell office:value-type="float" office:value="41.494509988784792" table:formula="of:=SUM([.E67:.H67])" table:style-name="ce61">
            <text:p><text:s/>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6"/>
          <table:table-cell office:value-type="float" office:value="701.07150285716341" table:formula="of:=SUBTOTAL(9;[.E62:.E67])" table:style-name="ce127">
            <text:p><text:s/>701<text:s/></text:p>
          </table:table-cell>
          <table:table-cell office:value-type="float" office:value="178.63724075940249" table:formula="of:=SUBTOTAL(9;[.F62:.F67])" table:style-name="ce65">
            <text:p><text:s/>179<text:s/></text:p>
          </table:table-cell>
          <table:table-cell office:value-type="float" office:value="1206.8370854736718" table:formula="of:=SUBTOTAL(9;[.G62:.G67])" table:style-name="ce65">
            <text:p><text:s/>1,207<text:s/></text:p>
          </table:table-cell>
          <table:table-cell office:value-type="float" office:value="1167.3701754939123" table:formula="of:=SUBTOTAL(9;[.H62:.H67])" table:style-name="ce128">
            <text:p><text:s/>1,167<text:s/></text:p>
          </table:table-cell>
          <table:table-cell office:value-type="float" office:value="3253.9160045841504" table:formula="of:=SUBTOTAL(9;[.I62:.I67])" table:style-name="ce66">
            <text:p><text:s/>3,25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ismantler</text:p>
          </table:table-cell>
          <table:table-cell office:value-type="float" office:value="11.082563813149928" table:style-name="ce32">
            <text:p><text:s/>11<text:s/></text:p>
          </table:table-cell>
          <table:table-cell office:value-type="float" office:value="12.637031008539722" table:style-name="ce33">
            <text:p><text:s/>13<text:s/></text:p>
          </table:table-cell>
          <table:table-cell office:value-type="float" office:value="23.989561617016793" table:style-name="ce33">
            <text:p><text:s/>24<text:s/></text:p>
          </table:table-cell>
          <table:table-cell office:value-type="float" office:value="31.594756319395266" table:style-name="ce34">
            <text:p><text:s/>32<text:s/></text:p>
          </table:table-cell>
          <table:table-cell office:value-type="float" office:value="79.303912758101717" table:formula="of:=SUM([.E69:.H69])" table:style-name="ce61">
            <text:p><text:s/>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103.03684105491638" table:style-name="ce32">
            <text:p><text:s/>103<text:s/></text:p>
          </table:table-cell>
          <table:table-cell office:value-type="float" office:value="59.81228748422663" table:style-name="ce33">
            <text:p><text:s/>60<text:s/></text:p>
          </table:table-cell>
          <table:table-cell office:value-type="float" office:value="378.09164409845135" table:style-name="ce33">
            <text:p><text:s/>378<text:s/></text:p>
          </table:table-cell>
          <table:table-cell office:value-type="float" office:value="754.26143715524529" table:style-name="ce34">
            <text:p><text:s/>754<text:s/></text:p>
          </table:table-cell>
          <table:table-cell office:value-type="float" office:value="1295.2022097928398" table:formula="of:=SUM([.E70:.H70])" table:style-name="ce61">
            <text:p><text:s/>1,2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0"/>
          <table:table-cell office:value-type="float" office:value="114.11940486806631" table:formula="of:=SUBTOTAL(9;[.E69:.E70])" table:style-name="ce29">
            <text:p><text:s/>114<text:s/></text:p>
          </table:table-cell>
          <table:table-cell office:value-type="float" office:value="72.449318492766352" table:formula="of:=SUBTOTAL(9;[.F69:.F70])" table:style-name="ce29">
            <text:p><text:s/>72<text:s/></text:p>
          </table:table-cell>
          <table:table-cell office:value-type="float" office:value="402.08120571546817" table:formula="of:=SUBTOTAL(9;[.G69:.G70])" table:style-name="ce29">
            <text:p><text:s/>402<text:s/></text:p>
          </table:table-cell>
          <table:table-cell office:value-type="float" office:value="785.85619347464058" table:formula="of:=SUBTOTAL(9;[.H69:.H70])" table:style-name="ce29">
            <text:p><text:s/>786<text:s/></text:p>
          </table:table-cell>
          <table:table-cell office:value-type="float" office:value="1374.5061225509414" table:formula="of:=SUBTOTAL(9;[.I69:.I70])" table:style-name="ce59">
            <text:p><text:s/>1,375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6 Total</text:p>
          </table:table-cell>
          <table:table-cell table:number-columns-repeated="2" table:style-name="ce72"/>
          <table:table-cell office:value-type="float" office:value="1514.2779244617859" table:formula="of:=SUBTOTAL(9;[.E59:.E70])" table:style-name="ce43">
            <text:p><text:s/>1,514<text:s/></text:p>
          </table:table-cell>
          <table:table-cell office:value-type="float" office:value="617.5073433280262" table:formula="of:=SUBTOTAL(9;[.F59:.F70])" table:style-name="ce43">
            <text:p><text:s/>618<text:s/></text:p>
          </table:table-cell>
          <table:table-cell office:value-type="float" office:value="3148.4851576058954" table:formula="of:=SUBTOTAL(9;[.G59:.G70])" table:style-name="ce43">
            <text:p><text:s/>3,148<text:s/></text:p>
          </table:table-cell>
          <table:table-cell office:value-type="float" office:value="3557.682578698335" table:formula="of:=SUBTOTAL(9;[.H59:.H70])" table:style-name="ce43">
            <text:p><text:s/>3,558<text:s/></text:p>
          </table:table-cell>
          <table:table-cell office:value-type="float" office:value="8837.9530040940426" table:formula="of:=SUBTOTAL(9;[.I59:.I70])" table:style-name="ce74">
            <text:p><text:s/>8,83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7" table:number-columns-spanned="1" table:number-rows-spanned="13" table:style-name="ce347">
            <text:p>2007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837.59406752879579" table:style-name="ce33">
            <text:p><text:s/>838<text:s/></text:p>
          </table:table-cell>
          <table:table-cell office:value-type="float" office:value="342.6391265964387" table:style-name="ce33">
            <text:p><text:s/>343<text:s/></text:p>
          </table:table-cell>
          <table:table-cell office:value-type="float" office:value="1628.5873658630926" table:style-name="ce33">
            <text:p><text:s/>1,629<text:s/></text:p>
          </table:table-cell>
          <table:table-cell office:value-type="float" office:value="1748.2556031547072" table:style-name="ce33">
            <text:p><text:s/>1,748<text:s/></text:p>
          </table:table-cell>
          <table:table-cell office:value-type="float" office:value="4557.0761631430341" table:formula="of:=SUM([.E73:.H73])" table:style-name="ce61">
            <text:p><text:s/>4,55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04.29825992990658" table:style-name="ce33">
            <text:p><text:s/>104<text:s/></text:p>
          </table:table-cell>
          <table:table-cell office:value-type="float" office:value="75.451945036143059" table:style-name="ce33">
            <text:p><text:s/>75<text:s/></text:p>
          </table:table-cell>
          <table:table-cell office:value-type="float" office:value="106.18659353297949" table:style-name="ce33">
            <text:p><text:s/>106<text:s/></text:p>
          </table:table-cell>
          <table:table-cell office:value-type="float" office:value="289.95449447676259" table:style-name="ce33">
            <text:p><text:s/>290<text:s/></text:p>
          </table:table-cell>
          <table:table-cell office:value-type="float" office:value="575.89129297579166" table:formula="of:=SUM([.E74:.H74])" table:style-name="ce61">
            <text:p><text:s/>57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941.89232745870231" table:formula="of:=SUM([.E73:.E74])" table:style-name="ce127">
            <text:p><text:s/>942<text:s/></text:p>
          </table:table-cell>
          <table:table-cell office:value-type="float" office:value="418.09107163258176" table:formula="of:=SUM([.F73:.F74])" table:style-name="ce65">
            <text:p><text:s/>418<text:s/></text:p>
          </table:table-cell>
          <table:table-cell office:value-type="float" office:value="1734.7739593960721" table:formula="of:=SUM([.G73:.G74])" table:style-name="ce65">
            <text:p><text:s/>1,735<text:s/></text:p>
          </table:table-cell>
          <table:table-cell office:value-type="float" office:value="2038.2100976314698" table:formula="of:=SUM([.H73:.H74])" table:style-name="ce65">
            <text:p><text:s/>2,038<text:s/></text:p>
          </table:table-cell>
          <table:table-cell office:value-type="float" office:value="5132.9674561188258" table:formula="of:=SUM([.I73:.I74])" table:style-name="ce66">
            <text:p><text:s/>5,1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142.81330306509136" table:style-name="ce32">
            <text:p><text:s/>143<text:s/></text:p>
          </table:table-cell>
          <table:table-cell office:value-type="float" office:value="101.66798649534583" table:style-name="ce33">
            <text:p><text:s/>102<text:s/></text:p>
          </table:table-cell>
          <table:table-cell office:value-type="float" office:value="258.87355465178877" table:style-name="ce33">
            <text:p><text:s/>259<text:s/></text:p>
          </table:table-cell>
          <table:table-cell office:value-type="float" office:value="456.53017199206352" table:style-name="ce33">
            <text:p><text:s/>457<text:s/></text:p>
          </table:table-cell>
          <table:table-cell office:value-type="float" office:value="959.88501620428951" table:formula="of:=SUM([.E76:.H76])" table:style-name="ce61">
            <text:p><text:s/>9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554.41089415138333" table:style-name="ce32">
            <text:p><text:s/>554<text:s/></text:p>
          </table:table-cell>
          <table:table-cell office:value-type="float" office:value="9.091720001220704" table:style-name="ce33">
            <text:p><text:s/>9<text:s/></text:p>
          </table:table-cell>
          <table:table-cell office:value-type="float" office:value="820.4425293220952" table:style-name="ce33">
            <text:p><text:s/>820<text:s/></text:p>
          </table:table-cell>
          <table:table-cell office:value-type="float" office:value="283.5362797477618" table:style-name="ce33">
            <text:p><text:s/>284<text:s/></text:p>
          </table:table-cell>
          <table:table-cell office:value-type="float" office:value="1667.4814232224612" table:formula="of:=SUM([.E77:.H77])" table:style-name="ce61">
            <text:p><text:s/>1,6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0.41494660801419558" table:style-name="ce32">
            <text:p><text:s/>0<text:s/></text:p>
          </table:table-cell>
          <table:table-cell office:value-type="float" office:value="59.914118160724641" table:style-name="ce33">
            <text:p><text:s/>60<text:s/></text:p>
          </table:table-cell>
          <table:table-cell office:value-type="float" office:value="0.08" table:style-name="ce33">
            <text:p><text:s/>0<text:s/></text:p>
          </table:table-cell>
          <table:table-cell office:value-type="float" office:value="229.60576296057255" table:style-name="ce33">
            <text:p><text:s/>230<text:s/></text:p>
          </table:table-cell>
          <table:table-cell office:value-type="float" office:value="290.01482772931138" table:formula="of:=SUM([.E78:.H78])" table:style-name="ce61">
            <text:p><text:s/>2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17.46597650140779" table:style-name="ce33">
            <text:p><text:s/>117<text:s/></text:p>
          </table:table-cell>
          <table:table-cell office:value-type="float" office:value="15.99687790244614" table:style-name="ce33">
            <text:p><text:s/>16<text:s/></text:p>
          </table:table-cell>
          <table:table-cell office:value-type="float" office:value="133.46285440385392" table:formula="of:=SUM([.E79:.H79])" table:style-name="ce61">
            <text:p><text:s/>1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68.456149897098541" table:style-name="ce32">
            <text:p><text:s/>68<text:s/></text:p>
          </table:table-cell>
          <table:table-cell office:value-type="float" office:value="25.548127153396607" table:style-name="ce33">
            <text:p><text:s/>26<text:s/></text:p>
          </table:table-cell>
          <table:table-cell office:value-type="float" office:value="102.89445861148835" table:style-name="ce33">
            <text:p><text:s/>103<text:s/></text:p>
          </table:table-cell>
          <table:table-cell office:value-type="float" office:value="12.207560106396675" table:style-name="ce33">
            <text:p><text:s/>12<text:s/></text:p>
          </table:table-cell>
          <table:table-cell office:value-type="float" office:value="209.10629576838016" table:formula="of:=SUM([.E80:.H80])" table:style-name="ce61">
            <text:p><text:s/>2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0.75788001251220705" table:style-name="ce32">
            <text:p><text:s/>1<text:s/></text:p>
          </table:table-cell>
          <table:table-cell office:value-type="float" office:value="1.0784799957275391" table:style-name="ce33">
            <text:p><text:s/>1<text:s/></text:p>
          </table:table-cell>
          <table:table-cell office:value-type="float" office:value="17.820540195465089" table:style-name="ce33">
            <text:p><text:s/>18<text:s/></text:p>
          </table:table-cell>
          <table:table-cell office:value-type="float" office:value="45.005949897766115" table:style-name="ce33">
            <text:p><text:s/>45<text:s/></text:p>
          </table:table-cell>
          <table:table-cell office:value-type="float" office:value="64.662850101470951" table:formula="of:=SUM([.E81:.H81])" table:style-name="ce61">
            <text:p><text:s/>6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766.85317373409976" table:formula="of:=SUM([.E76:.E81])" table:style-name="ce65">
            <text:p><text:s/>767<text:s/></text:p>
          </table:table-cell>
          <table:table-cell office:value-type="float" office:value="197.3004318064153" table:formula="of:=SUM([.F76:.F81])" table:style-name="ce65">
            <text:p><text:s/>197<text:s/></text:p>
          </table:table-cell>
          <table:table-cell office:value-type="float" office:value="1317.577059282245" table:formula="of:=SUM([.G76:.G81])" table:style-name="ce65">
            <text:p><text:s/>1,318<text:s/></text:p>
          </table:table-cell>
          <table:table-cell office:value-type="float" office:value="1042.8826026070069" table:formula="of:=SUM([.H76:.H81])" table:style-name="ce65">
            <text:p><text:s/>1,043<text:s/></text:p>
          </table:table-cell>
          <table:table-cell office:value-type="float" office:value="3324.6132674297673" table:formula="of:=SUM([.I76:.I81])" table:style-name="ce66">
            <text:p><text:s/>3,32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ismantler</text:p>
          </table:table-cell>
          <table:table-cell office:value-type="float" office:value="10.15875249695778" table:style-name="ce32">
            <text:p><text:s/>10<text:s/></text:p>
          </table:table-cell>
          <table:table-cell office:value-type="float" office:value="15.785933942268603" table:style-name="ce33">
            <text:p><text:s/>16<text:s/></text:p>
          </table:table-cell>
          <table:table-cell office:value-type="float" office:value="43.957117007255555" table:style-name="ce33">
            <text:p><text:s/>44<text:s/></text:p>
          </table:table-cell>
          <table:table-cell office:value-type="float" office:value="36.583862369871696" table:style-name="ce33">
            <text:p><text:s/>37<text:s/></text:p>
          </table:table-cell>
          <table:table-cell office:value-type="float" office:value="106.48566581635363" table:formula="of:=SUM([.E83:.H83])" table:style-name="ce61">
            <text:p><text:s/>10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108.72292908976041" table:style-name="ce32">
            <text:p><text:s/>109<text:s/></text:p>
          </table:table-cell>
          <table:table-cell office:value-type="float" office:value="65.12634784879495" table:style-name="ce33">
            <text:p><text:s/>65<text:s/></text:p>
          </table:table-cell>
          <table:table-cell office:value-type="float" office:value="347.69465101788705" table:style-name="ce33">
            <text:p><text:s/>348<text:s/></text:p>
          </table:table-cell>
          <table:table-cell office:value-type="float" office:value="359.1208718391955" table:style-name="ce33">
            <text:p><text:s/>359<text:s/></text:p>
          </table:table-cell>
          <table:table-cell office:value-type="float" office:value="880.66479979563792" table:formula="of:=SUM([.E84:.H84])" table:style-name="ce61">
            <text:p><text:s/>88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118.88168158671819" table:formula="of:=SUM([.E83:.E84])" table:style-name="ce65">
            <text:p><text:s/>119<text:s/></text:p>
          </table:table-cell>
          <table:table-cell office:value-type="float" office:value="80.912281791063549" table:formula="of:=SUM([.F83:.F84])" table:style-name="ce65">
            <text:p><text:s/>81<text:s/></text:p>
          </table:table-cell>
          <table:table-cell office:value-type="float" office:value="391.65176802514259" table:formula="of:=SUM([.G83:.G84])" table:style-name="ce65">
            <text:p><text:s/>392<text:s/></text:p>
          </table:table-cell>
          <table:table-cell office:value-type="float" office:value="395.70473420906717" table:formula="of:=SUM([.H83:.H84])" table:style-name="ce65">
            <text:p><text:s/>396<text:s/></text:p>
          </table:table-cell>
          <table:table-cell office:value-type="float" office:value="987.15046561199154" table:formula="of:=SUM([.I83:.I84])" table:style-name="ce66">
            <text:p><text:s/>987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7 Total</text:p>
          </table:table-cell>
          <table:table-cell table:number-columns-repeated="2" table:style-name="ce72"/>
          <table:table-cell office:value-type="float" office:value="1827.6271827795204" table:formula="of:=+[.E85]+[.E82]+[.E75]" table:style-name="ce134">
            <text:p><text:s/>1,828<text:s/></text:p>
          </table:table-cell>
          <table:table-cell office:value-type="float" office:value="696.30378523006061" table:formula="of:=+[.F85]+[.F82]+[.F75]" table:style-name="ce134">
            <text:p><text:s/>696<text:s/></text:p>
          </table:table-cell>
          <table:table-cell office:value-type="float" office:value="3444.0027867034596" table:formula="of:=+[.G85]+[.G82]+[.G75]" table:style-name="ce134">
            <text:p><text:s/>3,444<text:s/></text:p>
          </table:table-cell>
          <table:table-cell office:value-type="float" office:value="3476.7974344475442" table:formula="of:=+[.H85]+[.H82]+[.H75]" table:style-name="ce134">
            <text:p><text:s/>3,477<text:s/></text:p>
          </table:table-cell>
          <table:table-cell office:value-type="float" office:value="9444.7311891605859" table:formula="of:=+[.I85]+[.I82]+[.I75]" table:style-name="ce74">
            <text:p><text:s/>9,44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8" table:number-columns-spanned="1" table:number-rows-spanned="13" table:style-name="ce347">
            <text:p>2008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754.34424011228316" table:style-name="ce33">
            <text:p><text:s/>754<text:s/></text:p>
          </table:table-cell>
          <table:table-cell office:value-type="float" office:value="336.3779441963872" table:style-name="ce33">
            <text:p><text:s/>336<text:s/></text:p>
          </table:table-cell>
          <table:table-cell office:value-type="float" office:value="1470.0137557343969" table:style-name="ce33">
            <text:p><text:s/>1,470<text:s/></text:p>
          </table:table-cell>
          <table:table-cell office:value-type="float" office:value="2027.0733833255788" table:style-name="ce33">
            <text:p><text:s/>2,027<text:s/></text:p>
          </table:table-cell>
          <table:table-cell office:value-type="float" office:value="4587.8093233686459" table:formula="of:=SUM([.E87:.H87])" table:style-name="ce61">
            <text:p><text:s/>4,58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88.781750047735869" table:style-name="ce33">
            <text:p><text:s/>89<text:s/></text:p>
          </table:table-cell>
          <table:table-cell office:value-type="float" office:value="63.435996091507285" table:style-name="ce33">
            <text:p><text:s/>63<text:s/></text:p>
          </table:table-cell>
          <table:table-cell office:value-type="float" office:value="88.335852389663472" table:style-name="ce33">
            <text:p><text:s/>88<text:s/></text:p>
          </table:table-cell>
          <table:table-cell office:value-type="float" office:value="176.7215459866002" table:style-name="ce33">
            <text:p><text:s/>177<text:s/></text:p>
          </table:table-cell>
          <table:table-cell office:value-type="float" office:value="417.27514451550684" table:formula="of:=SUM([.E88:.H88])" table:style-name="ce61">
            <text:p><text:s/>4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843.125990160019" table:formula="of:=SUM([.E87:.E88])" table:style-name="ce127">
            <text:p><text:s/>843<text:s/></text:p>
          </table:table-cell>
          <table:table-cell office:value-type="float" office:value="399.81394028789447" table:formula="of:=SUM([.F87:.F88])" table:style-name="ce65">
            <text:p><text:s/>400<text:s/></text:p>
          </table:table-cell>
          <table:table-cell office:value-type="float" office:value="1558.3496081240603" table:formula="of:=SUM([.G87:.G88])" table:style-name="ce65">
            <text:p><text:s/>1,558<text:s/></text:p>
          </table:table-cell>
          <table:table-cell office:value-type="float" office:value="2203.7949293121792" table:formula="of:=SUM([.H87:.H88])" table:style-name="ce65">
            <text:p><text:s/>2,204<text:s/></text:p>
          </table:table-cell>
          <table:table-cell office:value-type="float" office:value="5005.0844678841531" table:formula="of:=SUM([.I87:.I88])" table:style-name="ce66">
            <text:p><text:s/>5,00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245.98785006909259" table:style-name="ce32">
            <text:p><text:s/>246<text:s/></text:p>
          </table:table-cell>
          <table:table-cell office:value-type="float" office:value="143.0516773687005" table:style-name="ce33">
            <text:p><text:s/>143<text:s/></text:p>
          </table:table-cell>
          <table:table-cell office:value-type="float" office:value="77.224215389369775" table:style-name="ce33">
            <text:p><text:s/>77<text:s/></text:p>
          </table:table-cell>
          <table:table-cell office:value-type="float" office:value="537.60858189725866" table:style-name="ce33">
            <text:p><text:s/>538<text:s/></text:p>
          </table:table-cell>
          <table:table-cell office:value-type="float" office:value="1003.8723247244216" table:formula="of:=SUM([.E90:.H90])" table:style-name="ce61">
            <text:p><text:s/>1,0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585.0472041222929" table:style-name="ce32">
            <text:p><text:s/>585<text:s/></text:p>
          </table:table-cell>
          <table:table-cell office:value-type="float" office:value="15.570967018127442" table:style-name="ce33">
            <text:p><text:s/>16<text:s/></text:p>
          </table:table-cell>
          <table:table-cell office:value-type="float" office:value="1259.1660919934463" table:style-name="ce33">
            <text:p><text:s/>1,259<text:s/></text:p>
          </table:table-cell>
          <table:table-cell office:value-type="float" office:value="327.91737492356452" table:style-name="ce33">
            <text:p><text:s/>328<text:s/></text:p>
          </table:table-cell>
          <table:table-cell office:value-type="float" office:value="2187.7016380574314" table:formula="of:=SUM([.E91:.H91])" table:style-name="ce61">
            <text:p><text:s/>2,18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0.39282069065689573" table:style-name="ce32">
            <text:p><text:s/>0<text:s/></text:p>
          </table:table-cell>
          <table:table-cell office:value-type="float" office:value="9.0885201356410992" table:style-name="ce33">
            <text:p><text:s/>9<text:s/></text:p>
          </table:table-cell>
          <table:table-cell office:value-type="float" office:value="150.43475357387396" table:style-name="ce33">
            <text:p><text:s/>150<text:s/></text:p>
          </table:table-cell>
          <table:table-cell office:value-type="float" office:value="150.34344687743487" table:style-name="ce33">
            <text:p><text:s/>150<text:s/></text:p>
          </table:table-cell>
          <table:table-cell office:value-type="float" office:value="310.25954127760684" table:formula="of:=SUM([.E92:.H92])" table:style-name="ce61">
            <text:p><text:s/>3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05.92979729756476" table:style-name="ce33">
            <text:p><text:s/>106<text:s/></text:p>
          </table:table-cell>
          <table:table-cell office:value-type="float" office:value="188.219464737723" table:style-name="ce33">
            <text:p><text:s/>188<text:s/></text:p>
          </table:table-cell>
          <table:table-cell office:value-type="float" office:value="294.14926203528773" table:formula="of:=SUM([.E93:.H93])" table:style-name="ce61">
            <text:p><text:s/>2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59.185599266648296" table:style-name="ce32">
            <text:p><text:s/>59<text:s/></text:p>
          </table:table-cell>
          <table:table-cell office:value-type="float" office:value="85.901850020647046" table:style-name="ce33">
            <text:p><text:s/>86<text:s/></text:p>
          </table:table-cell>
          <table:table-cell office:value-type="float" office:value="96.138839574098583" table:style-name="ce33">
            <text:p><text:s/>96<text:s/></text:p>
          </table:table-cell>
          <table:table-cell office:value-type="float" office:value="19.168696032866837" table:style-name="ce33">
            <text:p><text:s/>19<text:s/></text:p>
          </table:table-cell>
          <table:table-cell office:value-type="float" office:value="260.39498489426074" table:formula="of:=SUM([.E94:.H94])" table:style-name="ce61">
            <text:p><text:s/>2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2.591019989013672" table:style-name="ce32">
            <text:p><text:s/>3<text:s/></text:p>
          </table:table-cell>
          <table:table-cell office:value-type="float" office:value="2.7733699951171875" table:style-name="ce33">
            <text:p><text:s/>3<text:s/></text:p>
          </table:table-cell>
          <table:table-cell office:value-type="float" office:value="21.091150024414066" table:style-name="ce33">
            <text:p><text:s/>21<text:s/></text:p>
          </table:table-cell>
          <table:table-cell office:value-type="float" office:value="61.200295565664767" table:style-name="ce33">
            <text:p><text:s/>61<text:s/></text:p>
          </table:table-cell>
          <table:table-cell office:value-type="float" office:value="87.655835574209689" table:formula="of:=SUM([.E95:.H95])" table:style-name="ce61">
            <text:p><text:s/>8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893.20449413770439" table:formula="of:=SUM([.E90:.E95])" table:style-name="ce65">
            <text:p><text:s/>893<text:s/></text:p>
          </table:table-cell>
          <table:table-cell office:value-type="float" office:value="256.3863845382333" table:formula="of:=SUM([.F90:.F95])" table:style-name="ce65">
            <text:p><text:s/>256<text:s/></text:p>
          </table:table-cell>
          <table:table-cell office:value-type="float" office:value="1709.9848478527674" table:formula="of:=SUM([.G90:.G95])" table:style-name="ce65">
            <text:p><text:s/>1,710<text:s/></text:p>
          </table:table-cell>
          <table:table-cell office:value-type="float" office:value="1284.4578600345128" table:formula="of:=SUM([.H90:.H95])" table:style-name="ce65">
            <text:p><text:s/>1,284<text:s/></text:p>
          </table:table-cell>
          <table:table-cell office:value-type="float" office:value="4144.0335865632178" table:formula="of:=SUM([.I90:.I95])" table:style-name="ce66">
            <text:p><text:s/>4,14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ismantler</text:p>
          </table:table-cell>
          <table:table-cell office:value-type="float" office:value="6.7618608211874971" table:style-name="ce32">
            <text:p><text:s/>7<text:s/></text:p>
          </table:table-cell>
          <table:table-cell office:value-type="float" office:value="7.7052740036305041" table:style-name="ce33">
            <text:p><text:s/>8<text:s/></text:p>
          </table:table-cell>
          <table:table-cell office:value-type="float" office:value="60.009134112549958" table:style-name="ce33">
            <text:p><text:s/>60<text:s/></text:p>
          </table:table-cell>
          <table:table-cell office:value-type="float" office:value="26.608486045159395" table:style-name="ce33">
            <text:p><text:s/>27<text:s/></text:p>
          </table:table-cell>
          <table:table-cell office:value-type="float" office:value="101.08475498252736" table:formula="of:=SUM([.E97:.H97])" table:style-name="ce61">
            <text:p><text:s/>1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146.32851734026843" table:style-name="ce32">
            <text:p><text:s/>146<text:s/></text:p>
          </table:table-cell>
          <table:table-cell office:value-type="float" office:value="60.469513993411454" table:style-name="ce33">
            <text:p><text:s/>60<text:s/></text:p>
          </table:table-cell>
          <table:table-cell office:value-type="float" office:value="411.82878103906614" table:style-name="ce33">
            <text:p><text:s/>412<text:s/></text:p>
          </table:table-cell>
          <table:table-cell office:value-type="float" office:value="481.13611315757788" table:style-name="ce33">
            <text:p><text:s/>481<text:s/></text:p>
          </table:table-cell>
          <table:table-cell office:value-type="float" office:value="1099.7629255303239" table:formula="of:=SUM([.E98:.H98])" table:style-name="ce61">
            <text:p><text:s/>1,10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153.09037816145593" table:formula="of:=SUM([.E97:.E98])" table:style-name="ce65">
            <text:p><text:s/>153<text:s/></text:p>
          </table:table-cell>
          <table:table-cell office:value-type="float" office:value="68.17478799704196" table:formula="of:=SUM([.F97:.F98])" table:style-name="ce65">
            <text:p><text:s/>68<text:s/></text:p>
          </table:table-cell>
          <table:table-cell office:value-type="float" office:value="471.83791515161613" table:formula="of:=SUM([.G97:.G98])" table:style-name="ce65">
            <text:p><text:s/>472<text:s/></text:p>
          </table:table-cell>
          <table:table-cell office:value-type="float" office:value="507.74459920273728" table:formula="of:=SUM([.H97:.H98])" table:style-name="ce65">
            <text:p><text:s/>508<text:s/></text:p>
          </table:table-cell>
          <table:table-cell office:value-type="float" office:value="1200.8476805128512" table:formula="of:=SUM([.I97:.I98])" table:style-name="ce66">
            <text:p><text:s/>1,201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8 Total</text:p>
          </table:table-cell>
          <table:table-cell table:number-columns-repeated="2" table:style-name="ce72"/>
          <table:table-cell office:value-type="float" office:value="1889.4208624591793" table:formula="of:=+[.E99]+[.E96]+[.E89]" table:style-name="ce134">
            <text:p><text:s/>1,889<text:s/></text:p>
          </table:table-cell>
          <table:table-cell office:value-type="float" office:value="724.37511282316973" table:formula="of:=+[.F99]+[.F96]+[.F89]" table:style-name="ce134">
            <text:p><text:s/>724<text:s/></text:p>
          </table:table-cell>
          <table:table-cell office:value-type="float" office:value="3740.172371128444" table:formula="of:=+[.G99]+[.G96]+[.G89]" table:style-name="ce134">
            <text:p><text:s/>3,740<text:s/></text:p>
          </table:table-cell>
          <table:table-cell office:value-type="float" office:value="3995.9973885494292" table:formula="of:=+[.H99]+[.H96]+[.H89]" table:style-name="ce134">
            <text:p><text:s/>3,996<text:s/></text:p>
          </table:table-cell>
          <table:table-cell office:value-type="float" office:value="10349.965734960222" table:formula="of:=+[.I99]+[.I96]+[.I89]" table:style-name="ce74">
            <text:p><text:s/>10,350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9" table:number-columns-spanned="1" table:number-rows-spanned="13" table:style-name="ce347">
            <text:p>2009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937.1853900000001" table:style-name="ce33">
            <text:p><text:s/>937<text:s/></text:p>
          </table:table-cell>
          <table:table-cell office:value-type="float" office:value="513.10919000000001" table:style-name="ce33">
            <text:p><text:s/>513<text:s/></text:p>
          </table:table-cell>
          <table:table-cell office:value-type="float" office:value="1276.1405799999993" table:style-name="ce33">
            <text:p><text:s/>1,276<text:s/></text:p>
          </table:table-cell>
          <table:table-cell office:value-type="float" office:value="1470.0357900000004" table:style-name="ce33">
            <text:p><text:s/>1,470<text:s/></text:p>
          </table:table-cell>
          <table:table-cell office:value-type="float" office:value="4196.4709499999999" table:formula="of:=SUM([.E101:.H101])" table:style-name="ce61">
            <text:p><text:s/>4,1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87.590930000000014" table:style-name="ce33">
            <text:p><text:s/>88<text:s/></text:p>
          </table:table-cell>
          <table:table-cell office:value-type="float" office:value="73.369950000000046" table:style-name="ce33">
            <text:p><text:s/>73<text:s/></text:p>
          </table:table-cell>
          <table:table-cell office:value-type="float" office:value="95.149469999999909" table:style-name="ce33">
            <text:p><text:s/>95<text:s/></text:p>
          </table:table-cell>
          <table:table-cell office:value-type="float" office:value="328.4955099999998" table:style-name="ce33">
            <text:p><text:s/>328<text:s/></text:p>
          </table:table-cell>
          <table:table-cell office:value-type="float" office:value="584.60585999999978" table:formula="of:=SUM([.E102:.H102])" table:style-name="ce61">
            <text:p><text:s/>5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024.7763200000002" table:formula="of:=SUM([.E101:.E102])" table:style-name="ce127">
            <text:p><text:s/>1,025<text:s/></text:p>
          </table:table-cell>
          <table:table-cell office:value-type="float" office:value="586.47914000000003" table:formula="of:=SUM([.F101:.F102])" table:style-name="ce65">
            <text:p><text:s/>586<text:s/></text:p>
          </table:table-cell>
          <table:table-cell office:value-type="float" office:value="1371.2900499999992" table:formula="of:=SUM([.G101:.G102])" table:style-name="ce65">
            <text:p><text:s/>1,371<text:s/></text:p>
          </table:table-cell>
          <table:table-cell office:value-type="float" office:value="1798.5313000000001" table:formula="of:=SUM([.H101:.H102])" table:style-name="ce65">
            <text:p><text:s/>1,799<text:s/></text:p>
          </table:table-cell>
          <table:table-cell office:value-type="float" office:value="4781.0768099999996" table:formula="of:=SUM([.I101:.I102])" table:style-name="ce66">
            <text:p><text:s/>4,78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66.242099999999994" table:style-name="ce32">
            <text:p><text:s/>66<text:s/></text:p>
          </table:table-cell>
          <table:table-cell office:value-type="float" office:value="117.8866" table:style-name="ce33">
            <text:p><text:s/>118<text:s/></text:p>
          </table:table-cell>
          <table:table-cell office:value-type="float" office:value="37.094809999999988" table:style-name="ce33">
            <text:p><text:s/>37<text:s/></text:p>
          </table:table-cell>
          <table:table-cell office:value-type="float" office:value="687.3684199999999" table:style-name="ce33">
            <text:p><text:s/>687<text:s/></text:p>
          </table:table-cell>
          <table:table-cell office:value-type="float" office:value="908.59192999999982" table:formula="of:=SUM([.E104:.H104])" table:style-name="ce61">
            <text:p><text:s/>9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565.52600000000007" table:style-name="ce32">
            <text:p><text:s/>566<text:s/></text:p>
          </table:table-cell>
          <table:table-cell office:value-type="float" office:value="83.003010000000003" table:style-name="ce33">
            <text:p><text:s/>83<text:s/></text:p>
          </table:table-cell>
          <table:table-cell office:value-type="float" office:value="507.47800999999993" table:style-name="ce33">
            <text:p><text:s/>507<text:s/></text:p>
          </table:table-cell>
          <table:table-cell office:value-type="float" office:value="397.4008" table:style-name="ce33">
            <text:p><text:s/>397<text:s/></text:p>
          </table:table-cell>
          <table:table-cell office:value-type="float" office:value="1553.4078199999999" table:formula="of:=SUM([.E105:.H105])" table:style-name="ce61">
            <text:p><text:s/>1,55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10.69781" table:style-name="ce32">
            <text:p><text:s/>11<text:s/></text:p>
          </table:table-cell>
          <table:table-cell office:value-type="float" office:value="72.493920000000003" table:style-name="ce33">
            <text:p><text:s/>72<text:s/></text:p>
          </table:table-cell>
          <table:table-cell office:value-type="float" office:value="192.06459999999998" table:style-name="ce33">
            <text:p><text:s/>192<text:s/></text:p>
          </table:table-cell>
          <table:table-cell office:value-type="float" office:value="143.59370000000001" table:style-name="ce33">
            <text:p><text:s/>144<text:s/></text:p>
          </table:table-cell>
          <table:table-cell office:value-type="float" office:value="418.85003" table:formula="of:=SUM([.E106:.H106])" table:style-name="ce61">
            <text:p><text:s/>4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5.0226699999999997" table:style-name="ce33">
            <text:p><text:s/>5<text:s/></text:p>
          </table:table-cell>
          <table:table-cell office:value-type="float" office:value="76.897199999999955" table:style-name="ce33">
            <text:p><text:s/>77<text:s/></text:p>
          </table:table-cell>
          <table:table-cell office:value-type="float" office:value="147.65561000000008" table:style-name="ce33">
            <text:p><text:s/>148<text:s/></text:p>
          </table:table-cell>
          <table:table-cell office:value-type="float" office:value="229.57548000000003" table:formula="of:=SUM([.E107:.H107])" table:style-name="ce61">
            <text:p><text:s/>23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85.25775999999999" table:style-name="ce32">
            <text:p><text:s/>85<text:s/></text:p>
          </table:table-cell>
          <table:table-cell office:value-type="float" office:value="24.323619999999995" table:style-name="ce33">
            <text:p><text:s/>24<text:s/></text:p>
          </table:table-cell>
          <table:table-cell office:value-type="float" office:value="131.61163999999997" table:style-name="ce33">
            <text:p><text:s/>132<text:s/></text:p>
          </table:table-cell>
          <table:table-cell office:value-type="float" office:value="38.84281" table:style-name="ce33">
            <text:p><text:s/>39<text:s/></text:p>
          </table:table-cell>
          <table:table-cell office:value-type="float" office:value="280.03582999999992" table:formula="of:=SUM([.E108:.H108])" table:style-name="ce61">
            <text:p><text:s/>2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30.29419" table:style-name="ce32">
            <text:p><text:s/>30<text:s/></text:p>
          </table:table-cell>
          <table:table-cell office:value-type="float" office:value="1.81528" table:style-name="ce33">
            <text:p><text:s/>2<text:s/></text:p>
          </table:table-cell>
          <table:table-cell office:value-type="float" office:value="42.51437" table:style-name="ce33">
            <text:p><text:s/>43<text:s/></text:p>
          </table:table-cell>
          <table:table-cell office:value-type="float" office:value="87.528360000000006" table:style-name="ce33">
            <text:p><text:s/>88<text:s/></text:p>
          </table:table-cell>
          <table:table-cell office:value-type="float" office:value="162.15219999999999" table:formula="of:=SUM([.E109:.H109])" table:style-name="ce61">
            <text:p><text:s/>16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758.01785999999993" table:formula="of:=SUM([.E104:.E109])" table:style-name="ce65">
            <text:p><text:s/>758<text:s/></text:p>
          </table:table-cell>
          <table:table-cell office:value-type="float" office:value="304.54509999999999" table:formula="of:=SUM([.F104:.F109])" table:style-name="ce65">
            <text:p><text:s/>305<text:s/></text:p>
          </table:table-cell>
          <table:table-cell office:value-type="float" office:value="987.66062999999974" table:formula="of:=SUM([.G104:.G109])" table:style-name="ce65">
            <text:p><text:s/>988<text:s/></text:p>
          </table:table-cell>
          <table:table-cell office:value-type="float" office:value="1502.3897000000002" table:formula="of:=SUM([.H104:.H109])" table:style-name="ce65">
            <text:p><text:s/>1,502<text:s/></text:p>
          </table:table-cell>
          <table:table-cell office:value-type="float" office:value="3552.6132899999998" table:formula="of:=SUM([.I104:.I109])" table:style-name="ce66">
            <text:p><text:s/>3,55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ismantler</text:p>
          </table:table-cell>
          <table:table-cell office:value-type="float" office:value="3.8155399999999999" table:style-name="ce32">
            <text:p><text:s/>4<text:s/></text:p>
          </table:table-cell>
          <table:table-cell office:value-type="float" office:value="9.1801700000000004" table:style-name="ce33">
            <text:p><text:s/>9<text:s/></text:p>
          </table:table-cell>
          <table:table-cell office:value-type="float" office:value="51.967449999999992" table:style-name="ce33">
            <text:p><text:s/>52<text:s/></text:p>
          </table:table-cell>
          <table:table-cell office:value-type="float" office:value="22.777919999999995" table:style-name="ce33">
            <text:p><text:s/>23<text:s/></text:p>
          </table:table-cell>
          <table:table-cell office:value-type="float" office:value="87.741079999999982" table:formula="of:=SUM([.E111:.H111])" table:style-name="ce61">
            <text:p><text:s/>8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171.80019999999999" table:style-name="ce32">
            <text:p><text:s/>172<text:s/></text:p>
          </table:table-cell>
          <table:table-cell office:value-type="float" office:value="55.110579999999992" table:style-name="ce33">
            <text:p><text:s/>55<text:s/></text:p>
          </table:table-cell>
          <table:table-cell office:value-type="float" office:value="516.19500999999991" table:style-name="ce33">
            <text:p><text:s/>516<text:s/></text:p>
          </table:table-cell>
          <table:table-cell office:value-type="float" office:value="421.36290999999994" table:style-name="ce33">
            <text:p><text:s/>421<text:s/></text:p>
          </table:table-cell>
          <table:table-cell office:value-type="float" office:value="1164.4686999999999" table:formula="of:=SUM([.E112:.H112])" table:style-name="ce61">
            <text:p><text:s/>1,16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175.61573999999999" table:formula="of:=SUM([.E111:.E112])" table:style-name="ce65">
            <text:p><text:s/>176<text:s/></text:p>
          </table:table-cell>
          <table:table-cell office:value-type="float" office:value="64.290749999999989" table:formula="of:=SUM([.F111:.F112])" table:style-name="ce65">
            <text:p><text:s/>64<text:s/></text:p>
          </table:table-cell>
          <table:table-cell office:value-type="float" office:value="568.1624599999999" table:formula="of:=SUM([.G111:.G112])" table:style-name="ce65">
            <text:p><text:s/>568<text:s/></text:p>
          </table:table-cell>
          <table:table-cell office:value-type="float" office:value="444.14082999999994" table:formula="of:=SUM([.H111:.H112])" table:style-name="ce65">
            <text:p><text:s/>444<text:s/></text:p>
          </table:table-cell>
          <table:table-cell office:value-type="float" office:value="1252.2097799999999" table:formula="of:=SUM([.I111:.I112])" table:style-name="ce66">
            <text:p><text:s/>1,25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09 Total</text:p>
          </table:table-cell>
          <table:table-cell table:number-columns-repeated="2" table:style-name="ce72"/>
          <table:table-cell office:value-type="float" office:value="1958.4099200000001" table:formula="of:=+[.E113]+[.E110]+[.E103]" table:style-name="ce134">
            <text:p><text:s/>1,958<text:s/></text:p>
          </table:table-cell>
          <table:table-cell office:value-type="float" office:value="955.31499000000008" table:formula="of:=+[.F113]+[.F110]+[.F103]" table:style-name="ce134">
            <text:p><text:s/>955<text:s/></text:p>
          </table:table-cell>
          <table:table-cell office:value-type="float" office:value="2927.1131399999986" table:formula="of:=+[.G113]+[.G110]+[.G103]" table:style-name="ce134">
            <text:p><text:s/>2,927<text:s/></text:p>
          </table:table-cell>
          <table:table-cell office:value-type="float" office:value="3745.0618300000001" table:formula="of:=+[.H113]+[.H110]+[.H103]" table:style-name="ce134">
            <text:p><text:s/>3,745<text:s/></text:p>
          </table:table-cell>
          <table:table-cell office:value-type="float" office:value="9585.899879999999" table:formula="of:=+[.I113]+[.I110]+[.I103]" table:style-name="ce74">
            <text:p><text:s/>9,58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0" table:number-columns-spanned="1" table:number-rows-spanned="13" table:style-name="ce347">
            <text:p>2010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884.16999299999964" table:style-name="ce33">
            <text:p><text:s/>884<text:s/></text:p>
          </table:table-cell>
          <table:table-cell office:value-type="float" office:value="425.09300999999994" table:style-name="ce33">
            <text:p><text:s/>425<text:s/></text:p>
          </table:table-cell>
          <table:table-cell office:value-type="float" office:value="1434.366422999999" table:style-name="ce33">
            <text:p><text:s/>1,434<text:s/></text:p>
          </table:table-cell>
          <table:table-cell office:value-type="float" office:value="1136.8010160000006" table:style-name="ce33">
            <text:p><text:s/>1,137<text:s/></text:p>
          </table:table-cell>
          <table:table-cell office:value-type="float" office:value="3880.4304419999989" table:formula="of:=SUM([.E115:.H115])" table:style-name="ce61">
            <text:p><text:s/>3,8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84.556067999999968" table:style-name="ce33">
            <text:p><text:s/>85<text:s/></text:p>
          </table:table-cell>
          <table:table-cell office:value-type="float" office:value="71.172198999999907" table:style-name="ce33">
            <text:p><text:s/>71<text:s/></text:p>
          </table:table-cell>
          <table:table-cell office:value-type="float" office:value="67.615192999999991" table:style-name="ce33">
            <text:p><text:s/>68<text:s/></text:p>
          </table:table-cell>
          <table:table-cell office:value-type="float" office:value="267.60821200000004" table:style-name="ce33">
            <text:p><text:s/>268<text:s/></text:p>
          </table:table-cell>
          <table:table-cell office:value-type="float" office:value="490.95167199999992" table:formula="of:=SUM([.E116:.H116])" table:style-name="ce61">
            <text:p><text:s/>49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968.72606099999962" table:formula="of:=SUM([.E115:.E116])" table:style-name="ce127">
            <text:p><text:s/>969<text:s/></text:p>
          </table:table-cell>
          <table:table-cell office:value-type="float" office:value="496.26520899999986" table:formula="of:=SUM([.F115:.F116])" table:style-name="ce65">
            <text:p><text:s/>496<text:s/></text:p>
          </table:table-cell>
          <table:table-cell office:value-type="float" office:value="1501.9816159999991" table:formula="of:=SUM([.G115:.G116])" table:style-name="ce65">
            <text:p><text:s/>1,502<text:s/></text:p>
          </table:table-cell>
          <table:table-cell office:value-type="float" office:value="1404.4092280000007" table:formula="of:=SUM([.H115:.H116])" table:style-name="ce65">
            <text:p><text:s/>1,404<text:s/></text:p>
          </table:table-cell>
          <table:table-cell office:value-type="float" office:value="4371.3821139999991" table:formula="of:=SUM([.I115:.I116])" table:style-name="ce66">
            <text:p><text:s/>4,37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77.928885999999991" table:style-name="ce32">
            <text:p><text:s/>78<text:s/></text:p>
          </table:table-cell>
          <table:table-cell office:value-type="float" office:value="146.87278000000001" table:style-name="ce33">
            <text:p><text:s/>147<text:s/></text:p>
          </table:table-cell>
          <table:table-cell office:value-type="float" office:value="37.811186999999997" table:style-name="ce33">
            <text:p><text:s/>38<text:s/></text:p>
          </table:table-cell>
          <table:table-cell office:value-type="float" office:value="574.60465399999998" table:style-name="ce33">
            <text:p><text:s/>575<text:s/></text:p>
          </table:table-cell>
          <table:table-cell office:value-type="float" office:value="837.21750700000007" table:formula="of:=SUM([.E118:.H118])" table:style-name="ce61">
            <text:p><text:s/>83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540.13617099999999" table:style-name="ce32">
            <text:p><text:s/>540<text:s/></text:p>
          </table:table-cell>
          <table:table-cell office:value-type="float" office:value="93.022320000000008" table:style-name="ce33">
            <text:p><text:s/>93<text:s/></text:p>
          </table:table-cell>
          <table:table-cell office:value-type="float" office:value="776.0234210000001" table:style-name="ce33">
            <text:p><text:s/>776<text:s/></text:p>
          </table:table-cell>
          <table:table-cell office:value-type="float" office:value="408.58389100000005" table:style-name="ce33">
            <text:p><text:s/>409<text:s/></text:p>
          </table:table-cell>
          <table:table-cell office:value-type="float" office:value="1817.765803" table:formula="of:=SUM([.E119:.H119])" table:style-name="ce61">
            <text:p><text:s/>1,8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24.516179999999999" table:style-name="ce32">
            <text:p><text:s/>25<text:s/></text:p>
          </table:table-cell>
          <table:table-cell office:value-type="float" office:value="14.838871000000001" table:style-name="ce33">
            <text:p><text:s/>15<text:s/></text:p>
          </table:table-cell>
          <table:table-cell office:value-type="float" office:value="285.55150499999996" table:style-name="ce33">
            <text:p><text:s/>286<text:s/></text:p>
          </table:table-cell>
          <table:table-cell office:value-type="float" office:value="296.65108500000008" table:style-name="ce33">
            <text:p><text:s/>297<text:s/></text:p>
          </table:table-cell>
          <table:table-cell office:value-type="float" office:value="621.5576410000001" table:formula="of:=SUM([.E120:.H120])" table:style-name="ce61">
            <text:p><text:s/>62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.0164309999999999" table:style-name="ce33">
            <text:p><text:s/>3<text:s/></text:p>
          </table:table-cell>
          <table:table-cell office:value-type="float" office:value="67.443689999999933" table:style-name="ce33">
            <text:p><text:s/>67<text:s/></text:p>
          </table:table-cell>
          <table:table-cell office:value-type="float" office:value="162.93264299999998" table:style-name="ce33">
            <text:p><text:s/>163<text:s/></text:p>
          </table:table-cell>
          <table:table-cell office:value-type="float" office:value="233.39276399999991" table:formula="of:=SUM([.E121:.H121])" table:style-name="ce61">
            <text:p><text:s/>2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86.309129999999982" table:style-name="ce32">
            <text:p><text:s/>86<text:s/></text:p>
          </table:table-cell>
          <table:table-cell office:value-type="float" office:value="63.140839999999997" table:style-name="ce33">
            <text:p><text:s/>63<text:s/></text:p>
          </table:table-cell>
          <table:table-cell office:value-type="float" office:value="106.27026600000001" table:style-name="ce33">
            <text:p><text:s/>106<text:s/></text:p>
          </table:table-cell>
          <table:table-cell office:value-type="float" office:value="38.607749999999996" table:style-name="ce33">
            <text:p><text:s/>39<text:s/></text:p>
          </table:table-cell>
          <table:table-cell office:value-type="float" office:value="294.32798600000001" table:formula="of:=SUM([.E122:.H122])" table:style-name="ce61">
            <text:p><text:s/>2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103.86107000000001" table:style-name="ce32">
            <text:p><text:s/>104<text:s/></text:p>
          </table:table-cell>
          <table:table-cell office:value-type="float" office:value="0.42957999999999996" table:style-name="ce33">
            <text:p><text:s/>0<text:s/></text:p>
          </table:table-cell>
          <table:table-cell office:value-type="float" office:value="41.04569" table:style-name="ce33">
            <text:p><text:s/>41<text:s/></text:p>
          </table:table-cell>
          <table:table-cell office:value-type="float" office:value="60.944327000000001" table:style-name="ce33">
            <text:p><text:s/>61<text:s/></text:p>
          </table:table-cell>
          <table:table-cell office:value-type="float" office:value="206.28066699999999" table:formula="of:=SUM([.E123:.H123])" table:style-name="ce61">
            <text:p><text:s/>20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832.75143700000001" table:formula="of:=SUM([.E118:.E123])" table:style-name="ce65">
            <text:p><text:s/>833<text:s/></text:p>
          </table:table-cell>
          <table:table-cell office:value-type="float" office:value="321.32082200000002" table:formula="of:=SUM([.F118:.F123])" table:style-name="ce65">
            <text:p><text:s/>321<text:s/></text:p>
          </table:table-cell>
          <table:table-cell office:value-type="float" office:value="1314.1457589999998" table:formula="of:=SUM([.G118:.G123])" table:style-name="ce65">
            <text:p><text:s/>1,314<text:s/></text:p>
          </table:table-cell>
          <table:table-cell office:value-type="float" office:value="1542.3243499999999" table:formula="of:=SUM([.H118:.H123])" table:style-name="ce65">
            <text:p><text:s/>1,542<text:s/></text:p>
          </table:table-cell>
          <table:table-cell office:value-type="float" office:value="4010.5423679999994" table:formula="of:=SUM([.I118:.I123])" table:style-name="ce66">
            <text:p><text:s/>4,0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14.191235000000002" table:style-name="ce32">
            <text:p><text:s/>14<text:s/></text:p>
          </table:table-cell>
          <table:table-cell office:value-type="float" office:value="9.5050609999999995" table:style-name="ce33">
            <text:p><text:s/>10<text:s/></text:p>
          </table:table-cell>
          <table:table-cell office:value-type="float" office:value="69.307948999999979" table:style-name="ce33">
            <text:p><text:s/>69<text:s/></text:p>
          </table:table-cell>
          <table:table-cell office:value-type="float" office:value="21.673645000000004" table:style-name="ce33">
            <text:p><text:s/>22<text:s/></text:p>
          </table:table-cell>
          <table:table-cell office:value-type="float" office:value="114.67788999999999" table:formula="of:=SUM([.E125:.H125])" table:style-name="ce61">
            <text:p><text:s/>1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189.52781900000008" table:style-name="ce32">
            <text:p><text:s/>190<text:s/></text:p>
          </table:table-cell>
          <table:table-cell office:value-type="float" office:value="51.320988000000007" table:style-name="ce33">
            <text:p><text:s/>51<text:s/></text:p>
          </table:table-cell>
          <table:table-cell office:value-type="float" office:value="345.88324500000004" table:style-name="ce33">
            <text:p><text:s/>346<text:s/></text:p>
          </table:table-cell>
          <table:table-cell office:value-type="float" office:value="453.1177350000001" table:style-name="ce33">
            <text:p><text:s/>453<text:s/></text:p>
          </table:table-cell>
          <table:table-cell office:value-type="float" office:value="1039.8497870000001" table:formula="of:=SUM([.E126:.H126])" table:style-name="ce61">
            <text:p><text:s/>1,04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203.71905400000009" table:formula="of:=SUM([.E125:.E126])" table:style-name="ce65">
            <text:p><text:s/>204<text:s/></text:p>
          </table:table-cell>
          <table:table-cell office:value-type="float" office:value="60.826049000000005" table:formula="of:=SUM([.F125:.F126])" table:style-name="ce65">
            <text:p><text:s/>61<text:s/></text:p>
          </table:table-cell>
          <table:table-cell office:value-type="float" office:value="415.191194" table:formula="of:=SUM([.G125:.G126])" table:style-name="ce65">
            <text:p><text:s/>415<text:s/></text:p>
          </table:table-cell>
          <table:table-cell office:value-type="float" office:value="474.79138000000012" table:formula="of:=SUM([.H125:.H126])" table:style-name="ce65">
            <text:p><text:s/>475<text:s/></text:p>
          </table:table-cell>
          <table:table-cell office:value-type="float" office:value="1154.527677" table:formula="of:=SUM([.I125:.I126])" table:style-name="ce66">
            <text:p><text:s/>1,155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0 Total</text:p>
          </table:table-cell>
          <table:table-cell table:number-columns-repeated="2" table:style-name="ce72"/>
          <table:table-cell office:value-type="float" office:value="2005.1965519999997" table:formula="of:=+[.E127]+[.E124]+[.E117]" table:style-name="ce134">
            <text:p><text:s/>2,005<text:s/></text:p>
          </table:table-cell>
          <table:table-cell office:value-type="float" office:value="878.41207999999983" table:formula="of:=+[.F127]+[.F124]+[.F117]" table:style-name="ce134">
            <text:p><text:s/>878<text:s/></text:p>
          </table:table-cell>
          <table:table-cell office:value-type="float" office:value="3231.3185689999991" table:formula="of:=+[.G127]+[.G124]+[.G117]" table:style-name="ce134">
            <text:p><text:s/>3,231<text:s/></text:p>
          </table:table-cell>
          <table:table-cell office:value-type="float" office:value="3421.5249580000009" table:formula="of:=+[.H127]+[.H124]+[.H117]" table:style-name="ce134">
            <text:p><text:s/>3,422<text:s/></text:p>
          </table:table-cell>
          <table:table-cell office:value-type="float" office:value="9536.4521589999986" table:formula="of:=+[.I127]+[.I124]+[.I117]" table:style-name="ce74">
            <text:p><text:s/>9,53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1" table:number-columns-spanned="1" table:number-rows-spanned="13" table:style-name="ce347">
            <text:p>2011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114.4066049999999" table:style-name="ce33">
            <text:p><text:s/>1,114<text:s/></text:p>
          </table:table-cell>
          <table:table-cell office:value-type="float" office:value="392.16276799999997" table:style-name="ce33">
            <text:p><text:s/>392<text:s/></text:p>
          </table:table-cell>
          <table:table-cell office:value-type="float" office:value="1555.8998359999998" table:style-name="ce33">
            <text:p><text:s/>1,556<text:s/></text:p>
          </table:table-cell>
          <table:table-cell office:value-type="float" office:value="1208.8452830000003" table:style-name="ce33">
            <text:p><text:s/>1,209<text:s/></text:p>
          </table:table-cell>
          <table:table-cell office:value-type="float" office:value="4271.3144920000004" table:formula="of:=SUM([.E129:.H129])" table:style-name="ce61">
            <text:p><text:s/>4,27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94.726165999999949" table:style-name="ce33">
            <text:p><text:s/>95<text:s/></text:p>
          </table:table-cell>
          <table:table-cell office:value-type="float" office:value="77.419028000000026" table:style-name="ce33">
            <text:p><text:s/>77<text:s/></text:p>
          </table:table-cell>
          <table:table-cell office:value-type="float" office:value="71.941148999999982" table:style-name="ce33">
            <text:p><text:s/>72<text:s/></text:p>
          </table:table-cell>
          <table:table-cell office:value-type="float" office:value="267.86988099999991" table:style-name="ce33">
            <text:p><text:s/>268<text:s/></text:p>
          </table:table-cell>
          <table:table-cell office:value-type="float" office:value="511.95622399999985" table:formula="of:=SUM([.E130:.H130])" table:style-name="ce61">
            <text:p><text:s/>5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209.1327709999998" table:formula="of:=SUM([.E129:.E130])" table:style-name="ce127">
            <text:p><text:s/>1,209<text:s/></text:p>
          </table:table-cell>
          <table:table-cell office:value-type="float" office:value="469.581796" table:formula="of:=SUM([.F129:.F130])" table:style-name="ce65">
            <text:p><text:s/>470<text:s/></text:p>
          </table:table-cell>
          <table:table-cell office:value-type="float" office:value="1627.8409849999998" table:formula="of:=SUM([.G129:.G130])" table:style-name="ce65">
            <text:p><text:s/>1,628<text:s/></text:p>
          </table:table-cell>
          <table:table-cell office:value-type="float" office:value="1476.7151640000002" table:formula="of:=SUM([.H129:.H130])" table:style-name="ce65">
            <text:p><text:s/>1,477<text:s/></text:p>
          </table:table-cell>
          <table:table-cell office:value-type="float" office:value="4783.270716" table:formula="of:=SUM([.I129:.I130])" table:style-name="ce66">
            <text:p><text:s/>4,7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89.657956999999996" table:style-name="ce32">
            <text:p><text:s/>90<text:s/></text:p>
          </table:table-cell>
          <table:table-cell office:value-type="float" office:value="126.83161" table:style-name="ce33">
            <text:p><text:s/>127<text:s/></text:p>
          </table:table-cell>
          <table:table-cell office:value-type="float" office:value="59.934962999999996" table:style-name="ce33">
            <text:p><text:s/>60<text:s/></text:p>
          </table:table-cell>
          <table:table-cell office:value-type="float" office:value="533.51461699999993" table:style-name="ce33">
            <text:p><text:s/>534<text:s/></text:p>
          </table:table-cell>
          <table:table-cell office:value-type="float" office:value="809.93914699999993" table:formula="of:=SUM([.E132:.H132])" table:style-name="ce61">
            <text:p><text:s/>8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533.73168400000009" table:style-name="ce32">
            <text:p><text:s/>534<text:s/></text:p>
          </table:table-cell>
          <table:table-cell office:value-type="float" office:value="132.01531600000001" table:style-name="ce33">
            <text:p><text:s/>132<text:s/></text:p>
          </table:table-cell>
          <table:table-cell office:value-type="float" office:value="720.59542899999963" table:style-name="ce33">
            <text:p><text:s/>721<text:s/></text:p>
          </table:table-cell>
          <table:table-cell office:value-type="float" office:value="493.49103099999996" table:style-name="ce33">
            <text:p><text:s/>493<text:s/></text:p>
          </table:table-cell>
          <table:table-cell office:value-type="float" office:value="1879.8334599999998" table:formula="of:=SUM([.E133:.H133])" table:style-name="ce61">
            <text:p><text:s/>1,8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21.624959999999998" table:style-name="ce32">
            <text:p><text:s/>22<text:s/></text:p>
          </table:table-cell>
          <table:table-cell office:value-type="float" office:value="13.69642" table:style-name="ce33">
            <text:p><text:s/>14<text:s/></text:p>
          </table:table-cell>
          <table:table-cell office:value-type="float" office:value="169.467884" table:style-name="ce33">
            <text:p><text:s/>169<text:s/></text:p>
          </table:table-cell>
          <table:table-cell office:value-type="float" office:value="269.36045300000001" table:style-name="ce33">
            <text:p><text:s/>269<text:s/></text:p>
          </table:table-cell>
          <table:table-cell office:value-type="float" office:value="474.14971700000001" table:formula="of:=SUM([.E134:.H134])" table:style-name="ce61">
            <text:p><text:s/>47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9.228626000000006" table:style-name="ce33">
            <text:p><text:s/>59<text:s/></text:p>
          </table:table-cell>
          <table:table-cell office:value-type="float" office:value="155.61351400000001" table:style-name="ce33">
            <text:p><text:s/>156<text:s/></text:p>
          </table:table-cell>
          <table:table-cell office:value-type="float" office:value="214.84214000000003" table:formula="of:=SUM([.E135:.H135])" table:style-name="ce61">
            <text:p><text:s/>2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171.77070000000001" table:style-name="ce32">
            <text:p><text:s/>172<text:s/></text:p>
          </table:table-cell>
          <table:table-cell office:value-type="float" office:value="73.170649999999995" table:style-name="ce33">
            <text:p><text:s/>73<text:s/></text:p>
          </table:table-cell>
          <table:table-cell office:value-type="float" office:value="120.24030200000001" table:style-name="ce33">
            <text:p><text:s/>120<text:s/></text:p>
          </table:table-cell>
          <table:table-cell office:value-type="float" office:value="41.866579999999999" table:style-name="ce33">
            <text:p><text:s/>42<text:s/></text:p>
          </table:table-cell>
          <table:table-cell office:value-type="float" office:value="407.04823199999998" table:formula="of:=SUM([.E136:.H136])" table:style-name="ce61">
            <text:p><text:s/>4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294.13390099999998" table:style-name="ce32">
            <text:p><text:s/>294<text:s/></text:p>
          </table:table-cell>
          <table:table-cell office:value-type="float" office:value="1.1599999999999999" table:style-name="ce33">
            <text:p><text:s/>1<text:s/></text:p>
          </table:table-cell>
          <table:table-cell office:value-type="float" office:value="43.181455999999997" table:style-name="ce33">
            <text:p><text:s/>43<text:s/></text:p>
          </table:table-cell>
          <table:table-cell office:value-type="float" office:value="84.469815000000011" table:style-name="ce33">
            <text:p><text:s/>84<text:s/></text:p>
          </table:table-cell>
          <table:table-cell office:value-type="float" office:value="422.94517200000007" table:formula="of:=SUM([.E137:.H137])" table:style-name="ce61">
            <text:p><text:s/>4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1110.919202" table:formula="of:=SUM([.E132:.E137])" table:style-name="ce65">
            <text:p><text:s/>1,111<text:s/></text:p>
          </table:table-cell>
          <table:table-cell office:value-type="float" office:value="346.87399599999998" table:formula="of:=SUM([.F132:.F137])" table:style-name="ce65">
            <text:p><text:s/>347<text:s/></text:p>
          </table:table-cell>
          <table:table-cell office:value-type="float" office:value="1172.6486599999996" table:formula="of:=SUM([.G132:.G137])" table:style-name="ce65">
            <text:p><text:s/>1,173<text:s/></text:p>
          </table:table-cell>
          <table:table-cell office:value-type="float" office:value="1578.3160099999996" table:formula="of:=SUM([.H132:.H137])" table:style-name="ce65">
            <text:p><text:s/>1,578<text:s/></text:p>
          </table:table-cell>
          <table:table-cell office:value-type="float" office:value="4208.7578680000006" table:formula="of:=SUM([.I132:.I137])" table:style-name="ce66">
            <text:p><text:s/>4,2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8.5963449999999995" table:style-name="ce32">
            <text:p><text:s/>9<text:s/></text:p>
          </table:table-cell>
          <table:table-cell office:value-type="float" office:value="6.2409160000000004" table:style-name="ce33">
            <text:p><text:s/>6<text:s/></text:p>
          </table:table-cell>
          <table:table-cell office:value-type="float" office:value="68.25483899999999" table:style-name="ce33">
            <text:p><text:s/>68<text:s/></text:p>
          </table:table-cell>
          <table:table-cell office:value-type="float" office:value="73.966931999999986" table:style-name="ce33">
            <text:p><text:s/>74<text:s/></text:p>
          </table:table-cell>
          <table:table-cell office:value-type="float" office:value="157.05903199999997" table:formula="of:=SUM([.E139:.H139])" table:style-name="ce61">
            <text:p><text:s/>15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253.90187899999992" table:style-name="ce32">
            <text:p><text:s/>254<text:s/></text:p>
          </table:table-cell>
          <table:table-cell office:value-type="float" office:value="49.703821999999995" table:style-name="ce33">
            <text:p><text:s/>50<text:s/></text:p>
          </table:table-cell>
          <table:table-cell office:value-type="float" office:value="637.69855200000006" table:style-name="ce33">
            <text:p><text:s/>638<text:s/></text:p>
          </table:table-cell>
          <table:table-cell office:value-type="float" office:value="486.593504" table:style-name="ce33">
            <text:p><text:s/>487<text:s/></text:p>
          </table:table-cell>
          <table:table-cell office:value-type="float" office:value="1427.897757" table:formula="of:=SUM([.E140:.H140])" table:style-name="ce61">
            <text:p><text:s/>1,4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262.49822399999994" table:formula="of:=SUM([.E139:.E140])" table:style-name="ce65">
            <text:p><text:s/>262<text:s/></text:p>
          </table:table-cell>
          <table:table-cell office:value-type="float" office:value="55.944737999999994" table:formula="of:=SUM([.F139:.F140])" table:style-name="ce65">
            <text:p><text:s/>56<text:s/></text:p>
          </table:table-cell>
          <table:table-cell office:value-type="float" office:value="705.95339100000001" table:formula="of:=SUM([.G139:.G140])" table:style-name="ce65">
            <text:p><text:s/>706<text:s/></text:p>
          </table:table-cell>
          <table:table-cell office:value-type="float" office:value="560.56043599999998" table:formula="of:=SUM([.H139:.H140])" table:style-name="ce65">
            <text:p><text:s/>561<text:s/></text:p>
          </table:table-cell>
          <table:table-cell office:value-type="float" office:value="1584.9567889999998" table:formula="of:=SUM([.I139:.I140])" table:style-name="ce66">
            <text:p><text:s/>1,585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1 Total</text:p>
          </table:table-cell>
          <table:table-cell table:number-columns-repeated="2" table:style-name="ce72"/>
          <table:table-cell office:value-type="float" office:value="2582.5501969999996" table:formula="of:=+[.E141]+[.E138]+[.E131]" table:style-name="ce134">
            <text:p><text:s/>2,583<text:s/></text:p>
          </table:table-cell>
          <table:table-cell office:value-type="float" office:value="872.40052999999989" table:formula="of:=+[.F141]+[.F138]+[.F131]" table:style-name="ce134">
            <text:p><text:s/>872<text:s/></text:p>
          </table:table-cell>
          <table:table-cell office:value-type="float" office:value="3506.4430359999997" table:formula="of:=+[.G141]+[.G138]+[.G131]" table:style-name="ce134">
            <text:p><text:s/>3,506<text:s/></text:p>
          </table:table-cell>
          <table:table-cell office:value-type="float" office:value="3615.5916099999995" table:formula="of:=+[.H141]+[.H138]+[.H131]" table:style-name="ce134">
            <text:p><text:s/>3,616<text:s/></text:p>
          </table:table-cell>
          <table:table-cell office:value-type="float" office:value="10576.985373" table:formula="of:=+[.I141]+[.I138]+[.I131]" table:style-name="ce74">
            <text:p><text:s/>10,577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2" table:number-columns-spanned="1" table:number-rows-spanned="13" table:style-name="ce347">
            <text:p>2012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304.7249880000013" table:style-name="ce135">
            <text:p><text:s/>1,305<text:s/></text:p>
          </table:table-cell>
          <table:table-cell office:value-type="float" office:value="370.45629699999984" table:style-name="ce135">
            <text:p><text:s/>370<text:s/></text:p>
          </table:table-cell>
          <table:table-cell office:value-type="float" office:value="1417.4266020000016" table:style-name="ce135">
            <text:p><text:s/>1,417<text:s/></text:p>
          </table:table-cell>
          <table:table-cell office:value-type="float" office:value="1082.9552709999994" table:style-name="ce135">
            <text:p><text:s/>1,083<text:s/></text:p>
          </table:table-cell>
          <table:table-cell office:value-type="float" office:value="4175.5631580000027" table:formula="of:=SUM([.E143:.H143])" table:style-name="ce61">
            <text:p><text:s/>4,17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82.419300000000007" table:style-name="ce33">
            <text:p><text:s/>82<text:s/></text:p>
          </table:table-cell>
          <table:table-cell office:value-type="float" office:value="76.12448000000002" table:style-name="ce33">
            <text:p><text:s/>76<text:s/></text:p>
          </table:table-cell>
          <table:table-cell office:value-type="float" office:value="63.889394999999986" table:style-name="ce33">
            <text:p><text:s/>64<text:s/></text:p>
          </table:table-cell>
          <table:table-cell office:value-type="float" office:value="243.16177200000001" table:style-name="ce33">
            <text:p><text:s/>243<text:s/></text:p>
          </table:table-cell>
          <table:table-cell office:value-type="float" office:value="465.59494700000005" table:formula="of:=SUM([.E144:.H144])" table:style-name="ce61">
            <text:p><text:s/>46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387.1442880000013" table:formula="of:=SUM([.E143:.E144])" table:style-name="ce127">
            <text:p><text:s/>1,387<text:s/></text:p>
          </table:table-cell>
          <table:table-cell office:value-type="float" office:value="446.58077699999984" table:formula="of:=SUM([.F143:.F144])" table:style-name="ce65">
            <text:p><text:s/>447<text:s/></text:p>
          </table:table-cell>
          <table:table-cell office:value-type="float" office:value="1481.3159970000015" table:formula="of:=SUM([.G143:.G144])" table:style-name="ce65">
            <text:p><text:s/>1,481<text:s/></text:p>
          </table:table-cell>
          <table:table-cell office:value-type="float" office:value="1326.1170429999993" table:formula="of:=SUM([.H143:.H144])" table:style-name="ce65">
            <text:p><text:s/>1,326<text:s/></text:p>
          </table:table-cell>
          <table:table-cell office:value-type="float" office:value="4641.1581050000023" table:formula="of:=SUM([.I143:.I144])" table:style-name="ce66">
            <text:p><text:s/>4,6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100.15461599999999" table:style-name="ce28">
            <text:p><text:s/>100<text:s/></text:p>
          </table:table-cell>
          <table:table-cell office:value-type="float" office:value="118.95944999999999" table:style-name="ce29">
            <text:p><text:s/>119<text:s/></text:p>
          </table:table-cell>
          <table:table-cell office:value-type="float" office:value="70.349168000000034" table:style-name="ce29">
            <text:p><text:s/>70<text:s/></text:p>
          </table:table-cell>
          <table:table-cell office:value-type="float" office:value="718.81673299999989" table:style-name="ce29">
            <text:p><text:s/>719<text:s/></text:p>
          </table:table-cell>
          <table:table-cell office:value-type="float" office:value="1008.2799669999999" table:formula="of:=SUM([.E146:.H146])" table:style-name="ce61">
            <text:p><text:s/>1,00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718.69600999999989" table:style-name="ce32">
            <text:p><text:s/>719<text:s/></text:p>
          </table:table-cell>
          <table:table-cell office:value-type="float" office:value="161.34211099999996" table:style-name="ce33">
            <text:p><text:s/>161<text:s/></text:p>
          </table:table-cell>
          <table:table-cell office:value-type="float" office:value="947.20926800000007" table:style-name="ce33">
            <text:p><text:s/>947<text:s/></text:p>
          </table:table-cell>
          <table:table-cell office:value-type="float" office:value="830.36459099999968" table:style-name="ce33">
            <text:p><text:s/>830<text:s/></text:p>
          </table:table-cell>
          <table:table-cell office:value-type="float" office:value="2657.6119799999997" table:formula="of:=SUM([.E147:.H147])" table:style-name="ce61">
            <text:p><text:s/>2,6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18.21" table:style-name="ce32">
            <text:p><text:s/>18<text:s/></text:p>
          </table:table-cell>
          <table:table-cell office:value-type="float" office:value="19.551331000000001" table:style-name="ce33">
            <text:p><text:s/>20<text:s/></text:p>
          </table:table-cell>
          <table:table-cell office:value-type="float" office:value="173.73317399999999" table:style-name="ce33">
            <text:p><text:s/>174<text:s/></text:p>
          </table:table-cell>
          <table:table-cell office:value-type="float" office:value="309.85639899999995" table:style-name="ce33">
            <text:p><text:s/>310<text:s/></text:p>
          </table:table-cell>
          <table:table-cell office:value-type="float" office:value="521.3509039999999" table:formula="of:=SUM([.E148:.H148])" table:style-name="ce61">
            <text:p><text:s/>5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78.737298000000067" table:style-name="ce33">
            <text:p><text:s/>79<text:s/></text:p>
          </table:table-cell>
          <table:table-cell office:value-type="float" office:value="195.11086599999976" table:style-name="ce33">
            <text:p><text:s/>195<text:s/></text:p>
          </table:table-cell>
          <table:table-cell office:value-type="float" office:value="273.84816399999983" table:formula="of:=SUM([.E149:.H149])" table:style-name="ce61">
            <text:p><text:s/>27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218.84499999999991" table:style-name="ce32">
            <text:p><text:s/>219<text:s/></text:p>
          </table:table-cell>
          <table:table-cell office:value-type="float" office:value="100.27034999999998" table:style-name="ce33">
            <text:p><text:s/>100<text:s/></text:p>
          </table:table-cell>
          <table:table-cell office:value-type="float" office:value="130.43455999999998" table:style-name="ce33">
            <text:p><text:s/>130<text:s/></text:p>
          </table:table-cell>
          <table:table-cell office:value-type="float" office:value="62.656000000000006" table:style-name="ce33">
            <text:p><text:s/>63<text:s/></text:p>
          </table:table-cell>
          <table:table-cell office:value-type="float" office:value="512.2059099999999" table:formula="of:=SUM([.E150:.H150])" table:style-name="ce61">
            <text:p><text:s/>5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253.66515500000003" table:style-name="ce32">
            <text:p><text:s/>254<text:s/></text:p>
          </table:table-cell>
          <table:table-cell office:value-type="float" office:value="2.3224" table:style-name="ce33">
            <text:p><text:s/>2<text:s/></text:p>
          </table:table-cell>
          <table:table-cell office:value-type="float" office:value="45.386080999999997" table:style-name="ce33">
            <text:p><text:s/>45<text:s/></text:p>
          </table:table-cell>
          <table:table-cell office:value-type="float" office:value="83.151039999999995" table:style-name="ce33">
            <text:p><text:s/>83<text:s/></text:p>
          </table:table-cell>
          <table:table-cell office:value-type="float" office:value="384.524676" table:formula="of:=SUM([.E151:.H151])" table:style-name="ce61">
            <text:p><text:s/>3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1309.5707809999999" table:formula="of:=SUM([.E146:.E151])" table:style-name="ce65">
            <text:p><text:s/>1,310<text:s/></text:p>
          </table:table-cell>
          <table:table-cell office:value-type="float" office:value="402.44564199999991" table:formula="of:=SUM([.F146:.F151])" table:style-name="ce65">
            <text:p><text:s/>402<text:s/></text:p>
          </table:table-cell>
          <table:table-cell office:value-type="float" office:value="1445.8495490000003" table:formula="of:=SUM([.G146:.G151])" table:style-name="ce65">
            <text:p><text:s/>1,446<text:s/></text:p>
          </table:table-cell>
          <table:table-cell office:value-type="float" office:value="2199.9556289999996" table:formula="of:=SUM([.H146:.H151])" table:style-name="ce65">
            <text:p><text:s/>2,200<text:s/></text:p>
          </table:table-cell>
          <table:table-cell office:value-type="float" office:value="5357.8216009999987" table:formula="of:=SUM([.I146:.I151])" table:style-name="ce66">
            <text:p><text:s/>5,3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8.2977150000000002" table:style-name="ce28">
            <text:p><text:s/>8<text:s/></text:p>
          </table:table-cell>
          <table:table-cell office:value-type="float" office:value="5.9148329999999989" table:style-name="ce29">
            <text:p><text:s/>6<text:s/></text:p>
          </table:table-cell>
          <table:table-cell office:value-type="float" office:value="94.267926000000017" table:style-name="ce29">
            <text:p><text:s/>94<text:s/></text:p>
          </table:table-cell>
          <table:table-cell office:value-type="float" office:value="81.998776999999976" table:style-name="ce29">
            <text:p><text:s/>82<text:s/></text:p>
          </table:table-cell>
          <table:table-cell office:value-type="float" office:value="190.47925099999998" table:formula="of:=SUM([.E153:.H153])" table:style-name="ce61">
            <text:p><text:s/>1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218.27335999999997" table:style-name="ce32">
            <text:p><text:s/>218<text:s/></text:p>
          </table:table-cell>
          <table:table-cell office:value-type="float" office:value="38.174032999999994" table:style-name="ce33">
            <text:p><text:s/>38<text:s/></text:p>
          </table:table-cell>
          <table:table-cell office:value-type="float" office:value="839.01608499999998" table:style-name="ce33">
            <text:p><text:s/>839<text:s/></text:p>
          </table:table-cell>
          <table:table-cell office:value-type="float" office:value="403.66996399999999" table:style-name="ce33">
            <text:p><text:s/>404<text:s/></text:p>
          </table:table-cell>
          <table:table-cell office:value-type="float" office:value="1499.1334419999998" table:formula="of:=SUM([.E154:.H154])" table:style-name="ce61">
            <text:p><text:s/>1,49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226.57107499999998" table:formula="of:=SUM([.E153:.E154])" table:style-name="ce65">
            <text:p><text:s/>227<text:s/></text:p>
          </table:table-cell>
          <table:table-cell office:value-type="float" office:value="44.088865999999996" table:formula="of:=SUM([.F153:.F154])" table:style-name="ce65">
            <text:p><text:s/>44<text:s/></text:p>
          </table:table-cell>
          <table:table-cell office:value-type="float" office:value="933.28401099999996" table:formula="of:=SUM([.G153:.G154])" table:style-name="ce65">
            <text:p><text:s/>933<text:s/></text:p>
          </table:table-cell>
          <table:table-cell office:value-type="float" office:value="485.66874099999995" table:formula="of:=SUM([.H153:.H154])" table:style-name="ce65">
            <text:p><text:s/>486<text:s/></text:p>
          </table:table-cell>
          <table:table-cell office:value-type="float" office:value="1689.6126929999998" table:formula="of:=SUM([.I153:.I154])" table:style-name="ce66">
            <text:p><text:s/>1,69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2 Total</text:p>
          </table:table-cell>
          <table:table-cell table:number-columns-repeated="2" table:style-name="ce72"/>
          <table:table-cell office:value-type="float" office:value="2923.2861440000015" table:formula="of:=+[.E155]+[.E152]+[.E145]" table:style-name="ce134">
            <text:p><text:s/>2,923<text:s/></text:p>
          </table:table-cell>
          <table:table-cell office:value-type="float" office:value="893.11528499999974" table:formula="of:=+[.F155]+[.F152]+[.F145]" table:style-name="ce134">
            <text:p><text:s/>893<text:s/></text:p>
          </table:table-cell>
          <table:table-cell office:value-type="float" office:value="3860.4495570000017" table:formula="of:=+[.G155]+[.G152]+[.G145]" table:style-name="ce134">
            <text:p><text:s/>3,860<text:s/></text:p>
          </table:table-cell>
          <table:table-cell office:value-type="float" office:value="4011.7414129999988" table:formula="of:=+[.H155]+[.H152]+[.H145]" table:style-name="ce134">
            <text:p><text:s/>4,012<text:s/></text:p>
          </table:table-cell>
          <table:table-cell office:value-type="float" office:value="11688.592399000001" table:formula="of:=+[.I155]+[.I152]+[.I145]" table:style-name="ce74">
            <text:p><text:s/>11,689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3" table:number-columns-spanned="1" table:number-rows-spanned="13" table:style-name="ce347">
            <text:p>2013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384.7341409999999" table:style-name="ce135">
            <text:p><text:s/>1,385<text:s/></text:p>
          </table:table-cell>
          <table:table-cell office:value-type="float" office:value="454.27600000000024" table:style-name="ce135">
            <text:p><text:s/>454<text:s/></text:p>
          </table:table-cell>
          <table:table-cell office:value-type="float" office:value="1445.8814529999997" table:style-name="ce135">
            <text:p><text:s/>1,446<text:s/></text:p>
          </table:table-cell>
          <table:table-cell office:value-type="float" office:value="1060.0647760000004" table:style-name="ce135">
            <text:p><text:s/>1,060<text:s/></text:p>
          </table:table-cell>
          <table:table-cell office:value-type="float" office:value="4344.9563699999999" table:formula="of:=SUM([.E157:.H157])" table:style-name="ce61">
            <text:p><text:s/>4,34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83.478867999999991" table:style-name="ce78">
            <text:p><text:s/>83<text:s/></text:p>
          </table:table-cell>
          <table:table-cell office:value-type="float" office:value="69.955086000000009" table:style-name="ce78">
            <text:p><text:s/>70<text:s/></text:p>
          </table:table-cell>
          <table:table-cell office:value-type="float" office:value="67.810632999999996" table:style-name="ce78">
            <text:p><text:s/>68<text:s/></text:p>
          </table:table-cell>
          <table:table-cell office:value-type="float" office:value="271.43733500000008" table:style-name="ce78">
            <text:p><text:s/>271<text:s/></text:p>
          </table:table-cell>
          <table:table-cell office:value-type="float" office:value="492.6819220000001" table:formula="of:=SUM([.E158:.H158])" table:style-name="ce61">
            <text:p><text:s/>49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468.2130089999998" table:formula="of:=SUM([.E157:.E158])" table:style-name="ce127">
            <text:p><text:s/>1,468<text:s/></text:p>
          </table:table-cell>
          <table:table-cell office:value-type="float" office:value="524.23108600000023" table:formula="of:=SUM([.F157:.F158])" table:style-name="ce65">
            <text:p><text:s/>524<text:s/></text:p>
          </table:table-cell>
          <table:table-cell office:value-type="float" office:value="1513.6920859999998" table:formula="of:=SUM([.G157:.G158])" table:style-name="ce65">
            <text:p><text:s/>1,514<text:s/></text:p>
          </table:table-cell>
          <table:table-cell office:value-type="float" office:value="1331.5021110000005" table:formula="of:=SUM([.H157:.H158])" table:style-name="ce65">
            <text:p><text:s/>1,332<text:s/></text:p>
          </table:table-cell>
          <table:table-cell office:value-type="float" office:value="4837.6382919999996" table:formula="of:=SUM([.I157:.I158])" table:style-name="ce66">
            <text:p><text:s/>4,83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92.684449000000001" table:style-name="ce28">
            <text:p><text:s/>93<text:s/></text:p>
          </table:table-cell>
          <table:table-cell office:value-type="float" office:value="121.81638" table:style-name="ce29">
            <text:p><text:s/>122<text:s/></text:p>
          </table:table-cell>
          <table:table-cell office:value-type="float" office:value="160.46444599999995" table:style-name="ce29">
            <text:p><text:s/>160<text:s/></text:p>
          </table:table-cell>
          <table:table-cell office:value-type="float" office:value="739.55402199999992" table:style-name="ce30">
            <text:p><text:s/>740<text:s/></text:p>
          </table:table-cell>
          <table:table-cell office:value-type="float" office:value="1114.5192969999998" table:formula="of:=SUM([.E160:.H160])" table:style-name="ce61">
            <text:p><text:s/>1,1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820.80444299999999" table:style-name="ce32">
            <text:p><text:s/>821<text:s/></text:p>
          </table:table-cell>
          <table:table-cell office:value-type="float" office:value="195.75931399999999" table:style-name="ce33">
            <text:p><text:s/>196<text:s/></text:p>
          </table:table-cell>
          <table:table-cell office:value-type="float" office:value="1071.5568609999993" table:style-name="ce33">
            <text:p><text:s/>1,072<text:s/></text:p>
          </table:table-cell>
          <table:table-cell office:value-type="float" office:value="831.14605900000026" table:style-name="ce34">
            <text:p><text:s/>831<text:s/></text:p>
          </table:table-cell>
          <table:table-cell office:value-type="float" office:value="2919.2666769999996" table:formula="of:=SUM([.E161:.H161])" table:style-name="ce61">
            <text:p><text:s/>2,9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67.410330000000002" table:style-name="ce32">
            <text:p><text:s/>67<text:s/></text:p>
          </table:table-cell>
          <table:table-cell office:value-type="float" office:value="29.923290000000005" table:style-name="ce33">
            <text:p><text:s/>30<text:s/></text:p>
          </table:table-cell>
          <table:table-cell office:value-type="float" office:value="168.75897500000002" table:style-name="ce33">
            <text:p><text:s/>169<text:s/></text:p>
          </table:table-cell>
          <table:table-cell office:value-type="float" office:value="279.45756899999998" table:style-name="ce34">
            <text:p><text:s/>279<text:s/></text:p>
          </table:table-cell>
          <table:table-cell office:value-type="float" office:value="545.550164" table:formula="of:=SUM([.E162:.H162])" table:style-name="ce61">
            <text:p><text:s/>5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2.594861000000009" table:style-name="ce33">
            <text:p><text:s/>83<text:s/></text:p>
          </table:table-cell>
          <table:table-cell office:value-type="float" office:value="244.81750499999984" table:style-name="ce34">
            <text:p><text:s/>245<text:s/></text:p>
          </table:table-cell>
          <table:table-cell office:value-type="float" office:value="327.41236599999985" table:formula="of:=SUM([.E163:.H163])" table:style-name="ce61">
            <text:p><text:s/>32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227.25616000000005" table:style-name="ce32">
            <text:p><text:s/>227<text:s/></text:p>
          </table:table-cell>
          <table:table-cell office:value-type="float" office:value="106.363941" table:style-name="ce33">
            <text:p><text:s/>106<text:s/></text:p>
          </table:table-cell>
          <table:table-cell office:value-type="float" office:value="140.74774999999997" table:style-name="ce33">
            <text:p><text:s/>141<text:s/></text:p>
          </table:table-cell>
          <table:table-cell office:value-type="float" office:value="95.195999999999998" table:style-name="ce34">
            <text:p><text:s/>95<text:s/></text:p>
          </table:table-cell>
          <table:table-cell office:value-type="float" office:value="569.563851" table:formula="of:=SUM([.E164:.H164])" table:style-name="ce61">
            <text:p><text:s/>57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271.49692900000008" table:style-name="ce38">
            <text:p><text:s/>271<text:s/></text:p>
          </table:table-cell>
          <table:table-cell office:value-type="float" office:value="4.1677400000000002" table:style-name="ce39">
            <text:p><text:s/>4<text:s/></text:p>
          </table:table-cell>
          <table:table-cell office:value-type="float" office:value="49.111399999999989" table:style-name="ce39">
            <text:p><text:s/>49<text:s/></text:p>
          </table:table-cell>
          <table:table-cell office:value-type="float" office:value="77.520229999999998" table:style-name="ce40">
            <text:p><text:s/>78<text:s/></text:p>
          </table:table-cell>
          <table:table-cell office:value-type="float" office:value="402.29629900000009" table:formula="of:=SUM([.E165:.H165])" table:style-name="ce61">
            <text:p><text:s/>40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1479.6523110000003" table:formula="of:=SUM([.E160:.E165])" table:style-name="ce65">
            <text:p><text:s/>1,480<text:s/></text:p>
          </table:table-cell>
          <table:table-cell office:value-type="float" office:value="458.030665" table:formula="of:=SUM([.F160:.F165])" table:style-name="ce65">
            <text:p><text:s/>458<text:s/></text:p>
          </table:table-cell>
          <table:table-cell office:value-type="float" office:value="1673.2342929999993" table:formula="of:=SUM([.G160:.G165])" table:style-name="ce65">
            <text:p><text:s/>1,673<text:s/></text:p>
          </table:table-cell>
          <table:table-cell office:value-type="float" office:value="2267.6913850000001" table:formula="of:=SUM([.H160:.H165])" table:style-name="ce65">
            <text:p><text:s/>2,268<text:s/></text:p>
          </table:table-cell>
          <table:table-cell office:value-type="float" office:value="5878.6086539999997" table:formula="of:=SUM([.I160:.I165])" table:style-name="ce66">
            <text:p><text:s/>5,8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5.3822760000000009" table:style-name="ce28">
            <text:p><text:s/>5<text:s/></text:p>
          </table:table-cell>
          <table:table-cell office:value-type="float" office:value="16.436774" table:style-name="ce33">
            <text:p><text:s/>16<text:s/></text:p>
          </table:table-cell>
          <table:table-cell office:value-type="float" office:value="78.603418999999988" table:style-name="ce33">
            <text:p><text:s/>79<text:s/></text:p>
          </table:table-cell>
          <table:table-cell office:value-type="float" office:value="78.787029999999987" table:style-name="ce33">
            <text:p><text:s/>79<text:s/></text:p>
          </table:table-cell>
          <table:table-cell office:value-type="float" office:value="179.20949899999999" table:formula="of:=SUM([.E167:.H167])" table:style-name="ce61">
            <text:p><text:s/>1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263.00096200000007" table:style-name="ce38">
            <text:p><text:s/>263<text:s/></text:p>
          </table:table-cell>
          <table:table-cell office:value-type="float" office:value="39.150715999999996" table:style-name="ce33">
            <text:p><text:s/>39<text:s/></text:p>
          </table:table-cell>
          <table:table-cell office:value-type="float" office:value="753.28408999999999" table:style-name="ce33">
            <text:p><text:s/>753<text:s/></text:p>
          </table:table-cell>
          <table:table-cell office:value-type="float" office:value="299.34623899999997" table:style-name="ce33">
            <text:p><text:s/>299<text:s/></text:p>
          </table:table-cell>
          <table:table-cell office:value-type="float" office:value="1354.782007" table:formula="of:=SUM([.E168:.H168])" table:style-name="ce61">
            <text:p><text:s/>1,35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268.38323800000006" table:formula="of:=SUM([.E167:.E168])" table:style-name="ce65">
            <text:p><text:s/>268<text:s/></text:p>
          </table:table-cell>
          <table:table-cell office:value-type="float" office:value="55.587489999999995" table:formula="of:=SUM([.F167:.F168])" table:style-name="ce65">
            <text:p><text:s/>56<text:s/></text:p>
          </table:table-cell>
          <table:table-cell office:value-type="float" office:value="831.88750900000002" table:formula="of:=SUM([.G167:.G168])" table:style-name="ce65">
            <text:p><text:s/>832<text:s/></text:p>
          </table:table-cell>
          <table:table-cell office:value-type="float" office:value="378.13326899999993" table:formula="of:=SUM([.H167:.H168])" table:style-name="ce65">
            <text:p><text:s/>378<text:s/></text:p>
          </table:table-cell>
          <table:table-cell office:value-type="float" office:value="1533.9915060000001" table:formula="of:=SUM([.I167:.I168])" table:style-name="ce66">
            <text:p><text:s/>1,534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3 Total</text:p>
          </table:table-cell>
          <table:table-cell table:number-columns-repeated="2" table:style-name="ce72"/>
          <table:table-cell office:value-type="float" office:value="3216.2485580000002" table:formula="of:=+[.E169]+[.E166]+[.E159]" table:style-name="ce134">
            <text:p><text:s/>3,216<text:s/></text:p>
          </table:table-cell>
          <table:table-cell office:value-type="float" office:value="1037.8492410000003" table:formula="of:=+[.F169]+[.F166]+[.F159]" table:style-name="ce134">
            <text:p><text:s/>1,038<text:s/></text:p>
          </table:table-cell>
          <table:table-cell office:value-type="float" office:value="4018.8138879999988" table:formula="of:=+[.G169]+[.G166]+[.G159]" table:style-name="ce134">
            <text:p><text:s/>4,019<text:s/></text:p>
          </table:table-cell>
          <table:table-cell office:value-type="float" office:value="3977.3267650000007" table:formula="of:=+[.H169]+[.H166]+[.H159]" table:style-name="ce134">
            <text:p><text:s/>3,977<text:s/></text:p>
          </table:table-cell>
          <table:table-cell office:value-type="float" office:value="12250.238452" table:formula="of:=+[.I169]+[.I166]+[.I159]" table:style-name="ce74">
            <text:p><text:s/>12,250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4" table:number-columns-spanned="1" table:number-rows-spanned="13" table:style-name="ce347">
            <text:p>2014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363.4204849999994" table:style-name="ce135">
            <text:p><text:s/>1,363<text:s/></text:p>
          </table:table-cell>
          <table:table-cell office:value-type="float" office:value="486.02666899999974" table:style-name="ce135">
            <text:p><text:s/>486<text:s/></text:p>
          </table:table-cell>
          <table:table-cell office:value-type="float" office:value="1542.0763920000011" table:style-name="ce135">
            <text:p><text:s/>1,542<text:s/></text:p>
          </table:table-cell>
          <table:table-cell office:value-type="float" office:value="1025.759037" table:style-name="ce135">
            <text:p><text:s/>1,026<text:s/></text:p>
          </table:table-cell>
          <table:table-cell office:value-type="float" office:value="4417.2825830000002" table:formula="of:=SUM([.E171:.H171])" table:style-name="ce61">
            <text:p><text:s/>4,4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95.960116000000085" table:style-name="ce33">
            <text:p><text:s/>96<text:s/></text:p>
          </table:table-cell>
          <table:table-cell office:value-type="float" office:value="65.471630000000005" table:style-name="ce33">
            <text:p><text:s/>65<text:s/></text:p>
          </table:table-cell>
          <table:table-cell office:value-type="float" office:value="74.808818000000016" table:style-name="ce33">
            <text:p><text:s/>75<text:s/></text:p>
          </table:table-cell>
          <table:table-cell office:value-type="float" office:value="261.4747719999998" table:style-name="ce33">
            <text:p><text:s/>261<text:s/></text:p>
          </table:table-cell>
          <table:table-cell office:value-type="float" office:value="497.71533599999992" table:formula="of:=SUM([.E172:.H172])" table:style-name="ce61">
            <text:p><text:s/>49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459.3806009999994" table:formula="of:=SUM([.E171:.E172])" table:style-name="ce127">
            <text:p><text:s/>1,459<text:s/></text:p>
          </table:table-cell>
          <table:table-cell office:value-type="float" office:value="551.49829899999975" table:formula="of:=SUM([.F171:.F172])" table:style-name="ce65">
            <text:p><text:s/>551<text:s/></text:p>
          </table:table-cell>
          <table:table-cell office:value-type="float" office:value="1616.8852100000011" table:formula="of:=SUM([.G171:.G172])" table:style-name="ce65">
            <text:p><text:s/>1,617<text:s/></text:p>
          </table:table-cell>
          <table:table-cell office:value-type="float" office:value="1287.2338089999998" table:formula="of:=SUM([.H171:.H172])" table:style-name="ce65">
            <text:p><text:s/>1,287<text:s/></text:p>
          </table:table-cell>
          <table:table-cell office:value-type="float" office:value="4914.9979190000004" table:formula="of:=SUM([.I171:.I172])" table:style-name="ce66">
            <text:p><text:s/>4,9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98.084457000000015" table:style-name="ce28">
            <text:p><text:s/>98<text:s/></text:p>
          </table:table-cell>
          <table:table-cell office:value-type="float" office:value="186.03148000000002" table:style-name="ce29">
            <text:p><text:s/>186<text:s/></text:p>
          </table:table-cell>
          <table:table-cell office:value-type="float" office:value="128.97466899999998" table:style-name="ce29">
            <text:p><text:s/>129<text:s/></text:p>
          </table:table-cell>
          <table:table-cell office:value-type="float" office:value="814.00453099999993" table:style-name="ce30">
            <text:p><text:s/>814<text:s/></text:p>
          </table:table-cell>
          <table:table-cell office:value-type="float" office:value="1227.0951369999998" table:formula="of:=SUM([.E174:.H174])" table:style-name="ce61">
            <text:p><text:s/>1,22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1025.0193870000003" table:style-name="ce32">
            <text:p><text:s/>1,025<text:s/></text:p>
          </table:table-cell>
          <table:table-cell office:value-type="float" office:value="250.3314909999998" table:style-name="ce33">
            <text:p><text:s/>250<text:s/></text:p>
          </table:table-cell>
          <table:table-cell office:value-type="float" office:value="1132.6276040000002" table:style-name="ce33">
            <text:p><text:s/>1,133<text:s/></text:p>
          </table:table-cell>
          <table:table-cell office:value-type="float" office:value="759.78253500000017" table:style-name="ce34">
            <text:p><text:s/>760<text:s/></text:p>
          </table:table-cell>
          <table:table-cell office:value-type="float" office:value="3167.7610170000007" table:formula="of:=SUM([.E175:.H175])" table:style-name="ce61">
            <text:p><text:s/>3,1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47.709844000000004" table:style-name="ce32">
            <text:p><text:s/>48<text:s/></text:p>
          </table:table-cell>
          <table:table-cell office:value-type="float" office:value="26.790409999999994" table:style-name="ce33">
            <text:p><text:s/>27<text:s/></text:p>
          </table:table-cell>
          <table:table-cell office:value-type="float" office:value="175.80488600000001" table:style-name="ce33">
            <text:p><text:s/>176<text:s/></text:p>
          </table:table-cell>
          <table:table-cell office:value-type="float" office:value="356.81039700000002" table:style-name="ce34">
            <text:p><text:s/>357<text:s/></text:p>
          </table:table-cell>
          <table:table-cell office:value-type="float" office:value="607.11553700000002" table:formula="of:=SUM([.E176:.H176])" table:style-name="ce61">
            <text:p><text:s/>6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4.060265000000086" table:style-name="ce33">
            <text:p><text:s/>84<text:s/></text:p>
          </table:table-cell>
          <table:table-cell office:value-type="float" office:value="274.54212000000024" table:style-name="ce34">
            <text:p><text:s/>275<text:s/></text:p>
          </table:table-cell>
          <table:table-cell office:value-type="float" office:value="358.60238500000031" table:formula="of:=SUM([.E177:.H177])" table:style-name="ce61">
            <text:p><text:s/>35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238.29117699999992" table:style-name="ce32">
            <text:p><text:s/>238<text:s/></text:p>
          </table:table-cell>
          <table:table-cell office:value-type="float" office:value="97.42615099999999" table:style-name="ce33">
            <text:p><text:s/>97<text:s/></text:p>
          </table:table-cell>
          <table:table-cell office:value-type="float" office:value="118.06631899999999" table:style-name="ce33">
            <text:p><text:s/>118<text:s/></text:p>
          </table:table-cell>
          <table:table-cell office:value-type="float" office:value="137.87569999999999" table:style-name="ce34">
            <text:p><text:s/>138<text:s/></text:p>
          </table:table-cell>
          <table:table-cell office:value-type="float" office:value="591.6593469999998" table:formula="of:=SUM([.E178:.H178])" table:style-name="ce61">
            <text:p><text:s/>59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347.19806100000005" table:style-name="ce38">
            <text:p><text:s/>347<text:s/></text:p>
          </table:table-cell>
          <table:table-cell office:value-type="float" office:value="5.08657" table:style-name="ce39">
            <text:p><text:s/>5<text:s/></text:p>
          </table:table-cell>
          <table:table-cell office:value-type="float" office:value="74.17214899999999" table:style-name="ce39">
            <text:p><text:s/>74<text:s/></text:p>
          </table:table-cell>
          <table:table-cell office:value-type="float" office:value="74.497699999999995" table:style-name="ce40">
            <text:p><text:s/>74<text:s/></text:p>
          </table:table-cell>
          <table:table-cell office:value-type="float" office:value="500.95448000000005" table:formula="of:=SUM([.E179:.H179])" table:style-name="ce61">
            <text:p><text:s/>5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1756.3029260000001" table:formula="of:=SUM([.E174:.E179])" table:style-name="ce65">
            <text:p><text:s/>1,756<text:s/></text:p>
          </table:table-cell>
          <table:table-cell office:value-type="float" office:value="565.6661019999998" table:formula="of:=SUM([.F174:.F179])" table:style-name="ce65">
            <text:p><text:s/>566<text:s/></text:p>
          </table:table-cell>
          <table:table-cell office:value-type="float" office:value="1713.7058920000004" table:formula="of:=SUM([.G174:.G179])" table:style-name="ce65">
            <text:p><text:s/>1,714<text:s/></text:p>
          </table:table-cell>
          <table:table-cell office:value-type="float" office:value="2417.5129830000001" table:formula="of:=SUM([.H174:.H179])" table:style-name="ce65">
            <text:p><text:s/>2,418<text:s/></text:p>
          </table:table-cell>
          <table:table-cell office:value-type="float" office:value="6453.1879030000009" table:formula="of:=SUM([.I174:.I179])" table:style-name="ce66">
            <text:p><text:s/>6,45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5.5801540000000003" table:style-name="ce28">
            <text:p><text:s/>6<text:s/></text:p>
          </table:table-cell>
          <table:table-cell office:value-type="float" office:value="15.243809000000002" table:style-name="ce33">
            <text:p><text:s/>15<text:s/></text:p>
          </table:table-cell>
          <table:table-cell office:value-type="float" office:value="103.75657100000001" table:style-name="ce33">
            <text:p><text:s/>104<text:s/></text:p>
          </table:table-cell>
          <table:table-cell office:value-type="float" office:value="100.22289000000002" table:style-name="ce33">
            <text:p><text:s/>100<text:s/></text:p>
          </table:table-cell>
          <table:table-cell office:value-type="float" office:value="224.80342400000004" table:formula="of:=SUM([.E181:.H181])" table:style-name="ce61">
            <text:p><text:s/>22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339.76700899999992" table:style-name="ce38">
            <text:p><text:s/>340<text:s/></text:p>
          </table:table-cell>
          <table:table-cell office:value-type="float" office:value="39.457984000000003" table:style-name="ce33">
            <text:p><text:s/>39<text:s/></text:p>
          </table:table-cell>
          <table:table-cell office:value-type="float" office:value="743.03170599999987" table:style-name="ce33">
            <text:p><text:s/>743<text:s/></text:p>
          </table:table-cell>
          <table:table-cell office:value-type="float" office:value="340.81344099999995" table:style-name="ce33">
            <text:p><text:s/>341<text:s/></text:p>
          </table:table-cell>
          <table:table-cell office:value-type="float" office:value="1463.0701399999998" table:formula="of:=SUM([.E182:.H182])" table:style-name="ce61">
            <text:p><text:s/>1,4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345.34716299999991" table:formula="of:=SUM([.E181:.E182])" table:style-name="ce65">
            <text:p><text:s/>345<text:s/></text:p>
          </table:table-cell>
          <table:table-cell office:value-type="float" office:value="54.701793000000009" table:formula="of:=SUM([.F181:.F182])" table:style-name="ce65">
            <text:p><text:s/>55<text:s/></text:p>
          </table:table-cell>
          <table:table-cell office:value-type="float" office:value="846.78827699999988" table:formula="of:=SUM([.G181:.G182])" table:style-name="ce65">
            <text:p><text:s/>847<text:s/></text:p>
          </table:table-cell>
          <table:table-cell office:value-type="float" office:value="441.03633099999996" table:formula="of:=SUM([.H181:.H182])" table:style-name="ce65">
            <text:p><text:s/>441<text:s/></text:p>
          </table:table-cell>
          <table:table-cell office:value-type="float" office:value="1687.8735639999998" table:formula="of:=SUM([.I181:.I182])" table:style-name="ce66">
            <text:p><text:s/>1,688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4 Total</text:p>
          </table:table-cell>
          <table:table-cell table:number-columns-repeated="2" table:style-name="ce72"/>
          <table:table-cell office:value-type="float" office:value="3561.0306899999991" table:formula="of:=+[.E183]+[.E180]+[.E173]" table:style-name="ce134">
            <text:p><text:s/>3,561<text:s/></text:p>
          </table:table-cell>
          <table:table-cell office:value-type="float" office:value="1171.8661939999997" table:formula="of:=+[.F183]+[.F180]+[.F173]" table:style-name="ce134">
            <text:p><text:s/>1,172<text:s/></text:p>
          </table:table-cell>
          <table:table-cell office:value-type="float" office:value="4177.3793790000018" table:formula="of:=+[.G183]+[.G180]+[.G173]" table:style-name="ce134">
            <text:p><text:s/>4,177<text:s/></text:p>
          </table:table-cell>
          <table:table-cell office:value-type="float" office:value="4145.7831229999993" table:formula="of:=+[.H183]+[.H180]+[.H173]" table:style-name="ce134">
            <text:p><text:s/>4,146<text:s/></text:p>
          </table:table-cell>
          <table:table-cell office:value-type="float" office:value="13056.059386000001" table:formula="of:=+[.I183]+[.I180]+[.I173]" table:style-name="ce74">
            <text:p><text:s/>13,05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5" table:number-columns-spanned="1" table:number-rows-spanned="13" table:style-name="ce347">
            <text:p>2015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308.2317079999998" table:style-name="ce135">
            <text:p><text:s/>1,308<text:s/></text:p>
          </table:table-cell>
          <table:table-cell office:value-type="float" office:value="409.28210500000012" table:style-name="ce135">
            <text:p><text:s/>409<text:s/></text:p>
          </table:table-cell>
          <table:table-cell office:value-type="float" office:value="1459.6003700000001" table:style-name="ce135">
            <text:p><text:s/>1,460<text:s/></text:p>
          </table:table-cell>
          <table:table-cell office:value-type="float" office:value="1144.7230279999999" table:style-name="ce135">
            <text:p><text:s/>1,145<text:s/></text:p>
          </table:table-cell>
          <table:table-cell office:value-type="float" office:value="4321.837211" table:formula="of:=SUM([.E185:.H185])" table:style-name="ce61">
            <text:p><text:s/>4,32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97.298700999999994" table:style-name="ce33">
            <text:p><text:s/>97<text:s/></text:p>
          </table:table-cell>
          <table:table-cell office:value-type="float" office:value="58.590338000000031" table:style-name="ce33">
            <text:p><text:s/>59<text:s/></text:p>
          </table:table-cell>
          <table:table-cell office:value-type="float" office:value="74.317469000000045" table:style-name="ce33">
            <text:p><text:s/>74<text:s/></text:p>
          </table:table-cell>
          <table:table-cell office:value-type="float" office:value="299.2320010000002" table:style-name="ce33">
            <text:p><text:s/>299<text:s/></text:p>
          </table:table-cell>
          <table:table-cell office:value-type="float" office:value="529.43850900000029" table:formula="of:=SUM([.E186:.H186])" table:style-name="ce61">
            <text:p><text:s/>5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405.5304089999997" table:formula="of:=SUM([.E185:.E186])" table:style-name="ce127">
            <text:p><text:s/>1,406<text:s/></text:p>
          </table:table-cell>
          <table:table-cell office:value-type="float" office:value="467.87244300000015" table:formula="of:=SUM([.F185:.F186])" table:style-name="ce65">
            <text:p><text:s/>468<text:s/></text:p>
          </table:table-cell>
          <table:table-cell office:value-type="float" office:value="1533.9178390000002" table:formula="of:=SUM([.G185:.G186])" table:style-name="ce65">
            <text:p><text:s/>1,534<text:s/></text:p>
          </table:table-cell>
          <table:table-cell office:value-type="float" office:value="1443.9550290000002" table:formula="of:=SUM([.H185:.H186])" table:style-name="ce65">
            <text:p><text:s/>1,444<text:s/></text:p>
          </table:table-cell>
          <table:table-cell office:value-type="float" office:value="4851.2757200000005" table:formula="of:=SUM([.I185:.I186])" table:style-name="ce66">
            <text:p><text:s/>4,85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99.074514999999991" table:style-name="ce28">
            <text:p><text:s/>99<text:s/></text:p>
          </table:table-cell>
          <table:table-cell office:value-type="float" office:value="241.16008199999993" table:style-name="ce29">
            <text:p><text:s/>241<text:s/></text:p>
          </table:table-cell>
          <table:table-cell office:value-type="float" office:value="212.91375399999998" table:style-name="ce29">
            <text:p><text:s/>213<text:s/></text:p>
          </table:table-cell>
          <table:table-cell office:value-type="float" office:value="931.77663600000051" table:style-name="ce30">
            <text:p><text:s/>932<text:s/></text:p>
          </table:table-cell>
          <table:table-cell office:value-type="float" office:value="1484.9249870000003" table:formula="of:=SUM([.E188:.H188])" table:style-name="ce61">
            <text:p><text:s/>1,4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1381.5979570000004" table:style-name="ce32">
            <text:p><text:s/>1,382<text:s/></text:p>
          </table:table-cell>
          <table:table-cell office:value-type="float" office:value="309.43437199999988" table:style-name="ce33">
            <text:p><text:s/>309<text:s/></text:p>
          </table:table-cell>
          <table:table-cell office:value-type="float" office:value="1055.9416780000004" table:style-name="ce33">
            <text:p><text:s/>1,056<text:s/></text:p>
          </table:table-cell>
          <table:table-cell office:value-type="float" office:value="1108.9561199999998" table:style-name="ce34">
            <text:p><text:s/>1,109<text:s/></text:p>
          </table:table-cell>
          <table:table-cell office:value-type="float" office:value="3855.9301270000005" table:formula="of:=SUM([.E189:.H189])" table:style-name="ce61">
            <text:p><text:s/>3,8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46.766070000000006" table:style-name="ce32">
            <text:p><text:s/>47<text:s/></text:p>
          </table:table-cell>
          <table:table-cell office:value-type="float" office:value="15.569539999999998" table:style-name="ce33">
            <text:p><text:s/>16<text:s/></text:p>
          </table:table-cell>
          <table:table-cell office:value-type="float" office:value="200.55435000000003" table:style-name="ce33">
            <text:p><text:s/>201<text:s/></text:p>
          </table:table-cell>
          <table:table-cell office:value-type="float" office:value="302.05423500000001" table:style-name="ce34">
            <text:p><text:s/>302<text:s/></text:p>
          </table:table-cell>
          <table:table-cell office:value-type="float" office:value="564.94419500000004" table:formula="of:=SUM([.E190:.H190])" table:style-name="ce61">
            <text:p><text:s/>56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9.767212999999998" table:style-name="ce33">
            <text:p><text:s/>70<text:s/></text:p>
          </table:table-cell>
          <table:table-cell office:value-type="float" office:value="239.1736149999999" table:style-name="ce34">
            <text:p><text:s/>239<text:s/></text:p>
          </table:table-cell>
          <table:table-cell office:value-type="float" office:value="308.9408279999999" table:formula="of:=SUM([.E191:.H191])" table:style-name="ce61">
            <text:p><text:s/>3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222.02872100000005" table:style-name="ce32">
            <text:p><text:s/>222<text:s/></text:p>
          </table:table-cell>
          <table:table-cell office:value-type="float" office:value="75.046725000000009" table:style-name="ce33">
            <text:p><text:s/>75<text:s/></text:p>
          </table:table-cell>
          <table:table-cell office:value-type="float" office:value="122.50473900000001" table:style-name="ce33">
            <text:p><text:s/>123<text:s/></text:p>
          </table:table-cell>
          <table:table-cell office:value-type="float" office:value="41.774289999999993" table:style-name="ce34">
            <text:p><text:s/>42<text:s/></text:p>
          </table:table-cell>
          <table:table-cell office:value-type="float" office:value="461.35447500000009" table:formula="of:=SUM([.E192:.H192])" table:style-name="ce61">
            <text:p><text:s/>46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525.40747099999999" table:style-name="ce38">
            <text:p><text:s/>525<text:s/></text:p>
          </table:table-cell>
          <table:table-cell office:value-type="float" office:value="45.80046500000001" table:style-name="ce39">
            <text:p><text:s/>46<text:s/></text:p>
          </table:table-cell>
          <table:table-cell office:value-type="float" office:value="193.55509899999998" table:style-name="ce39">
            <text:p><text:s/>194<text:s/></text:p>
          </table:table-cell>
          <table:table-cell office:value-type="float" office:value="103.21983100000001" table:style-name="ce40">
            <text:p><text:s/>103<text:s/></text:p>
          </table:table-cell>
          <table:table-cell office:value-type="float" office:value="867.98286599999994" table:formula="of:=SUM([.E193:.H193])" table:style-name="ce61">
            <text:p><text:s/>8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2274.8747340000004" table:formula="of:=SUM([.E188:.E193])" table:style-name="ce65">
            <text:p><text:s/>2,275<text:s/></text:p>
          </table:table-cell>
          <table:table-cell office:value-type="float" office:value="687.01118399999984" table:formula="of:=SUM([.F188:.F193])" table:style-name="ce65">
            <text:p><text:s/>687<text:s/></text:p>
          </table:table-cell>
          <table:table-cell office:value-type="float" office:value="1855.2368330000004" table:formula="of:=SUM([.G188:.G193])" table:style-name="ce65">
            <text:p><text:s/>1,855<text:s/></text:p>
          </table:table-cell>
          <table:table-cell office:value-type="float" office:value="2726.9547269999998" table:formula="of:=SUM([.H188:.H193])" table:style-name="ce65">
            <text:p><text:s/>2,727<text:s/></text:p>
          </table:table-cell>
          <table:table-cell office:value-type="float" office:value="7544.0774780000011" table:formula="of:=SUM([.I188:.I193])" table:style-name="ce66">
            <text:p><text:s/>7,54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9.5828110000000013" table:style-name="ce28">
            <text:p><text:s/>10<text:s/></text:p>
          </table:table-cell>
          <table:table-cell office:value-type="float" office:value="4.5951280000000017" table:style-name="ce33">
            <text:p><text:s/>5<text:s/></text:p>
          </table:table-cell>
          <table:table-cell office:value-type="float" office:value="88.753472000000031" table:style-name="ce33">
            <text:p><text:s/>89<text:s/></text:p>
          </table:table-cell>
          <table:table-cell office:value-type="float" office:value="96.573917000000009" table:style-name="ce33">
            <text:p><text:s/>97<text:s/></text:p>
          </table:table-cell>
          <table:table-cell office:value-type="float" office:value="199.50532800000002" table:formula="of:=SUM([.E195:.H195])" table:style-name="ce61">
            <text:p><text:s/>20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358.970078" table:style-name="ce38">
            <text:p><text:s/>359<text:s/></text:p>
          </table:table-cell>
          <table:table-cell office:value-type="float" office:value="32.775331000000008" table:style-name="ce33">
            <text:p><text:s/>33<text:s/></text:p>
          </table:table-cell>
          <table:table-cell office:value-type="float" office:value="716.07207600000004" table:style-name="ce33">
            <text:p><text:s/>716<text:s/></text:p>
          </table:table-cell>
          <table:table-cell office:value-type="float" office:value="331.57972699999993" table:style-name="ce33">
            <text:p><text:s/>332<text:s/></text:p>
          </table:table-cell>
          <table:table-cell office:value-type="float" office:value="1439.3972119999999" table:formula="of:=SUM([.E196:.H196])" table:style-name="ce61">
            <text:p><text:s/>1,43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368.55288899999999" table:formula="of:=SUM([.E195:.E196])" table:style-name="ce65">
            <text:p><text:s/>369<text:s/></text:p>
          </table:table-cell>
          <table:table-cell office:value-type="float" office:value="37.370459000000011" table:formula="of:=SUM([.F195:.F196])" table:style-name="ce65">
            <text:p><text:s/>37<text:s/></text:p>
          </table:table-cell>
          <table:table-cell office:value-type="float" office:value="804.82554800000003" table:formula="of:=SUM([.G195:.G196])" table:style-name="ce65">
            <text:p><text:s/>805<text:s/></text:p>
          </table:table-cell>
          <table:table-cell office:value-type="float" office:value="428.15364399999993" table:formula="of:=SUM([.H195:.H196])" table:style-name="ce65">
            <text:p><text:s/>428<text:s/></text:p>
          </table:table-cell>
          <table:table-cell office:value-type="float" office:value="1638.9025399999998" table:formula="of:=SUM([.I195:.I196])" table:style-name="ce66">
            <text:p><text:s/>1,639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5 Total</text:p>
          </table:table-cell>
          <table:table-cell table:number-columns-repeated="2" table:style-name="ce72"/>
          <table:table-cell office:value-type="float" office:value="4048.9580320000005" table:formula="of:=+[.E197]+[.E194]+[.E187]" table:style-name="ce134">
            <text:p><text:s/>4,049<text:s/></text:p>
          </table:table-cell>
          <table:table-cell office:value-type="float" office:value="1192.2540859999999" table:formula="of:=+[.F197]+[.F194]+[.F187]" table:style-name="ce134">
            <text:p><text:s/>1,192<text:s/></text:p>
          </table:table-cell>
          <table:table-cell office:value-type="float" office:value="4193.9802200000013" table:formula="of:=+[.G197]+[.G194]+[.G187]" table:style-name="ce134">
            <text:p><text:s/>4,194<text:s/></text:p>
          </table:table-cell>
          <table:table-cell office:value-type="float" office:value="4599.0634" table:formula="of:=+[.H197]+[.H194]+[.H187]" table:style-name="ce134">
            <text:p><text:s/>4,599<text:s/></text:p>
          </table:table-cell>
          <table:table-cell office:value-type="float" office:value="14034.255738" table:formula="of:=+[.I197]+[.I194]+[.I187]" table:style-name="ce74">
            <text:p><text:s/>14,034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6" table:number-columns-spanned="1" table:number-rows-spanned="13" table:style-name="ce347">
            <text:p>2016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263.5006289999997" table:style-name="ce135">
            <text:p><text:s/>1,264<text:s/></text:p>
          </table:table-cell>
          <table:table-cell office:value-type="float" office:value="421.797933" table:style-name="ce135">
            <text:p><text:s/>422<text:s/></text:p>
          </table:table-cell>
          <table:table-cell office:value-type="float" office:value="1311.2865659999991" table:style-name="ce135">
            <text:p><text:s/>1,311<text:s/></text:p>
          </table:table-cell>
          <table:table-cell office:value-type="float" office:value="1309.5012060000001" table:style-name="ce135">
            <text:p><text:s/>1,310<text:s/></text:p>
          </table:table-cell>
          <table:table-cell office:value-type="float" office:value="4306.0863339999987" table:formula="of:=SUM([.E199:.H199])" table:style-name="ce61">
            <text:p><text:s/>4,30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04.32081800000009" table:style-name="ce33">
            <text:p><text:s/>104<text:s/></text:p>
          </table:table-cell>
          <table:table-cell office:value-type="float" office:value="51.458273999999932" table:style-name="ce33">
            <text:p><text:s/>51<text:s/></text:p>
          </table:table-cell>
          <table:table-cell office:value-type="float" office:value="77.301377999999943" table:style-name="ce33">
            <text:p><text:s/>77<text:s/></text:p>
          </table:table-cell>
          <table:table-cell office:value-type="float" office:value="338.37129600000009" table:style-name="ce33">
            <text:p><text:s/>338<text:s/></text:p>
          </table:table-cell>
          <table:table-cell office:value-type="float" office:value="571.45176600000002" table:formula="of:=SUM([.E200:.H200])" table:style-name="ce61">
            <text:p><text:s/>57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367.8214469999998" table:formula="of:=SUM([.E199:.E200])" table:style-name="ce127">
            <text:p><text:s/>1,368<text:s/></text:p>
          </table:table-cell>
          <table:table-cell office:value-type="float" office:value="473.2562069999999" table:formula="of:=SUM([.F199:.F200])" table:style-name="ce65">
            <text:p><text:s/>473<text:s/></text:p>
          </table:table-cell>
          <table:table-cell office:value-type="float" office:value="1388.587943999999" table:formula="of:=SUM([.G199:.G200])" table:style-name="ce65">
            <text:p><text:s/>1,389<text:s/></text:p>
          </table:table-cell>
          <table:table-cell office:value-type="float" office:value="1647.8725020000002" table:formula="of:=SUM([.H199:.H200])" table:style-name="ce65">
            <text:p><text:s/>1,648<text:s/></text:p>
          </table:table-cell>
          <table:table-cell office:value-type="float" office:value="4877.5380999999988" table:formula="of:=SUM([.I199:.I200])" table:style-name="ce66">
            <text:p><text:s/>4,87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118.872167" table:style-name="ce28">
            <text:p><text:s/>119<text:s/></text:p>
          </table:table-cell>
          <table:table-cell office:value-type="float" office:value="134.63930000000005" table:style-name="ce29">
            <text:p><text:s/>135<text:s/></text:p>
          </table:table-cell>
          <table:table-cell office:value-type="float" office:value="361.98708400000004" table:style-name="ce29">
            <text:p><text:s/>362<text:s/></text:p>
          </table:table-cell>
          <table:table-cell office:value-type="float" office:value="967.36180500000034" table:style-name="ce30">
            <text:p><text:s/>967<text:s/></text:p>
          </table:table-cell>
          <table:table-cell office:value-type="float" office:value="1582.8603560000006" table:formula="of:=SUM([.E202:.H202])" table:style-name="ce61">
            <text:p><text:s/>1,5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1649.1527760000006" table:style-name="ce32">
            <text:p><text:s/>1,649<text:s/></text:p>
          </table:table-cell>
          <table:table-cell office:value-type="float" office:value="336.36917699999975" table:style-name="ce33">
            <text:p><text:s/>336<text:s/></text:p>
          </table:table-cell>
          <table:table-cell office:value-type="float" office:value="1463.1462589999978" table:style-name="ce33">
            <text:p><text:s/>1,463<text:s/></text:p>
          </table:table-cell>
          <table:table-cell office:value-type="float" office:value="1063.2268660000002" table:style-name="ce34">
            <text:p><text:s/>1,063<text:s/></text:p>
          </table:table-cell>
          <table:table-cell office:value-type="float" office:value="4511.8950779999986" table:formula="of:=SUM([.E203:.H203])" table:style-name="ce61">
            <text:p><text:s/>4,5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174.79399999999998" table:style-name="ce32">
            <text:p><text:s/>175<text:s/></text:p>
          </table:table-cell>
          <table:table-cell office:value-type="float" office:value="14.872209999999999" table:style-name="ce33">
            <text:p><text:s/>15<text:s/></text:p>
          </table:table-cell>
          <table:table-cell office:value-type="float" office:value="207.450265" table:style-name="ce33">
            <text:p><text:s/>207<text:s/></text:p>
          </table:table-cell>
          <table:table-cell office:value-type="float" office:value="85.838171000000031" table:style-name="ce34">
            <text:p><text:s/>86<text:s/></text:p>
          </table:table-cell>
          <table:table-cell office:value-type="float" office:value="482.95464600000003" table:formula="of:=SUM([.E204:.H204])" table:style-name="ce61">
            <text:p><text:s/>4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81.437835999999933" table:style-name="ce33">
            <text:p><text:s/>81<text:s/></text:p>
          </table:table-cell>
          <table:table-cell office:value-type="float" office:value="276.4184379999981" table:style-name="ce34">
            <text:p><text:s/>276<text:s/></text:p>
          </table:table-cell>
          <table:table-cell office:value-type="float" office:value="357.85627399999805" table:formula="of:=SUM([.E205:.H205])" table:style-name="ce61">
            <text:p><text:s/>3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205.11642000000003" table:style-name="ce32">
            <text:p><text:s/>205<text:s/></text:p>
          </table:table-cell>
          <table:table-cell office:value-type="float" office:value="91.456974999999971" table:style-name="ce33">
            <text:p><text:s/>91<text:s/></text:p>
          </table:table-cell>
          <table:table-cell office:value-type="float" office:value="86.592369999999988" table:style-name="ce33">
            <text:p><text:s/>87<text:s/></text:p>
          </table:table-cell>
          <table:table-cell office:value-type="float" office:value="123.80923999999999" table:style-name="ce34">
            <text:p><text:s/>124<text:s/></text:p>
          </table:table-cell>
          <table:table-cell office:value-type="float" office:value="506.97500499999995" table:formula="of:=SUM([.E206:.H206])" table:style-name="ce61">
            <text:p><text:s/>5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509.67906000000045" table:style-name="ce38">
            <text:p><text:s/>510<text:s/></text:p>
          </table:table-cell>
          <table:table-cell office:value-type="float" office:value="102.18499300000001" table:style-name="ce39">
            <text:p><text:s/>102<text:s/></text:p>
          </table:table-cell>
          <table:table-cell office:value-type="float" office:value="285.61989099999982" table:style-name="ce39">
            <text:p><text:s/>286<text:s/></text:p>
          </table:table-cell>
          <table:table-cell office:value-type="float" office:value="111.23662999999999" table:style-name="ce40">
            <text:p><text:s/>111<text:s/></text:p>
          </table:table-cell>
          <table:table-cell office:value-type="float" office:value="1008.7205740000003" table:formula="of:=SUM([.E207:.H207])" table:style-name="ce61">
            <text:p><text:s/>1,0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2657.6144230000009" table:formula="of:=SUM([.E202:.E207])" table:style-name="ce65">
            <text:p><text:s/>2,658<text:s/></text:p>
          </table:table-cell>
          <table:table-cell office:value-type="float" office:value="679.52265499999976" table:formula="of:=SUM([.F202:.F207])" table:style-name="ce65">
            <text:p><text:s/>680<text:s/></text:p>
          </table:table-cell>
          <table:table-cell office:value-type="float" office:value="2486.2337049999974" table:formula="of:=SUM([.G202:.G207])" table:style-name="ce65">
            <text:p><text:s/>2,486<text:s/></text:p>
          </table:table-cell>
          <table:table-cell office:value-type="float" office:value="2627.8911499999986" table:formula="of:=SUM([.H202:.H207])" table:style-name="ce65">
            <text:p><text:s/>2,628<text:s/></text:p>
          </table:table-cell>
          <table:table-cell office:value-type="float" office:value="8451.261932999998" table:formula="of:=SUM([.I202:.I207])" table:style-name="ce66">
            <text:p><text:s/>8,45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78.588991999999962" table:style-name="ce28">
            <text:p><text:s/>79<text:s/></text:p>
          </table:table-cell>
          <table:table-cell office:value-type="float" office:value="13.281077999999997" table:style-name="ce33">
            <text:p><text:s/>13<text:s/></text:p>
          </table:table-cell>
          <table:table-cell office:value-type="float" office:value="25.706150000000012" table:style-name="ce33">
            <text:p><text:s/>26<text:s/></text:p>
          </table:table-cell>
          <table:table-cell office:value-type="float" office:value="112.92950000000003" table:style-name="ce33">
            <text:p><text:s/>113<text:s/></text:p>
          </table:table-cell>
          <table:table-cell office:value-type="float" office:value="230.50572" table:formula="of:=SUM([.E209:.H209])" table:style-name="ce61">
            <text:p><text:s/>23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624.78937699999949" table:style-name="ce38">
            <text:p><text:s/>625<text:s/></text:p>
          </table:table-cell>
          <table:table-cell office:value-type="float" office:value="31.503741000000002" table:style-name="ce33">
            <text:p><text:s/>32<text:s/></text:p>
          </table:table-cell>
          <table:table-cell office:value-type="float" office:value="693.03268399999956" table:style-name="ce33">
            <text:p><text:s/>693<text:s/></text:p>
          </table:table-cell>
          <table:table-cell office:value-type="float" office:value="385.22907100000009" table:style-name="ce33">
            <text:p><text:s/>385<text:s/></text:p>
          </table:table-cell>
          <table:table-cell office:value-type="float" office:value="1734.5548729999991" table:formula="of:=SUM([.E210:.H210])" table:style-name="ce61">
            <text:p><text:s/>1,73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703.37836899999945" table:formula="of:=SUM([.E209:.E210])" table:style-name="ce65">
            <text:p><text:s/>703<text:s/></text:p>
          </table:table-cell>
          <table:table-cell office:value-type="float" office:value="44.784818999999999" table:formula="of:=SUM([.F209:.F210])" table:style-name="ce65">
            <text:p><text:s/>45<text:s/></text:p>
          </table:table-cell>
          <table:table-cell office:value-type="float" office:value="718.73883399999954" table:formula="of:=SUM([.G209:.G210])" table:style-name="ce65">
            <text:p><text:s/>719<text:s/></text:p>
          </table:table-cell>
          <table:table-cell office:value-type="float" office:value="498.15857100000011" table:formula="of:=SUM([.H209:.H210])" table:style-name="ce65">
            <text:p><text:s/>498<text:s/></text:p>
          </table:table-cell>
          <table:table-cell office:value-type="float" office:value="1965.0605929999992" table:formula="of:=SUM([.I209:.I210])" table:style-name="ce66">
            <text:p><text:s/>1,965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6 Total</text:p>
          </table:table-cell>
          <table:table-cell table:number-columns-repeated="2" table:style-name="ce72"/>
          <table:table-cell office:value-type="float" office:value="4728.8142390000003" table:formula="of:=+[.E211]+[.E208]+[.E201]" table:style-name="ce134">
            <text:p><text:s/>4,729<text:s/></text:p>
          </table:table-cell>
          <table:table-cell office:value-type="float" office:value="1197.5636809999996" table:formula="of:=+[.F211]+[.F208]+[.F201]" table:style-name="ce134">
            <text:p><text:s/>1,198<text:s/></text:p>
          </table:table-cell>
          <table:table-cell office:value-type="float" office:value="4593.5604829999957" table:formula="of:=+[.G211]+[.G208]+[.G201]" table:style-name="ce134">
            <text:p><text:s/>4,594<text:s/></text:p>
          </table:table-cell>
          <table:table-cell office:value-type="float" office:value="4773.9222229999987" table:formula="of:=+[.H211]+[.H208]+[.H201]" table:style-name="ce134">
            <text:p><text:s/>4,774<text:s/></text:p>
          </table:table-cell>
          <table:table-cell office:value-type="float" office:value="15293.860625999994" table:formula="of:=+[.I211]+[.I208]+[.I201]" table:style-name="ce74">
            <text:p><text:s/>15,294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7" table:number-columns-spanned="1" table:number-rows-spanned="13" table:style-name="ce347">
            <text:p>2017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202.7668679999988" table:style-name="ce135">
            <text:p><text:s/>1,203<text:s/></text:p>
          </table:table-cell>
          <table:table-cell office:value-type="float" office:value="402.12989099999987" table:style-name="ce135">
            <text:p><text:s/>402<text:s/></text:p>
          </table:table-cell>
          <table:table-cell office:value-type="float" office:value="1449.2945269999941" table:style-name="ce135">
            <text:p><text:s/>1,449<text:s/></text:p>
          </table:table-cell>
          <table:table-cell office:value-type="float" office:value="1272.8419339999998" table:style-name="ce135">
            <text:p><text:s/>1,273<text:s/></text:p>
          </table:table-cell>
          <table:table-cell office:value-type="float" office:value="4327.033219999993" table:formula="of:=SUM([.E213:.H213])" table:style-name="ce61">
            <text:p><text:s/>4,32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06.19615000000012" table:style-name="ce33">
            <text:p><text:s/>106<text:s/></text:p>
          </table:table-cell>
          <table:table-cell office:value-type="float" office:value="63.058284000000064" table:style-name="ce33">
            <text:p><text:s/>63<text:s/></text:p>
          </table:table-cell>
          <table:table-cell office:value-type="float" office:value="75.921132000000014" table:style-name="ce33">
            <text:p><text:s/>76<text:s/></text:p>
          </table:table-cell>
          <table:table-cell office:value-type="float" office:value="258.28660700000017" table:style-name="ce33">
            <text:p><text:s/>258<text:s/></text:p>
          </table:table-cell>
          <table:table-cell office:value-type="float" office:value="503.46217300000035" table:formula="of:=SUM([.E214:.H214])" table:style-name="ce61">
            <text:p><text:s/>50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308.963017999999" table:formula="of:=SUM([.E213:.E214])" table:style-name="ce127">
            <text:p><text:s/>1,309<text:s/></text:p>
          </table:table-cell>
          <table:table-cell office:value-type="float" office:value="465.18817499999994" table:formula="of:=SUM([.F213:.F214])" table:style-name="ce65">
            <text:p><text:s/>465<text:s/></text:p>
          </table:table-cell>
          <table:table-cell office:value-type="float" office:value="1525.215658999994" table:formula="of:=SUM([.G213:.G214])" table:style-name="ce65">
            <text:p><text:s/>1,525<text:s/></text:p>
          </table:table-cell>
          <table:table-cell office:value-type="float" office:value="1531.128541" table:formula="of:=SUM([.H213:.H214])" table:style-name="ce65">
            <text:p><text:s/>1,531<text:s/></text:p>
          </table:table-cell>
          <table:table-cell office:value-type="float" office:value="4830.4953929999938" table:formula="of:=SUM([.I213:.I214])" table:style-name="ce66">
            <text:p><text:s/>4,83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117.87843700000003" table:style-name="ce28">
            <text:p><text:s/>118<text:s/></text:p>
          </table:table-cell>
          <table:table-cell office:value-type="float" office:value="101.13636999999997" table:style-name="ce29">
            <text:p><text:s/>101<text:s/></text:p>
          </table:table-cell>
          <table:table-cell office:value-type="float" office:value="308.75967099999986" table:style-name="ce29">
            <text:p><text:s/>309<text:s/></text:p>
          </table:table-cell>
          <table:table-cell office:value-type="float" office:value="968.00429700000018" table:style-name="ce30">
            <text:p><text:s/>968<text:s/></text:p>
          </table:table-cell>
          <table:table-cell office:value-type="float" office:value="1495.778775" table:formula="of:=SUM([.E216:.H216])" table:style-name="ce61">
            <text:p><text:s/>1,4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2504.9342319999978" table:style-name="ce32">
            <text:p><text:s/>2,505<text:s/></text:p>
          </table:table-cell>
          <table:table-cell office:value-type="float" office:value="499.43219199999976" table:style-name="ce33">
            <text:p><text:s/>499<text:s/></text:p>
          </table:table-cell>
          <table:table-cell office:value-type="float" office:value="1457.782430999999" table:style-name="ce33">
            <text:p><text:s/>1,458<text:s/></text:p>
          </table:table-cell>
          <table:table-cell office:value-type="float" office:value="1224.712184999999" table:style-name="ce34">
            <text:p><text:s/>1,225<text:s/></text:p>
          </table:table-cell>
          <table:table-cell office:value-type="float" office:value="5686.8610399999961" table:formula="of:=SUM([.E217:.H217])" table:style-name="ce61">
            <text:p><text:s/>5,68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95.950988000000066" table:style-name="ce32">
            <text:p><text:s/>96<text:s/></text:p>
          </table:table-cell>
          <table:table-cell office:value-type="float" office:value="9.9721000000000011" table:style-name="ce33">
            <text:p><text:s/>10<text:s/></text:p>
          </table:table-cell>
          <table:table-cell office:value-type="float" office:value="163.59843900000024" table:style-name="ce33">
            <text:p><text:s/>164<text:s/></text:p>
          </table:table-cell>
          <table:table-cell office:value-type="float" office:value="359.89185599999837" table:style-name="ce34">
            <text:p><text:s/>360<text:s/></text:p>
          </table:table-cell>
          <table:table-cell office:value-type="float" office:value="629.4133829999987" table:formula="of:=SUM([.E218:.H218])" table:style-name="ce61">
            <text:p><text:s/>6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office:value-type="float" office:value="52.738380000000092" table:style-name="ce33">
            <text:p><text:s/>53<text:s/></text:p>
          </table:table-cell>
          <table:table-cell office:value-type="float" office:value="203.72499599999989" table:style-name="ce34">
            <text:p><text:s/>204<text:s/></text:p>
          </table:table-cell>
          <table:table-cell office:value-type="float" office:value="256.46337599999998" table:formula="of:=SUM([.E219:.H219])" table:style-name="ce61">
            <text:p><text:s/>2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217.47751999999997" table:style-name="ce32">
            <text:p><text:s/>217<text:s/></text:p>
          </table:table-cell>
          <table:table-cell office:value-type="float" office:value="68.92097099999998" table:style-name="ce33">
            <text:p><text:s/>69<text:s/></text:p>
          </table:table-cell>
          <table:table-cell office:value-type="float" office:value="85.162282999999988" table:style-name="ce33">
            <text:p><text:s/>85<text:s/></text:p>
          </table:table-cell>
          <table:table-cell office:value-type="float" office:value="128.38853" table:style-name="ce34">
            <text:p><text:s/>128<text:s/></text:p>
          </table:table-cell>
          <table:table-cell office:value-type="float" office:value="499.94930399999993" table:formula="of:=SUM([.E220:.H220])" table:style-name="ce61">
            <text:p><text:s/>50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569.22226100000057" table:style-name="ce38">
            <text:p><text:s/>569<text:s/></text:p>
          </table:table-cell>
          <table:table-cell office:value-type="float" office:value="274.17297399999973" table:style-name="ce39">
            <text:p><text:s/>274<text:s/></text:p>
          </table:table-cell>
          <table:table-cell office:value-type="float" office:value="282.58407699999998" table:style-name="ce39">
            <text:p><text:s/>283<text:s/></text:p>
          </table:table-cell>
          <table:table-cell office:value-type="float" office:value="118.63856899999998" table:style-name="ce40">
            <text:p><text:s/>119<text:s/></text:p>
          </table:table-cell>
          <table:table-cell office:value-type="float" office:value="1244.6178810000004" table:formula="of:=SUM([.E221:.H221])" table:style-name="ce61">
            <text:p><text:s/>1,24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3505.463437999998" table:formula="of:=SUM([.E216:.E221])" table:style-name="ce65">
            <text:p><text:s/>3,505<text:s/></text:p>
          </table:table-cell>
          <table:table-cell office:value-type="float" office:value="953.63460699999939" table:formula="of:=SUM([.F216:.F221])" table:style-name="ce65">
            <text:p><text:s/>954<text:s/></text:p>
          </table:table-cell>
          <table:table-cell office:value-type="float" office:value="2350.6252809999992" table:formula="of:=SUM([.G216:.G221])" table:style-name="ce65">
            <text:p><text:s/>2,351<text:s/></text:p>
          </table:table-cell>
          <table:table-cell office:value-type="float" office:value="3003.3604329999976" table:formula="of:=SUM([.H216:.H221])" table:style-name="ce65">
            <text:p><text:s/>3,003<text:s/></text:p>
          </table:table-cell>
          <table:table-cell office:value-type="float" office:value="9813.0837589999937" table:formula="of:=SUM([.I216:.I221])" table:style-name="ce66">
            <text:p><text:s/>9,8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23.431954000000008" table:style-name="ce28">
            <text:p><text:s/>23<text:s/></text:p>
          </table:table-cell>
          <table:table-cell office:value-type="float" office:value="20.706425999999993" table:style-name="ce33">
            <text:p><text:s/>21<text:s/></text:p>
          </table:table-cell>
          <table:table-cell office:value-type="float" office:value="32.183943999999997" table:style-name="ce33">
            <text:p><text:s/>32<text:s/></text:p>
          </table:table-cell>
          <table:table-cell office:value-type="float" office:value="101.93626800000013" table:style-name="ce33">
            <text:p><text:s/>102<text:s/></text:p>
          </table:table-cell>
          <table:table-cell office:value-type="float" office:value="178.25859200000014" table:formula="of:=SUM([.E223:.H223])" table:style-name="ce61">
            <text:p><text:s/>17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413.85087200000015" table:style-name="ce38">
            <text:p><text:s/>414<text:s/></text:p>
          </table:table-cell>
          <table:table-cell office:value-type="float" office:value="31.589351000000011" table:style-name="ce33">
            <text:p><text:s/>32<text:s/></text:p>
          </table:table-cell>
          <table:table-cell office:value-type="float" office:value="725.66943900000035" table:style-name="ce33">
            <text:p><text:s/>726<text:s/></text:p>
          </table:table-cell>
          <table:table-cell office:value-type="float" office:value="332.60777499999983" table:style-name="ce33">
            <text:p><text:s/>333<text:s/></text:p>
          </table:table-cell>
          <table:table-cell office:value-type="float" office:value="1503.7174370000002" table:formula="of:=SUM([.E224:.H224])" table:style-name="ce61">
            <text:p><text:s/>1,5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437.28282600000017" table:formula="of:=SUM([.E223:.E224])" table:style-name="ce65">
            <text:p><text:s/>437<text:s/></text:p>
          </table:table-cell>
          <table:table-cell office:value-type="float" office:value="52.295777000000001" table:formula="of:=SUM([.F223:.F224])" table:style-name="ce65">
            <text:p><text:s/>52<text:s/></text:p>
          </table:table-cell>
          <table:table-cell office:value-type="float" office:value="757.85338300000035" table:formula="of:=SUM([.G223:.G224])" table:style-name="ce65">
            <text:p><text:s/>758<text:s/></text:p>
          </table:table-cell>
          <table:table-cell office:value-type="float" office:value="434.54404299999999" table:formula="of:=SUM([.H223:.H224])" table:style-name="ce65">
            <text:p><text:s/>435<text:s/></text:p>
          </table:table-cell>
          <table:table-cell office:value-type="float" office:value="1681.9760290000004" table:formula="of:=SUM([.I223:.I224])" table:style-name="ce66">
            <text:p><text:s/>1,68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7 Total</text:p>
          </table:table-cell>
          <table:table-cell table:number-columns-repeated="2" table:style-name="ce72"/>
          <table:table-cell office:value-type="float" office:value="5251.7092819999971" table:formula="of:=+[.E225]+[.E222]+[.E215]" table:style-name="ce134">
            <text:p><text:s/>5,252<text:s/></text:p>
          </table:table-cell>
          <table:table-cell office:value-type="float" office:value="1471.1185589999993" table:formula="of:=+[.F225]+[.F222]+[.F215]" table:style-name="ce134">
            <text:p><text:s/>1,471<text:s/></text:p>
          </table:table-cell>
          <table:table-cell office:value-type="float" office:value="4633.6943229999933" table:formula="of:=+[.G225]+[.G222]+[.G215]" table:style-name="ce134">
            <text:p><text:s/>4,634<text:s/></text:p>
          </table:table-cell>
          <table:table-cell office:value-type="float" office:value="4969.0330169999979" table:formula="of:=+[.H225]+[.H222]+[.H215]" table:style-name="ce134">
            <text:p><text:s/>4,969<text:s/></text:p>
          </table:table-cell>
          <table:table-cell office:value-type="float" office:value="16325.555180999989" table:formula="of:=+[.I225]+[.I222]+[.I215]" table:style-name="ce74">
            <text:p><text:s/>16,32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8" table:number-columns-spanned="1" table:number-rows-spanned="13" table:style-name="ce347">
            <text:p>2018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483" table:style-name="ce135">
            <text:p><text:s/>1,483<text:s/></text:p>
          </table:table-cell>
          <table:table-cell office:value-type="float" office:value="422" table:style-name="ce135">
            <text:p><text:s/>422<text:s/></text:p>
          </table:table-cell>
          <table:table-cell office:value-type="float" office:value="1470" table:style-name="ce135">
            <text:p><text:s/>1,470<text:s/></text:p>
          </table:table-cell>
          <table:table-cell office:value-type="float" office:value="1334" table:style-name="ce135">
            <text:p><text:s/>1,334<text:s/></text:p>
          </table:table-cell>
          <table:table-cell office:value-type="float" office:value="4709" table:formula="of:=SUM([.E227:.H227])" table:style-name="ce61">
            <text:p><text:s/>4,7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00.66800000000001" table:style-name="ce33">
            <text:p><text:s/>101<text:s/></text:p>
          </table:table-cell>
          <table:table-cell office:value-type="float" office:value="65.259" table:style-name="ce33">
            <text:p><text:s/>65<text:s/></text:p>
          </table:table-cell>
          <table:table-cell office:value-type="float" office:value="72.179000000000002" table:style-name="ce33">
            <text:p><text:s/>72<text:s/></text:p>
          </table:table-cell>
          <table:table-cell office:value-type="float" office:value="235.73099999999999" table:style-name="ce33">
            <text:p><text:s/>236<text:s/></text:p>
          </table:table-cell>
          <table:table-cell office:value-type="float" office:value="473.83699999999999" table:formula="of:=SUM([.E228:.H228])" table:style-name="ce61">
            <text:p><text:s/>47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583.6680000000001" table:formula="of:=SUM([.E227:.E228])" table:style-name="ce127">
            <text:p><text:s/>1,584<text:s/></text:p>
          </table:table-cell>
          <table:table-cell office:value-type="float" office:value="487.25900000000001" table:formula="of:=SUM([.F227:.F228])" table:style-name="ce65">
            <text:p><text:s/>487<text:s/></text:p>
          </table:table-cell>
          <table:table-cell office:value-type="float" office:value="1542.1790000000001" table:formula="of:=SUM([.G227:.G228])" table:style-name="ce65">
            <text:p><text:s/>1,542<text:s/></text:p>
          </table:table-cell>
          <table:table-cell office:value-type="float" office:value="1569.731" table:formula="of:=SUM([.H227:.H228])" table:style-name="ce65">
            <text:p><text:s/>1,570<text:s/></text:p>
          </table:table-cell>
          <table:table-cell office:value-type="float" office:value="5182.8369999999995" table:formula="of:=SUM([.I227:.I228])" table:style-name="ce66">
            <text:p><text:s/>5,1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111.015" table:style-name="ce28">
            <text:p><text:s/>111<text:s/></text:p>
          </table:table-cell>
          <table:table-cell office:value-type="float" office:value="91.909000000000006" table:style-name="ce29">
            <text:p><text:s/>92<text:s/></text:p>
          </table:table-cell>
          <table:table-cell office:value-type="float" office:value="320.43700000000001" table:style-name="ce29">
            <text:p><text:s/>320<text:s/></text:p>
          </table:table-cell>
          <table:table-cell office:value-type="float" office:value="871.827" table:style-name="ce30">
            <text:p><text:s/>872<text:s/></text:p>
          </table:table-cell>
          <table:table-cell office:value-type="float" office:value="1395.1880000000001" table:formula="of:=SUM([.E230:.H230])" table:style-name="ce61">
            <text:p><text:s/>1,3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2578.9180000000001" table:style-name="ce32">
            <text:p><text:s/>2,579<text:s/></text:p>
          </table:table-cell>
          <table:table-cell office:value-type="float" office:value="468.00200000000001" table:style-name="ce33">
            <text:p><text:s/>468<text:s/></text:p>
          </table:table-cell>
          <table:table-cell office:value-type="float" office:value="1305.606" table:style-name="ce33">
            <text:p><text:s/>1,306<text:s/></text:p>
          </table:table-cell>
          <table:table-cell office:value-type="float" office:value="1289.931" table:style-name="ce34">
            <text:p><text:s/>1,290<text:s/></text:p>
          </table:table-cell>
          <table:table-cell office:value-type="float" office:value="5642.4570000000003" table:formula="of:=SUM([.E231:.H231])" table:style-name="ce61">
            <text:p><text:s/>5,64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156.048" table:style-name="ce32">
            <text:p><text:s/>156<text:s/></text:p>
          </table:table-cell>
          <table:table-cell office:value-type="float" office:value="1" table:style-name="ce33">
            <text:p><text:s/>1<text:s/></text:p>
          </table:table-cell>
          <table:table-cell office:value-type="float" office:value="16.629000000000001" table:style-name="ce33">
            <text:p><text:s/>17<text:s/></text:p>
          </table:table-cell>
          <table:table-cell office:value-type="float" office:value="204.279" table:style-name="ce34">
            <text:p><text:s/>204<text:s/></text:p>
          </table:table-cell>
          <table:table-cell office:value-type="float" office:value="377.95600000000002" table:formula="of:=SUM([.E232:.H232])" table:style-name="ce61">
            <text:p><text:s/>37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2.11" table:style-name="ce33">
            <text:p><text:s/>52<text:s/></text:p>
          </table:table-cell>
          <table:table-cell office:value-type="float" office:value="214.49600000000001" table:style-name="ce34">
            <text:p><text:s/>214<text:s/></text:p>
          </table:table-cell>
          <table:table-cell office:value-type="float" office:value="266.60599999999999" table:formula="of:=SUM([.E233:.H233])" table:style-name="ce61">
            <text:p><text:s/>2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193.52500000000001" table:style-name="ce32">
            <text:p><text:s/>194<text:s/></text:p>
          </table:table-cell>
          <table:table-cell office:value-type="float" office:value="75.263000000000005" table:style-name="ce33">
            <text:p><text:s/>75<text:s/></text:p>
          </table:table-cell>
          <table:table-cell office:value-type="float" office:value="58.646000000000001" table:style-name="ce33">
            <text:p><text:s/>59<text:s/></text:p>
          </table:table-cell>
          <table:table-cell office:value-type="float" office:value="147.31299999999999" table:style-name="ce34">
            <text:p><text:s/>147<text:s/></text:p>
          </table:table-cell>
          <table:table-cell office:value-type="float" office:value="474.74700000000001" table:formula="of:=SUM([.E234:.H234])" table:style-name="ce61">
            <text:p><text:s/>47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421.33" table:style-name="ce38">
            <text:p><text:s/>421<text:s/></text:p>
          </table:table-cell>
          <table:table-cell office:value-type="float" office:value="300.85599999999999" table:style-name="ce39">
            <text:p><text:s/>301<text:s/></text:p>
          </table:table-cell>
          <table:table-cell office:value-type="float" office:value="255.221" table:style-name="ce39">
            <text:p><text:s/>255<text:s/></text:p>
          </table:table-cell>
          <table:table-cell office:value-type="float" office:value="494.76799999999997" table:style-name="ce40">
            <text:p><text:s/>495<text:s/></text:p>
          </table:table-cell>
          <table:table-cell office:value-type="float" office:value="1472.175" table:formula="of:=SUM([.E235:.H235])" table:style-name="ce61">
            <text:p><text:s/>1,47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3460.8359999999998" table:formula="of:=SUM([.E230:.E235])" table:style-name="ce65">
            <text:p><text:s/>3,461<text:s/></text:p>
          </table:table-cell>
          <table:table-cell office:value-type="float" office:value="937.03000000000009" table:formula="of:=SUM([.F230:.F235])" table:style-name="ce65">
            <text:p><text:s/>937<text:s/></text:p>
          </table:table-cell>
          <table:table-cell office:value-type="float" office:value="2008.6489999999999" table:formula="of:=SUM([.G230:.G235])" table:style-name="ce65">
            <text:p><text:s/>2,009<text:s/></text:p>
          </table:table-cell>
          <table:table-cell office:value-type="float" office:value="3222.614" table:formula="of:=SUM([.H230:.H235])" table:style-name="ce65">
            <text:p><text:s/>3,223<text:s/></text:p>
          </table:table-cell>
          <table:table-cell office:value-type="float" office:value="9629.1290000000008" table:formula="of:=SUM([.I230:.I235])" table:style-name="ce66">
            <text:p><text:s/>9,6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52.38" table:style-name="ce28">
            <text:p><text:s/>52<text:s/></text:p>
          </table:table-cell>
          <table:table-cell office:value-type="float" office:value="20.69" table:style-name="ce33">
            <text:p><text:s/>21<text:s/></text:p>
          </table:table-cell>
          <table:table-cell office:value-type="float" office:value="32.65" table:style-name="ce33">
            <text:p><text:s/>33<text:s/></text:p>
          </table:table-cell>
          <table:table-cell office:value-type="float" office:value="110.68" table:style-name="ce33">
            <text:p><text:s/>111<text:s/></text:p>
          </table:table-cell>
          <table:table-cell office:value-type="float" office:value="216.4" table:formula="of:=SUM([.E237:.H237])" table:style-name="ce61">
            <text:p><text:s/>2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422.23" table:style-name="ce38">
            <text:p><text:s/>422<text:s/></text:p>
          </table:table-cell>
          <table:table-cell office:value-type="float" office:value="32.868000000000002" table:style-name="ce33">
            <text:p><text:s/>33<text:s/></text:p>
          </table:table-cell>
          <table:table-cell office:value-type="float" office:value="773.16200000000003" table:style-name="ce33">
            <text:p><text:s/>773<text:s/></text:p>
          </table:table-cell>
          <table:table-cell office:value-type="float" office:value="351.74599999999998" table:style-name="ce33">
            <text:p><text:s/>352<text:s/></text:p>
          </table:table-cell>
          <table:table-cell office:value-type="float" office:value="1580.0059999999999" table:formula="of:=SUM([.E238:.H238])" table:style-name="ce61">
            <text:p><text:s/>1,5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474.61" table:formula="of:=SUM([.E237:.E238])" table:style-name="ce65">
            <text:p><text:s/>475<text:s/></text:p>
          </table:table-cell>
          <table:table-cell office:value-type="float" office:value="53.558000000000007" table:formula="of:=SUM([.F237:.F238])" table:style-name="ce65">
            <text:p><text:s/>54<text:s/></text:p>
          </table:table-cell>
          <table:table-cell office:value-type="float" office:value="805.81200000000001" table:formula="of:=SUM([.G237:.G238])" table:style-name="ce65">
            <text:p><text:s/>806<text:s/></text:p>
          </table:table-cell>
          <table:table-cell office:value-type="float" office:value="462.42599999999999" table:formula="of:=SUM([.H237:.H238])" table:style-name="ce65">
            <text:p><text:s/>462<text:s/></text:p>
          </table:table-cell>
          <table:table-cell office:value-type="float" office:value="1796.4059999999999" table:formula="of:=SUM([.I237:.I238])" table:style-name="ce66">
            <text:p><text:s/>1,796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8 Total</text:p>
          </table:table-cell>
          <table:table-cell table:number-columns-repeated="2" table:style-name="ce72"/>
          <table:table-cell office:value-type="float" office:value="5519.1139999999996" table:formula="of:=+[.E239]+[.E236]+[.E229]" table:style-name="ce134">
            <text:p><text:s/>5,519<text:s/></text:p>
          </table:table-cell>
          <table:table-cell office:value-type="float" office:value="1477.8470000000002" table:formula="of:=+[.F239]+[.F236]+[.F229]" table:style-name="ce134">
            <text:p><text:s/>1,478<text:s/></text:p>
          </table:table-cell>
          <table:table-cell office:value-type="float" office:value="4356.6399999999994" table:formula="of:=+[.G239]+[.G236]+[.G229]" table:style-name="ce134">
            <text:p><text:s/>4,357<text:s/></text:p>
          </table:table-cell>
          <table:table-cell office:value-type="float" office:value="5254.7709999999997" table:formula="of:=+[.H239]+[.H236]+[.H229]" table:style-name="ce134">
            <text:p><text:s/>5,255<text:s/></text:p>
          </table:table-cell>
          <table:table-cell office:value-type="float" office:value="16608.371999999999" table:formula="of:=+[.I239]+[.I236]+[.I229]" table:style-name="ce74">
            <text:p><text:s/>16,60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9" table:number-columns-spanned="1" table:number-rows-spanned="13" table:style-name="ce347">
            <text:p>2019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501" table:style-name="ce135">
            <text:p><text:s/>1,501<text:s/></text:p>
          </table:table-cell>
          <table:table-cell office:value-type="float" office:value="481" table:style-name="ce135">
            <text:p><text:s/>481<text:s/></text:p>
          </table:table-cell>
          <table:table-cell office:value-type="float" office:value="1552" table:style-name="ce135">
            <text:p><text:s/>1,552<text:s/></text:p>
          </table:table-cell>
          <table:table-cell office:value-type="float" office:value="1088" table:style-name="ce135">
            <text:p><text:s/>1,088<text:s/></text:p>
          </table:table-cell>
          <table:table-cell office:value-type="float" office:value="4622" table:formula="of:=SUM([.E241:.H241])" table:style-name="ce61">
            <text:p><text:s/>4,62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01" table:style-name="ce33">
            <text:p><text:s/>101<text:s/></text:p>
          </table:table-cell>
          <table:table-cell office:value-type="float" office:value="67" table:style-name="ce33">
            <text:p><text:s/>67<text:s/></text:p>
          </table:table-cell>
          <table:table-cell office:value-type="float" office:value="68" table:style-name="ce33">
            <text:p><text:s/>68<text:s/></text:p>
          </table:table-cell>
          <table:table-cell office:value-type="float" office:value="231" table:style-name="ce33">
            <text:p><text:s/>231<text:s/></text:p>
          </table:table-cell>
          <table:table-cell office:value-type="float" office:value="467" table:formula="of:=SUM([.E242:.H242])" table:style-name="ce61">
            <text:p><text:s/>4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602" table:formula="of:=SUM([.E241:.E242])" table:style-name="ce127">
            <text:p><text:s/>1,602<text:s/></text:p>
          </table:table-cell>
          <table:table-cell office:value-type="float" office:value="548" table:formula="of:=SUM([.F241:.F242])" table:style-name="ce65">
            <text:p><text:s/>548<text:s/></text:p>
          </table:table-cell>
          <table:table-cell office:value-type="float" office:value="1620" table:formula="of:=SUM([.G241:.G242])" table:style-name="ce65">
            <text:p><text:s/>1,620<text:s/></text:p>
          </table:table-cell>
          <table:table-cell office:value-type="float" office:value="1319" table:formula="of:=SUM([.H241:.H242])" table:style-name="ce65">
            <text:p><text:s/>1,319<text:s/></text:p>
          </table:table-cell>
          <table:table-cell office:value-type="float" office:value="5089" table:formula="of:=SUM([.I241:.I242])" table:style-name="ce66">
            <text:p><text:s/>5,0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67" table:style-name="ce28">
            <text:p><text:s/>67<text:s/></text:p>
          </table:table-cell>
          <table:table-cell office:value-type="float" office:value="87" table:style-name="ce29">
            <text:p><text:s/>87<text:s/></text:p>
          </table:table-cell>
          <table:table-cell office:value-type="float" office:value="324" table:style-name="ce29">
            <text:p><text:s/>324<text:s/></text:p>
          </table:table-cell>
          <table:table-cell office:value-type="float" office:value="865" table:style-name="ce30">
            <text:p><text:s/>865<text:s/></text:p>
          </table:table-cell>
          <table:table-cell office:value-type="float" office:value="1343" table:formula="of:=SUM([.E244:.H244])" table:style-name="ce61">
            <text:p><text:s/>1,3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2584" table:style-name="ce32">
            <text:p><text:s/>2,584<text:s/></text:p>
          </table:table-cell>
          <table:table-cell office:value-type="float" office:value="491" table:style-name="ce33">
            <text:p><text:s/>491<text:s/></text:p>
          </table:table-cell>
          <table:table-cell office:value-type="float" office:value="1464" table:style-name="ce33">
            <text:p><text:s/>1,464<text:s/></text:p>
          </table:table-cell>
          <table:table-cell office:value-type="float" office:value="1484" table:style-name="ce34">
            <text:p><text:s/>1,484<text:s/></text:p>
          </table:table-cell>
          <table:table-cell office:value-type="float" office:value="6023" table:formula="of:=SUM([.E245:.H245])" table:style-name="ce61">
            <text:p><text:s/>6,0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180" table:style-name="ce32">
            <text:p><text:s/>18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4" table:style-name="ce33">
            <text:p><text:s/>14<text:s/></text:p>
          </table:table-cell>
          <table:table-cell office:value-type="float" office:value="142" table:style-name="ce34">
            <text:p><text:s/>142<text:s/></text:p>
          </table:table-cell>
          <table:table-cell office:value-type="float" office:value="336" table:formula="of:=SUM([.E246:.H246])" table:style-name="ce61">
            <text:p><text:s/>33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3" table:style-name="ce33">
            <text:p><text:s/>53<text:s/></text:p>
          </table:table-cell>
          <table:table-cell office:value-type="float" office:value="194" table:style-name="ce34">
            <text:p><text:s/>194<text:s/></text:p>
          </table:table-cell>
          <table:table-cell office:value-type="float" office:value="247" table:formula="of:=SUM([.E247:.H247])" table:style-name="ce61">
            <text:p><text:s/>2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145" table:style-name="ce32">
            <text:p><text:s/>145<text:s/></text:p>
          </table:table-cell>
          <table:table-cell office:value-type="float" office:value="80" table:style-name="ce33">
            <text:p><text:s/>80<text:s/></text:p>
          </table:table-cell>
          <table:table-cell office:value-type="float" office:value="82" table:style-name="ce33">
            <text:p><text:s/>82<text:s/></text:p>
          </table:table-cell>
          <table:table-cell office:value-type="float" office:value="168" table:style-name="ce34">
            <text:p><text:s/>168<text:s/></text:p>
          </table:table-cell>
          <table:table-cell office:value-type="float" office:value="475" table:formula="of:=SUM([.E248:.H248])" table:style-name="ce61">
            <text:p><text:s/>47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652" table:style-name="ce38">
            <text:p><text:s/>652<text:s/></text:p>
          </table:table-cell>
          <table:table-cell office:value-type="float" office:value="282" table:style-name="ce39">
            <text:p><text:s/>282<text:s/></text:p>
          </table:table-cell>
          <table:table-cell office:value-type="float" office:value="251" table:style-name="ce39">
            <text:p><text:s/>251<text:s/></text:p>
          </table:table-cell>
          <table:table-cell office:value-type="float" office:value="2261" table:style-name="ce40">
            <text:p><text:s/>2,261<text:s/></text:p>
          </table:table-cell>
          <table:table-cell office:value-type="float" office:value="3446" table:formula="of:=SUM([.E249:.H249])" table:style-name="ce61">
            <text:p><text:s/>3,4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3628" table:formula="of:=SUM([.E244:.E249])" table:style-name="ce65">
            <text:p><text:s/>3,628<text:s/></text:p>
          </table:table-cell>
          <table:table-cell office:value-type="float" office:value="940" table:formula="of:=SUM([.F244:.F249])" table:style-name="ce65">
            <text:p><text:s/>940<text:s/></text:p>
          </table:table-cell>
          <table:table-cell office:value-type="float" office:value="2188" table:formula="of:=SUM([.G244:.G249])" table:style-name="ce65">
            <text:p><text:s/>2,188<text:s/></text:p>
          </table:table-cell>
          <table:table-cell office:value-type="float" office:value="5114" table:formula="of:=SUM([.H244:.H249])" table:style-name="ce65">
            <text:p><text:s/>5,114<text:s/></text:p>
          </table:table-cell>
          <table:table-cell office:value-type="float" office:value="11870" table:formula="of:=SUM([.I244:.I249])" table:style-name="ce66">
            <text:p><text:s/>11,87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23" table:style-name="ce28">
            <text:p><text:s/>23<text:s/></text:p>
          </table:table-cell>
          <table:table-cell office:value-type="float" office:value="23" table:style-name="ce33">
            <text:p><text:s/>23<text:s/></text:p>
          </table:table-cell>
          <table:table-cell office:value-type="float" office:value="26" table:style-name="ce33">
            <text:p><text:s/>26<text:s/></text:p>
          </table:table-cell>
          <table:table-cell office:value-type="float" office:value="105" table:style-name="ce33">
            <text:p><text:s/>105<text:s/></text:p>
          </table:table-cell>
          <table:table-cell office:value-type="float" office:value="177" table:formula="of:=SUM([.E251:.H251])" table:style-name="ce61">
            <text:p><text:s/>17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491" table:style-name="ce38">
            <text:p><text:s/>491<text:s/></text:p>
          </table:table-cell>
          <table:table-cell office:value-type="float" office:value="30" table:style-name="ce33">
            <text:p><text:s/>30<text:s/></text:p>
          </table:table-cell>
          <table:table-cell office:value-type="float" office:value="760" table:style-name="ce33">
            <text:p><text:s/>760<text:s/></text:p>
          </table:table-cell>
          <table:table-cell office:value-type="float" office:value="334" table:style-name="ce33">
            <text:p><text:s/>334<text:s/></text:p>
          </table:table-cell>
          <table:table-cell office:value-type="float" office:value="1615" table:formula="of:=SUM([.E252:.H252])" table:style-name="ce61">
            <text:p><text:s/>1,6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514" table:formula="of:=SUM([.E251:.E252])" table:style-name="ce65">
            <text:p><text:s/>514<text:s/></text:p>
          </table:table-cell>
          <table:table-cell office:value-type="float" office:value="53" table:formula="of:=SUM([.F251:.F252])" table:style-name="ce65">
            <text:p><text:s/>53<text:s/></text:p>
          </table:table-cell>
          <table:table-cell office:value-type="float" office:value="786" table:formula="of:=SUM([.G251:.G252])" table:style-name="ce65">
            <text:p><text:s/>786<text:s/></text:p>
          </table:table-cell>
          <table:table-cell office:value-type="float" office:value="439" table:formula="of:=SUM([.H251:.H252])" table:style-name="ce65">
            <text:p><text:s/>439<text:s/></text:p>
          </table:table-cell>
          <table:table-cell office:value-type="float" office:value="1792" table:formula="of:=SUM([.I251:.I252])" table:style-name="ce66">
            <text:p><text:s/>1,79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19 Total</text:p>
          </table:table-cell>
          <table:table-cell table:number-columns-repeated="2" table:style-name="ce72"/>
          <table:table-cell office:value-type="float" office:value="5744" table:formula="of:=+[.E253]+[.E250]+[.E243]" table:style-name="ce134">
            <text:p><text:s/>5,744<text:s/></text:p>
          </table:table-cell>
          <table:table-cell office:value-type="float" office:value="1541" table:formula="of:=+[.F253]+[.F250]+[.F243]" table:style-name="ce134">
            <text:p><text:s/>1,541<text:s/></text:p>
          </table:table-cell>
          <table:table-cell office:value-type="float" office:value="4594" table:formula="of:=+[.G253]+[.G250]+[.G243]" table:style-name="ce134">
            <text:p><text:s/>4,594<text:s/></text:p>
          </table:table-cell>
          <table:table-cell office:value-type="float" office:value="6872" table:formula="of:=+[.H253]+[.H250]+[.H243]" table:style-name="ce134">
            <text:p><text:s/>6,872<text:s/></text:p>
          </table:table-cell>
          <table:table-cell office:value-type="float" office:value="18751" table:formula="of:=+[.I253]+[.I250]+[.I243]" table:style-name="ce74">
            <text:p><text:s/>18,75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0" table:number-columns-spanned="1" table:number-rows-spanned="13" table:style-name="ce347">
            <text:p>2020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415" table:style-name="ce135">
            <text:p><text:s/>1,415<text:s/></text:p>
          </table:table-cell>
          <table:table-cell office:value-type="float" office:value="504" table:style-name="ce135">
            <text:p><text:s/>504<text:s/></text:p>
          </table:table-cell>
          <table:table-cell office:value-type="float" office:value="1548" table:style-name="ce135">
            <text:p><text:s/>1,548<text:s/></text:p>
          </table:table-cell>
          <table:table-cell office:value-type="float" office:value="1093" table:style-name="ce135">
            <text:p><text:s/>1,093<text:s/></text:p>
          </table:table-cell>
          <table:table-cell office:value-type="float" office:value="4560" table:formula="of:=SUM([.E255:.H255])" table:style-name="ce61">
            <text:p><text:s/>4,5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16" table:style-name="ce33">
            <text:p><text:s/>116<text:s/></text:p>
          </table:table-cell>
          <table:table-cell office:value-type="float" office:value="59" table:style-name="ce33">
            <text:p><text:s/>59<text:s/></text:p>
          </table:table-cell>
          <table:table-cell office:value-type="float" office:value="49" table:style-name="ce33">
            <text:p><text:s/>49<text:s/></text:p>
          </table:table-cell>
          <table:table-cell office:value-type="float" office:value="192" table:style-name="ce33">
            <text:p><text:s/>192<text:s/></text:p>
          </table:table-cell>
          <table:table-cell office:value-type="float" office:value="416" table:formula="of:=SUM([.E256:.H256])" table:style-name="ce61">
            <text:p><text:s/>4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531" table:formula="of:=SUM([.E255:.E256])" table:style-name="ce127">
            <text:p><text:s/>1,531<text:s/></text:p>
          </table:table-cell>
          <table:table-cell office:value-type="float" office:value="563" table:formula="of:=SUM([.F255:.F256])" table:style-name="ce65">
            <text:p><text:s/>563<text:s/></text:p>
          </table:table-cell>
          <table:table-cell office:value-type="float" office:value="1597" table:formula="of:=SUM([.G255:.G256])" table:style-name="ce65">
            <text:p><text:s/>1,597<text:s/></text:p>
          </table:table-cell>
          <table:table-cell office:value-type="float" office:value="1285" table:formula="of:=SUM([.H255:.H256])" table:style-name="ce65">
            <text:p><text:s/>1,285<text:s/></text:p>
          </table:table-cell>
          <table:table-cell office:value-type="float" office:value="4976" table:formula="of:=SUM([.I255:.I256])" table:style-name="ce66">
            <text:p><text:s/>4,97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485" table:style-name="ce28">
            <text:p><text:s/>485<text:s/></text:p>
          </table:table-cell>
          <table:table-cell office:value-type="float" office:value="20" table:style-name="ce29">
            <text:p><text:s/>20<text:s/></text:p>
          </table:table-cell>
          <table:table-cell office:value-type="float" office:value="271" table:style-name="ce29">
            <text:p><text:s/>271<text:s/></text:p>
          </table:table-cell>
          <table:table-cell office:value-type="float" office:value="698" table:style-name="ce30">
            <text:p><text:s/>698<text:s/></text:p>
          </table:table-cell>
          <table:table-cell office:value-type="float" office:value="1474" table:formula="of:=SUM([.E258:.H258])" table:style-name="ce61">
            <text:p><text:s/>1,47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2563" table:style-name="ce32">
            <text:p><text:s/>2,563<text:s/></text:p>
          </table:table-cell>
          <table:table-cell office:value-type="float" office:value="528" table:style-name="ce33">
            <text:p><text:s/>528<text:s/></text:p>
          </table:table-cell>
          <table:table-cell office:value-type="float" office:value="1870" table:style-name="ce33">
            <text:p><text:s/>1,870<text:s/></text:p>
          </table:table-cell>
          <table:table-cell office:value-type="float" office:value="1582" table:style-name="ce34">
            <text:p><text:s/>1,582<text:s/></text:p>
          </table:table-cell>
          <table:table-cell office:value-type="float" office:value="6543" table:formula="of:=SUM([.E259:.H259])" table:style-name="ce61">
            <text:p><text:s/>6,5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190" table:style-name="ce32">
            <text:p><text:s/>190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7" table:style-name="ce33">
            <text:p><text:s/>17<text:s/></text:p>
          </table:table-cell>
          <table:table-cell office:value-type="float" office:value="136" table:style-name="ce34">
            <text:p><text:s/>136<text:s/></text:p>
          </table:table-cell>
          <table:table-cell office:value-type="float" office:value="343" table:formula="of:=SUM([.E260:.H260])" table:style-name="ce61">
            <text:p><text:s/>3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8" table:style-name="ce33">
            <text:p><text:s/>58<text:s/></text:p>
          </table:table-cell>
          <table:table-cell office:value-type="float" office:value="221" table:style-name="ce34">
            <text:p><text:s/>221<text:s/></text:p>
          </table:table-cell>
          <table:table-cell office:value-type="float" office:value="279" table:formula="of:=SUM([.E261:.H261])" table:style-name="ce61">
            <text:p><text:s/>2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135" table:style-name="ce32">
            <text:p><text:s/>135<text:s/></text:p>
          </table:table-cell>
          <table:table-cell office:value-type="float" office:value="76" table:style-name="ce33">
            <text:p><text:s/>76<text:s/></text:p>
          </table:table-cell>
          <table:table-cell office:value-type="float" office:value="83" table:style-name="ce33">
            <text:p><text:s/>83<text:s/></text:p>
          </table:table-cell>
          <table:table-cell office:value-type="float" office:value="154" table:style-name="ce34">
            <text:p><text:s/>154<text:s/></text:p>
          </table:table-cell>
          <table:table-cell office:value-type="float" office:value="448" table:formula="of:=SUM([.E262:.H262])" table:style-name="ce61">
            <text:p><text:s/>44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667" table:style-name="ce38">
            <text:p><text:s/>667<text:s/></text:p>
          </table:table-cell>
          <table:table-cell office:value-type="float" office:value="262" table:style-name="ce39">
            <text:p><text:s/>262<text:s/></text:p>
          </table:table-cell>
          <table:table-cell office:value-type="float" office:value="236" table:style-name="ce39">
            <text:p><text:s/>236<text:s/></text:p>
          </table:table-cell>
          <table:table-cell office:value-type="float" office:value="2614" table:style-name="ce40">
            <text:p><text:s/>2,614<text:s/></text:p>
          </table:table-cell>
          <table:table-cell office:value-type="float" office:value="3779" table:formula="of:=SUM([.E263:.H263])" table:style-name="ce61">
            <text:p><text:s/>3,7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4040" table:formula="of:=SUM([.E258:.E263])" table:style-name="ce65">
            <text:p><text:s/>4,040<text:s/></text:p>
          </table:table-cell>
          <table:table-cell office:value-type="float" office:value="886" table:formula="of:=SUM([.F258:.F263])" table:style-name="ce65">
            <text:p><text:s/>886<text:s/></text:p>
          </table:table-cell>
          <table:table-cell office:value-type="float" office:value="2535" table:formula="of:=SUM([.G258:.G263])" table:style-name="ce65">
            <text:p><text:s/>2,535<text:s/></text:p>
          </table:table-cell>
          <table:table-cell office:value-type="float" office:value="5405" table:formula="of:=SUM([.H258:.H263])" table:style-name="ce65">
            <text:p><text:s/>5,405<text:s/></text:p>
          </table:table-cell>
          <table:table-cell office:value-type="float" office:value="12866" table:formula="of:=SUM([.I258:.I263])" table:style-name="ce66">
            <text:p><text:s/>12,86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35" table:style-name="ce28">
            <text:p><text:s/>35<text:s/></text:p>
          </table:table-cell>
          <table:table-cell office:value-type="float" office:value="16" table:style-name="ce33">
            <text:p><text:s/>16<text:s/></text:p>
          </table:table-cell>
          <table:table-cell office:value-type="float" office:value="37" table:style-name="ce33">
            <text:p><text:s/>37<text:s/></text:p>
          </table:table-cell>
          <table:table-cell office:value-type="float" office:value="91" table:style-name="ce33">
            <text:p><text:s/>91<text:s/></text:p>
          </table:table-cell>
          <table:table-cell office:value-type="float" office:value="179" table:formula="of:=SUM([.E265:.H265])" table:style-name="ce61">
            <text:p><text:s/>1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555" table:style-name="ce38">
            <text:p><text:s/>555<text:s/></text:p>
          </table:table-cell>
          <table:table-cell office:value-type="float" office:value="22" table:style-name="ce33">
            <text:p><text:s/>22<text:s/></text:p>
          </table:table-cell>
          <table:table-cell office:value-type="float" office:value="715" table:style-name="ce33">
            <text:p><text:s/>715<text:s/></text:p>
          </table:table-cell>
          <table:table-cell office:value-type="float" office:value="264" table:style-name="ce33">
            <text:p><text:s/>264<text:s/></text:p>
          </table:table-cell>
          <table:table-cell office:value-type="float" office:value="1556" table:formula="of:=SUM([.E266:.H266])" table:style-name="ce61">
            <text:p><text:s/>1,5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590" table:formula="of:=SUM([.E265:.E266])" table:style-name="ce65">
            <text:p><text:s/>590<text:s/></text:p>
          </table:table-cell>
          <table:table-cell office:value-type="float" office:value="38" table:formula="of:=SUM([.F265:.F266])" table:style-name="ce65">
            <text:p><text:s/>38<text:s/></text:p>
          </table:table-cell>
          <table:table-cell office:value-type="float" office:value="752" table:formula="of:=SUM([.G265:.G266])" table:style-name="ce65">
            <text:p><text:s/>752<text:s/></text:p>
          </table:table-cell>
          <table:table-cell office:value-type="float" office:value="355" table:formula="of:=SUM([.H265:.H266])" table:style-name="ce65">
            <text:p><text:s/>355<text:s/></text:p>
          </table:table-cell>
          <table:table-cell office:value-type="float" office:value="1735" table:formula="of:=SUM([.I265:.I266])" table:style-name="ce66">
            <text:p><text:s/>1,735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0 Total</text:p>
          </table:table-cell>
          <table:table-cell table:number-columns-repeated="2" table:style-name="ce72"/>
          <table:table-cell office:value-type="float" office:value="6161" table:formula="of:=+[.E267]+[.E264]+[.E257]" table:style-name="ce134">
            <text:p><text:s/>6,161<text:s/></text:p>
          </table:table-cell>
          <table:table-cell office:value-type="float" office:value="1487" table:formula="of:=+[.F267]+[.F264]+[.F257]" table:style-name="ce134">
            <text:p><text:s/>1,487<text:s/></text:p>
          </table:table-cell>
          <table:table-cell office:value-type="float" office:value="4884" table:formula="of:=+[.G267]+[.G264]+[.G257]" table:style-name="ce134">
            <text:p><text:s/>4,884<text:s/></text:p>
          </table:table-cell>
          <table:table-cell office:value-type="float" office:value="7045" table:formula="of:=+[.H267]+[.H264]+[.H257]" table:style-name="ce134">
            <text:p><text:s/>7,045<text:s/></text:p>
          </table:table-cell>
          <table:table-cell office:value-type="float" office:value="19577" table:formula="of:=+[.I267]+[.I264]+[.I257]" table:style-name="ce74">
            <text:p><text:s/>19,577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1" table:number-columns-spanned="1" table:number-rows-spanned="13" table:style-name="ce347">
            <text:p>2021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575" table:style-name="ce135">
            <text:p><text:s/>1,575<text:s/></text:p>
          </table:table-cell>
          <table:table-cell office:value-type="float" office:value="526" table:style-name="ce135">
            <text:p><text:s/>526<text:s/></text:p>
          </table:table-cell>
          <table:table-cell office:value-type="float" office:value="1526" table:style-name="ce135">
            <text:p><text:s/>1,526<text:s/></text:p>
          </table:table-cell>
          <table:table-cell office:value-type="float" office:value="1264" table:style-name="ce135">
            <text:p><text:s/>1,264<text:s/></text:p>
          </table:table-cell>
          <table:table-cell office:value-type="float" office:value="4891" table:formula="of:=SUM([.E269:.H269])" table:style-name="ce61">
            <text:p><text:s/>4,89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44" table:style-name="ce33">
            <text:p><text:s/>144<text:s/></text:p>
          </table:table-cell>
          <table:table-cell office:value-type="float" office:value="68" table:style-name="ce33">
            <text:p><text:s/>68<text:s/></text:p>
          </table:table-cell>
          <table:table-cell office:value-type="float" office:value="62" table:style-name="ce33">
            <text:p><text:s/>62<text:s/></text:p>
          </table:table-cell>
          <table:table-cell office:value-type="float" office:value="229" table:style-name="ce33">
            <text:p><text:s/>229<text:s/></text:p>
          </table:table-cell>
          <table:table-cell office:value-type="float" office:value="503" table:formula="of:=SUM([.E270:.H270])" table:style-name="ce61">
            <text:p><text:s/>50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719" table:formula="of:=SUM([.E269:.E270])" table:style-name="ce127">
            <text:p><text:s/>1,719<text:s/></text:p>
          </table:table-cell>
          <table:table-cell office:value-type="float" office:value="594" table:formula="of:=SUM([.F269:.F270])" table:style-name="ce65">
            <text:p><text:s/>594<text:s/></text:p>
          </table:table-cell>
          <table:table-cell office:value-type="float" office:value="1588" table:formula="of:=SUM([.G269:.G270])" table:style-name="ce65">
            <text:p><text:s/>1,588<text:s/></text:p>
          </table:table-cell>
          <table:table-cell office:value-type="float" office:value="1493" table:formula="of:=SUM([.H269:.H270])" table:style-name="ce65">
            <text:p><text:s/>1,493<text:s/></text:p>
          </table:table-cell>
          <table:table-cell office:value-type="float" office:value="5394" table:formula="of:=SUM([.I269:.I270])" table:style-name="ce66">
            <text:p><text:s/>5,3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1895" table:style-name="ce28">
            <text:p><text:s/>1,895<text:s/></text:p>
          </table:table-cell>
          <table:table-cell office:value-type="float" office:value="60" table:style-name="ce29">
            <text:p><text:s/>60<text:s/></text:p>
          </table:table-cell>
          <table:table-cell office:value-type="float" office:value="376" table:style-name="ce29">
            <text:p><text:s/>376<text:s/></text:p>
          </table:table-cell>
          <table:table-cell office:value-type="float" office:value="785" table:style-name="ce30">
            <text:p><text:s/>785<text:s/></text:p>
          </table:table-cell>
          <table:table-cell office:value-type="float" office:value="3116" table:formula="of:=SUM([.E272:.H272])" table:style-name="ce61">
            <text:p><text:s/>3,1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2453" table:style-name="ce32">
            <text:p><text:s/>2,453<text:s/></text:p>
          </table:table-cell>
          <table:table-cell office:value-type="float" office:value="595" table:style-name="ce33">
            <text:p><text:s/>595<text:s/></text:p>
          </table:table-cell>
          <table:table-cell office:value-type="float" office:value="1749" table:style-name="ce33">
            <text:p><text:s/>1,749<text:s/></text:p>
          </table:table-cell>
          <table:table-cell office:value-type="float" office:value="1905" table:style-name="ce34">
            <text:p><text:s/>1,905<text:s/></text:p>
          </table:table-cell>
          <table:table-cell office:value-type="float" office:value="6702" table:formula="of:=SUM([.E273:.H273])" table:style-name="ce61">
            <text:p><text:s/>6,70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265" table:style-name="ce32">
            <text:p><text:s/>265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16" table:style-name="ce33">
            <text:p><text:s/>16<text:s/></text:p>
          </table:table-cell>
          <table:table-cell office:value-type="float" office:value="106" table:style-name="ce34">
            <text:p><text:s/>106<text:s/></text:p>
          </table:table-cell>
          <table:table-cell office:value-type="float" office:value="387" table:formula="of:=SUM([.E274:.H274])" table:style-name="ce61">
            <text:p><text:s/>38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60" table:style-name="ce33">
            <text:p><text:s/>60<text:s/></text:p>
          </table:table-cell>
          <table:table-cell office:value-type="float" office:value="178" table:style-name="ce34">
            <text:p><text:s/>178<text:s/></text:p>
          </table:table-cell>
          <table:table-cell office:value-type="float" office:value="238" table:formula="of:=SUM([.E275:.H275])" table:style-name="ce61">
            <text:p><text:s/>23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138" table:style-name="ce32">
            <text:p><text:s/>138<text:s/></text:p>
          </table:table-cell>
          <table:table-cell office:value-type="float" office:value="77" table:style-name="ce33">
            <text:p><text:s/>77<text:s/></text:p>
          </table:table-cell>
          <table:table-cell office:value-type="float" office:value="94" table:style-name="ce33">
            <text:p><text:s/>94<text:s/></text:p>
          </table:table-cell>
          <table:table-cell office:value-type="float" office:value="151" table:style-name="ce34">
            <text:p><text:s/>151<text:s/></text:p>
          </table:table-cell>
          <table:table-cell office:value-type="float" office:value="460" table:formula="of:=SUM([.E276:.H276])" table:style-name="ce61">
            <text:p><text:s/>4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631" table:style-name="ce38">
            <text:p><text:s/>631<text:s/></text:p>
          </table:table-cell>
          <table:table-cell office:value-type="float" office:value="280" table:style-name="ce39">
            <text:p><text:s/>280<text:s/></text:p>
          </table:table-cell>
          <table:table-cell office:value-type="float" office:value="291" table:style-name="ce39">
            <text:p><text:s/>291<text:s/></text:p>
          </table:table-cell>
          <table:table-cell office:value-type="float" office:value="2599" table:style-name="ce40">
            <text:p><text:s/>2,599<text:s/></text:p>
          </table:table-cell>
          <table:table-cell office:value-type="float" office:value="3801" table:formula="of:=SUM([.E277:.H277])" table:style-name="ce61">
            <text:p><text:s/>3,8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5382" table:formula="of:=SUM([.E272:.E277])" table:style-name="ce65">
            <text:p><text:s/>5,382<text:s/></text:p>
          </table:table-cell>
          <table:table-cell office:value-type="float" office:value="1012" table:formula="of:=SUM([.F272:.F277])" table:style-name="ce65">
            <text:p><text:s/>1,012<text:s/></text:p>
          </table:table-cell>
          <table:table-cell office:value-type="float" office:value="2586" table:formula="of:=SUM([.G272:.G277])" table:style-name="ce65">
            <text:p><text:s/>2,586<text:s/></text:p>
          </table:table-cell>
          <table:table-cell office:value-type="float" office:value="5724" table:formula="of:=SUM([.H272:.H277])" table:style-name="ce65">
            <text:p><text:s/>5,724<text:s/></text:p>
          </table:table-cell>
          <table:table-cell office:value-type="float" office:value="14704" table:formula="of:=SUM([.I272:.I277])" table:style-name="ce66">
            <text:p><text:s/>14,7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32.9" table:style-name="ce28">
            <text:p><text:s/>33<text:s/></text:p>
          </table:table-cell>
          <table:table-cell office:value-type="float" office:value="52.1" table:style-name="ce33">
            <text:p><text:s/>52<text:s/></text:p>
          </table:table-cell>
          <table:table-cell office:value-type="float" office:value="41.2" table:style-name="ce33">
            <text:p><text:s/>41<text:s/></text:p>
          </table:table-cell>
          <table:table-cell office:value-type="float" office:value="69.8" table:style-name="ce33">
            <text:p><text:s/>70<text:s/></text:p>
          </table:table-cell>
          <table:table-cell office:value-type="float" office:value="196" table:formula="of:=SUM([.E279:.H279])" table:style-name="ce61">
            <text:p><text:s/>1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564.6" table:style-name="ce38">
            <text:p><text:s/>565<text:s/></text:p>
          </table:table-cell>
          <table:table-cell office:value-type="float" office:value="27.4" table:style-name="ce33">
            <text:p><text:s/>27<text:s/></text:p>
          </table:table-cell>
          <table:table-cell office:value-type="float" office:value="617.4" table:style-name="ce33">
            <text:p><text:s/>617<text:s/></text:p>
          </table:table-cell>
          <table:table-cell office:value-type="float" office:value="411.7" table:style-name="ce33">
            <text:p><text:s/>412<text:s/></text:p>
          </table:table-cell>
          <table:table-cell office:value-type="float" office:value="1621.1000000000001" table:formula="of:=SUM([.E280:.H280])" table:style-name="ce61">
            <text:p><text:s/>1,6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597.5" table:formula="of:=SUM([.E279:.E280])" table:style-name="ce65">
            <text:p><text:s/>598<text:s/></text:p>
          </table:table-cell>
          <table:table-cell office:value-type="float" office:value="79.5" table:formula="of:=SUM([.F279:.F280])" table:style-name="ce65">
            <text:p><text:s/>80<text:s/></text:p>
          </table:table-cell>
          <table:table-cell office:value-type="float" office:value="658.6" table:formula="of:=SUM([.G279:.G280])" table:style-name="ce65">
            <text:p><text:s/>659<text:s/></text:p>
          </table:table-cell>
          <table:table-cell office:value-type="float" office:value="481.5" table:formula="of:=SUM([.H279:.H280])" table:style-name="ce65">
            <text:p><text:s/>482<text:s/></text:p>
          </table:table-cell>
          <table:table-cell office:value-type="float" office:value="1817.1000000000001" table:formula="of:=SUM([.I279:.I280])" table:style-name="ce66">
            <text:p><text:s/>1,817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1 Total</text:p>
          </table:table-cell>
          <table:table-cell table:number-columns-repeated="2" table:style-name="ce72"/>
          <table:table-cell office:value-type="float" office:value="7698.5" table:formula="of:=+[.E281]+[.E278]+[.E271]" table:style-name="ce134">
            <text:p><text:s/>7,699<text:s/></text:p>
          </table:table-cell>
          <table:table-cell office:value-type="float" office:value="1685.5" table:formula="of:=+[.F281]+[.F278]+[.F271]" table:style-name="ce134">
            <text:p><text:s/>1,686<text:s/></text:p>
          </table:table-cell>
          <table:table-cell office:value-type="float" office:value="4832.6000000000004" table:formula="of:=+[.G281]+[.G278]+[.G271]" table:style-name="ce134">
            <text:p><text:s/>4,833<text:s/></text:p>
          </table:table-cell>
          <table:table-cell office:value-type="float" office:value="7698.5" table:formula="of:=+[.H281]+[.H278]+[.H271]" table:style-name="ce134">
            <text:p><text:s/>7,699<text:s/></text:p>
          </table:table-cell>
          <table:table-cell office:value-type="float" office:value="21915.1" table:formula="of:=+[.I281]+[.I278]+[.I271]" table:style-name="ce74">
            <text:p><text:s/>21,91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2" table:number-columns-spanned="1" table:number-rows-spanned="13" table:style-name="ce347">
            <text:p>2022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1381" table:style-name="ce135">
            <text:p><text:s/>1,381<text:s/></text:p>
          </table:table-cell>
          <table:table-cell office:value-type="float" office:value="495" table:style-name="ce135">
            <text:p><text:s/>495<text:s/></text:p>
          </table:table-cell>
          <table:table-cell office:value-type="float" office:value="1842" table:style-name="ce135">
            <text:p><text:s/>1,842<text:s/></text:p>
          </table:table-cell>
          <table:table-cell office:value-type="float" office:value="1164" table:style-name="ce135">
            <text:p><text:s/>1,164<text:s/></text:p>
          </table:table-cell>
          <table:table-cell office:value-type="float" office:value="4882" table:formula="of:=SUM([.E283:.H283])" table:style-name="ce61">
            <text:p><text:s/>4,8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37" table:style-name="ce33">
            <text:p><text:s/>137<text:s/></text:p>
          </table:table-cell>
          <table:table-cell office:value-type="float" office:value="60" table:style-name="ce33">
            <text:p><text:s/>60<text:s/></text:p>
          </table:table-cell>
          <table:table-cell office:value-type="float" office:value="55" table:style-name="ce33">
            <text:p><text:s/>55<text:s/></text:p>
          </table:table-cell>
          <table:table-cell office:value-type="float" office:value="215" table:style-name="ce33">
            <text:p><text:s/>215<text:s/></text:p>
          </table:table-cell>
          <table:table-cell office:value-type="float" office:value="467" table:formula="of:=SUM([.E284:.H284])" table:style-name="ce61">
            <text:p><text:s/>4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518" table:formula="of:=SUM([.E283:.E284])" table:style-name="ce127">
            <text:p><text:s/>1,518<text:s/></text:p>
          </table:table-cell>
          <table:table-cell office:value-type="float" office:value="555" table:formula="of:=SUM([.F283:.F284])" table:style-name="ce65">
            <text:p><text:s/>555<text:s/></text:p>
          </table:table-cell>
          <table:table-cell office:value-type="float" office:value="1897" table:formula="of:=SUM([.G283:.G284])" table:style-name="ce65">
            <text:p><text:s/>1,897<text:s/></text:p>
          </table:table-cell>
          <table:table-cell office:value-type="float" office:value="1379" table:formula="of:=SUM([.H283:.H284])" table:style-name="ce65">
            <text:p><text:s/>1,379<text:s/></text:p>
          </table:table-cell>
          <table:table-cell office:value-type="float" office:value="5349" table:formula="of:=SUM([.I283:.I284])" table:style-name="ce66">
            <text:p><text:s/>5,34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2007" table:style-name="ce28">
            <text:p><text:s/>2,007<text:s/></text:p>
          </table:table-cell>
          <table:table-cell office:value-type="float" office:value="69" table:style-name="ce29">
            <text:p><text:s/>69<text:s/></text:p>
          </table:table-cell>
          <table:table-cell office:value-type="float" office:value="426" table:style-name="ce29">
            <text:p><text:s/>426<text:s/></text:p>
          </table:table-cell>
          <table:table-cell office:value-type="float" office:value="714" table:style-name="ce30">
            <text:p><text:s/>714<text:s/></text:p>
          </table:table-cell>
          <table:table-cell office:value-type="float" office:value="3216" table:formula="of:=SUM([.E286:.H286])" table:style-name="ce61">
            <text:p><text:s/>3,2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2467" table:style-name="ce32">
            <text:p><text:s/>2,467<text:s/></text:p>
          </table:table-cell>
          <table:table-cell office:value-type="float" office:value="652" table:style-name="ce33">
            <text:p><text:s/>652<text:s/></text:p>
          </table:table-cell>
          <table:table-cell office:value-type="float" office:value="1669" table:style-name="ce33">
            <text:p><text:s/>1,669<text:s/></text:p>
          </table:table-cell>
          <table:table-cell office:value-type="float" office:value="1842" table:style-name="ce34">
            <text:p><text:s/>1,842<text:s/></text:p>
          </table:table-cell>
          <table:table-cell office:value-type="float" office:value="6629" table:style-name="ce61">
            <text:p><text:s/>6,6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274" table:style-name="ce32">
            <text:p><text:s/>274<text:s/></text:p>
          </table:table-cell>
          <table:table-cell office:value-type="float" office:value="54" table:style-name="ce33">
            <text:p><text:s/>54<text:s/></text:p>
          </table:table-cell>
          <table:table-cell office:value-type="float" office:value="19" table:style-name="ce33">
            <text:p><text:s/>19<text:s/></text:p>
          </table:table-cell>
          <table:table-cell office:value-type="float" office:value="111" table:style-name="ce34">
            <text:p><text:s/>111<text:s/></text:p>
          </table:table-cell>
          <table:table-cell office:value-type="float" office:value="459" table:style-name="ce61">
            <text:p><text:s/>45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2" table:style-name="ce32">
            <text:p><text:s/>2<text:s/></text:p>
          </table:table-cell>
          <table:table-cell office:value-type="float" office:value="0" table:style-name="ce33">
            <text:p><text:s/>-<text:s/></text:p>
          </table:table-cell>
          <table:table-cell office:value-type="float" office:value="52" table:style-name="ce33">
            <text:p><text:s/>52<text:s/></text:p>
          </table:table-cell>
          <table:table-cell office:value-type="float" office:value="169" table:style-name="ce34">
            <text:p><text:s/>169<text:s/></text:p>
          </table:table-cell>
          <table:table-cell office:value-type="float" office:value="223" table:formula="of:=SUM([.E289:.H289])" table:style-name="ce61">
            <text:p><text:s/>2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104" table:style-name="ce32">
            <text:p><text:s/>104<text:s/></text:p>
          </table:table-cell>
          <table:table-cell office:value-type="float" office:value="85" table:style-name="ce33">
            <text:p><text:s/>85<text:s/></text:p>
          </table:table-cell>
          <table:table-cell office:value-type="float" office:value="71" table:style-name="ce33">
            <text:p><text:s/>71<text:s/></text:p>
          </table:table-cell>
          <table:table-cell office:value-type="float" office:value="129" table:style-name="ce34">
            <text:p><text:s/>129<text:s/></text:p>
          </table:table-cell>
          <table:table-cell office:value-type="float" office:value="389" table:formula="of:=SUM([.E290:.H290])" table:style-name="ce61">
            <text:p><text:s/>3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690" table:style-name="ce38">
            <text:p><text:s/>690<text:s/></text:p>
          </table:table-cell>
          <table:table-cell office:value-type="float" office:value="237" table:style-name="ce39">
            <text:p><text:s/>237<text:s/></text:p>
          </table:table-cell>
          <table:table-cell office:value-type="float" office:value="430" table:style-name="ce39">
            <text:p><text:s/>430<text:s/></text:p>
          </table:table-cell>
          <table:table-cell office:value-type="float" office:value="3894" table:style-name="ce40">
            <text:p><text:s/>3,894<text:s/></text:p>
          </table:table-cell>
          <table:table-cell office:value-type="float" office:value="5251" table:formula="of:=SUM([.E291:.H291])" table:style-name="ce61">
            <text:p><text:s/>5,25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5544" table:formula="of:=SUM([.E286:.E291])" table:style-name="ce65">
            <text:p><text:s/>5,544<text:s/></text:p>
          </table:table-cell>
          <table:table-cell office:value-type="float" office:value="1097" table:formula="of:=SUM([.F286:.F291])" table:style-name="ce65">
            <text:p><text:s/>1,097<text:s/></text:p>
          </table:table-cell>
          <table:table-cell office:value-type="float" office:value="2667" table:formula="of:=SUM([.G286:.G291])" table:style-name="ce65">
            <text:p><text:s/>2,667<text:s/></text:p>
          </table:table-cell>
          <table:table-cell office:value-type="float" office:value="6859" table:formula="of:=SUM([.H286:.H291])" table:style-name="ce65">
            <text:p><text:s/>6,859<text:s/></text:p>
          </table:table-cell>
          <table:table-cell office:value-type="float" office:value="16168" table:style-name="ce66">
            <text:p><text:s/>16,1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24" table:style-name="ce28">
            <text:p><text:s/>24<text:s/></text:p>
          </table:table-cell>
          <table:table-cell office:value-type="float" office:value="18" table:style-name="ce33">
            <text:p><text:s/>18<text:s/></text:p>
          </table:table-cell>
          <table:table-cell office:value-type="float" office:value="326" table:style-name="ce33">
            <text:p><text:s/>326<text:s/></text:p>
          </table:table-cell>
          <table:table-cell office:value-type="float" office:value="77" table:style-name="ce33">
            <text:p><text:s/>77<text:s/></text:p>
          </table:table-cell>
          <table:table-cell office:value-type="float" office:value="445" table:formula="of:=SUM([.E293:.H293])" table:style-name="ce61">
            <text:p><text:s/>44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739" table:style-name="ce38">
            <text:p><text:s/>739<text:s/></text:p>
          </table:table-cell>
          <table:table-cell office:value-type="float" office:value="31" table:style-name="ce33">
            <text:p><text:s/>31<text:s/></text:p>
          </table:table-cell>
          <table:table-cell office:value-type="float" office:value="570" table:style-name="ce33">
            <text:p><text:s/>570<text:s/></text:p>
          </table:table-cell>
          <table:table-cell office:value-type="float" office:value="282" table:style-name="ce33">
            <text:p><text:s/>282<text:s/></text:p>
          </table:table-cell>
          <table:table-cell office:value-type="float" office:value="1621.5" table:style-name="ce61">
            <text:p><text:s/>1,62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763" table:formula="of:=SUM([.E293:.E294])" table:style-name="ce65">
            <text:p><text:s/>763<text:s/></text:p>
          </table:table-cell>
          <table:table-cell office:value-type="float" office:value="49" table:formula="of:=SUM([.F293:.F294])" table:style-name="ce65">
            <text:p><text:s/>49<text:s/></text:p>
          </table:table-cell>
          <table:table-cell office:value-type="float" office:value="896" table:formula="of:=SUM([.G293:.G294])" table:style-name="ce65">
            <text:p><text:s/>896<text:s/></text:p>
          </table:table-cell>
          <table:table-cell office:value-type="float" office:value="359" table:formula="of:=SUM([.H293:.H294])" table:style-name="ce65">
            <text:p><text:s/>359<text:s/></text:p>
          </table:table-cell>
          <table:table-cell office:value-type="float" office:value="2066.5" table:formula="of:=SUM([.I293:.I294])" table:style-name="ce66">
            <text:p><text:s/>2,067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2 Total</text:p>
          </table:table-cell>
          <table:table-cell table:number-columns-repeated="2" table:style-name="ce72"/>
          <table:table-cell office:value-type="float" office:value="7825" table:formula="of:=+[.E295]+[.E292]+[.E285]" table:style-name="ce134">
            <text:p><text:s/>7,825<text:s/></text:p>
          </table:table-cell>
          <table:table-cell office:value-type="float" office:value="1701" table:formula="of:=+[.F295]+[.F292]+[.F285]" table:style-name="ce134">
            <text:p><text:s/>1,701<text:s/></text:p>
          </table:table-cell>
          <table:table-cell office:value-type="float" office:value="5460" table:formula="of:=+[.G295]+[.G292]+[.G285]" table:style-name="ce134">
            <text:p><text:s/>5,460<text:s/></text:p>
          </table:table-cell>
          <table:table-cell office:value-type="float" office:value="8597" table:formula="of:=+[.H295]+[.H292]+[.H285]" table:style-name="ce134">
            <text:p><text:s/>8,597<text:s/></text:p>
          </table:table-cell>
          <table:table-cell office:value-type="float" office:value="23583.5" table:formula="of:=+[.I295]+[.I292]+[.I285]" table:style-name="ce74">
            <text:p><text:s/>23,584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3" table:number-columns-spanned="1" table:number-rows-spanned="13" table:style-name="ce347">
            <text:p>2023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992" table:style-name="ce135">
            <text:p><text:s/>992<text:s/></text:p>
          </table:table-cell>
          <table:table-cell office:value-type="float" office:value="512" table:style-name="ce135">
            <text:p><text:s/>512<text:s/></text:p>
          </table:table-cell>
          <table:table-cell office:value-type="float" office:value="1995" table:style-name="ce135">
            <text:p><text:s/>1,995<text:s/></text:p>
          </table:table-cell>
          <table:table-cell office:value-type="float" office:value="1206" table:style-name="ce135">
            <text:p><text:s/>1,206<text:s/></text:p>
          </table:table-cell>
          <table:table-cell office:value-type="float" office:value="4665" table:style-name="ce294">
            <text:p>4,665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13693.378" table:style-name="ce261">
            <text:p><text:s text:c="2"/>114</text:p>
          </table:table-cell>
          <table:table-cell office:value-type="float" office:value="60734.769936999997" table:style-name="ce261">
            <text:p><text:s text:c="2"/>61</text:p>
          </table:table-cell>
          <table:table-cell office:value-type="float" office:value="62534.362699999998" table:style-name="ce261">
            <text:p><text:s text:c="2"/>63</text:p>
          </table:table-cell>
          <table:table-cell office:value-type="float" office:value="214859.31140000001" table:style-name="ce261">
            <text:p><text:s text:c="2"/>215</text:p>
          </table:table-cell>
          <table:table-cell office:value-type="float" office:value="451821.82203699998" table:formula="of:=SUM([.E298:.H298])" table:style-name="ce254">
            <text:p>452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1105" table:style-name="ce296">
            <text:p>1,105</text:p>
          </table:table-cell>
          <table:table-cell office:value-type="float" office:value="573" table:style-name="ce297">
            <text:p>573</text:p>
          </table:table-cell>
          <table:table-cell office:value-type="float" office:value="2017" table:style-name="ce297">
            <text:p>2,017</text:p>
          </table:table-cell>
          <table:table-cell office:value-type="float" office:value="1421" table:style-name="ce297">
            <text:p>1,421</text:p>
          </table:table-cell>
          <table:table-cell office:value-type="float" office:value="5117" table:style-name="ce66">
            <text:p><text:s/>5,1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1007745.818" table:style-name="ce282">
            <text:p><text:s text:c="2"/>1,008</text:p>
          </table:table-cell>
          <table:table-cell office:value-type="float" office:value="77955.600000000006" table:style-name="ce260">
            <text:p><text:s text:c="2"/>78</text:p>
          </table:table-cell>
          <table:table-cell office:value-type="float" office:value="326677.06900000002" table:style-name="ce260">
            <text:p><text:s text:c="2"/>327</text:p>
          </table:table-cell>
          <table:table-cell office:value-type="float" office:value="2881149.7510990002" table:style-name="ce261">
            <text:p><text:s text:c="2"/>2,881</text:p>
          </table:table-cell>
          <table:table-cell office:value-type="float" office:value="4293528.2380990004" table:formula="of:=SUM([.E300:.H300])" table:style-name="ce254">
            <text:p>4,29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2714167.6764500001" table:style-name="ce263">
            <text:p><text:s text:c="2"/>2,714</text:p>
          </table:table-cell>
          <table:table-cell office:value-type="float" office:value="697447.08" table:style-name="ce264">
            <text:p><text:s text:c="2"/>697</text:p>
          </table:table-cell>
          <table:table-cell office:value-type="float" office:value="1495883.1918490001" table:style-name="ce264">
            <text:p><text:s text:c="2"/>1,496</text:p>
          </table:table-cell>
          <table:table-cell office:value-type="float" office:value="2015274.8177970101" table:style-name="ce265">
            <text:p><text:s text:c="2"/>2,015</text:p>
          </table:table-cell>
          <table:table-cell office:value-type="float" office:value="6629" table:style-name="ce294">
            <text:p>6,629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311336.85980000102" table:style-name="ce284">
            <text:p><text:s text:c="2"/>311</text:p>
          </table:table-cell>
          <table:table-cell office:value-type="float" office:value="55869.5" table:style-name="ce261">
            <text:p><text:s text:c="2"/>56</text:p>
          </table:table-cell>
          <table:table-cell office:value-type="float" office:value="18123.962049999998" table:style-name="ce261">
            <text:p><text:s text:c="2"/>18</text:p>
          </table:table-cell>
          <table:table-cell office:value-type="float" office:value="88525.579989999896" table:style-name="ce261">
            <text:p><text:s text:c="2"/>89</text:p>
          </table:table-cell>
          <table:table-cell office:value-type="float" office:value="474" table:style-name="ce294">
            <text:p>47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101115.942" table:style-name="ce284">
            <text:p><text:s text:c="2"/>101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53536.1101979999" table:style-name="ce261">
            <text:p><text:s text:c="2"/>54</text:p>
          </table:table-cell>
          <table:table-cell office:value-type="float" office:value="168048.009433" table:style-name="ce265">
            <text:p><text:s text:c="2"/>168</text:p>
          </table:table-cell>
          <table:table-cell office:value-type="float" office:value="322700.0616309999" table:formula="of:=SUM([.E303:.H303])" table:style-name="ce254">
            <text:p>323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109171.776" table:style-name="ce284">
            <text:p><text:s text:c="2"/>109</text:p>
          </table:table-cell>
          <table:table-cell office:value-type="float" office:value="84768.7" table:style-name="ce261">
            <text:p><text:s text:c="2"/>85</text:p>
          </table:table-cell>
          <table:table-cell office:value-type="float" office:value="82978.080000000002" table:style-name="ce261">
            <text:p><text:s text:c="2"/>83</text:p>
          </table:table-cell>
          <table:table-cell office:value-type="float" office:value="148496.64000000001" table:style-name="ce261">
            <text:p><text:s text:c="2"/>148</text:p>
          </table:table-cell>
          <table:table-cell office:value-type="float" office:value="425415.196" table:formula="of:=SUM([.E304:.H304])" table:style-name="ce254">
            <text:p>425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617461.49600000004" table:style-name="ce285">
            <text:p><text:s text:c="2"/>617</text:p>
          </table:table-cell>
          <table:table-cell office:value-type="float" office:value="218368.28399900001" table:style-name="ce286">
            <text:p><text:s text:c="2"/>218</text:p>
          </table:table-cell>
          <table:table-cell office:value-type="float" office:value="291492.8" table:style-name="ce261">
            <text:p><text:s text:c="2"/>291</text:p>
          </table:table-cell>
          <table:table-cell office:value-type="float" office:value="366804.08208999998" table:style-name="ce287">
            <text:p><text:s text:c="2"/>367</text:p>
          </table:table-cell>
          <table:table-cell office:value-type="float" office:value="1494126.662089" table:formula="of:=SUM([.E305:.H305])" table:style-name="ce254">
            <text:p>1,494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4860999.5682500014" table:formula="of:=SUM([.E300:.E305])" table:style-name="ce295">
            <text:p>4,861</text:p>
          </table:table-cell>
          <table:table-cell office:value-type="float" office:value="1134409.1639989999" table:formula="of:=SUM([.F300:.F305])" table:style-name="ce295">
            <text:p>1,134</text:p>
          </table:table-cell>
          <table:table-cell office:value-type="float" office:value="2268691.213097" table:formula="of:=SUM([.G300:.G305])" table:style-name="ce295">
            <text:p>2,269</text:p>
          </table:table-cell>
          <table:table-cell office:value-type="float" office:value="5668298.8804090098" table:formula="of:=SUM([.H300:.H305])" table:style-name="ce295">
            <text:p>5,668</text:p>
          </table:table-cell>
          <table:table-cell office:value-type="float" office:value="13932" table:style-name="ce299">
            <text:p>13,932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24669.243999999999" table:style-name="ce282">
            <text:p><text:s text:c="2"/>25</text:p>
          </table:table-cell>
          <table:table-cell office:value-type="float" office:value="13987.341998" table:style-name="ce264">
            <text:p><text:s text:c="2"/>14</text:p>
          </table:table-cell>
          <table:table-cell office:value-type="float" office:value="56356.349800000004" table:style-name="ce264">
            <text:p><text:s text:c="2"/>56</text:p>
          </table:table-cell>
          <table:table-cell office:value-type="float" office:value="74724.2429999999" table:style-name="ce264">
            <text:p><text:s text:c="2"/>75</text:p>
          </table:table-cell>
          <table:table-cell office:value-type="float" office:value="169737.17879799989" table:formula="of:=SUM([.E307:.H307])" table:style-name="ce254">
            <text:p>17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535003.95313200005" table:style-name="ce268">
            <text:p><text:s text:c="2"/>535</text:p>
          </table:table-cell>
          <table:table-cell office:value-type="float" office:value="33884.837200000002" table:style-name="ce261">
            <text:p><text:s text:c="2"/>34</text:p>
          </table:table-cell>
          <table:table-cell office:value-type="float" office:value="580438.22429500101" table:style-name="ce261">
            <text:p><text:s text:c="2"/>580</text:p>
          </table:table-cell>
          <table:table-cell office:value-type="float" office:value="349215.00579700002" table:style-name="ce261">
            <text:p><text:s text:c="2"/>349</text:p>
          </table:table-cell>
          <table:table-cell office:value-type="float" office:value="1498542.0204240009" table:formula="of:=SUM([.E308:.H308])" table:style-name="ce254">
            <text:p>1,499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559673.197132" table:formula="of:=SUM([.E307:.E308])" table:style-name="ce295">
            <text:p>560</text:p>
          </table:table-cell>
          <table:table-cell office:value-type="float" office:value="47872.179197999998" table:formula="of:=SUM([.F307:.F308])" table:style-name="ce295">
            <text:p>48</text:p>
          </table:table-cell>
          <table:table-cell office:value-type="float" office:value="636794.57409500098" table:formula="of:=SUM([.G307:.G308])" table:style-name="ce295">
            <text:p>637</text:p>
          </table:table-cell>
          <table:table-cell office:value-type="float" office:value="423939.24879699992" table:formula="of:=SUM([.H307:.H308])" table:style-name="ce295">
            <text:p>424</text:p>
          </table:table-cell>
          <table:table-cell office:value-type="float" office:value="1668279.1992220008" table:formula="of:=SUM([.I307:.I308])" table:style-name="ce298">
            <text:p>1,668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3 Total</text:p>
          </table:table-cell>
          <table:table-cell table:number-columns-repeated="2" table:style-name="ce72"/>
          <table:table-cell office:value-type="float" office:value="6526" table:style-name="ce300">
            <text:p>6,526</text:p>
          </table:table-cell>
          <table:table-cell office:value-type="float" office:value="1755" table:style-name="ce300">
            <text:p>1,755</text:p>
          </table:table-cell>
          <table:table-cell office:value-type="float" office:value="4923" table:style-name="ce300">
            <text:p>4,923</text:p>
          </table:table-cell>
          <table:table-cell office:value-type="float" office:value="7513" table:style-name="ce300">
            <text:p>7,513</text:p>
          </table:table-cell>
          <table:table-cell office:value-type="float" office:value="20717" table:style-name="ce301">
            <text:p>20,717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4" table:number-columns-spanned="1" table:number-rows-spanned="13" table:style-name="ce347">
            <text:p>2024</text:p>
          </table:table-cell>
          <table:table-cell office:value-type="string" table:number-columns-spanned="1" table:number-rows-spanned="2" table:style-name="ce357">
            <text:p>Transfer</text:p>
          </table:table-cell>
          <table:table-cell office:value-type="string" table:style-name="ce131">
            <text:p>Transfer</text:p>
          </table:table-cell>
          <table:table-cell office:value-type="float" office:value="819000" table:style-name="ce336">
            <text:p>819</text:p>
          </table:table-cell>
          <table:table-cell office:value-type="float" office:value="546000" table:style-name="ce336">
            <text:p>546</text:p>
          </table:table-cell>
          <table:table-cell office:value-type="float" office:value="1875000" table:style-name="ce336">
            <text:p>1,875</text:p>
          </table:table-cell>
          <table:table-cell office:value-type="float" office:value="1323000" table:style-name="ce336">
            <text:p>1,323</text:p>
          </table:table-cell>
          <table:table-cell office:value-type="float" office:value="4563000" table:formula="of:=+SUM([.E311:.H311])" table:style-name="ce254">
            <text:p>4,563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32">
            <text:p>Civic amenity</text:p>
          </table:table-cell>
          <table:table-cell office:value-type="float" office:value="115453.14800000003" table:style-name="ce261">
            <text:p><text:s text:c="2"/>115</text:p>
          </table:table-cell>
          <table:table-cell office:value-type="float" office:value="67463.786000000066" table:style-name="ce261">
            <text:p><text:s text:c="2"/>67</text:p>
          </table:table-cell>
          <table:table-cell office:value-type="float" office:value="65977.018460000021" table:style-name="ce261">
            <text:p><text:s text:c="2"/>66</text:p>
          </table:table-cell>
          <table:table-cell office:value-type="float" office:value="224266.56897899997" table:style-name="ce261">
            <text:p><text:s text:c="2"/>224</text:p>
          </table:table-cell>
          <table:table-cell office:value-type="float" office:value="473160.52143900009" table:formula="of:=SUM([.E312:.H312])" table:style-name="ce254">
            <text:p>473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33"/>
          <table:table-cell office:value-type="float" office:value="934453.14800000004" table:formula="of:=+SUM([.E311:.E312])" table:style-name="ce337">
            <text:p>934</text:p>
          </table:table-cell>
          <table:table-cell office:value-type="float" office:value="613463.78600000008" table:formula="of:=+SUM([.F311:.F312])" table:style-name="ce295">
            <text:p>613</text:p>
          </table:table-cell>
          <table:table-cell office:value-type="float" office:value="1940977.0184599999" table:formula="of:=+SUM([.G311:.G312])" table:style-name="ce295">
            <text:p>1,941</text:p>
          </table:table-cell>
          <table:table-cell office:value-type="float" office:value="1547266.568979" table:formula="of:=+SUM([.H311:.H312])" table:style-name="ce295">
            <text:p>1,547</text:p>
          </table:table-cell>
          <table:table-cell office:value-type="float" office:value="5036160.521439" table:formula="of:=+SUM([.E313:.H313])" table:style-name="ce298">
            <text:p>5,036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57">
            <text:p>Treatment</text:p>
          </table:table-cell>
          <table:table-cell office:value-type="string" table:style-name="ce108">
            <text:p>Material recovery</text:p>
          </table:table-cell>
          <table:table-cell office:value-type="float" office:value="315251" table:style-name="ce282">
            <text:p><text:s text:c="2"/>315</text:p>
          </table:table-cell>
          <table:table-cell office:value-type="float" office:value="78165" table:style-name="ce260">
            <text:p><text:s text:c="2"/>78</text:p>
          </table:table-cell>
          <table:table-cell office:value-type="float" office:value="302632" table:style-name="ce260">
            <text:p><text:s text:c="2"/>303</text:p>
          </table:table-cell>
          <table:table-cell office:value-type="float" office:value="2804673" table:style-name="ce261">
            <text:p><text:s text:c="2"/>2,805</text:p>
          </table:table-cell>
          <table:table-cell office:value-type="float" office:value="3500721" table:formula="of:=SUM([.E314:.H314])" table:style-name="ce254">
            <text:p>3,501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al</text:p>
          </table:table-cell>
          <table:table-cell office:value-type="float" office:value="2803145" table:style-name="ce263">
            <text:p><text:s text:c="2"/>2,803</text:p>
          </table:table-cell>
          <table:table-cell office:value-type="float" office:value="559749" table:style-name="ce264">
            <text:p><text:s text:c="2"/>560</text:p>
          </table:table-cell>
          <table:table-cell office:value-type="float" office:value="1683192" table:style-name="ce264">
            <text:p><text:s text:c="2"/>1,683</text:p>
          </table:table-cell>
          <table:table-cell office:value-type="float" office:value="1838002" table:style-name="ce265">
            <text:p><text:s text:c="2"/>1,838</text:p>
          </table:table-cell>
          <table:table-cell office:value-type="float" office:value="6884088" table:formula="of:=SUM([.E315:.H315])" table:style-name="ce254">
            <text:p>6,88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Physico-chemical</text:p>
          </table:table-cell>
          <table:table-cell office:value-type="float" office:value="225467.10650400002" table:style-name="ce284">
            <text:p><text:s text:c="2"/>225</text:p>
          </table:table-cell>
          <table:table-cell office:value-type="float" office:value="20346" table:style-name="ce261">
            <text:p><text:s text:c="2"/>20</text:p>
          </table:table-cell>
          <table:table-cell office:value-type="float" office:value="14560.150659999999" table:style-name="ce261">
            <text:p><text:s text:c="2"/>15</text:p>
          </table:table-cell>
          <table:table-cell office:value-type="float" office:value="123654.87606099987" table:style-name="ce261">
            <text:p><text:s text:c="2"/>124</text:p>
          </table:table-cell>
          <table:table-cell office:value-type="float" office:value="384028.13322499988" table:formula="of:=SUM([.E316:.H316])" table:style-name="ce254">
            <text:p>38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hemical</text:p>
          </table:table-cell>
          <table:table-cell office:value-type="float" office:value="54505.977999999981" table:style-name="ce284">
            <text:p><text:s text:c="2"/>55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59174.779335999992" table:style-name="ce261">
            <text:p><text:s text:c="2"/>59</text:p>
          </table:table-cell>
          <table:table-cell office:value-type="float" office:value="183581" table:style-name="ce265">
            <text:p><text:s text:c="2"/>184</text:p>
          </table:table-cell>
          <table:table-cell office:value-type="float" office:value="297261.75733599998" table:formula="of:=SUM([.E317:.H317])" table:style-name="ce254">
            <text:p>297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Composting</text:p>
          </table:table-cell>
          <table:table-cell office:value-type="float" office:value="109017.39" table:style-name="ce284">
            <text:p><text:s text:c="2"/>109</text:p>
          </table:table-cell>
          <table:table-cell office:value-type="float" office:value="74134.812000000005" table:style-name="ce261">
            <text:p><text:s text:c="2"/>74</text:p>
          </table:table-cell>
          <table:table-cell office:value-type="float" office:value="89936.09" table:style-name="ce261">
            <text:p><text:s text:c="2"/>90</text:p>
          </table:table-cell>
          <table:table-cell office:value-type="float" office:value="125297.89" table:style-name="ce261">
            <text:p><text:s text:c="2"/>125</text:p>
          </table:table-cell>
          <table:table-cell office:value-type="float" office:value="398386.18200000003" table:formula="of:=SUM([.E318:.H318])" table:style-name="ce254">
            <text:p>398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Biological</text:p>
          </table:table-cell>
          <table:table-cell office:value-type="float" office:value="733116" table:style-name="ce285">
            <text:p><text:s text:c="2"/>733</text:p>
          </table:table-cell>
          <table:table-cell office:value-type="float" office:value="228764" table:style-name="ce286">
            <text:p><text:s text:c="2"/>229</text:p>
          </table:table-cell>
          <table:table-cell office:value-type="float" office:value="290854" table:style-name="ce261">
            <text:p><text:s text:c="2"/>291</text:p>
          </table:table-cell>
          <table:table-cell office:value-type="float" office:value="331896" table:style-name="ce287">
            <text:p><text:s text:c="2"/>332</text:p>
          </table:table-cell>
          <table:table-cell office:value-type="float" office:value="1584630" table:formula="of:=SUM([.E319:.H319])" table:style-name="ce254">
            <text:p>1,585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33"/>
          <table:table-cell office:value-type="float" office:value="4240502.4745039996" table:formula="of:=SUM([.E314:.E319])" table:style-name="ce295">
            <text:p>4,241</text:p>
          </table:table-cell>
          <table:table-cell office:value-type="float" office:value="961158.81200000003" table:formula="of:=SUM([.F314:.F319])" table:style-name="ce295">
            <text:p>961</text:p>
          </table:table-cell>
          <table:table-cell office:value-type="float" office:value="2440349.019996" table:formula="of:=SUM([.G314:.G319])" table:style-name="ce295">
            <text:p>2,440</text:p>
          </table:table-cell>
          <table:table-cell office:value-type="float" office:value="5407104.7660609996" table:formula="of:=SUM([.H314:.H319])" table:style-name="ce295">
            <text:p>5,407</text:p>
          </table:table-cell>
          <table:table-cell office:value-type="float" office:value="13049115.072561" table:formula="of:=+SUM([.I314:.I319])" table:style-name="ce298">
            <text:p>13,049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57">
            <text:p>MRS</text:p>
          </table:table-cell>
          <table:table-cell office:value-type="string" table:style-name="ce108">
            <text:p>Vehicle depollution</text:p>
          </table:table-cell>
          <table:table-cell office:value-type="float" office:value="28572" table:style-name="ce282">
            <text:p><text:s text:c="2"/>29</text:p>
          </table:table-cell>
          <table:table-cell office:value-type="float" office:value="16492" table:style-name="ce264">
            <text:p><text:s text:c="2"/>16</text:p>
          </table:table-cell>
          <table:table-cell office:value-type="float" office:value="47277" table:style-name="ce264">
            <text:p><text:s text:c="2"/>47</text:p>
          </table:table-cell>
          <table:table-cell office:value-type="float" office:value="29953" table:style-name="ce264">
            <text:p><text:s text:c="2"/>30</text:p>
          </table:table-cell>
          <table:table-cell office:value-type="float" office:value="122294" table:formula="of:=SUM([.E321:.H321])" table:style-name="ce254">
            <text:p>122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8">
            <text:p>Metal recycling</text:p>
          </table:table-cell>
          <table:table-cell office:value-type="float" office:value="635824.10968500061" table:style-name="ce268">
            <text:p><text:s text:c="2"/>636</text:p>
          </table:table-cell>
          <table:table-cell office:value-type="float" office:value="36835.232900000017" table:style-name="ce261">
            <text:p><text:s text:c="2"/>37</text:p>
          </table:table-cell>
          <table:table-cell office:value-type="float" office:value="590316.20451799931" table:style-name="ce261">
            <text:p><text:s text:c="2"/>590</text:p>
          </table:table-cell>
          <table:table-cell office:value-type="float" office:value="291319.94009999989" table:style-name="ce261">
            <text:p><text:s text:c="2"/>291</text:p>
          </table:table-cell>
          <table:table-cell office:value-type="float" office:value="1554295.4872029996" table:formula="of:=SUM([.E322:.H322])" table:style-name="ce254">
            <text:p>1,554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33"/>
          <table:table-cell office:value-type="float" office:value="664396.10968500061" table:formula="of:=SUM([.E321:.E322])" table:style-name="ce295">
            <text:p>664</text:p>
          </table:table-cell>
          <table:table-cell office:value-type="float" office:value="53327.232900000017" table:formula="of:=SUM([.F321:.F322])" table:style-name="ce295">
            <text:p>53</text:p>
          </table:table-cell>
          <table:table-cell office:value-type="float" office:value="637593.20451799931" table:formula="of:=SUM([.G321:.G322])" table:style-name="ce295">
            <text:p>638</text:p>
          </table:table-cell>
          <table:table-cell office:value-type="float" office:value="321272.94009999989" table:formula="of:=SUM([.H321:.H322])" table:style-name="ce295">
            <text:p>321</text:p>
          </table:table-cell>
          <table:table-cell office:value-type="float" office:value="1676589.4872029996" table:formula="of:=SUM([.I321:.I322])" table:style-name="ce298">
            <text:p>1,677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71">
            <text:p>2024 Total</text:p>
          </table:table-cell>
          <table:table-cell table:number-columns-repeated="2" table:style-name="ce72"/>
          <table:table-cell office:value-type="float" office:value="5839351.7321890006" table:formula="of:=+SUM([.E313];[.E320];[.E323])" table:style-name="ce338">
            <text:p>5,839</text:p>
          </table:table-cell>
          <table:table-cell office:value-type="float" office:value="1627949.8309000002" table:formula="of:=+SUM([.F313];[.F320];[.F323])" table:style-name="ce338">
            <text:p>1,628</text:p>
          </table:table-cell>
          <table:table-cell office:value-type="float" office:value="5018919.2429740001" table:formula="of:=+SUM([.G313];[.G320];[.G323])" table:style-name="ce338">
            <text:p>5,019</text:p>
          </table:table-cell>
          <table:table-cell office:value-type="float" office:value="7275644.2751399996" table:formula="of:=+SUM([.H313];[.H320];[.H323])" table:style-name="ce338">
            <text:p>7,276</text:p>
          </table:table-cell>
          <table:table-cell office:value-type="float" office:value="19761865.081202999" table:formula="of:=+SUM([.E324:.H324])" table:style-name="ce339">
            <text:p>19,762</text:p>
          </table:table-cell>
          <table:table-cell table:number-columns-repeated="16375"/>
        </table:table-row>
        <table:table-row table:number-rows-repeated="1048252" table:style-name="ro5">
          <table:table-cell table:number-columns-repeated="16384"/>
        </table:table-row>
      </table:table>
      <table:table table:name="Incineration_Input_&amp;_Capacity" table:style-name="ta2">
        <table:table-column table:style-name="co5" table:default-cell-style-name="ce15"/>
        <table:table-column table:style-name="co40" table:default-cell-style-name="ce15"/>
        <table:table-column table:style-name="co33" table:default-cell-style-name="ce15"/>
        <table:table-column table:style-name="co41" table:default-cell-style-name="ce15"/>
        <table:table-column table:style-name="co36" table:default-cell-style-name="ce15"/>
        <table:table-column table:style-name="co42" table:default-cell-style-name="ce15"/>
        <table:table-column table:style-name="co29" table:default-cell-style-name="ce15"/>
        <table:table-column table:style-name="co14" table:number-columns-repeated="16377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Yorkshire and the Humber: Incineration throughput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provided in 000s tonnes</text:p>
          </table:table-cell>
          <table:table-cell table:style-name="ce17"/>
          <table:table-cell table:number-columns-repeated="16381" table:style-name="ce15"/>
        </table:table-row>
        <table:table-row table:style-name="ro5">
          <table:table-cell table:style-name="ce15"/>
          <table:table-cell table:style-name="ce44"/>
          <table:table-cell table:number-columns-repeated="16382" table:style-name="ce15"/>
        </table:table-row>
        <table:table-row table:style-name="ro5">
          <table:table-cell table:style-name="ce15"/>
          <table:table-cell office:value-type="string" table:number-columns-spanned="1" table:number-rows-spanned="2" table:style-name="ce343">
            <text:p>Incineration Type</text:p>
          </table:table-cell>
          <table:table-cell office:value-type="string" table:number-columns-spanned="4" table:number-rows-spanned="1" table:style-name="ce3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345">
            <text:p>YORKSHIRE AND THE HUMBER</text:p>
          </table:table-cell>
          <table:table-cell table:number-columns-repeated="16377"/>
        </table:table-row>
        <table:table-row table:style-name="ro21">
          <table:table-cell table:style-name="ce15"/>
          <table:covered-table-cell/>
          <table:table-cell office:value-type="string" table:style-name="ce23">
            <text:p>Former Humberside</text:p>
          </table:table-cell>
          <table:table-cell office:value-type="string" table:style-name="ce2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23">
            <text:p>West Yorkshire</text:p>
          </table:table-cell>
          <table:covered-table-cell/>
          <table:table-cell table:number-columns-repeated="16377"/>
        </table:table-row>
        <table:table-row table:style-name="ro22">
          <table:table-cell table:style-name="ce15"/>
          <table:table-cell office:value-type="string" table:style-name="ce95">
            <text:p>Animal By-Product</text:p>
          </table:table-cell>
          <table:table-cell office:value-type="float" office:value="82149" table:style-name="ce314">
            <text:p>82</text:p>
          </table:table-cell>
          <table:table-cell office:value-type="float" office:value="0" table:style-name="ce137">
            <text:p><text:s/>-<text:s/></text:p>
          </table:table-cell>
          <table:table-cell office:value-type="float" office:value="0" table:style-name="ce137">
            <text:p><text:s/>-<text:s/></text:p>
          </table:table-cell>
          <table:table-cell office:value-type="float" office:value="0" table:style-name="ce138">
            <text:p><text:s/>-<text:s/></text:p>
          </table:table-cell>
          <table:table-cell office:value-type="float" office:value="82149" table:formula="of:=SUM([.C7:.F7])" table:style-name="ce317">
            <text:p>82</text:p>
          </table:table-cell>
          <table:table-cell table:number-columns-repeated="16377"/>
        </table:table-row>
        <table:table-row table:style-name="ro22">
          <table:table-cell table:style-name="ce15"/>
          <table:table-cell office:value-type="string" table:style-name="ce95">
            <text:p>Animal Carcasses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0">
            <text:p><text:s/>-<text:s/></text:p>
          </table:table-cell>
          <table:table-cell office:value-type="string" table:style-name="ce35">
            <text:p>-</text:p>
          </table:table-cell>
          <table:table-cell table:number-columns-repeated="16377"/>
        </table:table-row>
        <table:table-row table:style-name="ro22">
          <table:table-cell table:style-name="ce15"/>
          <table:table-cell office:value-type="string" table:style-name="ce95">
            <text:p>Clinical<text:s/>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1704" table:style-name="ce314">
            <text:p>12</text:p>
          </table:table-cell>
          <table:table-cell office:value-type="float" office:value="11704" table:formula="of:=SUM([.C9:.F9])" table:style-name="ce317">
            <text:p>12</text:p>
          </table:table-cell>
          <table:table-cell table:number-columns-repeated="16377"/>
        </table:table-row>
        <table:table-row table:style-name="ro22">
          <table:table-cell table:style-name="ce15"/>
          <table:table-cell office:value-type="string" table:style-name="ce96">
            <text:p>Co-Incineration of Hazardous Waste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0">
            <text:p><text:s/>-<text:s/></text:p>
          </table:table-cell>
          <table:table-cell office:value-type="float" office:value="0" table:formula="of:=SUM([.C10:.F10])" table:style-name="ce35">
            <text:p><text:s/>-<text:s/></text:p>
          </table:table-cell>
          <table:table-cell table:number-columns-repeated="16377"/>
        </table:table-row>
        <table:table-row table:style-name="ro22">
          <table:table-cell table:style-name="ce15"/>
          <table:table-cell office:value-type="string" table:style-name="ce96">
            <text:p>Co-Incineration of Non Hazardous Waste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32118" table:style-name="ce316">
            <text:p>132</text:p>
          </table:table-cell>
          <table:table-cell office:value-type="float" office:value="0" table:style-name="ce140">
            <text:p><text:s/>-<text:s/></text:p>
          </table:table-cell>
          <table:table-cell office:value-type="float" office:value="132118" table:formula="of:=SUM([.C11:.F11])" table:style-name="ce317">
            <text:p>132</text:p>
          </table:table-cell>
          <table:table-cell table:number-columns-repeated="16377"/>
        </table:table-row>
        <table:table-row table:style-name="ro22">
          <table:table-cell table:style-name="ce15"/>
          <table:table-cell office:value-type="string" table:style-name="ce96">
            <text:p>Hazardous<text:s/>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0">
            <text:p><text:s/>-<text:s/></text:p>
          </table:table-cell>
          <table:table-cell office:value-type="string" table:style-name="ce35">
            <text:p>-</text:p>
          </table:table-cell>
          <table:table-cell table:number-columns-repeated="16377"/>
        </table:table-row>
        <table:table-row table:style-name="ro22">
          <table:table-cell table:style-name="ce15"/>
          <table:table-cell office:value-type="string" table:style-name="ce141">
            <text:p>Municipal and/or Industrial &amp; Commercial</text:p>
          </table:table-cell>
          <table:table-cell office:value-type="float" office:value="12737" table:style-name="ce314">
            <text:p>13</text:p>
          </table:table-cell>
          <table:table-cell office:value-type="float" office:value="239755" table:style-name="ce316">
            <text:p>240</text:p>
          </table:table-cell>
          <table:table-cell office:value-type="float" office:value="265306" table:style-name="ce314">
            <text:p>265</text:p>
          </table:table-cell>
          <table:table-cell office:value-type="float" office:value="1620051" table:style-name="ce314">
            <text:p>1,620</text:p>
          </table:table-cell>
          <table:table-cell office:value-type="float" office:value="2137849" table:formula="of:=SUM([.C13:.F13])" table:style-name="ce317">
            <text:p>2,138</text:p>
          </table:table-cell>
          <table:table-cell table:number-columns-repeated="16377"/>
        </table:table-row>
        <table:table-row table:style-name="ro22">
          <table:table-cell table:style-name="ce15"/>
          <table:table-cell office:value-type="string" table:style-name="ce95">
            <text:p>Sewage Sludge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0">
            <text:p><text:s/>-<text:s/></text:p>
          </table:table-cell>
          <table:table-cell office:value-type="float" office:value="0" table:formula="of:=SUM([.C14:.F14])" table:style-name="ce35">
            <text:p><text:s/>-<text:s/></text:p>
          </table:table-cell>
          <table:table-cell table:number-columns-repeated="16377"/>
        </table:table-row>
        <table:table-row table:style-name="ro22">
          <table:table-cell table:style-name="ce15"/>
          <table:table-cell office:value-type="string" table:style-name="ce105">
            <text:p>Biomass/Wood Waste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484405" table:style-name="ce314">
            <text:p>484</text:p>
          </table:table-cell>
          <table:table-cell office:value-type="float" office:value="0" table:style-name="ce143">
            <text:p><text:s/>-<text:s/></text:p>
          </table:table-cell>
          <table:table-cell office:value-type="float" office:value="484405" table:formula="of:=SUM([.C15:.F15])" table:style-name="ce317">
            <text:p>484</text:p>
          </table:table-cell>
          <table:table-cell table:number-columns-repeated="16377"/>
        </table:table-row>
        <table:table-row table:style-name="ro22">
          <table:table-cell table:style-name="ce15"/>
          <table:table-cell office:value-type="string" table:style-name="ce144">
            <text:p>Total</text:p>
          </table:table-cell>
          <table:table-cell office:value-type="float" office:value="94886" table:formula="of:=SUM([.C7:.C15])" table:style-name="ce315">
            <text:p>95</text:p>
          </table:table-cell>
          <table:table-cell office:value-type="float" office:value="239755" table:formula="of:=SUM([.D7:.D15])" table:style-name="ce253">
            <text:p>240</text:p>
          </table:table-cell>
          <table:table-cell office:value-type="float" office:value="881829" table:formula="of:=SUM([.E7:.E15])" table:style-name="ce253">
            <text:p>882</text:p>
          </table:table-cell>
          <table:table-cell office:value-type="float" office:value="1631755" table:formula="of:=SUM([.F7:.F15])" table:style-name="ce255">
            <text:p>1,632</text:p>
          </table:table-cell>
          <table:table-cell office:value-type="float" office:value="2848225" table:formula="of:=SUM([.G7:.G15])" table:style-name="ce315">
            <text:p>2,848</text:p>
          </table:table-cell>
          <table:table-cell table:number-columns-repeated="16377"/>
        </table:table-row>
        <table:table-row table:style-name="ro5">
          <table:table-cell/>
          <table:table-cell table:style-name="ce145"/>
          <table:table-cell table:number-columns-repeated="16382" table:style-name="ce15"/>
        </table:table-row>
        <table:table-row table:style-name="ro5">
          <table:table-cell/>
          <table:table-cell office:value-type="string" table:style-name="ce44">
            <text:p>Table Notes: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46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5"/>
        </table:table-row>
        <table:table-row table:style-name="ro5">
          <table:table-cell/>
          <table:table-cell table:style-name="ce147"/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6">
            <text:p>Yorkshire and the Humber: Incineration capacity 2024</text:p>
          </table:table-cell>
          <table:table-cell table:number-columns-repeated="16382" table:style-name="ce15"/>
        </table:table-row>
        <table:table-row table:style-name="ro6">
          <table:table-cell/>
          <table:table-cell office:value-type="string" table:style-name="ce18">
            <text:p>All figures provided in 000s tonnes</text:p>
          </table:table-cell>
          <table:table-cell table:number-columns-repeated="16382" table:style-name="ce15"/>
        </table:table-row>
        <table:table-row table:style-name="ro5">
          <table:table-cell/>
          <table:table-cell table:style-name="ce44"/>
          <table:table-cell table:number-columns-repeated="16382" table:style-name="ce15"/>
        </table:table-row>
        <table:table-row table:style-name="ro5">
          <table:table-cell/>
          <table:table-cell office:value-type="string" table:number-columns-spanned="1" table:number-rows-spanned="2" table:style-name="ce343">
            <text:p>Incineration Type</text:p>
          </table:table-cell>
          <table:table-cell office:value-type="string" table:number-columns-spanned="4" table:number-rows-spanned="1" table:style-name="ce359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360">
            <text:p>YORKSHIRE AND THE HUMBER</text:p>
          </table:table-cell>
          <table:table-cell table:number-columns-repeated="16377"/>
        </table:table-row>
        <table:table-row table:style-name="ro23">
          <table:table-cell/>
          <table:covered-table-cell/>
          <table:table-cell office:value-type="string" table:style-name="ce148">
            <text:p>Former Humberside</text:p>
          </table:table-cell>
          <table:table-cell office:value-type="string" table:style-name="ce148">
            <text:p>North Yorkshire</text:p>
          </table:table-cell>
          <table:table-cell office:value-type="string" table:style-name="ce148">
            <text:p>South Yorkshire</text:p>
          </table:table-cell>
          <table:table-cell office:value-type="string" table:style-name="ce148">
            <text:p>West Yorkshire</text:p>
          </table:table-cell>
          <table:covered-table-cell/>
          <table:table-cell table:number-columns-repeated="16377"/>
        </table:table-row>
        <table:table-row table:style-name="ro22">
          <table:table-cell/>
          <table:table-cell office:value-type="string" table:style-name="ce31">
            <text:p>Animal By-Product</text:p>
          </table:table-cell>
          <table:table-cell office:value-type="float" office:value="270000" table:style-name="ce318">
            <text:p>270</text:p>
          </table:table-cell>
          <table:table-cell office:value-type="float" office:value="0" table:style-name="ce137">
            <text:p><text:s/>-<text:s/></text:p>
          </table:table-cell>
          <table:table-cell office:value-type="float" office:value="0" table:style-name="ce137">
            <text:p><text:s/>-<text:s/></text:p>
          </table:table-cell>
          <table:table-cell office:value-type="float" office:value="0" table:style-name="ce138">
            <text:p><text:s/>-<text:s/></text:p>
          </table:table-cell>
          <table:table-cell office:value-type="float" office:value="270000" table:formula="of:=SUM([.C27:.F27])" table:style-name="ce321">
            <text:p>270</text:p>
          </table:table-cell>
          <table:table-cell table:number-columns-repeated="16377"/>
        </table:table-row>
        <table:table-row table:style-name="ro22">
          <table:table-cell/>
          <table:table-cell office:value-type="string" table:style-name="ce31">
            <text:p>Animal Carcasses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0">
            <text:p><text:s/>-<text:s/></text:p>
          </table:table-cell>
          <table:table-cell office:value-type="string" table:style-name="ce61">
            <text:p>-</text:p>
          </table:table-cell>
          <table:table-cell table:number-columns-repeated="16377"/>
        </table:table-row>
        <table:table-row table:style-name="ro22">
          <table:table-cell/>
          <table:table-cell office:value-type="string" table:style-name="ce31">
            <text:p>Clinical<text:s/>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7000" table:style-name="ce314">
            <text:p>17</text:p>
          </table:table-cell>
          <table:table-cell office:value-type="float" office:value="17000" table:formula="of:=SUM([.C29:.F29])" table:style-name="ce317">
            <text:p>17</text:p>
          </table:table-cell>
          <table:table-cell table:number-columns-repeated="16377"/>
        </table:table-row>
        <table:table-row table:style-name="ro22">
          <table:table-cell/>
          <table:table-cell office:value-type="string" table:style-name="ce36">
            <text:p>Co-Incineration of Hazardous Waste</text:p>
          </table:table-cell>
          <table:table-cell office:value-type="float" office:value="87600" table:style-name="ce319">
            <text:p>88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0">
            <text:p><text:s/>-<text:s/></text:p>
          </table:table-cell>
          <table:table-cell office:value-type="float" office:value="87600" table:formula="of:=SUM([.C30:.F30])" table:style-name="ce317">
            <text:p>88</text:p>
          </table:table-cell>
          <table:table-cell table:number-columns-repeated="16377"/>
        </table:table-row>
        <table:table-row table:style-name="ro22">
          <table:table-cell/>
          <table:table-cell office:value-type="string" table:style-name="ce36">
            <text:p>Co-Incineration of Non Hazardous Waste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05000" table:style-name="ce316">
            <text:p>105</text:p>
          </table:table-cell>
          <table:table-cell office:value-type="float" office:value="0" table:style-name="ce140">
            <text:p><text:s/>-<text:s/></text:p>
          </table:table-cell>
          <table:table-cell office:value-type="float" office:value="105000" table:formula="of:=SUM([.C31:.F31])" table:style-name="ce317">
            <text:p>105</text:p>
          </table:table-cell>
          <table:table-cell table:number-columns-repeated="16377"/>
        </table:table-row>
        <table:table-row table:style-name="ro22">
          <table:table-cell/>
          <table:table-cell office:value-type="string" table:style-name="ce36">
            <text:p>Hazardous<text:s/>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0">
            <text:p><text:s/>-<text:s/></text:p>
          </table:table-cell>
          <table:table-cell office:value-type="string" table:style-name="ce61">
            <text:p>-</text:p>
          </table:table-cell>
          <table:table-cell table:number-columns-repeated="16377"/>
        </table:table-row>
        <table:table-row table:style-name="ro22">
          <table:table-cell/>
          <table:table-cell office:value-type="string" table:style-name="ce149">
            <text:p>Municipal and/or Industrial &amp; Commercial</text:p>
          </table:table-cell>
          <table:table-cell office:value-type="float" office:value="315000" table:style-name="ce320">
            <text:p>315</text:p>
          </table:table-cell>
          <table:table-cell office:value-type="float" office:value="320000" table:style-name="ce316">
            <text:p>320</text:p>
          </table:table-cell>
          <table:table-cell office:value-type="float" office:value="300300" table:style-name="ce314">
            <text:p>300</text:p>
          </table:table-cell>
          <table:table-cell office:value-type="float" office:value="1679580" table:style-name="ce314">
            <text:p>1,680</text:p>
          </table:table-cell>
          <table:table-cell office:value-type="float" office:value="2614880" table:formula="of:=SUM([.C33:.F33])" table:style-name="ce317">
            <text:p>2,615</text:p>
          </table:table-cell>
          <table:table-cell table:number-columns-repeated="16377"/>
        </table:table-row>
        <table:table-row table:style-name="ro22">
          <table:table-cell/>
          <table:table-cell office:value-type="string" table:style-name="ce31">
            <text:p>Sewage Sludge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0">
            <text:p><text:s/>-<text:s/></text:p>
          </table:table-cell>
          <table:table-cell office:value-type="float" office:value="0" table:formula="of:=SUM([.C34:.F34])" table:style-name="ce35">
            <text:p><text:s/>-<text:s/></text:p>
          </table:table-cell>
          <table:table-cell table:number-columns-repeated="16377"/>
        </table:table-row>
        <table:table-row table:style-name="ro22">
          <table:table-cell/>
          <table:table-cell office:value-type="string" table:style-name="ce129">
            <text:p>Biomass/Wood Waste</text:p>
          </table:table-cell>
          <table:table-cell office:value-type="float" office:value="0" table:style-name="ce139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570000" table:style-name="ce314">
            <text:p>570</text:p>
          </table:table-cell>
          <table:table-cell office:value-type="float" office:value="0" table:style-name="ce143">
            <text:p><text:s/>-<text:s/></text:p>
          </table:table-cell>
          <table:table-cell office:value-type="float" office:value="570000" table:formula="of:=SUM([.C35:.F35])" table:style-name="ce322">
            <text:p>570</text:p>
          </table:table-cell>
          <table:table-cell table:number-columns-repeated="16377"/>
        </table:table-row>
        <table:table-row table:style-name="ro22">
          <table:table-cell/>
          <table:table-cell office:value-type="string" table:style-name="ce144">
            <text:p>Total</text:p>
          </table:table-cell>
          <table:table-cell office:value-type="float" office:value="672600" table:formula="of:=SUM([.C27:.C35])" table:style-name="ce315">
            <text:p>673</text:p>
          </table:table-cell>
          <table:table-cell office:value-type="float" office:value="320000" table:formula="of:=SUM([.D27:.D35])" table:style-name="ce253">
            <text:p>320</text:p>
          </table:table-cell>
          <table:table-cell office:value-type="float" office:value="975300" table:formula="of:=SUM([.E27:.E35])" table:style-name="ce253">
            <text:p>975</text:p>
          </table:table-cell>
          <table:table-cell office:value-type="float" office:value="1696580" table:formula="of:=SUM([.F27:.F35])" table:style-name="ce255">
            <text:p>1,697</text:p>
          </table:table-cell>
          <table:table-cell office:value-type="float" office:value="3664480" table:formula="of:=SUM([.G27:.G35])" table:style-name="ce253">
            <text:p>3,664</text:p>
          </table:table-cell>
          <table:table-cell table:number-columns-repeated="16377"/>
        </table:table-row>
        <table:table-row table:style-name="ro5">
          <table:table-cell/>
          <table:table-cell table:style-name="ce150"/>
          <table:table-cell table:number-columns-repeated="16382" table:style-name="ce15"/>
        </table:table-row>
        <table:table-row table:style-name="ro5">
          <table:table-cell/>
          <table:table-cell office:value-type="string" table:style-name="ce44">
            <text:p>Table Notes: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46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5"/>
        </table:table-row>
        <table:table-row table:style-name="ro5">
          <table:table-cell/>
          <table:table-cell table:style-name="ce147"/>
          <table:table-cell table:number-columns-repeated="16382" table:style-name="ce15"/>
        </table:table-row>
        <table:table-row table:number-rows-repeated="1048536" table:style-name="ro5">
          <table:table-cell table:number-columns-repeated="16384"/>
        </table:table-row>
      </table:table>
      <table:table table:name="Land_Disposal" table:style-name="ta2">
        <table:table-column table:style-name="co5" table:default-cell-style-name="ce15"/>
        <table:table-column table:style-name="co43" table:default-cell-style-name="ce15"/>
        <table:table-column table:style-name="co26" table:default-cell-style-name="ce15"/>
        <table:table-column table:style-name="co21" table:default-cell-style-name="ce15"/>
        <table:table-column table:style-name="co44" table:default-cell-style-name="ce15"/>
        <table:table-column table:style-name="co45" table:default-cell-style-name="ce15"/>
        <table:table-column table:style-name="co19" table:default-cell-style-name="ce15"/>
        <table:table-column table:style-name="co21" table:default-cell-style-name="ce15"/>
        <table:table-column table:style-name="co22" table:default-cell-style-name="ce15"/>
        <table:table-column table:style-name="co29" table:default-cell-style-name="ce15"/>
        <table:table-column table:style-name="co14" table:number-columns-repeated="16374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Yorkshire and the Humber: <text:s/>Borehole and lagoon inputs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number-columns-spanned="1" table:number-rows-spanned="2" table:style-name="ce343">
            <text:p>Site Type</text:p>
          </table:table-cell>
          <table:table-cell office:value-type="string" table:number-columns-spanned="4" table:number-rows-spanned="1" table:style-name="ce3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345">
            <text:p>YORKSHIRE AND THE HUMBER</text:p>
          </table:table-cell>
          <table:table-cell table:number-columns-repeated="16377" table:style-name="ce15"/>
        </table:table-row>
        <table:table-row table:style-name="ro24">
          <table:table-cell table:style-name="ce15"/>
          <table:covered-table-cell/>
          <table:table-cell office:value-type="string" table:style-name="ce23">
            <text:p>Former Humberside</text:p>
          </table:table-cell>
          <table:table-cell office:value-type="string" table:style-name="ce2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23">
            <text:p>West Yorkshire</text:p>
          </table:table-cell>
          <table:covered-table-cell/>
          <table:table-cell table:number-columns-repeated="16377" table:style-name="ce15"/>
        </table:table-row>
        <table:table-row table:style-name="ro19">
          <table:table-cell table:style-name="ce15"/>
          <table:table-cell office:value-type="string" table:style-name="ce104">
            <text:p>Borehole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C7:.F7])" table:style-name="ce35">
            <text:p><text:s/>-<text:s/></text:p>
          </table:table-cell>
          <table:table-cell table:number-columns-repeated="16377" table:style-name="ce15"/>
        </table:table-row>
        <table:table-row table:style-name="ro19">
          <table:table-cell table:style-name="ce15"/>
          <table:table-cell office:value-type="string" table:style-name="ce129">
            <text:p>Lagoon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C8:.F8])" table:style-name="ce35">
            <text:p><text:s/>-<text:s/></text:p>
          </table:table-cell>
          <table:table-cell table:number-columns-repeated="16377" table:style-name="ce15"/>
        </table:table-row>
        <table:table-row table:style-name="ro5">
          <table:table-cell table:style-name="ce15"/>
          <table:table-cell office:value-type="string" table:style-name="ce41">
            <text:p>Total</text:p>
          </table:table-cell>
          <table:table-cell office:value-type="float" office:value="0" table:formula="of:=SUM([.C7:.C8])" table:style-name="ce42">
            <text:p><text:s/>-<text:s/></text:p>
          </table:table-cell>
          <table:table-cell office:value-type="float" office:value="0" table:formula="of:=SUM([.D7:.D8])" table:style-name="ce43">
            <text:p><text:s/>-<text:s/></text:p>
          </table:table-cell>
          <table:table-cell office:value-type="float" office:value="0" table:formula="of:=SUM([.E7:.E8])" table:style-name="ce43">
            <text:p><text:s/>-<text:s/></text:p>
          </table:table-cell>
          <table:table-cell office:value-type="float" office:value="0" table:formula="of:=SUM([.F7:.F8])" table:style-name="ce151">
            <text:p><text:s/>-<text:s/></text:p>
          </table:table-cell>
          <table:table-cell office:value-type="float" office:value="0" table:formula="of:=SUM([.G7:.G8])" table:style-name="ce107">
            <text:p><text:s/>-<text:s/></text:p>
          </table:table-cell>
          <table:table-cell table:number-columns-repeated="16377" table:style-name="ce15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15"/>
          <table:table-cell office:value-type="string" table:style-name="ce16">
            <text:p>Yorkshire and the Humber: Deposit in landfill for recovery inputs 2024</text:p>
          </table:table-cell>
          <table:table-cell table:number-columns-repeated="2" table:style-name="ce15"/>
          <table:table-cell table:number-columns-repeated="5" table:style-name="ce119"/>
          <table:table-cell table:number-columns-repeated="1637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number-columns-spanned="1" table:number-rows-spanned="2" table:style-name="ce343">
            <text:p>Site Type</text:p>
          </table:table-cell>
          <table:table-cell office:value-type="string" table:number-columns-spanned="4" table:number-rows-spanned="1" table:style-name="ce3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345">
            <text:p>YORKSHIRE AND THE HUMBER</text:p>
          </table:table-cell>
          <table:table-cell table:number-columns-repeated="2" table:style-name="ce119"/>
          <table:table-cell table:number-columns-repeated="16375"/>
        </table:table-row>
        <table:table-row table:style-name="ro24">
          <table:table-cell table:style-name="ce15"/>
          <table:covered-table-cell/>
          <table:table-cell office:value-type="string" table:style-name="ce23">
            <text:p>Former Humberside</text:p>
          </table:table-cell>
          <table:table-cell office:value-type="string" table:style-name="ce2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23">
            <text:p>West Yorkshire</text:p>
          </table:table-cell>
          <table:covered-table-cell/>
          <table:table-cell table:number-columns-repeated="2" table:style-name="ce119"/>
          <table:table-cell table:number-columns-repeated="16375"/>
        </table:table-row>
        <table:table-row table:style-name="ro25">
          <table:table-cell/>
          <table:table-cell office:value-type="string" table:style-name="ce56">
            <text:p>Deposit in landfill for recovery</text:p>
          </table:table-cell>
          <table:table-cell office:value-type="float" office:value="221836.67" table:style-name="ce261">
            <text:p><text:s text:c="2"/>222</text:p>
          </table:table-cell>
          <table:table-cell office:value-type="float" office:value="129276.4" table:style-name="ce261">
            <text:p><text:s text:c="2"/>129</text:p>
          </table:table-cell>
          <table:table-cell office:value-type="float" office:value="776005.80999999982" table:style-name="ce261">
            <text:p><text:s text:c="2"/>776</text:p>
          </table:table-cell>
          <table:table-cell office:value-type="float" office:value="199378.03999999998" table:style-name="ce261">
            <text:p><text:s text:c="2"/>199</text:p>
          </table:table-cell>
          <table:table-cell office:value-type="float" office:value="1326496.92" table:formula="of:=SUM([.C17:.F17])" table:style-name="ce279">
            <text:p><text:s text:c="2"/>1,326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41">
            <text:p>Total</text:p>
          </table:table-cell>
          <table:table-cell office:value-type="float" office:value="221836.67" table:formula="of:=SUM([.C17:.C17])" table:style-name="ce270">
            <text:p><text:s text:c="2"/>222</text:p>
          </table:table-cell>
          <table:table-cell office:value-type="float" office:value="129276.4" table:formula="of:=SUM([.D17:.D17])" table:style-name="ce271">
            <text:p><text:s text:c="2"/>129</text:p>
          </table:table-cell>
          <table:table-cell office:value-type="float" office:value="776005.80999999982" table:formula="of:=SUM([.E17:.E17])" table:style-name="ce271">
            <text:p><text:s text:c="2"/>776</text:p>
          </table:table-cell>
          <table:table-cell office:value-type="float" office:value="199378.03999999998" table:formula="of:=SUM([.F17:.F17])" table:style-name="ce280">
            <text:p><text:s text:c="2"/>199</text:p>
          </table:table-cell>
          <table:table-cell office:value-type="float" office:value="1326496.92" table:formula="of:=SUM([.G17:.G17])" table:style-name="ce281">
            <text:p><text:s text:c="2"/>1,326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5">
            <text:p>Note: This activity is the deposit of waste in land for benefit and recovery purposes. <text:s/>Landfilling is the deposit in land for the purposes of final disposal.<text:s text:c="2"/>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5">
            <text:p>Both activities require an environmental permit under the Environmental Permitting Regulations.</text:p>
          </table:table-cell>
          <table:table-cell table:number-columns-repeated="16382" table:style-name="ce15"/>
        </table:table-row>
        <table:table-row table:number-rows-repeated="1048555" table:style-name="ro5">
          <table:table-cell table:number-columns-repeated="16384"/>
        </table:table-row>
      </table:table>
      <table:table table:name="Use_of_Waste" table:style-name="ta3">
        <table:table-column table:style-name="co5" table:default-cell-style-name="ce15"/>
        <table:table-column table:style-name="co46" table:default-cell-style-name="ce15"/>
        <table:table-column table:style-name="co32" table:default-cell-style-name="ce15"/>
        <table:table-column table:style-name="co47" table:default-cell-style-name="ce15"/>
        <table:table-column table:style-name="co7" table:default-cell-style-name="ce15"/>
        <table:table-column table:style-name="co36" table:default-cell-style-name="ce15"/>
        <table:table-column table:style-name="co2" table:default-cell-style-name="ce15"/>
        <table:table-column table:style-name="co14" table:number-columns-repeated="16377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Yorkshire and the Humber: Use of waste inputs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provided in 000s tonnes</text:p>
          </table:table-cell>
          <table:table-cell table:number-columns-repeated="16382" table:style-name="ce15"/>
        </table:table-row>
        <table:table-row table:style-name="ro5">
          <table:table-cell table:style-name="ce15"/>
          <table:table-cell table:style-name="ce44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43">
            <text:p>Site Type</text:p>
          </table:table-cell>
          <table:table-cell office:value-type="string" table:number-columns-spanned="4" table:number-rows-spanned="1" table:style-name="ce344">
            <text:p>Sub Region</text:p>
          </table:table-cell>
          <table:covered-table-cell table:number-columns-repeated="3"/>
          <table:table-cell office:value-type="string" table:number-columns-spanned="1" table:number-rows-spanned="2" table:style-name="ce361">
            <text:p>YORKSHIRE AND THE HUMBER</text:p>
          </table:table-cell>
          <table:table-cell table:number-columns-repeated="16377"/>
        </table:table-row>
        <table:table-row table:style-name="ro26">
          <table:table-cell table:style-name="ce15"/>
          <table:covered-table-cell/>
          <table:table-cell office:value-type="string" table:style-name="ce23">
            <text:p>Former Humberside</text:p>
          </table:table-cell>
          <table:table-cell office:value-type="string" table:style-name="ce153">
            <text:p>North Yorkshire</text:p>
          </table:table-cell>
          <table:table-cell office:value-type="string" table:style-name="ce23">
            <text:p>South Yorkshire</text:p>
          </table:table-cell>
          <table:table-cell office:value-type="string" table:style-name="ce23">
            <text:p>West Yorkshire</text:p>
          </table:table-cell>
          <table:covered-table-cell/>
          <table:table-cell table:number-columns-repeated="16377"/>
        </table:table-row>
        <table:table-row table:style-name="ro27">
          <table:table-cell table:style-name="ce15"/>
          <table:table-cell office:value-type="string" table:style-name="ce154">
            <text:p>Use of waste in construction</text:p>
          </table:table-cell>
          <table:table-cell office:value-type="string" table:style-name="ce28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float" office:value="0" table:formula="of:=SUM([.C7:.F7])" table:style-name="ce35">
            <text:p><text:s/>-<text:s/></text:p>
          </table:table-cell>
          <table:table-cell table:number-columns-repeated="16377"/>
        </table:table-row>
        <table:table-row table:style-name="ro27">
          <table:table-cell table:style-name="ce15"/>
          <table:table-cell office:value-type="string" table:style-name="ce155">
            <text:p>Use of waste in reclamation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float" office:value="0" table:formula="of:=SUM([.C8:.F8])" table:style-name="ce35">
            <text:p><text:s/>-<text:s/></text:p>
          </table:table-cell>
          <table:table-cell table:number-columns-repeated="16377"/>
        </table:table-row>
        <table:table-row table:style-name="ro27">
          <table:table-cell table:style-name="ce15"/>
          <table:table-cell office:value-type="string" table:style-name="ce156">
            <text:p>Use of waste for timber manufacturing</text:p>
          </table:table-cell>
          <table:table-cell office:value-type="string" table:style-name="ce38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float" office:value="0" table:formula="of:=SUM([.C9:.F9])" table:style-name="ce35">
            <text:p><text:s/>-<text:s/></text:p>
          </table:table-cell>
          <table:table-cell table:number-columns-repeated="16377"/>
        </table:table-row>
        <table:table-row table:style-name="ro28">
          <table:table-cell table:style-name="ce15"/>
          <table:table-cell office:value-type="string" table:style-name="ce106">
            <text:p>Total</text:p>
          </table:table-cell>
          <table:table-cell office:value-type="float" office:value="0" table:formula="of:=SUM([.C7:.C9])" table:style-name="ce42">
            <text:p><text:s/>-<text:s/></text:p>
          </table:table-cell>
          <table:table-cell office:value-type="float" office:value="0" table:formula="of:=SUM([.D7:.D9])" table:style-name="ce43">
            <text:p><text:s/>-<text:s/></text:p>
          </table:table-cell>
          <table:table-cell office:value-type="float" office:value="0" table:formula="of:=SUM([.E7:.E9])" table:style-name="ce43">
            <text:p><text:s/>-<text:s/></text:p>
          </table:table-cell>
          <table:table-cell office:value-type="float" office:value="0" table:formula="of:=SUM([.F7:.F9])" table:style-name="ce151">
            <text:p><text:s/>-<text:s/></text:p>
          </table:table-cell>
          <table:table-cell office:value-type="float" office:value="0" table:formula="of:=SUM([.G7:.G9])" table:style-name="ce42">
            <text:p><text:s/>-<text:s/>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style-name="ce15">
            <text:p>Note: These activities are for use of waste permitted under Standard Rules Permits for waste operations.</text:p>
          </table:table-cell>
          <table:table-cell table:number-columns-repeated="16382" table:style-name="ce15"/>
        </table:table-row>
        <table:table-row table:number-rows-repeated="1048564" table:style-name="ro5">
          <table:table-cell table:number-columns-repeated="16384"/>
        </table:table-row>
      </table:table>
      <table:table table:name="Haz_Waste_Managed_&amp;_Deposits" table:style-name="ta1">
        <table:table-column table:style-name="co48" table:default-cell-style-name="ce157"/>
        <table:table-column table:style-name="co14" table:default-cell-style-name="ce157"/>
        <table:table-column table:style-name="co49" table:default-cell-style-name="ce157"/>
        <table:table-column table:style-name="co45" table:default-cell-style-name="ce157"/>
        <table:table-column table:style-name="co50" table:default-cell-style-name="ce157"/>
        <table:table-column table:style-name="co51" table:default-cell-style-name="ce157"/>
        <table:table-column table:style-name="co13" table:default-cell-style-name="ce157"/>
        <table:table-column table:style-name="co52" table:default-cell-style-name="ce157"/>
        <table:table-column table:style-name="co14" table:number-columns-repeated="16376" table:default-cell-style-name="ce157"/>
        <table:table-row table:style-name="ro4">
          <table:table-cell table:style-name="ce14"/>
          <table:table-cell table:number-columns-repeated="16383" table:style-name="ce157"/>
        </table:table-row>
        <table:table-row table:style-name="ro6">
          <table:table-cell table:style-name="ce157"/>
          <table:table-cell office:value-type="string" table:style-name="ce16">
            <text:p>Yorkshire and the Humber: Hazardous waste managed by EWC chapter and former planning sub-region 2024 (tonnes)</text:p>
          </table:table-cell>
          <table:table-cell table:number-columns-repeated="16382" table:style-name="ce157"/>
        </table:table-row>
        <table:table-row table:style-name="ro5">
          <table:table-cell table:style-name="ce157"/>
          <table:table-cell table:style-name="ce158"/>
          <table:table-cell table:number-columns-repeated="16382" table:style-name="ce157"/>
        </table:table-row>
        <table:table-row table:style-name="ro29">
          <table:table-cell table:style-name="ce157"/>
          <table:table-cell office:value-type="string" table:style-name="ce71">
            <text:p>EWC Chapter</text:p>
          </table:table-cell>
          <table:table-cell office:value-type="string" table:style-name="ce159">
            <text:p>EWC Chapter Description</text:p>
          </table:table-cell>
          <table:table-cell office:value-type="string" table:style-name="ce20">
            <text:p>Former Humberside</text:p>
          </table:table-cell>
          <table:table-cell office:value-type="string" table:style-name="ce152">
            <text:p>North Yorkshire</text:p>
          </table:table-cell>
          <table:table-cell office:value-type="string" table:style-name="ce152">
            <text:p>South Yorkshire</text:p>
          </table:table-cell>
          <table:table-cell office:value-type="string" table:style-name="ce21">
            <text:p>West Yorkshire</text:p>
          </table:table-cell>
          <table:table-cell office:value-type="string" table:style-name="ce160">
            <text:p>YORKSHIRE AND THE HUMBER</text:p>
          </table:table-cell>
          <table:table-cell table:style-name="ce161"/>
          <table:table-cell table:number-columns-repeated="16375"/>
        </table:table-row>
        <table:table-row table:style-name="ro5">
          <table:table-cell table:style-name="ce157"/>
          <table:table-cell office:value-type="string" table:style-name="ce117">
            <text:p>01</text:p>
          </table:table-cell>
          <table:table-cell office:value-type="string" table:style-name="ce131">
            <text:p>Mining and Minerals</text:p>
          </table:table-cell>
          <table:table-cell table:number-columns-repeated="2" table:style-name="ce302"/>
          <table:table-cell office:value-type="float" office:value="40" table:style-name="ce302">
            <text:p>40</text:p>
          </table:table-cell>
          <table:table-cell table:style-name="ce302"/>
          <table:table-cell office:value-type="float" office:value="40" table:style-name="ce35">
            <text:p><text:s/>40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02</text:p>
          </table:table-cell>
          <table:table-cell office:value-type="string" table:style-name="ce162">
            <text:p>Agricultural and Food Production</text:p>
          </table:table-cell>
          <table:table-cell office:value-type="float" office:value="26" table:style-name="ce302">
            <text:p>26</text:p>
          </table:table-cell>
          <table:table-cell office:value-type="float" office:value="4" table:style-name="ce302">
            <text:p>4</text:p>
          </table:table-cell>
          <table:table-cell office:value-type="float" office:value="1" table:style-name="ce302">
            <text:p>1</text:p>
          </table:table-cell>
          <table:table-cell office:value-type="float" office:value="39" table:style-name="ce302">
            <text:p>39</text:p>
          </table:table-cell>
          <table:table-cell office:value-type="float" office:value="70" table:style-name="ce35">
            <text:p><text:s/>70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03</text:p>
          </table:table-cell>
          <table:table-cell office:value-type="string" table:style-name="ce162">
            <text:p>Wood and Paper Production</text:p>
          </table:table-cell>
          <table:table-cell table:number-columns-repeated="2" table:style-name="ce302"/>
          <table:table-cell office:value-type="float" office:value="36" table:style-name="ce302">
            <text:p>36</text:p>
          </table:table-cell>
          <table:table-cell table:style-name="ce302"/>
          <table:table-cell office:value-type="float" office:value="36" table:style-name="ce35">
            <text:p><text:s/>36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04</text:p>
          </table:table-cell>
          <table:table-cell office:value-type="string" table:style-name="ce162">
            <text:p>Leather and Textile Production</text:p>
          </table:table-cell>
          <table:table-cell table:style-name="ce302"/>
          <table:table-cell office:value-type="float" office:value="2" table:style-name="ce302">
            <text:p>2</text:p>
          </table:table-cell>
          <table:table-cell office:value-type="float" office:value="0" table:style-name="ce302">
            <text:p>0</text:p>
          </table:table-cell>
          <table:table-cell office:value-type="float" office:value="209" table:style-name="ce302">
            <text:p>209</text:p>
          </table:table-cell>
          <table:table-cell office:value-type="float" office:value="212" table:style-name="ce35">
            <text:p><text:s/>212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05</text:p>
          </table:table-cell>
          <table:table-cell office:value-type="string" table:style-name="ce162">
            <text:p>Petrol, Gas and Coal Refining/Treatment</text:p>
          </table:table-cell>
          <table:table-cell office:value-type="float" office:value="1764" table:style-name="ce302">
            <text:p>1,764</text:p>
          </table:table-cell>
          <table:table-cell table:style-name="ce302"/>
          <table:table-cell office:value-type="float" office:value="1" table:style-name="ce302">
            <text:p>1</text:p>
          </table:table-cell>
          <table:table-cell table:style-name="ce302"/>
          <table:table-cell office:value-type="float" office:value="1765" table:style-name="ce35">
            <text:p><text:s/>1,765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06</text:p>
          </table:table-cell>
          <table:table-cell office:value-type="string" table:style-name="ce162">
            <text:p>Inorganic Chemical Processes</text:p>
          </table:table-cell>
          <table:table-cell office:value-type="float" office:value="8343" table:style-name="ce302">
            <text:p>8,343</text:p>
          </table:table-cell>
          <table:table-cell office:value-type="float" office:value="178" table:style-name="ce302">
            <text:p>178</text:p>
          </table:table-cell>
          <table:table-cell office:value-type="float" office:value="1255" table:style-name="ce302">
            <text:p>1,255</text:p>
          </table:table-cell>
          <table:table-cell office:value-type="float" office:value="752" table:style-name="ce302">
            <text:p>752</text:p>
          </table:table-cell>
          <table:table-cell office:value-type="float" office:value="10528" table:style-name="ce35">
            <text:p><text:s/>10,528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07</text:p>
          </table:table-cell>
          <table:table-cell office:value-type="string" table:style-name="ce162">
            <text:p>Organic Chemical Processes</text:p>
          </table:table-cell>
          <table:table-cell office:value-type="float" office:value="6285" table:style-name="ce302">
            <text:p>6,285</text:p>
          </table:table-cell>
          <table:table-cell office:value-type="float" office:value="804" table:style-name="ce302">
            <text:p>804</text:p>
          </table:table-cell>
          <table:table-cell office:value-type="float" office:value="22698" table:style-name="ce302">
            <text:p>22,698</text:p>
          </table:table-cell>
          <table:table-cell office:value-type="float" office:value="18121" table:style-name="ce302">
            <text:p>18,121</text:p>
          </table:table-cell>
          <table:table-cell office:value-type="float" office:value="47908" table:style-name="ce35">
            <text:p><text:s/>47,908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08</text:p>
          </table:table-cell>
          <table:table-cell office:value-type="string" table:style-name="ce162">
            <text:p>MFSU Paints, Varnish, Adhesive and Inks</text:p>
          </table:table-cell>
          <table:table-cell office:value-type="float" office:value="2130" table:style-name="ce302">
            <text:p>2,130</text:p>
          </table:table-cell>
          <table:table-cell office:value-type="float" office:value="1108" table:style-name="ce302">
            <text:p>1,108</text:p>
          </table:table-cell>
          <table:table-cell office:value-type="float" office:value="3437" table:style-name="ce302">
            <text:p>3,437</text:p>
          </table:table-cell>
          <table:table-cell office:value-type="float" office:value="3948" table:style-name="ce302">
            <text:p>3,948</text:p>
          </table:table-cell>
          <table:table-cell office:value-type="float" office:value="10623" table:style-name="ce35">
            <text:p><text:s/>10,623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09</text:p>
          </table:table-cell>
          <table:table-cell office:value-type="string" table:style-name="ce162">
            <text:p>Photographic Industry</text:p>
          </table:table-cell>
          <table:table-cell office:value-type="float" office:value="12" table:style-name="ce302">
            <text:p>12</text:p>
          </table:table-cell>
          <table:table-cell office:value-type="float" office:value="4" table:style-name="ce302">
            <text:p>4</text:p>
          </table:table-cell>
          <table:table-cell office:value-type="float" office:value="174" table:style-name="ce302">
            <text:p>174</text:p>
          </table:table-cell>
          <table:table-cell office:value-type="float" office:value="106" table:style-name="ce302">
            <text:p>106</text:p>
          </table:table-cell>
          <table:table-cell office:value-type="float" office:value="296" table:style-name="ce35">
            <text:p><text:s/>296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10</text:p>
          </table:table-cell>
          <table:table-cell office:value-type="string" table:style-name="ce162">
            <text:p>Thermal Process Waste (inorganic)</text:p>
          </table:table-cell>
          <table:table-cell office:value-type="float" office:value="22895" table:style-name="ce302">
            <text:p>22,895</text:p>
          </table:table-cell>
          <table:table-cell office:value-type="float" office:value="27" table:style-name="ce302">
            <text:p>27</text:p>
          </table:table-cell>
          <table:table-cell office:value-type="float" office:value="82167" table:style-name="ce302">
            <text:p>82,167</text:p>
          </table:table-cell>
          <table:table-cell office:value-type="float" office:value="488" table:style-name="ce302">
            <text:p>488</text:p>
          </table:table-cell>
          <table:table-cell office:value-type="float" office:value="105577" table:style-name="ce35">
            <text:p><text:s/>105,577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11</text:p>
          </table:table-cell>
          <table:table-cell office:value-type="string" table:style-name="ce162">
            <text:p>Metal Treatment and Coating Processes</text:p>
          </table:table-cell>
          <table:table-cell office:value-type="float" office:value="724" table:style-name="ce302">
            <text:p>724</text:p>
          </table:table-cell>
          <table:table-cell office:value-type="float" office:value="498" table:style-name="ce302">
            <text:p>498</text:p>
          </table:table-cell>
          <table:table-cell office:value-type="float" office:value="4407" table:style-name="ce302">
            <text:p>4,407</text:p>
          </table:table-cell>
          <table:table-cell office:value-type="float" office:value="1256" table:style-name="ce302">
            <text:p>1,256</text:p>
          </table:table-cell>
          <table:table-cell office:value-type="float" office:value="6885" table:style-name="ce35">
            <text:p><text:s/>6,885<text:s/></text:p>
          </table:table-cell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129">
            <text:p>12</text:p>
          </table:table-cell>
          <table:table-cell office:value-type="string" table:style-name="ce162">
            <text:p>Shaping/Treatment of Metals and Plastics</text:p>
          </table:table-cell>
          <table:table-cell office:value-type="float" office:value="250" table:style-name="ce302">
            <text:p>250</text:p>
          </table:table-cell>
          <table:table-cell office:value-type="float" office:value="218" table:style-name="ce302">
            <text:p>218</text:p>
          </table:table-cell>
          <table:table-cell office:value-type="float" office:value="7319" table:style-name="ce302">
            <text:p>7,319</text:p>
          </table:table-cell>
          <table:table-cell office:value-type="float" office:value="1978" table:style-name="ce302">
            <text:p>1,978</text:p>
          </table:table-cell>
          <table:table-cell office:value-type="float" office:value="9765" table:style-name="ce35">
            <text:p><text:s/>9,765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29">
            <text:p>13</text:p>
          </table:table-cell>
          <table:table-cell office:value-type="string" table:style-name="ce162">
            <text:p>Oil and Oil/Water Mixtures</text:p>
          </table:table-cell>
          <table:table-cell office:value-type="float" office:value="19237" table:style-name="ce302">
            <text:p>19,237</text:p>
          </table:table-cell>
          <table:table-cell office:value-type="float" office:value="6886" table:style-name="ce302">
            <text:p>6,886</text:p>
          </table:table-cell>
          <table:table-cell office:value-type="float" office:value="23755" table:style-name="ce302">
            <text:p>23,755</text:p>
          </table:table-cell>
          <table:table-cell office:value-type="float" office:value="13802" table:style-name="ce302">
            <text:p>13,802</text:p>
          </table:table-cell>
          <table:table-cell office:value-type="float" office:value="63680" table:style-name="ce35">
            <text:p><text:s/>63,680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29">
            <text:p>14</text:p>
          </table:table-cell>
          <table:table-cell office:value-type="string" table:style-name="ce162">
            <text:p>Solvents</text:p>
          </table:table-cell>
          <table:table-cell office:value-type="float" office:value="655" table:style-name="ce302">
            <text:p>655</text:p>
          </table:table-cell>
          <table:table-cell office:value-type="float" office:value="234" table:style-name="ce302">
            <text:p>234</text:p>
          </table:table-cell>
          <table:table-cell office:value-type="float" office:value="401" table:style-name="ce302">
            <text:p>401</text:p>
          </table:table-cell>
          <table:table-cell office:value-type="float" office:value="425" table:style-name="ce302">
            <text:p>425</text:p>
          </table:table-cell>
          <table:table-cell office:value-type="float" office:value="1715" table:style-name="ce35">
            <text:p><text:s/>1,715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29">
            <text:p>15</text:p>
          </table:table-cell>
          <table:table-cell office:value-type="string" table:style-name="ce162">
            <text:p>Packaging, Cloths, Filter Materials</text:p>
          </table:table-cell>
          <table:table-cell office:value-type="float" office:value="5161" table:style-name="ce302">
            <text:p>5,161</text:p>
          </table:table-cell>
          <table:table-cell office:value-type="float" office:value="818" table:style-name="ce302">
            <text:p>818</text:p>
          </table:table-cell>
          <table:table-cell office:value-type="float" office:value="7137" table:style-name="ce302">
            <text:p>7,137</text:p>
          </table:table-cell>
          <table:table-cell office:value-type="float" office:value="16522" table:style-name="ce302">
            <text:p>16,522</text:p>
          </table:table-cell>
          <table:table-cell office:value-type="float" office:value="29638" table:style-name="ce35">
            <text:p><text:s/>29,638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29">
            <text:p>16</text:p>
          </table:table-cell>
          <table:table-cell office:value-type="string" table:style-name="ce162">
            <text:p>Not Otherwise Specified*</text:p>
          </table:table-cell>
          <table:table-cell office:value-type="float" office:value="47513" table:style-name="ce302">
            <text:p>47,513</text:p>
          </table:table-cell>
          <table:table-cell office:value-type="float" office:value="8675" table:style-name="ce302">
            <text:p>8,675</text:p>
          </table:table-cell>
          <table:table-cell office:value-type="float" office:value="26194" table:style-name="ce302">
            <text:p>26,194</text:p>
          </table:table-cell>
          <table:table-cell office:value-type="float" office:value="18154" table:style-name="ce302">
            <text:p>18,154</text:p>
          </table:table-cell>
          <table:table-cell office:value-type="float" office:value="100536" table:style-name="ce35">
            <text:p><text:s/>100,536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29">
            <text:p>17</text:p>
          </table:table-cell>
          <table:table-cell office:value-type="string" table:style-name="ce162">
            <text:p>C&amp;D Waste and Asbestos</text:p>
          </table:table-cell>
          <table:table-cell office:value-type="float" office:value="25854" table:style-name="ce302">
            <text:p>25,854</text:p>
          </table:table-cell>
          <table:table-cell office:value-type="float" office:value="16373" table:style-name="ce302">
            <text:p>16,373</text:p>
          </table:table-cell>
          <table:table-cell office:value-type="float" office:value="29231" table:style-name="ce302">
            <text:p>29,231</text:p>
          </table:table-cell>
          <table:table-cell office:value-type="float" office:value="40272" table:style-name="ce302">
            <text:p>40,272</text:p>
          </table:table-cell>
          <table:table-cell office:value-type="float" office:value="111731" table:style-name="ce35">
            <text:p><text:s/>111,731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29">
            <text:p>18</text:p>
          </table:table-cell>
          <table:table-cell office:value-type="string" table:style-name="ce162">
            <text:p>Healthcare</text:p>
          </table:table-cell>
          <table:table-cell office:value-type="float" office:value="1307" table:style-name="ce302">
            <text:p>1,307</text:p>
          </table:table-cell>
          <table:table-cell office:value-type="float" office:value="1754" table:style-name="ce302">
            <text:p>1,754</text:p>
          </table:table-cell>
          <table:table-cell office:value-type="float" office:value="2977" table:style-name="ce302">
            <text:p>2,977</text:p>
          </table:table-cell>
          <table:table-cell office:value-type="float" office:value="8555" table:style-name="ce302">
            <text:p>8,555</text:p>
          </table:table-cell>
          <table:table-cell office:value-type="float" office:value="14593" table:style-name="ce35">
            <text:p><text:s/>14,593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29">
            <text:p>19</text:p>
          </table:table-cell>
          <table:table-cell office:value-type="string" table:style-name="ce162">
            <text:p>Waste Treatment /Water Treatment and Water Industry</text:p>
          </table:table-cell>
          <table:table-cell office:value-type="float" office:value="30594" table:style-name="ce302">
            <text:p>30,594</text:p>
          </table:table-cell>
          <table:table-cell office:value-type="float" office:value="34753" table:style-name="ce302">
            <text:p>34,753</text:p>
          </table:table-cell>
          <table:table-cell office:value-type="float" office:value="49138" table:style-name="ce302">
            <text:p>49,138</text:p>
          </table:table-cell>
          <table:table-cell office:value-type="float" office:value="85100" table:style-name="ce302">
            <text:p>85,100</text:p>
          </table:table-cell>
          <table:table-cell office:value-type="float" office:value="199584" table:style-name="ce35">
            <text:p><text:s/>199,584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">
            <text:p>20</text:p>
          </table:table-cell>
          <table:table-cell office:value-type="string" table:style-name="ce132">
            <text:p>Municipal and Similar Commercial Wastes</text:p>
          </table:table-cell>
          <table:table-cell office:value-type="float" office:value="6897" table:style-name="ce302">
            <text:p>6,897</text:p>
          </table:table-cell>
          <table:table-cell office:value-type="float" office:value="4112" table:style-name="ce302">
            <text:p>4,112</text:p>
          </table:table-cell>
          <table:table-cell office:value-type="float" office:value="7086" table:style-name="ce302">
            <text:p>7,086</text:p>
          </table:table-cell>
          <table:table-cell office:value-type="float" office:value="27873" table:style-name="ce302">
            <text:p>27,873</text:p>
          </table:table-cell>
          <table:table-cell office:value-type="float" office:value="45967" table:style-name="ce35">
            <text:p><text:s/>45,967<text:s/>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41">
            <text:p>Total<text:s/></text:p>
          </table:table-cell>
          <table:table-cell table:style-name="ce163"/>
          <table:table-cell office:value-type="float" office:value="179645" table:style-name="ce118">
            <text:p><text:s/>179,645<text:s/></text:p>
          </table:table-cell>
          <table:table-cell office:value-type="float" office:value="76448" table:formula="of:=SUM([.E5:.E24])" table:style-name="ce43">
            <text:p><text:s/>76,448<text:s/></text:p>
          </table:table-cell>
          <table:table-cell office:value-type="float" office:value="267455" table:style-name="ce43">
            <text:p><text:s/>267,455<text:s/></text:p>
          </table:table-cell>
          <table:table-cell office:value-type="float" office:value="237600" table:formula="of:=SUM([.G5:.G24])" table:style-name="ce107">
            <text:p><text:s/>237,600<text:s/></text:p>
          </table:table-cell>
          <table:table-cell office:value-type="float" office:value="761148" table:style-name="ce107">
            <text:p><text:s/>761,148<text:s/></text:p>
          </table:table-cell>
          <table:table-cell table:number-columns-repeated="16376"/>
        </table:table-row>
        <table:table-row table:style-name="ro4">
          <table:table-cell/>
          <table:table-cell table:style-name="ce164"/>
          <table:table-cell table:number-columns-repeated="16382" table:style-name="ce157"/>
        </table:table-row>
        <table:table-row table:style-name="ro5">
          <table:table-cell/>
          <table:table-cell office:value-type="string" table:style-name="ce44">
            <text:p>Notes:</text:p>
          </table:table-cell>
          <table:table-cell table:number-columns-repeated="2" table:style-name="ce157"/>
          <table:table-cell table:style-name="ce119"/>
          <table:table-cell table:number-columns-repeated="16379" table:style-name="ce157"/>
        </table:table-row>
        <table:table-row table:style-name="ro5">
          <table:table-cell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57"/>
        </table:table-row>
        <table:table-row table:style-name="ro5">
          <table:table-cell/>
          <table:table-cell office:value-type="string" table:style-name="ce15">
            <text:p>This double counting should be taken into account when using this data.</text:p>
          </table:table-cell>
          <table:table-cell table:number-columns-repeated="16382" table:style-name="ce157"/>
        </table:table-row>
        <table:table-row table:style-name="ro5">
          <table:table-cell/>
          <table:table-cell office:value-type="string" table:style-name="ce15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57"/>
        </table:table-row>
        <table:table-row table:number-rows-repeated="2" table:style-name="ro4">
          <table:table-cell table:number-columns-repeated="16384"/>
        </table:table-row>
        <table:table-row table:style-name="ro6">
          <table:table-cell/>
          <table:table-cell office:value-type="string" table:style-name="ce16">
            <text:p>Yorkshire and the Humber: Hazardous waste deposited by EWC chapter and former planning sub-region 2024 (tonnes)</text:p>
          </table:table-cell>
          <table:table-cell table:number-columns-repeated="16382" table:style-name="ce157"/>
        </table:table-row>
        <table:table-row table:style-name="ro4">
          <table:table-cell table:number-columns-repeated="16384"/>
        </table:table-row>
        <table:table-row table:style-name="ro29">
          <table:table-cell/>
          <table:table-cell office:value-type="string" table:style-name="ce165">
            <text:p>EWC Chapter</text:p>
          </table:table-cell>
          <table:table-cell office:value-type="string" table:style-name="ce166">
            <text:p>EWC Chapter Description</text:p>
          </table:table-cell>
          <table:table-cell office:value-type="string" table:style-name="ce20">
            <text:p>Former Humberside</text:p>
          </table:table-cell>
          <table:table-cell office:value-type="string" table:style-name="ce152">
            <text:p>North Yorkshire</text:p>
          </table:table-cell>
          <table:table-cell office:value-type="string" table:style-name="ce152">
            <text:p>South Yorkshire</text:p>
          </table:table-cell>
          <table:table-cell office:value-type="string" table:style-name="ce21">
            <text:p>West Yorkshire</text:p>
          </table:table-cell>
          <table:table-cell office:value-type="string" table:style-name="ce160">
            <text:p>YORKSHIRE AND THE HUMBER</text:p>
          </table:table-cell>
          <table:table-cell table:number-columns-repeated="3" table:style-name="ce167"/>
          <table:table-cell table:number-columns-repeated="16373"/>
        </table:table-row>
        <table:table-row table:style-name="ro5">
          <table:table-cell/>
          <table:table-cell office:value-type="string" table:style-name="ce168">
            <text:p>01</text:p>
          </table:table-cell>
          <table:table-cell office:value-type="string" table:style-name="ce169">
            <text:p>Mining and Minerals</text:p>
          </table:table-cell>
          <table:table-cell table:number-columns-repeated="3" table:style-name="ce302"/>
          <table:table-cell office:value-type="float" office:value="333" table:style-name="ce302">
            <text:p>333</text:p>
          </table:table-cell>
          <table:table-cell office:value-type="float" office:value="333" table:style-name="ce35">
            <text:p><text:s/>333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02</text:p>
          </table:table-cell>
          <table:table-cell office:value-type="string" table:style-name="ce169">
            <text:p>Agricultural and Food Production</text:p>
          </table:table-cell>
          <table:table-cell office:value-type="float" office:value="0" table:style-name="ce302">
            <text:p>0</text:p>
          </table:table-cell>
          <table:table-cell office:value-type="float" office:value="0" table:style-name="ce302">
            <text:p>0</text:p>
          </table:table-cell>
          <table:table-cell office:value-type="float" office:value="20" table:style-name="ce302">
            <text:p>20</text:p>
          </table:table-cell>
          <table:table-cell office:value-type="float" office:value="81" table:style-name="ce302">
            <text:p>81</text:p>
          </table:table-cell>
          <table:table-cell office:value-type="float" office:value="101" table:style-name="ce35">
            <text:p><text:s/>101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03</text:p>
          </table:table-cell>
          <table:table-cell office:value-type="string" table:style-name="ce169">
            <text:p>Wood and Paper Production</text:p>
          </table:table-cell>
          <table:table-cell table:number-columns-repeated="3" table:style-name="ce302"/>
          <table:table-cell office:value-type="float" office:value="36" table:style-name="ce302">
            <text:p>36</text:p>
          </table:table-cell>
          <table:table-cell office:value-type="float" office:value="36" table:style-name="ce35">
            <text:p><text:s/>36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04</text:p>
          </table:table-cell>
          <table:table-cell office:value-type="string" table:style-name="ce169">
            <text:p>Leather and Textile Production</text:p>
          </table:table-cell>
          <table:table-cell table:number-columns-repeated="2" table:style-name="ce302"/>
          <table:table-cell office:value-type="float" office:value="0" table:style-name="ce302">
            <text:p>0</text:p>
          </table:table-cell>
          <table:table-cell office:value-type="float" office:value="2" table:style-name="ce302">
            <text:p>2</text:p>
          </table:table-cell>
          <table:table-cell office:value-type="float" office:value="2" table:style-name="ce35">
            <text:p><text:s/>2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05</text:p>
          </table:table-cell>
          <table:table-cell office:value-type="string" table:style-name="ce169">
            <text:p>Petrol, Gas and Coal Refining/Treatment</text:p>
          </table:table-cell>
          <table:table-cell table:style-name="ce302"/>
          <table:table-cell office:value-type="float" office:value="0" table:style-name="ce302">
            <text:p>0</text:p>
          </table:table-cell>
          <table:table-cell office:value-type="float" office:value="27" table:style-name="ce302">
            <text:p>27</text:p>
          </table:table-cell>
          <table:table-cell office:value-type="float" office:value="2" table:style-name="ce302">
            <text:p>2</text:p>
          </table:table-cell>
          <table:table-cell office:value-type="float" office:value="30" table:style-name="ce35">
            <text:p><text:s/>30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06</text:p>
          </table:table-cell>
          <table:table-cell office:value-type="string" table:style-name="ce169">
            <text:p>Inorganic Chemical Processes</text:p>
          </table:table-cell>
          <table:table-cell office:value-type="float" office:value="36" table:style-name="ce302">
            <text:p>36</text:p>
          </table:table-cell>
          <table:table-cell office:value-type="float" office:value="1938" table:style-name="ce302">
            <text:p>1,938</text:p>
          </table:table-cell>
          <table:table-cell office:value-type="float" office:value="934" table:style-name="ce302">
            <text:p>934</text:p>
          </table:table-cell>
          <table:table-cell office:value-type="float" office:value="10297" table:style-name="ce302">
            <text:p>10,297</text:p>
          </table:table-cell>
          <table:table-cell office:value-type="float" office:value="13204" table:style-name="ce35">
            <text:p><text:s/>13,204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07</text:p>
          </table:table-cell>
          <table:table-cell office:value-type="string" table:style-name="ce169">
            <text:p>Organic Chemical Processes</text:p>
          </table:table-cell>
          <table:table-cell office:value-type="float" office:value="740" table:style-name="ce302">
            <text:p>740</text:p>
          </table:table-cell>
          <table:table-cell office:value-type="float" office:value="81" table:style-name="ce302">
            <text:p>81</text:p>
          </table:table-cell>
          <table:table-cell office:value-type="float" office:value="686" table:style-name="ce302">
            <text:p>686</text:p>
          </table:table-cell>
          <table:table-cell office:value-type="float" office:value="3994" table:style-name="ce302">
            <text:p>3,994</text:p>
          </table:table-cell>
          <table:table-cell office:value-type="float" office:value="5501" table:style-name="ce35">
            <text:p><text:s/>5,501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08</text:p>
          </table:table-cell>
          <table:table-cell office:value-type="string" table:style-name="ce169">
            <text:p>MFSU Paints, Varnish, Adhesive and Inks</text:p>
          </table:table-cell>
          <table:table-cell office:value-type="float" office:value="30" table:style-name="ce302">
            <text:p>30</text:p>
          </table:table-cell>
          <table:table-cell office:value-type="float" office:value="1816" table:style-name="ce302">
            <text:p>1,816</text:p>
          </table:table-cell>
          <table:table-cell office:value-type="float" office:value="3644" table:style-name="ce302">
            <text:p>3,644</text:p>
          </table:table-cell>
          <table:table-cell office:value-type="float" office:value="2422" table:style-name="ce302">
            <text:p>2,422</text:p>
          </table:table-cell>
          <table:table-cell office:value-type="float" office:value="7912" table:style-name="ce35">
            <text:p><text:s/>7,912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09</text:p>
          </table:table-cell>
          <table:table-cell office:value-type="string" table:style-name="ce169">
            <text:p>Photographic Industry</text:p>
          </table:table-cell>
          <table:table-cell table:style-name="ce302"/>
          <table:table-cell office:value-type="float" office:value="0" table:style-name="ce302">
            <text:p>0</text:p>
          </table:table-cell>
          <table:table-cell office:value-type="float" office:value="121" table:style-name="ce302">
            <text:p>121</text:p>
          </table:table-cell>
          <table:table-cell office:value-type="float" office:value="186" table:style-name="ce302">
            <text:p>186</text:p>
          </table:table-cell>
          <table:table-cell office:value-type="float" office:value="307" table:style-name="ce35">
            <text:p><text:s/>307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0</text:p>
          </table:table-cell>
          <table:table-cell office:value-type="string" table:style-name="ce169">
            <text:p>Thermal Process Waste (inorganic)</text:p>
          </table:table-cell>
          <table:table-cell office:value-type="float" office:value="7906" table:style-name="ce302">
            <text:p>7,906</text:p>
          </table:table-cell>
          <table:table-cell office:value-type="float" office:value="185" table:style-name="ce302">
            <text:p>185</text:p>
          </table:table-cell>
          <table:table-cell office:value-type="float" office:value="88131" table:style-name="ce302">
            <text:p>88,131</text:p>
          </table:table-cell>
          <table:table-cell office:value-type="float" office:value="46" table:style-name="ce302">
            <text:p>46</text:p>
          </table:table-cell>
          <table:table-cell office:value-type="float" office:value="96267" table:style-name="ce35">
            <text:p><text:s/>96,267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1</text:p>
          </table:table-cell>
          <table:table-cell office:value-type="string" table:style-name="ce169">
            <text:p>Metal Treatment and Coating Processes</text:p>
          </table:table-cell>
          <table:table-cell office:value-type="float" office:value="140" table:style-name="ce302">
            <text:p>140</text:p>
          </table:table-cell>
          <table:table-cell office:value-type="float" office:value="139" table:style-name="ce302">
            <text:p>139</text:p>
          </table:table-cell>
          <table:table-cell office:value-type="float" office:value="2788" table:style-name="ce302">
            <text:p>2,788</text:p>
          </table:table-cell>
          <table:table-cell office:value-type="float" office:value="10581" table:style-name="ce302">
            <text:p>10,581</text:p>
          </table:table-cell>
          <table:table-cell office:value-type="float" office:value="13647" table:style-name="ce35">
            <text:p><text:s/>13,647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2</text:p>
          </table:table-cell>
          <table:table-cell office:value-type="string" table:style-name="ce169">
            <text:p>Shaping/Treatment of Metals and Plastics</text:p>
          </table:table-cell>
          <table:table-cell office:value-type="float" office:value="189" table:style-name="ce302">
            <text:p>189</text:p>
          </table:table-cell>
          <table:table-cell office:value-type="float" office:value="1" table:style-name="ce302">
            <text:p>1</text:p>
          </table:table-cell>
          <table:table-cell office:value-type="float" office:value="7368" table:style-name="ce302">
            <text:p>7,368</text:p>
          </table:table-cell>
          <table:table-cell office:value-type="float" office:value="3454" table:style-name="ce302">
            <text:p>3,454</text:p>
          </table:table-cell>
          <table:table-cell office:value-type="float" office:value="11012" table:style-name="ce35">
            <text:p><text:s/>11,012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3</text:p>
          </table:table-cell>
          <table:table-cell office:value-type="string" table:style-name="ce169">
            <text:p>Oil and Oil/Water Mixtures</text:p>
          </table:table-cell>
          <table:table-cell office:value-type="float" office:value="57045" table:style-name="ce302">
            <text:p>57,045</text:p>
          </table:table-cell>
          <table:table-cell office:value-type="float" office:value="1287" table:style-name="ce302">
            <text:p>1,287</text:p>
          </table:table-cell>
          <table:table-cell office:value-type="float" office:value="49375" table:style-name="ce302">
            <text:p>49,375</text:p>
          </table:table-cell>
          <table:table-cell office:value-type="float" office:value="2172" table:style-name="ce302">
            <text:p>2,172</text:p>
          </table:table-cell>
          <table:table-cell office:value-type="float" office:value="109878" table:style-name="ce35">
            <text:p><text:s/>109,878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4</text:p>
          </table:table-cell>
          <table:table-cell office:value-type="string" table:style-name="ce169">
            <text:p>Solvents</text:p>
          </table:table-cell>
          <table:table-cell office:value-type="float" office:value="127" table:style-name="ce302">
            <text:p>127</text:p>
          </table:table-cell>
          <table:table-cell office:value-type="float" office:value="135" table:style-name="ce302">
            <text:p>135</text:p>
          </table:table-cell>
          <table:table-cell office:value-type="float" office:value="149" table:style-name="ce302">
            <text:p>149</text:p>
          </table:table-cell>
          <table:table-cell office:value-type="float" office:value="335" table:style-name="ce302">
            <text:p>335</text:p>
          </table:table-cell>
          <table:table-cell office:value-type="float" office:value="745" table:style-name="ce35">
            <text:p><text:s/>745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5</text:p>
          </table:table-cell>
          <table:table-cell office:value-type="string" table:style-name="ce169">
            <text:p>Packaging, Cloths, Filter Materials</text:p>
          </table:table-cell>
          <table:table-cell office:value-type="float" office:value="3505" table:style-name="ce302">
            <text:p>3,505</text:p>
          </table:table-cell>
          <table:table-cell office:value-type="float" office:value="607" table:style-name="ce302">
            <text:p>607</text:p>
          </table:table-cell>
          <table:table-cell office:value-type="float" office:value="7472" table:style-name="ce302">
            <text:p>7,472</text:p>
          </table:table-cell>
          <table:table-cell office:value-type="float" office:value="17104" table:style-name="ce302">
            <text:p>17,104</text:p>
          </table:table-cell>
          <table:table-cell office:value-type="float" office:value="28687" table:style-name="ce35">
            <text:p><text:s/>28,687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6</text:p>
          </table:table-cell>
          <table:table-cell office:value-type="string" table:style-name="ce169">
            <text:p>Not Otherwise Specified*</text:p>
          </table:table-cell>
          <table:table-cell office:value-type="float" office:value="50403" table:style-name="ce302">
            <text:p>50,403</text:p>
          </table:table-cell>
          <table:table-cell office:value-type="float" office:value="828" table:style-name="ce302">
            <text:p>828</text:p>
          </table:table-cell>
          <table:table-cell office:value-type="float" office:value="28875" table:style-name="ce302">
            <text:p>28,875</text:p>
          </table:table-cell>
          <table:table-cell office:value-type="float" office:value="30742" table:style-name="ce302">
            <text:p>30,742</text:p>
          </table:table-cell>
          <table:table-cell office:value-type="float" office:value="110848" table:style-name="ce35">
            <text:p><text:s/>110,848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7</text:p>
          </table:table-cell>
          <table:table-cell office:value-type="string" table:style-name="ce169">
            <text:p>C&amp;D Waste and Asbestos</text:p>
          </table:table-cell>
          <table:table-cell office:value-type="float" office:value="5643" table:style-name="ce302">
            <text:p>5,643</text:p>
          </table:table-cell>
          <table:table-cell office:value-type="float" office:value="6347" table:style-name="ce302">
            <text:p>6,347</text:p>
          </table:table-cell>
          <table:table-cell office:value-type="float" office:value="31985" table:style-name="ce302">
            <text:p>31,985</text:p>
          </table:table-cell>
          <table:table-cell office:value-type="float" office:value="51568" table:style-name="ce302">
            <text:p>51,568</text:p>
          </table:table-cell>
          <table:table-cell office:value-type="float" office:value="95543" table:style-name="ce35">
            <text:p><text:s/>95,543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8</text:p>
          </table:table-cell>
          <table:table-cell office:value-type="string" table:style-name="ce169">
            <text:p>Healthcare</text:p>
          </table:table-cell>
          <table:table-cell office:value-type="float" office:value="53" table:style-name="ce302">
            <text:p>53</text:p>
          </table:table-cell>
          <table:table-cell office:value-type="float" office:value="1348" table:style-name="ce302">
            <text:p>1,348</text:p>
          </table:table-cell>
          <table:table-cell office:value-type="float" office:value="1462" table:style-name="ce302">
            <text:p>1,462</text:p>
          </table:table-cell>
          <table:table-cell office:value-type="float" office:value="13783" table:style-name="ce302">
            <text:p>13,783</text:p>
          </table:table-cell>
          <table:table-cell office:value-type="float" office:value="16646" table:style-name="ce35">
            <text:p><text:s/>16,646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68">
            <text:p>19</text:p>
          </table:table-cell>
          <table:table-cell office:value-type="string" table:style-name="ce169">
            <text:p>Waste Treatment /Water Treatment and Water Industry</text:p>
          </table:table-cell>
          <table:table-cell office:value-type="float" office:value="18544" table:style-name="ce302">
            <text:p>18,544</text:p>
          </table:table-cell>
          <table:table-cell office:value-type="float" office:value="261" table:style-name="ce302">
            <text:p>261</text:p>
          </table:table-cell>
          <table:table-cell office:value-type="float" office:value="8685" table:style-name="ce302">
            <text:p>8,685</text:p>
          </table:table-cell>
          <table:table-cell office:value-type="float" office:value="121742" table:style-name="ce302">
            <text:p>121,742</text:p>
          </table:table-cell>
          <table:table-cell office:value-type="float" office:value="149231" table:style-name="ce35">
            <text:p><text:s/>149,231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170">
            <text:p>20</text:p>
          </table:table-cell>
          <table:table-cell office:value-type="string" table:style-name="ce171">
            <text:p>Municipal and Similar Commercial Wastes</text:p>
          </table:table-cell>
          <table:table-cell office:value-type="float" office:value="5279" table:style-name="ce302">
            <text:p>5,279</text:p>
          </table:table-cell>
          <table:table-cell office:value-type="float" office:value="1706" table:style-name="ce302">
            <text:p>1,706</text:p>
          </table:table-cell>
          <table:table-cell office:value-type="float" office:value="4646" table:style-name="ce302">
            <text:p>4,646</text:p>
          </table:table-cell>
          <table:table-cell office:value-type="float" office:value="30732" table:style-name="ce302">
            <text:p>30,732</text:p>
          </table:table-cell>
          <table:table-cell office:value-type="float" office:value="42363" table:style-name="ce35">
            <text:p><text:s/>42,363<text:s/></text:p>
          </table:table-cell>
          <table:table-cell table:number-columns-repeated="16376" table:style-name="ce157"/>
        </table:table-row>
        <table:table-row table:style-name="ro5">
          <table:table-cell/>
          <table:table-cell office:value-type="string" table:style-name="ce41">
            <text:p>Total<text:s/></text:p>
          </table:table-cell>
          <table:table-cell table:style-name="ce72"/>
          <table:table-cell office:value-type="float" office:value="149636" table:style-name="ce118">
            <text:p><text:s/>149,636<text:s/></text:p>
          </table:table-cell>
          <table:table-cell office:value-type="float" office:value="16678" table:style-name="ce43">
            <text:p><text:s/>16,678<text:s/></text:p>
          </table:table-cell>
          <table:table-cell office:value-type="float" office:value="236368" table:formula="of:=SUM([.F36:.F55])" table:style-name="ce43">
            <text:p><text:s/>236,368<text:s/></text:p>
          </table:table-cell>
          <table:table-cell office:value-type="float" office:value="299611" table:style-name="ce43">
            <text:p><text:s/>299,611<text:s/></text:p>
          </table:table-cell>
          <table:table-cell office:value-type="float" office:value="702293" table:formula="of:=SUM([.H36:.H55])" table:style-name="ce43">
            <text:p><text:s/>702,293<text:s/></text:p>
          </table:table-cell>
          <table:table-cell table:number-columns-repeated="3" table:style-name="ce158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44">
            <text:p>Notes:</text:p>
          </table:table-cell>
          <table:table-cell table:number-columns-repeated="2" table:style-name="ce157"/>
          <table:table-cell office:value-type="float" office:value="0" table:style-name="ce119">
            <text:p><text:s/>-<text:s/></text:p>
          </table:table-cell>
          <table:table-cell table:number-columns-repeated="16379" table:style-name="ce157"/>
        </table:table-row>
        <table:table-row table:style-name="ro5">
          <table:table-cell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57"/>
        </table:table-row>
        <table:table-row table:style-name="ro5">
          <table:table-cell/>
          <table:table-cell office:value-type="string" table:style-name="ce15">
            <text:p>This double counting should be taken into account when using this data.</text:p>
          </table:table-cell>
          <table:table-cell table:number-columns-repeated="16382" table:style-name="ce157"/>
        </table:table-row>
        <table:table-row table:style-name="ro5">
          <table:table-cell/>
          <table:table-cell office:value-type="string" table:style-name="ce15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57"/>
        </table:table-row>
        <table:table-row table:number-rows-repeated="1048515" table:style-name="ro4">
          <table:table-cell table:number-columns-repeated="16384"/>
        </table:table-row>
      </table:table>
      <table:table table:name="Haz_Waste_Deposits_by_Fate" table:style-name="ta1">
        <table:table-column table:style-name="co53" table:default-cell-style-name="ce157"/>
        <table:table-column table:style-name="co54" table:default-cell-style-name="ce157"/>
        <table:table-column table:style-name="co24" table:number-columns-repeated="2" table:default-cell-style-name="ce157"/>
        <table:table-column table:style-name="co55" table:default-cell-style-name="ce157"/>
        <table:table-column table:style-name="co12" table:default-cell-style-name="ce157"/>
        <table:table-column table:style-name="co15" table:default-cell-style-name="ce157"/>
        <table:table-column table:style-name="co14" table:number-columns-repeated="16377" table:default-cell-style-name="ce157"/>
        <table:table-row table:style-name="ro4">
          <table:table-cell table:style-name="ce14"/>
          <table:table-cell table:number-columns-repeated="16383" table:style-name="ce157"/>
        </table:table-row>
        <table:table-row table:style-name="ro6">
          <table:table-cell table:style-name="ce157"/>
          <table:table-cell office:value-type="string" table:style-name="ce16">
            <text:p>Yorkshire and the Humber: Hazardous waste deposited by fate and former planning sub-region 2024 (tonnes)</text:p>
          </table:table-cell>
          <table:table-cell table:number-columns-repeated="16382" table:style-name="ce157"/>
        </table:table-row>
        <table:table-row table:style-name="ro4">
          <table:table-cell table:number-columns-repeated="16384"/>
        </table:table-row>
        <table:table-row table:style-name="ro30">
          <table:table-cell table:style-name="ce157"/>
          <table:table-cell office:value-type="string" table:style-name="ce172">
            <text:p>Waste Fate</text:p>
          </table:table-cell>
          <table:table-cell office:value-type="string" table:style-name="ce20">
            <text:p>Former Humberside</text:p>
          </table:table-cell>
          <table:table-cell office:value-type="string" table:style-name="ce152">
            <text:p>North Yorkshire</text:p>
          </table:table-cell>
          <table:table-cell office:value-type="string" table:style-name="ce152">
            <text:p>South Yorkshire</text:p>
          </table:table-cell>
          <table:table-cell office:value-type="string" table:style-name="ce173">
            <text:p>West Yorkshire</text:p>
          </table:table-cell>
          <table:table-cell office:value-type="string" table:style-name="ce21">
            <text:p>YORKSHIRE AND THE HUMBER</text:p>
          </table:table-cell>
          <table:table-cell table:number-columns-repeated="16377" table:style-name="ce157"/>
        </table:table-row>
        <table:table-row table:style-name="ro5">
          <table:table-cell table:style-name="ce157"/>
          <table:table-cell office:value-type="string" table:style-name="ce291">
            <text:p>Incineration with energy recovery</text:p>
          </table:table-cell>
          <table:table-cell office:value-type="float" office:value="1" table:style-name="ce302">
            <text:p>1</text:p>
          </table:table-cell>
          <table:table-cell table:style-name="ce302"/>
          <table:table-cell office:value-type="float" office:value="962" table:style-name="ce302">
            <text:p>962</text:p>
          </table:table-cell>
          <table:table-cell office:value-type="float" office:value="0" table:style-name="ce302">
            <text:p>0</text:p>
          </table:table-cell>
          <table:table-cell office:value-type="float" office:value="963" table:formula="of:=SUM([.C5:.F5])" table:style-name="ce35">
            <text:p><text:s/>963<text:s/></text:p>
          </table:table-cell>
          <table:table-cell table:number-columns-repeated="16377" table:style-name="ce157"/>
        </table:table-row>
        <table:table-row table:style-name="ro5">
          <table:table-cell table:style-name="ce157"/>
          <table:table-cell office:value-type="string" table:style-name="ce292">
            <text:p>Incineration without energy recovery</text:p>
          </table:table-cell>
          <table:table-cell table:number-columns-repeated="3" table:style-name="ce302"/>
          <table:table-cell office:value-type="float" office:value="3122" table:style-name="ce302">
            <text:p>3,122</text:p>
          </table:table-cell>
          <table:table-cell office:value-type="float" office:value="3122" table:formula="of:=SUM([.C6:.F6])" table:style-name="ce35">
            <text:p><text:s/>3,122<text:s/></text:p>
          </table:table-cell>
          <table:table-cell table:number-columns-repeated="16377" table:style-name="ce157"/>
        </table:table-row>
        <table:table-row table:style-name="ro5">
          <table:table-cell table:style-name="ce157"/>
          <table:table-cell office:value-type="string" table:style-name="ce292">
            <text:p>Landfill</text:p>
          </table:table-cell>
          <table:table-cell office:value-type="float" office:value="7574" table:style-name="ce302">
            <text:p>7,574</text:p>
          </table:table-cell>
          <table:table-cell table:number-columns-repeated="2" table:style-name="ce302"/>
          <table:table-cell office:value-type="float" office:value="898" table:style-name="ce302">
            <text:p>898</text:p>
          </table:table-cell>
          <table:table-cell office:value-type="float" office:value="8472" table:formula="of:=SUM([.C7:.F7])" table:style-name="ce35">
            <text:p><text:s/>8,472<text:s/></text:p>
          </table:table-cell>
          <table:table-cell table:number-columns-repeated="16377" table:style-name="ce157"/>
        </table:table-row>
        <table:table-row table:style-name="ro5">
          <table:table-cell table:style-name="ce157"/>
          <table:table-cell office:value-type="string" table:style-name="ce292">
            <text:p>Long term storage</text:p>
          </table:table-cell>
          <table:table-cell table:number-columns-repeated="4" table:style-name="ce302"/>
          <table:table-cell office:value-type="float" office:value="0" table:formula="of:=SUM([.C8:.F8])" table:style-name="ce35">
            <text:p><text:s/>-<text:s/></text:p>
          </table:table-cell>
          <table:table-cell table:number-columns-repeated="16377" table:style-name="ce157"/>
        </table:table-row>
        <table:table-row table:style-name="ro5">
          <table:table-cell table:style-name="ce157"/>
          <table:table-cell office:value-type="string" table:style-name="ce292">
            <text:p>Other Fate</text:p>
          </table:table-cell>
          <table:table-cell table:number-columns-repeated="4" table:style-name="ce302"/>
          <table:table-cell office:value-type="float" office:value="0" table:formula="of:=SUM([.C9:.F9])" table:style-name="ce35">
            <text:p><text:s/>-<text:s/></text:p>
          </table:table-cell>
          <table:table-cell table:style-name="ce174"/>
          <table:table-cell table:number-columns-repeated="16376" table:style-name="ce157"/>
        </table:table-row>
        <table:table-row table:style-name="ro5">
          <table:table-cell table:style-name="ce157"/>
          <table:table-cell office:value-type="string" table:style-name="ce292">
            <text:p>Recovery</text:p>
          </table:table-cell>
          <table:table-cell office:value-type="float" office:value="89051" table:style-name="ce302">
            <text:p>89,051</text:p>
          </table:table-cell>
          <table:table-cell office:value-type="float" office:value="10012" table:style-name="ce302">
            <text:p>10,012</text:p>
          </table:table-cell>
          <table:table-cell office:value-type="float" office:value="76487" table:style-name="ce302">
            <text:p>76,487</text:p>
          </table:table-cell>
          <table:table-cell office:value-type="float" office:value="173745" table:style-name="ce302">
            <text:p>173,745</text:p>
          </table:table-cell>
          <table:table-cell office:value-type="float" office:value="349295" table:formula="of:=SUM([.C10:.F10])" table:style-name="ce35">
            <text:p><text:s/>349,295<text:s/></text:p>
          </table:table-cell>
          <table:table-cell table:number-columns-repeated="16377" table:style-name="ce157"/>
        </table:table-row>
        <table:table-row table:style-name="ro5">
          <table:table-cell table:style-name="ce157"/>
          <table:table-cell office:value-type="string" table:style-name="ce292">
            <text:p>Rejected</text:p>
          </table:table-cell>
          <table:table-cell office:value-type="float" office:value="0" table:style-name="ce302">
            <text:p>0</text:p>
          </table:table-cell>
          <table:table-cell table:style-name="ce302"/>
          <table:table-cell office:value-type="float" office:value="745" table:style-name="ce302">
            <text:p>745</text:p>
          </table:table-cell>
          <table:table-cell office:value-type="float" office:value="1803" table:style-name="ce302">
            <text:p>1,803</text:p>
          </table:table-cell>
          <table:table-cell office:value-type="float" office:value="2548" table:formula="of:=SUM([.C11:.F11])" table:style-name="ce35">
            <text:p><text:s/>2,548<text:s/></text:p>
          </table:table-cell>
          <table:table-cell table:style-name="ce157"/>
          <table:table-cell table:style-name="ce174"/>
          <table:table-cell table:number-columns-repeated="16375"/>
        </table:table-row>
        <table:table-row table:style-name="ro5">
          <table:table-cell table:style-name="ce157"/>
          <table:table-cell office:value-type="string" table:style-name="ce292">
            <text:p>Transfer (D)</text:p>
          </table:table-cell>
          <table:table-cell office:value-type="float" office:value="760" table:style-name="ce302">
            <text:p>760</text:p>
          </table:table-cell>
          <table:table-cell office:value-type="float" office:value="828" table:style-name="ce302">
            <text:p>828</text:p>
          </table:table-cell>
          <table:table-cell office:value-type="float" office:value="68830" table:style-name="ce302">
            <text:p>68,830</text:p>
          </table:table-cell>
          <table:table-cell office:value-type="float" office:value="11419" table:style-name="ce302">
            <text:p>11,419</text:p>
          </table:table-cell>
          <table:table-cell office:value-type="float" office:value="81837" table:formula="of:=SUM([.C12:.F12])" table:style-name="ce35">
            <text:p><text:s/>81,837<text:s/></text:p>
          </table:table-cell>
          <table:table-cell table:number-columns-repeated="2" table:style-name="ce174"/>
          <table:table-cell table:number-columns-repeated="16375"/>
        </table:table-row>
        <table:table-row table:style-name="ro5">
          <table:table-cell table:style-name="ce157"/>
          <table:table-cell office:value-type="string" table:style-name="ce292">
            <text:p>Transfer (R)</text:p>
          </table:table-cell>
          <table:table-cell office:value-type="float" office:value="52249" table:style-name="ce302">
            <text:p>52,249</text:p>
          </table:table-cell>
          <table:table-cell office:value-type="float" office:value="4619" table:style-name="ce302">
            <text:p>4,619</text:p>
          </table:table-cell>
          <table:table-cell office:value-type="float" office:value="56075" table:style-name="ce302">
            <text:p>56,075</text:p>
          </table:table-cell>
          <table:table-cell office:value-type="float" office:value="37527" table:style-name="ce302">
            <text:p>37,527</text:p>
          </table:table-cell>
          <table:table-cell office:value-type="float" office:value="150470" table:formula="of:=SUM([.C13:.F13])" table:style-name="ce35">
            <text:p><text:s/>150,470<text:s/></text:p>
          </table:table-cell>
          <table:table-cell table:number-columns-repeated="16377" table:style-name="ce157"/>
        </table:table-row>
        <table:table-row table:style-name="ro5">
          <table:table-cell table:style-name="ce157"/>
          <table:table-cell office:value-type="string" table:style-name="ce293">
            <text:p>Treatment</text:p>
          </table:table-cell>
          <table:table-cell office:value-type="float" office:value="0" table:style-name="ce302">
            <text:p>0</text:p>
          </table:table-cell>
          <table:table-cell office:value-type="float" office:value="1219" table:style-name="ce302">
            <text:p>1,219</text:p>
          </table:table-cell>
          <table:table-cell office:value-type="float" office:value="33269" table:style-name="ce302">
            <text:p>33,269</text:p>
          </table:table-cell>
          <table:table-cell office:value-type="float" office:value="71098" table:style-name="ce302">
            <text:p>71,098</text:p>
          </table:table-cell>
          <table:table-cell office:value-type="float" office:value="105586" table:formula="of:=SUM([.C14:.F14])" table:style-name="ce35">
            <text:p><text:s/>105,586<text:s/></text:p>
          </table:table-cell>
          <table:table-cell table:number-columns-repeated="16377" table:style-name="ce157"/>
        </table:table-row>
        <table:table-row table:style-name="ro12">
          <table:table-cell table:style-name="ce157"/>
          <table:table-cell office:value-type="string" table:style-name="ce175">
            <text:p>Total<text:s/></text:p>
          </table:table-cell>
          <table:table-cell office:value-type="float" office:value="149635" table:formula="of:=SUM([.C5:.C14])" table:style-name="ce118">
            <text:p><text:s/>149,635<text:s/></text:p>
          </table:table-cell>
          <table:table-cell office:value-type="float" office:value="16678" table:formula="of:=SUM([.D5:.D14])" table:style-name="ce43">
            <text:p><text:s/>16,678<text:s/></text:p>
          </table:table-cell>
          <table:table-cell office:value-type="float" office:value="236368" table:formula="of:=SUM([.E5:.E14])" table:style-name="ce43">
            <text:p><text:s/>236,368<text:s/></text:p>
          </table:table-cell>
          <table:table-cell office:value-type="float" office:value="299612" table:formula="of:=SUM([.F5:.F14])" table:style-name="ce43">
            <text:p><text:s/>299,612<text:s/></text:p>
          </table:table-cell>
          <table:table-cell office:value-type="float" office:value="702293" table:formula="of:=SUM([.G5:.G14])" table:style-name="ce98">
            <text:p><text:s/>702,293<text:s/></text:p>
          </table:table-cell>
          <table:table-cell table:number-columns-repeated="16377" table:style-name="ce157"/>
        </table:table-row>
        <table:table-row table:style-name="ro5">
          <table:table-cell table:style-name="ce157"/>
          <table:table-cell table:number-columns-repeated="6" table:style-name="ce15"/>
          <table:table-cell table:number-columns-repeated="16377" table:style-name="ce157"/>
        </table:table-row>
        <table:table-row table:style-name="ro5">
          <table:table-cell/>
          <table:table-cell office:value-type="string" table:style-name="ce44">
            <text:p>Notes:</text:p>
          </table:table-cell>
          <table:table-cell table:style-name="ce15"/>
          <table:table-cell table:style-name="ce119"/>
          <table:table-cell table:number-columns-repeated="3" table:style-name="ce15"/>
          <table:table-cell table:number-columns-repeated="16377"/>
        </table:table-row>
        <table:table-row table:style-name="ro5">
          <table:table-cell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5" table:style-name="ce15"/>
          <table:table-cell table:number-columns-repeated="16377"/>
        </table:table-row>
        <table:table-row table:style-name="ro5">
          <table:table-cell/>
          <table:table-cell office:value-type="string" table:style-name="ce15">
            <text:p>multiple facilities and each separate movement is recorded. <text:s/>This double counting should be taken into account when using this data.</text:p>
          </table:table-cell>
          <table:table-cell table:number-columns-repeated="5" table:style-name="ce15"/>
          <table:table-cell table:number-columns-repeated="16377"/>
        </table:table-row>
        <table:table-row table:style-name="ro5">
          <table:table-cell/>
          <table:table-cell office:value-type="string" table:style-name="ce15">
            <text:p>Transfer (D) means transfer before disposal, Transfer (R) means transfer before recovery.</text:p>
          </table:table-cell>
          <table:table-cell table:number-columns-repeated="5" table:style-name="ce15"/>
          <table:table-cell table:number-columns-repeated="16377"/>
        </table:table-row>
        <table:table-row table:style-name="ro5">
          <table:table-cell/>
          <table:table-cell office:value-type="string" table:style-name="ce15">
            <text:p>In previous years Recovery was called Recycling/reuse.</text:p>
          </table:table-cell>
          <table:table-cell table:number-columns-repeated="5" table:style-name="ce15"/>
          <table:table-cell table:number-columns-repeated="16377"/>
        </table:table-row>
        <table:table-row table:style-name="ro5">
          <table:table-cell/>
          <table:table-cell office:value-type="string" table:style-name="ce15">
            <text:p>In previous years the Landfill category included deep injection, land treatment and surface impoundment. <text:s/>These are now included in Other Fate.</text:p>
          </table:table-cell>
          <table:table-cell table:number-columns-repeated="5" table:style-name="ce15"/>
          <table:table-cell table:number-columns-repeated="16377"/>
        </table:table-row>
        <table:table-row table:number-rows-repeated="1048554" table:style-name="ro4">
          <table:table-cell table:number-columns-repeated="16384"/>
        </table:table-row>
      </table:table>
      <table:table table:name="Haz_Waste_Trends" table:style-name="ta1"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33" table:default-cell-style-name="ce15"/>
        <table:table-column table:style-name="co59" table:default-cell-style-name="ce15"/>
        <table:table-column table:style-name="co60" table:default-cell-style-name="ce15"/>
        <table:table-column table:style-name="co59" table:default-cell-style-name="ce15"/>
        <table:table-column table:style-name="co61" table:default-cell-style-name="ce15"/>
        <table:table-column table:style-name="co59" table:default-cell-style-name="ce15"/>
        <table:table-column table:style-name="co14" table:number-columns-repeated="7" table:default-cell-style-name="ce15"/>
        <table:table-column table:style-name="co62" table:number-columns-repeated="2" table:default-cell-style-name="ce15"/>
        <table:table-column table:style-name="co14" table:number-columns-repeated="5" table:default-cell-style-name="ce15"/>
        <table:table-column table:style-name="co63" table:default-cell-style-name="ce15"/>
        <table:table-column table:style-name="co14" table:number-columns-repeated="16360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4"/>
          <table:table-cell office:value-type="string" table:style-name="ce16">
            <text:p>Yorkshire and the Humber: Hazardous waste trends from 1998 to 2024</text:p>
          </table:table-cell>
          <table:table-cell table:number-columns-repeated="16382" table:style-name="ce15"/>
        </table:table-row>
        <table:table-row table:style-name="ro8">
          <table:table-cell table:style-name="ce14"/>
          <table:table-cell table:style-name="ce16"/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5">
            <text:p>multiple facilities and each separate movement is recorded. <text:s/>This double counting should be taken into account when using this data.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76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76">
            <text:p>2005 data is unreliable and has not been included in the above tables; a new hazardous waste management system and database was introduced in mid-2005 to coincide with the introduction of the new Hazardous Waste Regulations,<text:s/>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76">
            <text:p>classification and data collection changes introduced some inconsistency and some data was lost as new systems took a little time to become fully operational.<text:s/>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5">
            <text:p>In previous years Recovery was called Recycling/reuse.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office:value-type="string" table:style-name="ce15">
            <text:p>In previous years the Landfill category included deep injection, land treatment and surface impoundment. <text:s/>These are now included in Other Fate.</text:p>
          </table:table-cell>
          <table:table-cell table:number-columns-repeated="16382" table:style-name="ce15"/>
        </table:table-row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Yorkshire and the Humber: Hazardous waste managed by EWC chapter from 1998 to 2024 (tonnes)</text:p>
          </table:table-cell>
          <table:table-cell table:number-columns-repeated="15" table:style-name="ce177"/>
          <table:table-cell table:number-columns-repeated="16367" table:style-name="ce15"/>
        </table:table-row>
        <table:table-row table:style-name="ro5">
          <table:table-cell table:style-name="ce15"/>
          <table:table-cell table:number-columns-repeated="16" table:style-name="ce177"/>
          <table:table-cell table:number-columns-repeated="16367" table:style-name="ce15"/>
        </table:table-row>
        <table:table-row table:style-name="ro3">
          <table:table-cell table:style-name="ce15"/>
          <table:table-cell office:value-type="string" table:style-name="ce178">
            <text:p>EWC chapter</text:p>
          </table:table-cell>
          <table:table-cell office:value-type="string" table:style-name="ce179">
            <text:p>EWC Chapter Description</text:p>
          </table:table-cell>
          <table:table-cell office:value-type="string" table:style-name="ce178">
            <text:p>1998/9</text:p>
          </table:table-cell>
          <table:table-cell office:value-type="float" office:value="2000" table:style-name="ce179">
            <text:p>2000</text:p>
          </table:table-cell>
          <table:table-cell office:value-type="float" office:value="2001" table:style-name="ce179">
            <text:p>2001</text:p>
          </table:table-cell>
          <table:table-cell office:value-type="float" office:value="2002" table:style-name="ce179">
            <text:p>2002</text:p>
          </table:table-cell>
          <table:table-cell office:value-type="float" office:value="2003" table:style-name="ce179">
            <text:p>2003</text:p>
          </table:table-cell>
          <table:table-cell office:value-type="float" office:value="2004" table:style-name="ce179">
            <text:p>2004</text:p>
          </table:table-cell>
          <table:table-cell office:value-type="float" office:value="2006" table:style-name="ce179">
            <text:p>2006</text:p>
          </table:table-cell>
          <table:table-cell office:value-type="float" office:value="2007" table:style-name="ce179">
            <text:p>2007</text:p>
          </table:table-cell>
          <table:table-cell office:value-type="float" office:value="2008" table:style-name="ce179">
            <text:p>2008</text:p>
          </table:table-cell>
          <table:table-cell office:value-type="float" office:value="2009" table:style-name="ce179">
            <text:p>2009</text:p>
          </table:table-cell>
          <table:table-cell office:value-type="float" office:value="2010" table:style-name="ce179">
            <text:p>2010</text:p>
          </table:table-cell>
          <table:table-cell office:value-type="float" office:value="2011" table:style-name="ce180">
            <text:p>2011</text:p>
          </table:table-cell>
          <table:table-cell office:value-type="float" office:value="2012" table:style-name="ce180">
            <text:p>2012</text:p>
          </table:table-cell>
          <table:table-cell office:value-type="float" office:value="2013" table:style-name="ce179">
            <text:p>2013</text:p>
          </table:table-cell>
          <table:table-cell office:value-type="float" office:value="2014" table:style-name="ce179">
            <text:p>2014</text:p>
          </table:table-cell>
          <table:table-cell office:value-type="float" office:value="2015" table:style-name="ce179">
            <text:p>2015</text:p>
          </table:table-cell>
          <table:table-cell office:value-type="float" office:value="2016" table:style-name="ce179">
            <text:p>2016</text:p>
          </table:table-cell>
          <table:table-cell office:value-type="float" office:value="2017" table:style-name="ce179">
            <text:p>2017</text:p>
          </table:table-cell>
          <table:table-cell office:value-type="float" office:value="2018" table:style-name="ce180">
            <text:p>2018</text:p>
          </table:table-cell>
          <table:table-cell office:value-type="float" office:value="2019" table:style-name="ce180">
            <text:p>2019</text:p>
          </table:table-cell>
          <table:table-cell office:value-type="float" office:value="2020" table:style-name="ce180">
            <text:p>2020</text:p>
          </table:table-cell>
          <table:table-cell office:value-type="float" office:value="2021" table:style-name="ce180">
            <text:p>2021</text:p>
          </table:table-cell>
          <table:table-cell office:value-type="float" office:value="2022" table:style-name="ce180">
            <text:p>2022</text:p>
          </table:table-cell>
          <table:table-cell office:value-type="float" office:value="2023" table:style-name="ce324">
            <text:p>2023</text:p>
          </table:table-cell>
          <table:table-cell office:value-type="float" office:value="2024" table:style-name="ce181">
            <text:p>2024</text:p>
          </table:table-cell>
          <table:table-cell table:number-columns-repeated="16356"/>
        </table:table-row>
        <table:table-row table:style-name="ro10">
          <table:table-cell table:style-name="ce15"/>
          <table:table-cell office:value-type="string" table:style-name="ce182">
            <text:p>01</text:p>
          </table:table-cell>
          <table:table-cell office:value-type="string" table:style-name="ce183">
            <text:p>Mining and Minerals</text:p>
          </table:table-cell>
          <table:table-cell office:value-type="float" office:value="5242.7259999999997" table:style-name="ce58">
            <text:p><text:s/>5,243<text:s/></text:p>
          </table:table-cell>
          <table:table-cell office:value-type="float" office:value="325.653544023633" table:style-name="ce58">
            <text:p><text:s/>326<text:s/></text:p>
          </table:table-cell>
          <table:table-cell office:value-type="float" office:value="195.83949992060661" table:style-name="ce58">
            <text:p><text:s/>196<text:s/></text:p>
          </table:table-cell>
          <table:table-cell office:value-type="float" office:value="307.27077770233154" table:style-name="ce58">
            <text:p><text:s/>307<text:s/></text:p>
          </table:table-cell>
          <table:table-cell office:value-type="float" office:value="271.75450000000001" table:style-name="ce58">
            <text:p><text:s/>272<text:s/></text:p>
          </table:table-cell>
          <table:table-cell office:value-type="float" office:value="127.2110013961792" table:style-name="ce58">
            <text:p><text:s/>127<text:s/></text:p>
          </table:table-cell>
          <table:table-cell office:value-type="float" office:value="147.02100000000002" table:style-name="ce82">
            <text:p><text:s/>147<text:s/></text:p>
          </table:table-cell>
          <table:table-cell office:value-type="float" office:value="107.726" table:style-name="ce58">
            <text:p><text:s/>108<text:s/></text:p>
          </table:table-cell>
          <table:table-cell office:value-type="float" office:value="44.45" table:style-name="ce29">
            <text:p><text:s/>44<text:s/></text:p>
          </table:table-cell>
          <table:table-cell office:value-type="float" office:value="246.35" table:style-name="ce29">
            <text:p><text:s/>246<text:s/></text:p>
          </table:table-cell>
          <table:table-cell office:value-type="float" office:value="85.11" table:style-name="ce184">
            <text:p><text:s/>85<text:s/></text:p>
          </table:table-cell>
          <table:table-cell office:value-type="float" office:value="36.979000000000006" table:style-name="ce185">
            <text:p><text:s/>37<text:s/></text:p>
          </table:table-cell>
          <table:table-cell office:value-type="float" office:value="12.756" table:style-name="ce89">
            <text:p><text:s/>13<text:s/></text:p>
          </table:table-cell>
          <table:table-cell office:value-type="float" office:value="452.3623" table:style-name="ce137">
            <text:p><text:s/>452<text:s/></text:p>
          </table:table-cell>
          <table:table-cell office:value-type="float" office:value="703.57940000000008" table:style-name="ce137">
            <text:p><text:s/>704<text:s/></text:p>
          </table:table-cell>
          <table:table-cell office:value-type="float" office:value="3.3149999999999999" table:style-name="ce137">
            <text:p><text:s/>3<text:s/></text:p>
          </table:table-cell>
          <table:table-cell office:value-type="float" office:value="14.131999999999998" table:style-name="ce137">
            <text:p><text:s/>14<text:s/></text:p>
          </table:table-cell>
          <table:table-cell office:value-type="float" office:value="6.29" table:style-name="ce137">
            <text:p><text:s/>6<text:s/></text:p>
          </table:table-cell>
          <table:table-cell office:value-type="float" office:value="27.47" table:style-name="ce136">
            <text:p>27</text:p>
          </table:table-cell>
          <table:table-cell office:value-type="float" office:value="62.255000000000003" table:style-name="ce186">
            <text:p>62</text:p>
          </table:table-cell>
          <table:table-cell office:value-type="float" office:value="33.121000000000002" table:style-name="ce202">
            <text:p>33</text:p>
          </table:table-cell>
          <table:table-cell office:value-type="float" office:value="636.26099999999997" table:style-name="ce136">
            <text:p>636</text:p>
          </table:table-cell>
          <table:table-cell office:value-type="float" office:value="129.42000000000002" table:style-name="ce304">
            <text:p>129</text:p>
          </table:table-cell>
          <table:table-cell office:value-type="float" office:value="356" table:style-name="ce303">
            <text:p>356</text:p>
          </table:table-cell>
          <table:table-cell office:value-type="float" office:value="40" table:style-name="ce323">
            <text:p>40</text:p>
          </table:table-cell>
          <table:table-cell table:number-columns-repeated="16356"/>
        </table:table-row>
        <table:table-row table:style-name="ro10">
          <table:table-cell table:style-name="ce15"/>
          <table:table-cell office:value-type="string" table:style-name="ce187">
            <text:p>02</text:p>
          </table:table-cell>
          <table:table-cell office:value-type="string" table:style-name="ce188">
            <text:p>Agricultural and Food Production</text:p>
          </table:table-cell>
          <table:table-cell office:value-type="float" office:value="199.01121999999998" table:style-name="ce58">
            <text:p><text:s/>199<text:s/></text:p>
          </table:table-cell>
          <table:table-cell office:value-type="float" office:value="563.77730383980088" table:style-name="ce58">
            <text:p><text:s/>564<text:s/></text:p>
          </table:table-cell>
          <table:table-cell office:value-type="float" office:value="1299.5085134888068" table:style-name="ce58">
            <text:p><text:s/>1,300<text:s/></text:p>
          </table:table-cell>
          <table:table-cell office:value-type="float" office:value="905.44390287052374" table:style-name="ce58">
            <text:p><text:s/>905<text:s/></text:p>
          </table:table-cell>
          <table:table-cell office:value-type="float" office:value="479.48525000000001" table:style-name="ce58">
            <text:p><text:s/>479<text:s/></text:p>
          </table:table-cell>
          <table:table-cell office:value-type="float" office:value="272.44548844080418" table:style-name="ce58">
            <text:p><text:s/>272<text:s/></text:p>
          </table:table-cell>
          <table:table-cell office:value-type="float" office:value="801.54300000000001" table:style-name="ce58">
            <text:p><text:s/>802<text:s/></text:p>
          </table:table-cell>
          <table:table-cell office:value-type="float" office:value="395.29449999999997" table:style-name="ce58">
            <text:p><text:s/>395<text:s/></text:p>
          </table:table-cell>
          <table:table-cell office:value-type="float" office:value="474.3553" table:style-name="ce33">
            <text:p><text:s/>474<text:s/></text:p>
          </table:table-cell>
          <table:table-cell office:value-type="float" office:value="24.0351" table:style-name="ce33">
            <text:p><text:s/>24<text:s/></text:p>
          </table:table-cell>
          <table:table-cell office:value-type="float" office:value="444.74641999999994" table:style-name="ce185">
            <text:p><text:s/>445<text:s/></text:p>
          </table:table-cell>
          <table:table-cell office:value-type="float" office:value="246.49665000000002" table:style-name="ce185">
            <text:p><text:s/>246<text:s/></text:p>
          </table:table-cell>
          <table:table-cell office:value-type="float" office:value="173.19909999999999" table:style-name="ce89">
            <text:p><text:s/>173<text:s/></text:p>
          </table:table-cell>
          <table:table-cell office:value-type="float" office:value="381.2475" table:style-name="ce89">
            <text:p><text:s/>381<text:s/></text:p>
          </table:table-cell>
          <table:table-cell office:value-type="float" office:value="57.771800000000006" table:style-name="ce89">
            <text:p><text:s/>58<text:s/></text:p>
          </table:table-cell>
          <table:table-cell office:value-type="float" office:value="45.4285" table:style-name="ce89">
            <text:p><text:s/>45<text:s/></text:p>
          </table:table-cell>
          <table:table-cell office:value-type="float" office:value="72.140360000000015" table:style-name="ce89">
            <text:p><text:s/>72<text:s/></text:p>
          </table:table-cell>
          <table:table-cell office:value-type="float" office:value="19.682470000000002" table:style-name="ce89">
            <text:p><text:s/>20<text:s/></text:p>
          </table:table-cell>
          <table:table-cell office:value-type="float" office:value="40.974099999999993" table:style-name="ce136">
            <text:p>41</text:p>
          </table:table-cell>
          <table:table-cell office:value-type="float" office:value="144.31281999999999" table:style-name="ce136">
            <text:p>144</text:p>
          </table:table-cell>
          <table:table-cell office:value-type="float" office:value="139.57055" table:style-name="ce202">
            <text:p>140</text:p>
          </table:table-cell>
          <table:table-cell office:value-type="float" office:value="65.282799999999995" table:style-name="ce136">
            <text:p>65</text:p>
          </table:table-cell>
          <table:table-cell office:value-type="float" office:value="54.914550000000006" table:style-name="ce304">
            <text:p>55</text:p>
          </table:table-cell>
          <table:table-cell office:value-type="float" office:value="93" table:style-name="ce303">
            <text:p>93</text:p>
          </table:table-cell>
          <table:table-cell office:value-type="float" office:value="70" table:style-name="ce323">
            <text:p>7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03</text:p>
          </table:table-cell>
          <table:table-cell office:value-type="string" table:style-name="ce188">
            <text:p>Wood and Paper Production</text:p>
          </table:table-cell>
          <table:table-cell office:value-type="float" office:value="304.66523999999993" table:style-name="ce58">
            <text:p><text:s/>305<text:s/></text:p>
          </table:table-cell>
          <table:table-cell office:value-type="float" office:value="121.48073229193687" table:style-name="ce58">
            <text:p><text:s/>121<text:s/></text:p>
          </table:table-cell>
          <table:table-cell office:value-type="float" office:value="179.37119954824448" table:style-name="ce58">
            <text:p><text:s/>179<text:s/></text:p>
          </table:table-cell>
          <table:table-cell office:value-type="float" office:value="726.5034841299057" table:style-name="ce58">
            <text:p><text:s/>727<text:s/></text:p>
          </table:table-cell>
          <table:table-cell office:value-type="float" office:value="318.37125999999995" table:style-name="ce58">
            <text:p><text:s/>318<text:s/></text:p>
          </table:table-cell>
          <table:table-cell office:value-type="float" office:value="354.27756966650486" table:style-name="ce58">
            <text:p><text:s/>354<text:s/></text:p>
          </table:table-cell>
          <table:table-cell office:value-type="float" office:value="116.995" table:style-name="ce58">
            <text:p><text:s/>117<text:s/></text:p>
          </table:table-cell>
          <table:table-cell office:value-type="float" office:value="106.02249999999999" table:style-name="ce58">
            <text:p><text:s/>106<text:s/></text:p>
          </table:table-cell>
          <table:table-cell office:value-type="float" office:value="147.435" table:style-name="ce33">
            <text:p><text:s/>147<text:s/></text:p>
          </table:table-cell>
          <table:table-cell office:value-type="float" office:value="137.976" table:style-name="ce33">
            <text:p><text:s/>138<text:s/></text:p>
          </table:table-cell>
          <table:table-cell office:value-type="float" office:value="12.45" table:style-name="ce185">
            <text:p><text:s/>12<text:s/></text:p>
          </table:table-cell>
          <table:table-cell office:value-type="float" office:value="45.12" table:style-name="ce185">
            <text:p><text:s/>45<text:s/></text:p>
          </table:table-cell>
          <table:table-cell office:value-type="float" office:value="63.81" table:style-name="ce89">
            <text:p><text:s/>64<text:s/></text:p>
          </table:table-cell>
          <table:table-cell office:value-type="float" office:value="39.94" table:style-name="ce89">
            <text:p><text:s/>40<text:s/></text:p>
          </table:table-cell>
          <table:table-cell office:value-type="float" office:value="84.003000000000014" table:style-name="ce89">
            <text:p><text:s/>84<text:s/></text:p>
          </table:table-cell>
          <table:table-cell office:value-type="float" office:value="105.82099999999998" table:style-name="ce89">
            <text:p><text:s/>106<text:s/></text:p>
          </table:table-cell>
          <table:table-cell office:value-type="float" office:value="15.048999999999998" table:style-name="ce89">
            <text:p><text:s/>15<text:s/></text:p>
          </table:table-cell>
          <table:table-cell office:value-type="float" office:value="69.685000000000002" table:style-name="ce89">
            <text:p><text:s/>70<text:s/></text:p>
          </table:table-cell>
          <table:table-cell office:value-type="float" office:value="99.161999999999992" table:style-name="ce136">
            <text:p>99</text:p>
          </table:table-cell>
          <table:table-cell office:value-type="float" office:value="42.176000000000002" table:style-name="ce136">
            <text:p>42</text:p>
          </table:table-cell>
          <table:table-cell office:value-type="float" office:value="3.6049999999999995" table:style-name="ce202">
            <text:p>4</text:p>
          </table:table-cell>
          <table:table-cell office:value-type="float" office:value="37.53" table:style-name="ce136">
            <text:p>38</text:p>
          </table:table-cell>
          <table:table-cell office:value-type="float" office:value="67.304000000000002" table:style-name="ce304">
            <text:p>67</text:p>
          </table:table-cell>
          <table:table-cell office:value-type="float" office:value="5" table:style-name="ce303">
            <text:p>5</text:p>
          </table:table-cell>
          <table:table-cell office:value-type="float" office:value="36" table:style-name="ce323">
            <text:p>3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04</text:p>
          </table:table-cell>
          <table:table-cell office:value-type="string" table:style-name="ce188">
            <text:p>Leather and Textile Production</text:p>
          </table:table-cell>
          <table:table-cell office:value-type="float" office:value="594.81365000000005" table:style-name="ce58">
            <text:p><text:s/>595<text:s/></text:p>
          </table:table-cell>
          <table:table-cell office:value-type="float" office:value="1470.4963347315788" table:style-name="ce58">
            <text:p><text:s/>1,470<text:s/></text:p>
          </table:table-cell>
          <table:table-cell office:value-type="float" office:value="2091.8301717191935" table:style-name="ce58">
            <text:p><text:s/>2,092<text:s/></text:p>
          </table:table-cell>
          <table:table-cell office:value-type="float" office:value="2856.1478817295283" table:style-name="ce58">
            <text:p><text:s/>2,856<text:s/></text:p>
          </table:table-cell>
          <table:table-cell office:value-type="float" office:value="4625.1271999999999" table:style-name="ce58">
            <text:p><text:s/>4,625<text:s/></text:p>
          </table:table-cell>
          <table:table-cell office:value-type="float" office:value="5739.5184254059568" table:style-name="ce58">
            <text:p><text:s/>5,740<text:s/></text:p>
          </table:table-cell>
          <table:table-cell office:value-type="float" office:value="2029.13" table:style-name="ce58">
            <text:p><text:s/>2,029<text:s/></text:p>
          </table:table-cell>
          <table:table-cell office:value-type="float" office:value="690.37750000000005" table:style-name="ce58">
            <text:p><text:s/>690<text:s/></text:p>
          </table:table-cell>
          <table:table-cell office:value-type="float" office:value="407.89800000000002" table:style-name="ce33">
            <text:p><text:s/>408<text:s/></text:p>
          </table:table-cell>
          <table:table-cell office:value-type="float" office:value="25.248000000000001" table:style-name="ce33">
            <text:p><text:s/>25<text:s/></text:p>
          </table:table-cell>
          <table:table-cell office:value-type="float" office:value="124.44800000000002" table:style-name="ce185">
            <text:p><text:s/>124<text:s/></text:p>
          </table:table-cell>
          <table:table-cell office:value-type="float" office:value="45.316000000000003" table:style-name="ce185">
            <text:p><text:s/>45<text:s/></text:p>
          </table:table-cell>
          <table:table-cell office:value-type="float" office:value="72.066999999999993" table:style-name="ce89">
            <text:p><text:s/>72<text:s/></text:p>
          </table:table-cell>
          <table:table-cell office:value-type="float" office:value="31.974999999999998" table:style-name="ce89">
            <text:p><text:s/>32<text:s/></text:p>
          </table:table-cell>
          <table:table-cell office:value-type="float" office:value="0.46" table:style-name="ce89">
            <text:p><text:s/>0<text:s/></text:p>
          </table:table-cell>
          <table:table-cell office:value-type="float" office:value="5.4817" table:style-name="ce89">
            <text:p><text:s/>5<text:s/></text:p>
          </table:table-cell>
          <table:table-cell office:value-type="float" office:value="34.168499999999995" table:style-name="ce89">
            <text:p><text:s/>34<text:s/></text:p>
          </table:table-cell>
          <table:table-cell office:value-type="float" office:value="94.471000000000004" table:style-name="ce89">
            <text:p><text:s/>94<text:s/></text:p>
          </table:table-cell>
          <table:table-cell office:value-type="float" office:value="218.50050000000002" table:style-name="ce136">
            <text:p>219</text:p>
          </table:table-cell>
          <table:table-cell office:value-type="float" office:value="184.4" table:style-name="ce136">
            <text:p>184</text:p>
          </table:table-cell>
          <table:table-cell office:value-type="float" office:value="259.39299999999997" table:style-name="ce202">
            <text:p>259</text:p>
          </table:table-cell>
          <table:table-cell office:value-type="float" office:value="209.09300000000002" table:style-name="ce136">
            <text:p>209</text:p>
          </table:table-cell>
          <table:table-cell office:value-type="float" office:value="163.99499999999998" table:style-name="ce304">
            <text:p>164</text:p>
          </table:table-cell>
          <table:table-cell office:value-type="float" office:value="222" table:style-name="ce303">
            <text:p>222</text:p>
          </table:table-cell>
          <table:table-cell office:value-type="float" office:value="212" table:style-name="ce323">
            <text:p>21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05</text:p>
          </table:table-cell>
          <table:table-cell office:value-type="string" table:style-name="ce188">
            <text:p>Petrol, Gas and Coal Refining/Treatment</text:p>
          </table:table-cell>
          <table:table-cell office:value-type="float" office:value="117752.04305999998" table:style-name="ce58">
            <text:p><text:s/>117,752<text:s/></text:p>
          </table:table-cell>
          <table:table-cell office:value-type="float" office:value="9617.2079086164013" table:style-name="ce58">
            <text:p><text:s/>9,617<text:s/></text:p>
          </table:table-cell>
          <table:table-cell office:value-type="float" office:value="26810.852835770696" table:style-name="ce58">
            <text:p><text:s/>26,811<text:s/></text:p>
          </table:table-cell>
          <table:table-cell office:value-type="float" office:value="4910.9952827123925" table:style-name="ce58">
            <text:p><text:s/>4,911<text:s/></text:p>
          </table:table-cell>
          <table:table-cell office:value-type="float" office:value="5308.5157200000003" table:style-name="ce58">
            <text:p><text:s/>5,309<text:s/></text:p>
          </table:table-cell>
          <table:table-cell office:value-type="float" office:value="13538.850086864084" table:style-name="ce58">
            <text:p><text:s/>13,539<text:s/></text:p>
          </table:table-cell>
          <table:table-cell office:value-type="float" office:value="1391.2880000000002" table:style-name="ce58">
            <text:p><text:s/>1,391<text:s/></text:p>
          </table:table-cell>
          <table:table-cell office:value-type="float" office:value="2017.0471299999999" table:style-name="ce58">
            <text:p><text:s/>2,017<text:s/></text:p>
          </table:table-cell>
          <table:table-cell office:value-type="float" office:value="2544.8182499999998" table:style-name="ce33">
            <text:p><text:s/>2,545<text:s/></text:p>
          </table:table-cell>
          <table:table-cell office:value-type="float" office:value="2263.2669999999998" table:style-name="ce33">
            <text:p><text:s/>2,263<text:s/></text:p>
          </table:table-cell>
          <table:table-cell office:value-type="float" office:value="3019.9387000000002" table:style-name="ce185">
            <text:p><text:s/>3,020<text:s/></text:p>
          </table:table-cell>
          <table:table-cell office:value-type="float" office:value="2525.5500000000002" table:style-name="ce185">
            <text:p><text:s/>2,526<text:s/></text:p>
          </table:table-cell>
          <table:table-cell office:value-type="float" office:value="3403.5190000000002" table:style-name="ce89">
            <text:p><text:s/>3,404<text:s/></text:p>
          </table:table-cell>
          <table:table-cell office:value-type="float" office:value="2744.4180000000001" table:style-name="ce89">
            <text:p><text:s/>2,744<text:s/></text:p>
          </table:table-cell>
          <table:table-cell office:value-type="float" office:value="2190.4926599999999" table:style-name="ce89">
            <text:p><text:s/>2,190<text:s/></text:p>
          </table:table-cell>
          <table:table-cell office:value-type="float" office:value="1774.7442599999997" table:style-name="ce89">
            <text:p><text:s/>1,775<text:s/></text:p>
          </table:table-cell>
          <table:table-cell office:value-type="float" office:value="1960.8969399999999" table:style-name="ce89">
            <text:p><text:s/>1,961<text:s/></text:p>
          </table:table-cell>
          <table:table-cell office:value-type="float" office:value="6774.1774999999989" table:style-name="ce89">
            <text:p><text:s/>6,774<text:s/></text:p>
          </table:table-cell>
          <table:table-cell office:value-type="float" office:value="1982.191" table:style-name="ce136">
            <text:p>1,982</text:p>
          </table:table-cell>
          <table:table-cell office:value-type="float" office:value="5158.4819999999991" table:style-name="ce136">
            <text:p>5,158</text:p>
          </table:table-cell>
          <table:table-cell office:value-type="float" office:value="2990.58941" table:style-name="ce202">
            <text:p>2,991</text:p>
          </table:table-cell>
          <table:table-cell office:value-type="float" office:value="1242.3335" table:style-name="ce136">
            <text:p>1,242</text:p>
          </table:table-cell>
          <table:table-cell office:value-type="float" office:value="2559.6080000000011" table:style-name="ce304">
            <text:p>2,560</text:p>
          </table:table-cell>
          <table:table-cell office:value-type="float" office:value="978" table:style-name="ce303">
            <text:p>978</text:p>
          </table:table-cell>
          <table:table-cell office:value-type="float" office:value="1765" table:style-name="ce323">
            <text:p>1,76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06</text:p>
          </table:table-cell>
          <table:table-cell office:value-type="string" table:style-name="ce188">
            <text:p>Inorganic Chemical Processes</text:p>
          </table:table-cell>
          <table:table-cell office:value-type="float" office:value="36560.85194" table:style-name="ce58">
            <text:p><text:s/>36,561<text:s/></text:p>
          </table:table-cell>
          <table:table-cell office:value-type="float" office:value="41908.191871476425" table:style-name="ce58">
            <text:p><text:s/>41,908<text:s/></text:p>
          </table:table-cell>
          <table:table-cell office:value-type="float" office:value="37204.347040675581" table:style-name="ce58">
            <text:p><text:s/>37,204<text:s/></text:p>
          </table:table-cell>
          <table:table-cell office:value-type="float" office:value="36408.670461523579" table:style-name="ce58">
            <text:p><text:s/>36,409<text:s/></text:p>
          </table:table-cell>
          <table:table-cell office:value-type="float" office:value="30325.212460000002" table:style-name="ce58">
            <text:p><text:s/>30,325<text:s/></text:p>
          </table:table-cell>
          <table:table-cell office:value-type="float" office:value="19743.428777605495" table:style-name="ce58">
            <text:p><text:s/>19,743<text:s/></text:p>
          </table:table-cell>
          <table:table-cell office:value-type="float" office:value="10443.81603" table:style-name="ce58">
            <text:p><text:s/>10,444<text:s/></text:p>
          </table:table-cell>
          <table:table-cell office:value-type="float" office:value="10558.59806" table:style-name="ce58">
            <text:p><text:s/>10,559<text:s/></text:p>
          </table:table-cell>
          <table:table-cell office:value-type="float" office:value="9485.0668100000003" table:style-name="ce33">
            <text:p><text:s/>9,485<text:s/></text:p>
          </table:table-cell>
          <table:table-cell office:value-type="float" office:value="11133.663200000001" table:style-name="ce33">
            <text:p><text:s/>11,134<text:s/></text:p>
          </table:table-cell>
          <table:table-cell office:value-type="float" office:value="8837.635669999996" table:style-name="ce185">
            <text:p><text:s/>8,838<text:s/></text:p>
          </table:table-cell>
          <table:table-cell office:value-type="float" office:value="13910.285539999999" table:style-name="ce185">
            <text:p><text:s/>13,910<text:s/></text:p>
          </table:table-cell>
          <table:table-cell office:value-type="float" office:value="4777.18379" table:style-name="ce89">
            <text:p><text:s/>4,777<text:s/></text:p>
          </table:table-cell>
          <table:table-cell office:value-type="float" office:value="5955.7781999999997" table:style-name="ce89">
            <text:p><text:s/>5,956<text:s/></text:p>
          </table:table-cell>
          <table:table-cell office:value-type="float" office:value="5794.1018800000002" table:style-name="ce89">
            <text:p><text:s/>5,794<text:s/></text:p>
          </table:table-cell>
          <table:table-cell office:value-type="float" office:value="9381.2649500000007" table:style-name="ce89">
            <text:p><text:s/>9,381<text:s/></text:p>
          </table:table-cell>
          <table:table-cell office:value-type="float" office:value="19314.718529999995" table:style-name="ce89">
            <text:p><text:s/>19,315<text:s/></text:p>
          </table:table-cell>
          <table:table-cell office:value-type="float" office:value="21195.527450000005" table:style-name="ce89">
            <text:p><text:s/>21,196<text:s/></text:p>
          </table:table-cell>
          <table:table-cell office:value-type="float" office:value="15150.53031" table:style-name="ce136">
            <text:p>15,151</text:p>
          </table:table-cell>
          <table:table-cell office:value-type="float" office:value="16116.111599999998" table:style-name="ce136">
            <text:p>16,116</text:p>
          </table:table-cell>
          <table:table-cell office:value-type="float" office:value="17940.040529999998" table:style-name="ce202">
            <text:p>17,940</text:p>
          </table:table-cell>
          <table:table-cell office:value-type="float" office:value="14130.962570000002" table:style-name="ce136">
            <text:p>14,131</text:p>
          </table:table-cell>
          <table:table-cell office:value-type="float" office:value="12801.710279999999" table:style-name="ce304">
            <text:p>12,802</text:p>
          </table:table-cell>
          <table:table-cell office:value-type="float" office:value="10839" table:style-name="ce303">
            <text:p>10,839</text:p>
          </table:table-cell>
          <table:table-cell office:value-type="float" office:value="10528" table:style-name="ce323">
            <text:p>10,52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07</text:p>
          </table:table-cell>
          <table:table-cell office:value-type="string" table:style-name="ce188">
            <text:p>Organic Chemical Processes</text:p>
          </table:table-cell>
          <table:table-cell office:value-type="float" office:value="122687.52789000003" table:style-name="ce58">
            <text:p><text:s/>122,688<text:s/></text:p>
          </table:table-cell>
          <table:table-cell office:value-type="float" office:value="104571.8652733254" table:style-name="ce58">
            <text:p><text:s/>104,572<text:s/></text:p>
          </table:table-cell>
          <table:table-cell office:value-type="float" office:value="125182.7060933779" table:style-name="ce58">
            <text:p><text:s/>125,183<text:s/></text:p>
          </table:table-cell>
          <table:table-cell office:value-type="float" office:value="124246.95310247135" table:style-name="ce58">
            <text:p><text:s/>124,247<text:s/></text:p>
          </table:table-cell>
          <table:table-cell office:value-type="float" office:value="108692.53413999999" table:style-name="ce58">
            <text:p><text:s/>108,693<text:s/></text:p>
          </table:table-cell>
          <table:table-cell office:value-type="float" office:value="122351.05732191913" table:style-name="ce58">
            <text:p><text:s/>122,351<text:s/></text:p>
          </table:table-cell>
          <table:table-cell office:value-type="float" office:value="66694.672670000014" table:style-name="ce58">
            <text:p><text:s/>66,695<text:s/></text:p>
          </table:table-cell>
          <table:table-cell office:value-type="float" office:value="79666.764409999989" table:style-name="ce58">
            <text:p><text:s/>79,667<text:s/></text:p>
          </table:table-cell>
          <table:table-cell office:value-type="float" office:value="60379.611840000005" table:style-name="ce33">
            <text:p><text:s/>60,380<text:s/></text:p>
          </table:table-cell>
          <table:table-cell office:value-type="float" office:value="47729.243500000011" table:style-name="ce33">
            <text:p><text:s/>47,729<text:s/></text:p>
          </table:table-cell>
          <table:table-cell office:value-type="float" office:value="61513.866899999994" table:style-name="ce185">
            <text:p><text:s/>61,514<text:s/></text:p>
          </table:table-cell>
          <table:table-cell office:value-type="float" office:value="72892.231860000014" table:style-name="ce185">
            <text:p><text:s/>72,892<text:s/></text:p>
          </table:table-cell>
          <table:table-cell office:value-type="float" office:value="78858.005130000005" table:style-name="ce89">
            <text:p><text:s/>78,858<text:s/></text:p>
          </table:table-cell>
          <table:table-cell office:value-type="float" office:value="83094.585700000011" table:style-name="ce89">
            <text:p><text:s/>83,095<text:s/></text:p>
          </table:table-cell>
          <table:table-cell office:value-type="float" office:value="93210.671720000013" table:style-name="ce89">
            <text:p><text:s/>93,211<text:s/></text:p>
          </table:table-cell>
          <table:table-cell office:value-type="float" office:value="107839.87472999998" table:style-name="ce89">
            <text:p><text:s/>107,840<text:s/></text:p>
          </table:table-cell>
          <table:table-cell office:value-type="float" office:value="79364.612959999984" table:style-name="ce89">
            <text:p><text:s/>79,365<text:s/></text:p>
          </table:table-cell>
          <table:table-cell office:value-type="float" office:value="88252.660090000034" table:style-name="ce89">
            <text:p><text:s/>88,253<text:s/></text:p>
          </table:table-cell>
          <table:table-cell office:value-type="float" office:value="93626.455070000011" table:style-name="ce136">
            <text:p>93,626</text:p>
          </table:table-cell>
          <table:table-cell office:value-type="float" office:value="78268.861350000006" table:style-name="ce136">
            <text:p>78,269</text:p>
          </table:table-cell>
          <table:table-cell office:value-type="float" office:value="63413.284599999984" table:style-name="ce202">
            <text:p>63,413</text:p>
          </table:table-cell>
          <table:table-cell office:value-type="float" office:value="46609.349450000002" table:style-name="ce136">
            <text:p>46,609</text:p>
          </table:table-cell>
          <table:table-cell office:value-type="float" office:value="59731.592419999972" table:style-name="ce304">
            <text:p>59,732</text:p>
          </table:table-cell>
          <table:table-cell office:value-type="float" office:value="49753" table:style-name="ce303">
            <text:p>49,753</text:p>
          </table:table-cell>
          <table:table-cell office:value-type="float" office:value="47908" table:style-name="ce323">
            <text:p>47,90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08</text:p>
          </table:table-cell>
          <table:table-cell office:value-type="string" table:style-name="ce188">
            <text:p>MFSU Paints, Varnish, Adhesive and Inks</text:p>
          </table:table-cell>
          <table:table-cell office:value-type="float" office:value="16385.074339999992" table:style-name="ce58">
            <text:p><text:s/>16,385<text:s/></text:p>
          </table:table-cell>
          <table:table-cell office:value-type="float" office:value="14287.117964211153" table:style-name="ce58">
            <text:p><text:s/>14,287<text:s/></text:p>
          </table:table-cell>
          <table:table-cell office:value-type="float" office:value="13633.176188984653" table:style-name="ce58">
            <text:p><text:s/>13,633<text:s/></text:p>
          </table:table-cell>
          <table:table-cell office:value-type="float" office:value="12855.776402246207" table:style-name="ce58">
            <text:p><text:s/>12,856<text:s/></text:p>
          </table:table-cell>
          <table:table-cell office:value-type="float" office:value="10721.459819999996" table:style-name="ce58">
            <text:p><text:s/>10,721<text:s/></text:p>
          </table:table-cell>
          <table:table-cell office:value-type="float" office:value="13453.143213418196" table:style-name="ce58">
            <text:p><text:s/>13,453<text:s/></text:p>
          </table:table-cell>
          <table:table-cell office:value-type="float" office:value="11355.87473" table:style-name="ce58">
            <text:p><text:s/>11,356<text:s/></text:p>
          </table:table-cell>
          <table:table-cell office:value-type="float" office:value="11695.066820000002" table:style-name="ce58">
            <text:p><text:s/>11,695<text:s/></text:p>
          </table:table-cell>
          <table:table-cell office:value-type="float" office:value="10337.836400000002" table:style-name="ce33">
            <text:p><text:s/>10,338<text:s/></text:p>
          </table:table-cell>
          <table:table-cell office:value-type="float" office:value="8842.8841699999994" table:style-name="ce33">
            <text:p><text:s/>8,843<text:s/></text:p>
          </table:table-cell>
          <table:table-cell office:value-type="float" office:value="8402.2284399999971" table:style-name="ce185">
            <text:p><text:s/>8,402<text:s/></text:p>
          </table:table-cell>
          <table:table-cell office:value-type="float" office:value="9968.9586999999992" table:style-name="ce185">
            <text:p><text:s/>9,969<text:s/></text:p>
          </table:table-cell>
          <table:table-cell office:value-type="float" office:value="8387.2820700000011" table:style-name="ce89">
            <text:p><text:s/>8,387<text:s/></text:p>
          </table:table-cell>
          <table:table-cell office:value-type="float" office:value="8594.8483899999992" table:style-name="ce89">
            <text:p><text:s/>8,595<text:s/></text:p>
          </table:table-cell>
          <table:table-cell office:value-type="float" office:value="9310.8251499999988" table:style-name="ce89">
            <text:p><text:s/>9,311<text:s/></text:p>
          </table:table-cell>
          <table:table-cell office:value-type="float" office:value="9473.9020299999993" table:style-name="ce89">
            <text:p><text:s/>9,474<text:s/></text:p>
          </table:table-cell>
          <table:table-cell office:value-type="float" office:value="9787.3470999999972" table:style-name="ce89">
            <text:p><text:s/>9,787<text:s/></text:p>
          </table:table-cell>
          <table:table-cell office:value-type="float" office:value="10283.602870000001" table:style-name="ce89">
            <text:p><text:s/>10,284<text:s/></text:p>
          </table:table-cell>
          <table:table-cell office:value-type="float" office:value="11067.373749999997" table:style-name="ce136">
            <text:p>11,067</text:p>
          </table:table-cell>
          <table:table-cell office:value-type="float" office:value="12294.362639999999" table:style-name="ce136">
            <text:p>12,294</text:p>
          </table:table-cell>
          <table:table-cell office:value-type="float" office:value="12533.357920000002" table:style-name="ce202">
            <text:p>12,533</text:p>
          </table:table-cell>
          <table:table-cell office:value-type="float" office:value="12610.308459999998" table:style-name="ce136">
            <text:p>12,610</text:p>
          </table:table-cell>
          <table:table-cell office:value-type="float" office:value="12332.85527" table:style-name="ce304">
            <text:p>12,333</text:p>
          </table:table-cell>
          <table:table-cell office:value-type="float" office:value="10247" table:style-name="ce303">
            <text:p>10,247</text:p>
          </table:table-cell>
          <table:table-cell office:value-type="float" office:value="10623" table:style-name="ce323">
            <text:p>10,62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09</text:p>
          </table:table-cell>
          <table:table-cell office:value-type="string" table:style-name="ce188">
            <text:p>Photographic Industry</text:p>
          </table:table-cell>
          <table:table-cell office:value-type="float" office:value="626.39079000000015" table:style-name="ce58">
            <text:p><text:s/>626<text:s/></text:p>
          </table:table-cell>
          <table:table-cell office:value-type="float" office:value="342.21974060311913" table:style-name="ce58">
            <text:p><text:s/>342<text:s/></text:p>
          </table:table-cell>
          <table:table-cell office:value-type="float" office:value="1904.3194213435054" table:style-name="ce58">
            <text:p><text:s/>1,904<text:s/></text:p>
          </table:table-cell>
          <table:table-cell office:value-type="float" office:value="5485.1774646200938" table:style-name="ce58">
            <text:p><text:s/>5,485<text:s/></text:p>
          </table:table-cell>
          <table:table-cell office:value-type="float" office:value="6225.0806499999981" table:style-name="ce58">
            <text:p><text:s/>6,225<text:s/></text:p>
          </table:table-cell>
          <table:table-cell office:value-type="float" office:value="5880.9512377176434" table:style-name="ce58">
            <text:p><text:s/>5,881<text:s/></text:p>
          </table:table-cell>
          <table:table-cell office:value-type="float" office:value="1311.4430600000001" table:style-name="ce58">
            <text:p><text:s/>1,311<text:s/></text:p>
          </table:table-cell>
          <table:table-cell office:value-type="float" office:value="801.05649000000017" table:style-name="ce58">
            <text:p><text:s/>801<text:s/></text:p>
          </table:table-cell>
          <table:table-cell office:value-type="float" office:value="682.26775000000009" table:style-name="ce33">
            <text:p><text:s/>682<text:s/></text:p>
          </table:table-cell>
          <table:table-cell office:value-type="float" office:value="670.03950000000009" table:style-name="ce33">
            <text:p><text:s/>670<text:s/></text:p>
          </table:table-cell>
          <table:table-cell office:value-type="float" office:value="603.6092000000001" table:style-name="ce185">
            <text:p><text:s/>604<text:s/></text:p>
          </table:table-cell>
          <table:table-cell office:value-type="float" office:value="725.2011" table:style-name="ce185">
            <text:p><text:s/>725<text:s/></text:p>
          </table:table-cell>
          <table:table-cell office:value-type="float" office:value="787.93304000000001" table:style-name="ce89">
            <text:p><text:s/>788<text:s/></text:p>
          </table:table-cell>
          <table:table-cell office:value-type="float" office:value="742.63592999999992" table:style-name="ce89">
            <text:p><text:s/>743<text:s/></text:p>
          </table:table-cell>
          <table:table-cell office:value-type="float" office:value="563.78275000000008" table:style-name="ce89">
            <text:p><text:s/>564<text:s/></text:p>
          </table:table-cell>
          <table:table-cell office:value-type="float" office:value="479.12798999999995" table:style-name="ce89">
            <text:p><text:s/>479<text:s/></text:p>
          </table:table-cell>
          <table:table-cell office:value-type="float" office:value="584.61411999999984" table:style-name="ce89">
            <text:p><text:s/>585<text:s/></text:p>
          </table:table-cell>
          <table:table-cell office:value-type="float" office:value="368.79831000000013" table:style-name="ce89">
            <text:p><text:s/>369<text:s/></text:p>
          </table:table-cell>
          <table:table-cell office:value-type="float" office:value="342.24438000000004" table:style-name="ce136">
            <text:p>342</text:p>
          </table:table-cell>
          <table:table-cell office:value-type="float" office:value="358.89750000000004" table:style-name="ce136">
            <text:p>359</text:p>
          </table:table-cell>
          <table:table-cell office:value-type="float" office:value="168.52303999999998" table:style-name="ce202">
            <text:p>169</text:p>
          </table:table-cell>
          <table:table-cell office:value-type="float" office:value="161.07245999999998" table:style-name="ce136">
            <text:p>161</text:p>
          </table:table-cell>
          <table:table-cell office:value-type="float" office:value="229.2432" table:style-name="ce304">
            <text:p>229</text:p>
          </table:table-cell>
          <table:table-cell office:value-type="float" office:value="285" table:style-name="ce303">
            <text:p>285</text:p>
          </table:table-cell>
          <table:table-cell office:value-type="float" office:value="296" table:style-name="ce323">
            <text:p>29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0</text:p>
          </table:table-cell>
          <table:table-cell office:value-type="string" table:style-name="ce188">
            <text:p>Thermal Process Waste (inorganic)</text:p>
          </table:table-cell>
          <table:table-cell office:value-type="float" office:value="21768.297089999993" table:style-name="ce58">
            <text:p><text:s/>21,768<text:s/></text:p>
          </table:table-cell>
          <table:table-cell office:value-type="float" office:value="29055.526908717118" table:style-name="ce58">
            <text:p><text:s/>29,056<text:s/></text:p>
          </table:table-cell>
          <table:table-cell office:value-type="float" office:value="29860.916183029385" table:style-name="ce58">
            <text:p><text:s/>29,861<text:s/></text:p>
          </table:table-cell>
          <table:table-cell office:value-type="float" office:value="39234.381058525294" table:style-name="ce58">
            <text:p><text:s/>39,234<text:s/></text:p>
          </table:table-cell>
          <table:table-cell office:value-type="float" office:value="41759.353610000042" table:style-name="ce58">
            <text:p><text:s/>41,759<text:s/></text:p>
          </table:table-cell>
          <table:table-cell office:value-type="float" office:value="28468.209817837778" table:style-name="ce58">
            <text:p><text:s/>28,468<text:s/></text:p>
          </table:table-cell>
          <table:table-cell office:value-type="float" office:value="4857.7725" table:style-name="ce58">
            <text:p><text:s/>4,858<text:s/></text:p>
          </table:table-cell>
          <table:table-cell office:value-type="float" office:value="4740.2321000000002" table:style-name="ce58">
            <text:p><text:s/>4,740<text:s/></text:p>
          </table:table-cell>
          <table:table-cell office:value-type="float" office:value="4486.1634300000005" table:style-name="ce33">
            <text:p><text:s/>4,486<text:s/></text:p>
          </table:table-cell>
          <table:table-cell office:value-type="float" office:value="3702.3796100000009" table:style-name="ce33">
            <text:p><text:s/>3,702<text:s/></text:p>
          </table:table-cell>
          <table:table-cell office:value-type="float" office:value="7271.465580000001" table:style-name="ce185">
            <text:p><text:s/>7,271<text:s/></text:p>
          </table:table-cell>
          <table:table-cell office:value-type="float" office:value="7072.8406499999992" table:style-name="ce185">
            <text:p><text:s/>7,073<text:s/></text:p>
          </table:table-cell>
          <table:table-cell office:value-type="float" office:value="29173.040280000001" table:style-name="ce89">
            <text:p><text:s/>29,173<text:s/></text:p>
          </table:table-cell>
          <table:table-cell office:value-type="float" office:value="33168.149810000003" table:style-name="ce89">
            <text:p><text:s/>33,168<text:s/></text:p>
          </table:table-cell>
          <table:table-cell office:value-type="float" office:value="24428.065999999999" table:style-name="ce89">
            <text:p><text:s/>24,428<text:s/></text:p>
          </table:table-cell>
          <table:table-cell office:value-type="float" office:value="57774.188000000002" table:style-name="ce89">
            <text:p><text:s/>57,774<text:s/></text:p>
          </table:table-cell>
          <table:table-cell office:value-type="float" office:value="58558.090020000003" table:style-name="ce89">
            <text:p><text:s/>58,558<text:s/></text:p>
          </table:table-cell>
          <table:table-cell office:value-type="float" office:value="47400.630059999996" table:style-name="ce89">
            <text:p><text:s/>47,401<text:s/></text:p>
          </table:table-cell>
          <table:table-cell office:value-type="float" office:value="47711.100099999996" table:style-name="ce136">
            <text:p>47,711</text:p>
          </table:table-cell>
          <table:table-cell office:value-type="float" office:value="49836.872759999998" table:style-name="ce136">
            <text:p>49,837</text:p>
          </table:table-cell>
          <table:table-cell office:value-type="float" office:value="45465.184299999994" table:style-name="ce202">
            <text:p>45,465</text:p>
          </table:table-cell>
          <table:table-cell office:value-type="float" office:value="55356.332000000002" table:style-name="ce136">
            <text:p>55,356</text:p>
          </table:table-cell>
          <table:table-cell office:value-type="float" office:value="63894.698499999999" table:style-name="ce304">
            <text:p>63,895</text:p>
          </table:table-cell>
          <table:table-cell office:value-type="float" office:value="56905" table:style-name="ce303">
            <text:p>56,905</text:p>
          </table:table-cell>
          <table:table-cell office:value-type="float" office:value="105577" table:style-name="ce323">
            <text:p>105,57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1</text:p>
          </table:table-cell>
          <table:table-cell office:value-type="string" table:style-name="ce188">
            <text:p>Metal Treatment and Coating Processes</text:p>
          </table:table-cell>
          <table:table-cell office:value-type="float" office:value="23417.492859999988" table:style-name="ce58">
            <text:p><text:s/>23,417<text:s/></text:p>
          </table:table-cell>
          <table:table-cell office:value-type="float" office:value="18188.698162931407" table:style-name="ce58">
            <text:p><text:s/>18,189<text:s/></text:p>
          </table:table-cell>
          <table:table-cell office:value-type="float" office:value="14534.297531200573" table:style-name="ce58">
            <text:p><text:s/>14,534<text:s/></text:p>
          </table:table-cell>
          <table:table-cell office:value-type="float" office:value="17260.504836622626" table:style-name="ce58">
            <text:p><text:s/>17,261<text:s/></text:p>
          </table:table-cell>
          <table:table-cell office:value-type="float" office:value="21285.647509999995" table:style-name="ce58">
            <text:p><text:s/>21,286<text:s/></text:p>
          </table:table-cell>
          <table:table-cell office:value-type="float" office:value="19742.106415324844" table:style-name="ce58">
            <text:p><text:s/>19,742<text:s/></text:p>
          </table:table-cell>
          <table:table-cell office:value-type="float" office:value="26676.622689999997" table:style-name="ce58">
            <text:p><text:s/>26,677<text:s/></text:p>
          </table:table-cell>
          <table:table-cell office:value-type="float" office:value="27568.99295" table:style-name="ce58">
            <text:p><text:s/>27,569<text:s/></text:p>
          </table:table-cell>
          <table:table-cell office:value-type="float" office:value="24472.156299999995" table:style-name="ce33">
            <text:p><text:s/>24,472<text:s/></text:p>
          </table:table-cell>
          <table:table-cell office:value-type="float" office:value="22424.537890000003" table:style-name="ce33">
            <text:p><text:s/>22,425<text:s/></text:p>
          </table:table-cell>
          <table:table-cell office:value-type="float" office:value="16893.129029999989" table:style-name="ce185">
            <text:p><text:s/>16,893<text:s/></text:p>
          </table:table-cell>
          <table:table-cell office:value-type="float" office:value="15222.629339999998" table:style-name="ce185">
            <text:p><text:s/>15,223<text:s/></text:p>
          </table:table-cell>
          <table:table-cell office:value-type="float" office:value="14418.821739999999" table:style-name="ce89">
            <text:p><text:s/>14,419<text:s/></text:p>
          </table:table-cell>
          <table:table-cell office:value-type="float" office:value="12630.231159999999" table:style-name="ce89">
            <text:p><text:s/>12,630<text:s/></text:p>
          </table:table-cell>
          <table:table-cell office:value-type="float" office:value="13637.940700000003" table:style-name="ce89">
            <text:p><text:s/>13,638<text:s/></text:p>
          </table:table-cell>
          <table:table-cell office:value-type="float" office:value="10982.479839999996" table:style-name="ce89">
            <text:p><text:s/>10,982<text:s/></text:p>
          </table:table-cell>
          <table:table-cell office:value-type="float" office:value="6924.9386800000011" table:style-name="ce89">
            <text:p><text:s/>6,925<text:s/></text:p>
          </table:table-cell>
          <table:table-cell office:value-type="float" office:value="6723.5788899999998" table:style-name="ce89">
            <text:p><text:s/>6,724<text:s/></text:p>
          </table:table-cell>
          <table:table-cell office:value-type="float" office:value="9355.6353000000017" table:style-name="ce136">
            <text:p>9,356</text:p>
          </table:table-cell>
          <table:table-cell office:value-type="float" office:value="9058.7009099999977" table:style-name="ce136">
            <text:p>9,059</text:p>
          </table:table-cell>
          <table:table-cell office:value-type="float" office:value="6453.0320499999989" table:style-name="ce202">
            <text:p>6,453</text:p>
          </table:table-cell>
          <table:table-cell office:value-type="float" office:value="7742.6018299999978" table:style-name="ce136">
            <text:p>7,743</text:p>
          </table:table-cell>
          <table:table-cell office:value-type="float" office:value="6943.482109999999" table:style-name="ce304">
            <text:p>6,943</text:p>
          </table:table-cell>
          <table:table-cell office:value-type="float" office:value="6556" table:style-name="ce303">
            <text:p>6,556</text:p>
          </table:table-cell>
          <table:table-cell office:value-type="float" office:value="6885" table:style-name="ce323">
            <text:p>6,88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2</text:p>
          </table:table-cell>
          <table:table-cell office:value-type="string" table:style-name="ce188">
            <text:p>Shaping/Treatment of Metals and Plastics</text:p>
          </table:table-cell>
          <table:table-cell office:value-type="float" office:value="25157.991659999992" table:style-name="ce58">
            <text:p><text:s/>25,158<text:s/></text:p>
          </table:table-cell>
          <table:table-cell office:value-type="float" office:value="14440.954924616963" table:style-name="ce58">
            <text:p><text:s/>14,441<text:s/></text:p>
          </table:table-cell>
          <table:table-cell office:value-type="float" office:value="12485.689438660163" table:style-name="ce58">
            <text:p><text:s/>12,486<text:s/></text:p>
          </table:table-cell>
          <table:table-cell office:value-type="float" office:value="15500.26632720232" table:style-name="ce58">
            <text:p><text:s/>15,500<text:s/></text:p>
          </table:table-cell>
          <table:table-cell office:value-type="float" office:value="16967.656739999995" table:style-name="ce58">
            <text:p><text:s/>16,968<text:s/></text:p>
          </table:table-cell>
          <table:table-cell office:value-type="float" office:value="10952.58963105455" table:style-name="ce58">
            <text:p><text:s/>10,953<text:s/></text:p>
          </table:table-cell>
          <table:table-cell office:value-type="float" office:value="9590.1832799999993" table:style-name="ce58">
            <text:p><text:s/>9,590<text:s/></text:p>
          </table:table-cell>
          <table:table-cell office:value-type="float" office:value="15439.195349999995" table:style-name="ce58">
            <text:p><text:s/>15,439<text:s/></text:p>
          </table:table-cell>
          <table:table-cell office:value-type="float" office:value="8648.1443099999997" table:style-name="ce33">
            <text:p><text:s/>8,648<text:s/></text:p>
          </table:table-cell>
          <table:table-cell office:value-type="float" office:value="8515.7314400000032" table:style-name="ce33">
            <text:p><text:s/>8,516<text:s/></text:p>
          </table:table-cell>
          <table:table-cell office:value-type="float" office:value="7281.5423500000024" table:style-name="ce185">
            <text:p><text:s/>7,282<text:s/></text:p>
          </table:table-cell>
          <table:table-cell office:value-type="float" office:value="6721.8909800000001" table:style-name="ce185">
            <text:p><text:s/>6,722<text:s/></text:p>
          </table:table-cell>
          <table:table-cell office:value-type="float" office:value="8934.3967599999996" table:style-name="ce89">
            <text:p><text:s/>8,934<text:s/></text:p>
          </table:table-cell>
          <table:table-cell office:value-type="float" office:value="8077.6980000000003" table:style-name="ce89">
            <text:p><text:s/>8,078<text:s/></text:p>
          </table:table-cell>
          <table:table-cell office:value-type="float" office:value="8582.4354000000003" table:style-name="ce89">
            <text:p><text:s/>8,582<text:s/></text:p>
          </table:table-cell>
          <table:table-cell office:value-type="float" office:value="8905.1685499999985" table:style-name="ce89">
            <text:p><text:s/>8,905<text:s/></text:p>
          </table:table-cell>
          <table:table-cell office:value-type="float" office:value="8385.0656299999973" table:style-name="ce89">
            <text:p><text:s/>8,385<text:s/></text:p>
          </table:table-cell>
          <table:table-cell office:value-type="float" office:value="8153.9858499999955" table:style-name="ce89">
            <text:p><text:s/>8,154<text:s/></text:p>
          </table:table-cell>
          <table:table-cell office:value-type="float" office:value="8333.4420999999984" table:style-name="ce136">
            <text:p>8,333</text:p>
          </table:table-cell>
          <table:table-cell office:value-type="float" office:value="8576.7202699999998" table:style-name="ce136">
            <text:p>8,577</text:p>
          </table:table-cell>
          <table:table-cell office:value-type="float" office:value="8789.4829199999986" table:style-name="ce202">
            <text:p>8,789</text:p>
          </table:table-cell>
          <table:table-cell office:value-type="float" office:value="8854.8514100000029" table:style-name="ce136">
            <text:p>8,855</text:p>
          </table:table-cell>
          <table:table-cell office:value-type="float" office:value="8959.1702199999982" table:style-name="ce304">
            <text:p>8,959</text:p>
          </table:table-cell>
          <table:table-cell office:value-type="float" office:value="8088" table:style-name="ce303">
            <text:p>8,088</text:p>
          </table:table-cell>
          <table:table-cell office:value-type="float" office:value="9765" table:style-name="ce323">
            <text:p>9,76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3</text:p>
          </table:table-cell>
          <table:table-cell office:value-type="string" table:style-name="ce188">
            <text:p>Oil and Oil/Water Mixtures</text:p>
          </table:table-cell>
          <table:table-cell office:value-type="float" office:value="92420.658320000191" table:style-name="ce58">
            <text:p><text:s/>92,421<text:s/></text:p>
          </table:table-cell>
          <table:table-cell office:value-type="float" office:value="116164.41039416884" table:style-name="ce58">
            <text:p><text:s/>116,164<text:s/></text:p>
          </table:table-cell>
          <table:table-cell office:value-type="float" office:value="85770.832604737414" table:style-name="ce58">
            <text:p><text:s/>85,771<text:s/></text:p>
          </table:table-cell>
          <table:table-cell office:value-type="float" office:value="69629.065892167157" table:style-name="ce58">
            <text:p><text:s/>69,629<text:s/></text:p>
          </table:table-cell>
          <table:table-cell office:value-type="float" office:value="67527.473870000118" table:style-name="ce58">
            <text:p><text:s/>67,527<text:s/></text:p>
          </table:table-cell>
          <table:table-cell office:value-type="float" office:value="88290.168715823558" table:style-name="ce58">
            <text:p><text:s/>88,290<text:s/></text:p>
          </table:table-cell>
          <table:table-cell office:value-type="float" office:value="90221.023060000065" table:style-name="ce58">
            <text:p><text:s/>90,221<text:s/></text:p>
          </table:table-cell>
          <table:table-cell office:value-type="float" office:value="79900.426680000004" table:style-name="ce58">
            <text:p><text:s/>79,900<text:s/></text:p>
          </table:table-cell>
          <table:table-cell office:value-type="float" office:value="84663.688860000009" table:style-name="ce33">
            <text:p><text:s/>84,664<text:s/></text:p>
          </table:table-cell>
          <table:table-cell office:value-type="float" office:value="66299.616150000031" table:style-name="ce33">
            <text:p><text:s/>66,300<text:s/></text:p>
          </table:table-cell>
          <table:table-cell office:value-type="float" office:value="63225.031090000004" table:style-name="ce185">
            <text:p><text:s/>63,225<text:s/></text:p>
          </table:table-cell>
          <table:table-cell office:value-type="float" office:value="60009.992130000013" table:style-name="ce185">
            <text:p><text:s/>60,010<text:s/></text:p>
          </table:table-cell>
          <table:table-cell office:value-type="float" office:value="65624.920230000003" table:style-name="ce89">
            <text:p><text:s/>65,625<text:s/></text:p>
          </table:table-cell>
          <table:table-cell office:value-type="float" office:value="61205.856339999998" table:style-name="ce89">
            <text:p><text:s/>61,206<text:s/></text:p>
          </table:table-cell>
          <table:table-cell office:value-type="float" office:value="68262.239910000004" table:style-name="ce89">
            <text:p><text:s/>68,262<text:s/></text:p>
          </table:table-cell>
          <table:table-cell office:value-type="float" office:value="56314.542759999989" table:style-name="ce89">
            <text:p><text:s/>56,315<text:s/></text:p>
          </table:table-cell>
          <table:table-cell office:value-type="float" office:value="59683.746880000042" table:style-name="ce89">
            <text:p><text:s/>59,684<text:s/></text:p>
          </table:table-cell>
          <table:table-cell office:value-type="float" office:value="59791.393889999999" table:style-name="ce89">
            <text:p><text:s/>59,791<text:s/></text:p>
          </table:table-cell>
          <table:table-cell office:value-type="float" office:value="62706.638429999999" table:style-name="ce136">
            <text:p>62,707</text:p>
          </table:table-cell>
          <table:table-cell office:value-type="float" office:value="74440.361340000003" table:style-name="ce136">
            <text:p>74,440</text:p>
          </table:table-cell>
          <table:table-cell office:value-type="float" office:value="70456.361470000018" table:style-name="ce202">
            <text:p>70,456</text:p>
          </table:table-cell>
          <table:table-cell office:value-type="float" office:value="69633.292350000018" table:style-name="ce136">
            <text:p>69,633</text:p>
          </table:table-cell>
          <table:table-cell office:value-type="float" office:value="66808.121560000029" table:style-name="ce304">
            <text:p>66,808</text:p>
          </table:table-cell>
          <table:table-cell office:value-type="float" office:value="63229" table:style-name="ce303">
            <text:p>63,229</text:p>
          </table:table-cell>
          <table:table-cell office:value-type="float" office:value="63680" table:style-name="ce323">
            <text:p>63,68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4</text:p>
          </table:table-cell>
          <table:table-cell office:value-type="string" table:style-name="ce188">
            <text:p>Solvents</text:p>
          </table:table-cell>
          <table:table-cell office:value-type="float" office:value="22222.005360000003" table:style-name="ce58">
            <text:p><text:s/>22,222<text:s/></text:p>
          </table:table-cell>
          <table:table-cell office:value-type="float" office:value="49013.188582271381" table:style-name="ce58">
            <text:p><text:s/>49,013<text:s/></text:p>
          </table:table-cell>
          <table:table-cell office:value-type="float" office:value="17068.569246580824" table:style-name="ce58">
            <text:p><text:s/>17,069<text:s/></text:p>
          </table:table-cell>
          <table:table-cell office:value-type="float" office:value="13666.599023774266" table:style-name="ce58">
            <text:p><text:s/>13,667<text:s/></text:p>
          </table:table-cell>
          <table:table-cell office:value-type="float" office:value="8104.8030700000008" table:style-name="ce58">
            <text:p><text:s/>8,105<text:s/></text:p>
          </table:table-cell>
          <table:table-cell office:value-type="float" office:value="4508.8915960223967" table:style-name="ce58">
            <text:p><text:s/>4,509<text:s/></text:p>
          </table:table-cell>
          <table:table-cell office:value-type="float" office:value="2869.31943" table:style-name="ce58">
            <text:p><text:s/>2,869<text:s/></text:p>
          </table:table-cell>
          <table:table-cell office:value-type="float" office:value="3190.52844" table:style-name="ce58">
            <text:p><text:s/>3,191<text:s/></text:p>
          </table:table-cell>
          <table:table-cell office:value-type="float" office:value="2392.7366599999996" table:style-name="ce33">
            <text:p><text:s/>2,393<text:s/></text:p>
          </table:table-cell>
          <table:table-cell office:value-type="float" office:value="2719.38859" table:style-name="ce33">
            <text:p><text:s/>2,719<text:s/></text:p>
          </table:table-cell>
          <table:table-cell office:value-type="float" office:value="2244.6190900000001" table:style-name="ce185">
            <text:p><text:s/>2,245<text:s/></text:p>
          </table:table-cell>
          <table:table-cell office:value-type="float" office:value="3685.8009000000006" table:style-name="ce185">
            <text:p><text:s/>3,686<text:s/></text:p>
          </table:table-cell>
          <table:table-cell office:value-type="float" office:value="3023.4041900000002" table:style-name="ce89">
            <text:p><text:s/>3,023<text:s/></text:p>
          </table:table-cell>
          <table:table-cell office:value-type="float" office:value="3109.8321599999999" table:style-name="ce89">
            <text:p><text:s/>3,110<text:s/></text:p>
          </table:table-cell>
          <table:table-cell office:value-type="float" office:value="3303.8394699999999" table:style-name="ce89">
            <text:p><text:s/>3,304<text:s/></text:p>
          </table:table-cell>
          <table:table-cell office:value-type="float" office:value="4165.2074200000006" table:style-name="ce89">
            <text:p><text:s/>4,165<text:s/></text:p>
          </table:table-cell>
          <table:table-cell office:value-type="float" office:value="3499.9160100000008" table:style-name="ce89">
            <text:p><text:s/>3,500<text:s/></text:p>
          </table:table-cell>
          <table:table-cell office:value-type="float" office:value="3899.8359800000007" table:style-name="ce89">
            <text:p><text:s/>3,900<text:s/></text:p>
          </table:table-cell>
          <table:table-cell office:value-type="float" office:value="2414.0296700000008" table:style-name="ce136">
            <text:p>2,414</text:p>
          </table:table-cell>
          <table:table-cell office:value-type="float" office:value="2877.8891499999995" table:style-name="ce136">
            <text:p>2,878</text:p>
          </table:table-cell>
          <table:table-cell office:value-type="float" office:value="1969.0488600000001" table:style-name="ce202">
            <text:p>1,969</text:p>
          </table:table-cell>
          <table:table-cell office:value-type="float" office:value="1715.7185999999999" table:style-name="ce136">
            <text:p>1,716</text:p>
          </table:table-cell>
          <table:table-cell office:value-type="float" office:value="1917.00009" table:style-name="ce304">
            <text:p>1,917</text:p>
          </table:table-cell>
          <table:table-cell office:value-type="float" office:value="1823" table:style-name="ce303">
            <text:p>1,823</text:p>
          </table:table-cell>
          <table:table-cell office:value-type="float" office:value="1715" table:style-name="ce323">
            <text:p>1,71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5</text:p>
          </table:table-cell>
          <table:table-cell office:value-type="string" table:style-name="ce188">
            <text:p>Packaging, Cloths, Filter Materials</text:p>
          </table:table-cell>
          <table:table-cell office:value-type="float" office:value="3735.7533299999991" table:style-name="ce58">
            <text:p><text:s/>3,736<text:s/></text:p>
          </table:table-cell>
          <table:table-cell office:value-type="float" office:value="11496.429189251736" table:style-name="ce58">
            <text:p><text:s/>11,496<text:s/></text:p>
          </table:table-cell>
          <table:table-cell office:value-type="float" office:value="4938.0420406154008" table:style-name="ce58">
            <text:p><text:s/>4,938<text:s/></text:p>
          </table:table-cell>
          <table:table-cell office:value-type="float" office:value="5613.0566611090908" table:style-name="ce58">
            <text:p><text:s/>5,613<text:s/></text:p>
          </table:table-cell>
          <table:table-cell office:value-type="float" office:value="5895.35401" table:style-name="ce58">
            <text:p><text:s/>5,895<text:s/></text:p>
          </table:table-cell>
          <table:table-cell office:value-type="float" office:value="10464.147099380614" table:style-name="ce58">
            <text:p><text:s/>10,464<text:s/></text:p>
          </table:table-cell>
          <table:table-cell office:value-type="float" office:value="7087.6004699999994" table:style-name="ce58">
            <text:p><text:s/>7,088<text:s/></text:p>
          </table:table-cell>
          <table:table-cell office:value-type="float" office:value="7123.3396099999982" table:style-name="ce58">
            <text:p><text:s/>7,123<text:s/></text:p>
          </table:table-cell>
          <table:table-cell office:value-type="float" office:value="7958.8435399999962" table:style-name="ce33">
            <text:p><text:s/>7,959<text:s/></text:p>
          </table:table-cell>
          <table:table-cell office:value-type="float" office:value="6138.4721900000004" table:style-name="ce33">
            <text:p><text:s/>6,138<text:s/></text:p>
          </table:table-cell>
          <table:table-cell office:value-type="float" office:value="7895.0425199999954" table:style-name="ce185">
            <text:p><text:s/>7,895<text:s/></text:p>
          </table:table-cell>
          <table:table-cell office:value-type="float" office:value="7277.3700699999972" table:style-name="ce185">
            <text:p><text:s/>7,277<text:s/></text:p>
          </table:table-cell>
          <table:table-cell office:value-type="float" office:value="10985.20465" table:style-name="ce89">
            <text:p><text:s/>10,985<text:s/></text:p>
          </table:table-cell>
          <table:table-cell office:value-type="float" office:value="10577.661" table:style-name="ce89">
            <text:p><text:s/>10,578<text:s/></text:p>
          </table:table-cell>
          <table:table-cell office:value-type="float" office:value="13416.170479999999" table:style-name="ce89">
            <text:p><text:s/>13,416<text:s/></text:p>
          </table:table-cell>
          <table:table-cell office:value-type="float" office:value="21269.242830000003" table:style-name="ce89">
            <text:p><text:s/>21,269<text:s/></text:p>
          </table:table-cell>
          <table:table-cell office:value-type="float" office:value="22151.391540000001" table:style-name="ce89">
            <text:p><text:s/>22,151<text:s/></text:p>
          </table:table-cell>
          <table:table-cell office:value-type="float" office:value="20915.940779999986" table:style-name="ce89">
            <text:p><text:s/>20,916<text:s/></text:p>
          </table:table-cell>
          <table:table-cell office:value-type="float" office:value="19883.540360000003" table:style-name="ce136">
            <text:p>19,884</text:p>
          </table:table-cell>
          <table:table-cell office:value-type="float" office:value="21236.207950000004" table:style-name="ce136">
            <text:p>21,236</text:p>
          </table:table-cell>
          <table:table-cell office:value-type="float" office:value="19311.502749999996" table:style-name="ce202">
            <text:p>19,312</text:p>
          </table:table-cell>
          <table:table-cell office:value-type="float" office:value="18325.658040000002" table:style-name="ce136">
            <text:p>18,326</text:p>
          </table:table-cell>
          <table:table-cell office:value-type="float" office:value="43365.490650000007" table:style-name="ce304">
            <text:p>43,365</text:p>
          </table:table-cell>
          <table:table-cell office:value-type="float" office:value="19110" table:style-name="ce303">
            <text:p>19,110</text:p>
          </table:table-cell>
          <table:table-cell office:value-type="float" office:value="29638" table:style-name="ce323">
            <text:p>29,63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6</text:p>
          </table:table-cell>
          <table:table-cell office:value-type="string" table:style-name="ce188">
            <text:p>Not Otherwise Specified*</text:p>
          </table:table-cell>
          <table:table-cell office:value-type="float" office:value="32972.647590000022" table:style-name="ce58">
            <text:p><text:s/>32,973<text:s/></text:p>
          </table:table-cell>
          <table:table-cell office:value-type="float" office:value="67340.224000006041" table:style-name="ce58">
            <text:p><text:s/>67,340<text:s/></text:p>
          </table:table-cell>
          <table:table-cell office:value-type="float" office:value="45041.443481977753" table:style-name="ce58">
            <text:p><text:s/>45,041<text:s/></text:p>
          </table:table-cell>
          <table:table-cell office:value-type="float" office:value="38439.337306217581" table:style-name="ce58">
            <text:p><text:s/>38,439<text:s/></text:p>
          </table:table-cell>
          <table:table-cell office:value-type="float" office:value="34932.238050000014" table:style-name="ce58">
            <text:p><text:s/>34,932<text:s/></text:p>
          </table:table-cell>
          <table:table-cell office:value-type="float" office:value="29367.585177074012" table:style-name="ce58">
            <text:p><text:s/>29,368<text:s/></text:p>
          </table:table-cell>
          <table:table-cell office:value-type="float" office:value="41764.787860000026" table:style-name="ce58">
            <text:p><text:s/>41,765<text:s/></text:p>
          </table:table-cell>
          <table:table-cell office:value-type="float" office:value="52273.439330000008" table:style-name="ce58">
            <text:p><text:s/>52,273<text:s/></text:p>
          </table:table-cell>
          <table:table-cell office:value-type="float" office:value="57847.531650000019" table:style-name="ce33">
            <text:p><text:s/>57,848<text:s/></text:p>
          </table:table-cell>
          <table:table-cell office:value-type="float" office:value="53427.096290000038" table:style-name="ce33">
            <text:p><text:s/>53,427<text:s/></text:p>
          </table:table-cell>
          <table:table-cell office:value-type="float" office:value="74853.420689999999" table:style-name="ce185">
            <text:p><text:s/>74,853<text:s/></text:p>
          </table:table-cell>
          <table:table-cell office:value-type="float" office:value="86008.596940000018" table:style-name="ce185">
            <text:p><text:s/>86,009<text:s/></text:p>
          </table:table-cell>
          <table:table-cell office:value-type="float" office:value="75125.188340000008" table:style-name="ce89">
            <text:p><text:s/>75,125<text:s/></text:p>
          </table:table-cell>
          <table:table-cell office:value-type="float" office:value="72683.064809999996" table:style-name="ce89">
            <text:p><text:s/>72,683<text:s/></text:p>
          </table:table-cell>
          <table:table-cell office:value-type="float" office:value="73047.764219999997" table:style-name="ce89">
            <text:p><text:s/>73,048<text:s/></text:p>
          </table:table-cell>
          <table:table-cell office:value-type="float" office:value="92227.305150000015" table:style-name="ce89">
            <text:p><text:s/>92,227<text:s/></text:p>
          </table:table-cell>
          <table:table-cell office:value-type="float" office:value="91539.795910000059" table:style-name="ce89">
            <text:p><text:s/>91,540<text:s/></text:p>
          </table:table-cell>
          <table:table-cell office:value-type="float" office:value="104833.59146999997" table:style-name="ce89">
            <text:p><text:s/>104,834<text:s/></text:p>
          </table:table-cell>
          <table:table-cell office:value-type="float" office:value="91329.967030000029" table:style-name="ce136">
            <text:p>91,330</text:p>
          </table:table-cell>
          <table:table-cell office:value-type="float" office:value="91831.898359999992" table:style-name="ce136">
            <text:p>91,832</text:p>
          </table:table-cell>
          <table:table-cell office:value-type="float" office:value="76120.384600000034" table:style-name="ce202">
            <text:p>76,120</text:p>
          </table:table-cell>
          <table:table-cell office:value-type="float" office:value="93995.575310000073" table:style-name="ce136">
            <text:p>93,996</text:p>
          </table:table-cell>
          <table:table-cell office:value-type="float" office:value="101555.63019999991" table:style-name="ce304">
            <text:p>101,556</text:p>
          </table:table-cell>
          <table:table-cell office:value-type="float" office:value="93307" table:style-name="ce303">
            <text:p>93,307</text:p>
          </table:table-cell>
          <table:table-cell office:value-type="float" office:value="100536" table:style-name="ce323">
            <text:p>100,53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7</text:p>
          </table:table-cell>
          <table:table-cell office:value-type="string" table:style-name="ce188">
            <text:p>C&amp;D Waste and Asbestos</text:p>
          </table:table-cell>
          <table:table-cell office:value-type="float" office:value="82229.985629999952" table:style-name="ce58">
            <text:p><text:s/>82,230<text:s/></text:p>
          </table:table-cell>
          <table:table-cell office:value-type="float" office:value="78473.501800353202" table:style-name="ce58">
            <text:p><text:s/>78,474<text:s/></text:p>
          </table:table-cell>
          <table:table-cell office:value-type="float" office:value="99887.273987993132" table:style-name="ce58">
            <text:p><text:s/>99,887<text:s/></text:p>
          </table:table-cell>
          <table:table-cell office:value-type="float" office:value="133204.64610193833" table:style-name="ce58">
            <text:p><text:s/>133,205<text:s/></text:p>
          </table:table-cell>
          <table:table-cell office:value-type="float" office:value="100764.56042999991" table:style-name="ce58">
            <text:p><text:s/>100,765<text:s/></text:p>
          </table:table-cell>
          <table:table-cell office:value-type="float" office:value="312142.05244526791" table:style-name="ce58">
            <text:p><text:s/>312,142<text:s/></text:p>
          </table:table-cell>
          <table:table-cell office:value-type="float" office:value="61347.526070000022" table:style-name="ce58">
            <text:p><text:s/>61,348<text:s/></text:p>
          </table:table-cell>
          <table:table-cell office:value-type="float" office:value="66718.958650000044" table:style-name="ce58">
            <text:p><text:s/>66,719<text:s/></text:p>
          </table:table-cell>
          <table:table-cell office:value-type="float" office:value="66918.998220000038" table:style-name="ce33">
            <text:p><text:s/>66,919<text:s/></text:p>
          </table:table-cell>
          <table:table-cell office:value-type="float" office:value="36154.835140000003" table:style-name="ce33">
            <text:p><text:s/>36,155<text:s/></text:p>
          </table:table-cell>
          <table:table-cell office:value-type="float" office:value="51015.587440000032" table:style-name="ce185">
            <text:p><text:s/>51,016<text:s/></text:p>
          </table:table-cell>
          <table:table-cell office:value-type="float" office:value="50609.550849999985" table:style-name="ce185">
            <text:p><text:s/>50,610<text:s/></text:p>
          </table:table-cell>
          <table:table-cell office:value-type="float" office:value="73249.159950000001" table:style-name="ce89">
            <text:p><text:s/>73,249<text:s/></text:p>
          </table:table-cell>
          <table:table-cell office:value-type="float" office:value="45343.421210000015" table:style-name="ce89">
            <text:p><text:s/>45,343<text:s/></text:p>
          </table:table-cell>
          <table:table-cell office:value-type="float" office:value="85712.570570000011" table:style-name="ce89">
            <text:p><text:s/>85,713<text:s/></text:p>
          </table:table-cell>
          <table:table-cell office:value-type="float" office:value="204124.72345999995" table:style-name="ce89">
            <text:p><text:s/>204,125<text:s/></text:p>
          </table:table-cell>
          <table:table-cell office:value-type="float" office:value="74181.49215999998" table:style-name="ce89">
            <text:p><text:s/>74,181<text:s/></text:p>
          </table:table-cell>
          <table:table-cell office:value-type="float" office:value="215315.44637000011" table:style-name="ce89">
            <text:p><text:s/>215,315<text:s/></text:p>
          </table:table-cell>
          <table:table-cell office:value-type="float" office:value="130671.25667999999" table:style-name="ce136">
            <text:p>130,671</text:p>
          </table:table-cell>
          <table:table-cell office:value-type="float" office:value="146691.82672999997" table:style-name="ce136">
            <text:p>146,692</text:p>
          </table:table-cell>
          <table:table-cell office:value-type="float" office:value="90188.413230000006" table:style-name="ce202">
            <text:p>90,188</text:p>
          </table:table-cell>
          <table:table-cell office:value-type="float" office:value="125753.22902999997" table:style-name="ce136">
            <text:p>125,753</text:p>
          </table:table-cell>
          <table:table-cell office:value-type="float" office:value="139470.31128000002" table:style-name="ce304">
            <text:p>139,470</text:p>
          </table:table-cell>
          <table:table-cell office:value-type="float" office:value="116807" table:style-name="ce303">
            <text:p>116,807</text:p>
          </table:table-cell>
          <table:table-cell office:value-type="float" office:value="111731" table:style-name="ce323">
            <text:p>111,73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8</text:p>
          </table:table-cell>
          <table:table-cell office:value-type="string" table:style-name="ce188">
            <text:p>Healthcare</text:p>
          </table:table-cell>
          <table:table-cell office:value-type="float" office:value="3789.7884799999997" table:style-name="ce58">
            <text:p><text:s/>3,790<text:s/></text:p>
          </table:table-cell>
          <table:table-cell office:value-type="float" office:value="3814.7031064184848" table:style-name="ce58">
            <text:p><text:s/>3,815<text:s/></text:p>
          </table:table-cell>
          <table:table-cell office:value-type="float" office:value="4813.9725629150635" table:style-name="ce58">
            <text:p><text:s/>4,814<text:s/></text:p>
          </table:table-cell>
          <table:table-cell office:value-type="float" office:value="4585.3576939322847" table:style-name="ce58">
            <text:p><text:s/>4,585<text:s/></text:p>
          </table:table-cell>
          <table:table-cell office:value-type="float" office:value="5052.628099999999" table:style-name="ce58">
            <text:p><text:s/>5,053<text:s/></text:p>
          </table:table-cell>
          <table:table-cell office:value-type="float" office:value="15354.058668040409" table:style-name="ce58">
            <text:p><text:s/>15,354<text:s/></text:p>
          </table:table-cell>
          <table:table-cell office:value-type="float" office:value="12089.789069999999" table:style-name="ce58">
            <text:p><text:s/>12,090<text:s/></text:p>
          </table:table-cell>
          <table:table-cell office:value-type="float" office:value="15605.761420000023" table:style-name="ce58">
            <text:p><text:s/>15,606<text:s/></text:p>
          </table:table-cell>
          <table:table-cell office:value-type="float" office:value="16127.146319999993" table:style-name="ce33">
            <text:p><text:s/>16,127<text:s/></text:p>
          </table:table-cell>
          <table:table-cell office:value-type="float" office:value="14640.038290000028" table:style-name="ce33">
            <text:p><text:s/>14,640<text:s/></text:p>
          </table:table-cell>
          <table:table-cell office:value-type="float" office:value="14938.464840000024" table:style-name="ce185">
            <text:p><text:s/>14,938<text:s/></text:p>
          </table:table-cell>
          <table:table-cell office:value-type="float" office:value="13580.643209999991" table:style-name="ce185">
            <text:p><text:s/>13,581<text:s/></text:p>
          </table:table-cell>
          <table:table-cell office:value-type="float" office:value="16413.3135" table:style-name="ce89">
            <text:p><text:s/>16,413<text:s/></text:p>
          </table:table-cell>
          <table:table-cell office:value-type="float" office:value="16957.405230000008" table:style-name="ce89">
            <text:p><text:s/>16,957<text:s/></text:p>
          </table:table-cell>
          <table:table-cell office:value-type="float" office:value="16226.805150000002" table:style-name="ce89">
            <text:p><text:s/>16,227<text:s/></text:p>
          </table:table-cell>
          <table:table-cell office:value-type="float" office:value="16021.041870000001" table:style-name="ce89">
            <text:p><text:s/>16,021<text:s/></text:p>
          </table:table-cell>
          <table:table-cell office:value-type="float" office:value="15163.881350000007" table:style-name="ce89">
            <text:p><text:s/>15,164<text:s/></text:p>
          </table:table-cell>
          <table:table-cell office:value-type="float" office:value="13983.336570000005" table:style-name="ce89">
            <text:p><text:s/>13,983<text:s/></text:p>
          </table:table-cell>
          <table:table-cell office:value-type="float" office:value="12080.940500000001" table:style-name="ce136">
            <text:p>12,081</text:p>
          </table:table-cell>
          <table:table-cell office:value-type="float" office:value="9678.6125499999962" table:style-name="ce136">
            <text:p>9,679</text:p>
          </table:table-cell>
          <table:table-cell office:value-type="float" office:value="12712.076070000003" table:style-name="ce202">
            <text:p>12,712</text:p>
          </table:table-cell>
          <table:table-cell office:value-type="float" office:value="16534.74212000001" table:style-name="ce136">
            <text:p>16,535</text:p>
          </table:table-cell>
          <table:table-cell office:value-type="float" office:value="16547.017180000003" table:style-name="ce304">
            <text:p>16,547</text:p>
          </table:table-cell>
          <table:table-cell office:value-type="float" office:value="11123" table:style-name="ce303">
            <text:p>11,123</text:p>
          </table:table-cell>
          <table:table-cell office:value-type="float" office:value="14593" table:style-name="ce323">
            <text:p>14,59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19</text:p>
          </table:table-cell>
          <table:table-cell office:value-type="string" table:style-name="ce188">
            <text:p>Waste/Water Treatment and Water Industry</text:p>
          </table:table-cell>
          <table:table-cell office:value-type="float" office:value="6269.2636499999999" table:style-name="ce58">
            <text:p><text:s/>6,269<text:s/></text:p>
          </table:table-cell>
          <table:table-cell office:value-type="float" office:value="63303.146370126167" table:style-name="ce58">
            <text:p><text:s/>63,303<text:s/></text:p>
          </table:table-cell>
          <table:table-cell office:value-type="float" office:value="51406.15162815759" table:style-name="ce58">
            <text:p><text:s/>51,406<text:s/></text:p>
          </table:table-cell>
          <table:table-cell office:value-type="float" office:value="74080.926631260663" table:style-name="ce58">
            <text:p><text:s/>74,081<text:s/></text:p>
          </table:table-cell>
          <table:table-cell office:value-type="float" office:value="71090.584370000011" table:style-name="ce58">
            <text:p><text:s/>71,091<text:s/></text:p>
          </table:table-cell>
          <table:table-cell office:value-type="float" office:value="80293.184043668211" table:style-name="ce58">
            <text:p><text:s/>80,293<text:s/></text:p>
          </table:table-cell>
          <table:table-cell office:value-type="float" office:value="119875.51819999999" table:style-name="ce58">
            <text:p><text:s/>119,876<text:s/></text:p>
          </table:table-cell>
          <table:table-cell office:value-type="float" office:value="98015.59203" table:style-name="ce58">
            <text:p><text:s/>98,016<text:s/></text:p>
          </table:table-cell>
          <table:table-cell office:value-type="float" office:value="72504.155350000001" table:style-name="ce33">
            <text:p><text:s/>72,504<text:s/></text:p>
          </table:table-cell>
          <table:table-cell office:value-type="float" office:value="77245.634259999992" table:style-name="ce33">
            <text:p><text:s/>77,246<text:s/></text:p>
          </table:table-cell>
          <table:table-cell office:value-type="float" office:value="82050.732150000011" table:style-name="ce185">
            <text:p><text:s/>82,051<text:s/></text:p>
          </table:table-cell>
          <table:table-cell office:value-type="float" office:value="80696.093899999993" table:style-name="ce185">
            <text:p><text:s/>80,696<text:s/></text:p>
          </table:table-cell>
          <table:table-cell office:value-type="float" office:value="93504.375620000006" table:style-name="ce89">
            <text:p><text:s/>93,504<text:s/></text:p>
          </table:table-cell>
          <table:table-cell office:value-type="float" office:value="68305.518840000004" table:style-name="ce89">
            <text:p><text:s/>68,306<text:s/></text:p>
          </table:table-cell>
          <table:table-cell office:value-type="float" office:value="73207.091620000007" table:style-name="ce89">
            <text:p><text:s/>73,207<text:s/></text:p>
          </table:table-cell>
          <table:table-cell office:value-type="float" office:value="84739.348429999998" table:style-name="ce89">
            <text:p><text:s/>84,739<text:s/></text:p>
          </table:table-cell>
          <table:table-cell office:value-type="float" office:value="131029.85349999997" table:style-name="ce89">
            <text:p><text:s/>131,030<text:s/></text:p>
          </table:table-cell>
          <table:table-cell office:value-type="float" office:value="188663.65778999994" table:style-name="ce89">
            <text:p><text:s/>188,664<text:s/></text:p>
          </table:table-cell>
          <table:table-cell office:value-type="float" office:value="87479.281340000016" table:style-name="ce136">
            <text:p>87,479</text:p>
          </table:table-cell>
          <table:table-cell office:value-type="float" office:value="118753.50672999999" table:style-name="ce136">
            <text:p>118,754</text:p>
          </table:table-cell>
          <table:table-cell office:value-type="float" office:value="132396.53278000001" table:style-name="ce202">
            <text:p>132,397</text:p>
          </table:table-cell>
          <table:table-cell office:value-type="float" office:value="151972.75472999999" table:style-name="ce136">
            <text:p>151,973</text:p>
          </table:table-cell>
          <table:table-cell office:value-type="float" office:value="152122.51578000002" table:style-name="ce304">
            <text:p>152,123</text:p>
          </table:table-cell>
          <table:table-cell office:value-type="float" office:value="153037" table:style-name="ce303">
            <text:p>153,037</text:p>
          </table:table-cell>
          <table:table-cell office:value-type="float" office:value="199584" table:style-name="ce323">
            <text:p>199,58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7">
            <text:p>20</text:p>
          </table:table-cell>
          <table:table-cell office:value-type="string" table:style-name="ce188">
            <text:p>Municipal and Similar Commercial Wastes</text:p>
          </table:table-cell>
          <table:table-cell office:value-type="float" office:value="2048.1660499999994" table:style-name="ce58">
            <text:p><text:s/>2,048<text:s/></text:p>
          </table:table-cell>
          <table:table-cell office:value-type="float" office:value="5854.0228473280367" table:style-name="ce58">
            <text:p><text:s/>5,854<text:s/></text:p>
          </table:table-cell>
          <table:table-cell office:value-type="float" office:value="5695.5630082724892" table:style-name="ce58">
            <text:p><text:s/>5,696<text:s/></text:p>
          </table:table-cell>
          <table:table-cell office:value-type="float" office:value="12325.857855972994" table:style-name="ce58">
            <text:p><text:s/>12,326<text:s/></text:p>
          </table:table-cell>
          <table:table-cell office:value-type="float" office:value="21850.083599999994" table:style-name="ce58">
            <text:p><text:s/>21,850<text:s/></text:p>
          </table:table-cell>
          <table:table-cell office:value-type="float" office:value="15600.335009996284" table:style-name="ce58">
            <text:p><text:s/>15,600<text:s/></text:p>
          </table:table-cell>
          <table:table-cell office:value-type="float" office:value="15930.298900000002" table:style-name="ce58">
            <text:p><text:s/>15,930<text:s/></text:p>
          </table:table-cell>
          <table:table-cell office:value-type="float" office:value="23168.529520000004" table:style-name="ce58">
            <text:p><text:s/>23,169<text:s/></text:p>
          </table:table-cell>
          <table:table-cell office:value-type="float" office:value="27410.781930000005" table:style-name="ce33">
            <text:p><text:s/>27,411<text:s/></text:p>
          </table:table-cell>
          <table:table-cell office:value-type="float" office:value="25144.733550000001" table:style-name="ce33">
            <text:p><text:s/>25,145<text:s/></text:p>
          </table:table-cell>
          <table:table-cell office:value-type="float" office:value="24525.455579999994" table:style-name="ce185">
            <text:p><text:s/>24,525<text:s/></text:p>
          </table:table-cell>
          <table:table-cell office:value-type="float" office:value="29051.641490000002" table:style-name="ce185">
            <text:p><text:s/>29,052<text:s/></text:p>
          </table:table-cell>
          <table:table-cell office:value-type="float" office:value="22104.75863" table:style-name="ce89">
            <text:p><text:s/>22,105<text:s/></text:p>
          </table:table-cell>
          <table:table-cell office:value-type="float" office:value="21482.559880000001" table:style-name="ce89">
            <text:p><text:s/>21,483<text:s/></text:p>
          </table:table-cell>
          <table:table-cell office:value-type="float" office:value="29793.538919999999" table:style-name="ce89">
            <text:p><text:s/>29,794<text:s/></text:p>
          </table:table-cell>
          <table:table-cell office:value-type="float" office:value="38461.310249999995" table:style-name="ce89">
            <text:p><text:s/>38,461<text:s/></text:p>
          </table:table-cell>
          <table:table-cell office:value-type="float" office:value="37981.719109999998" table:style-name="ce89">
            <text:p><text:s/>37,982<text:s/></text:p>
          </table:table-cell>
          <table:table-cell office:value-type="float" office:value="34632.195099999983" table:style-name="ce89">
            <text:p><text:s/>34,632<text:s/></text:p>
          </table:table-cell>
          <table:table-cell office:value-type="float" office:value="34559.379470000007" table:style-name="ce136">
            <text:p>34,559</text:p>
          </table:table-cell>
          <table:table-cell office:value-type="float" office:value="34777.744599999998" table:style-name="ce136">
            <text:p>34,778</text:p>
          </table:table-cell>
          <table:table-cell office:value-type="float" office:value="36057.072319999985" table:style-name="ce202">
            <text:p>36,057</text:p>
          </table:table-cell>
          <table:table-cell office:value-type="float" office:value="40043.009919999997" table:style-name="ce136">
            <text:p>40,043</text:p>
          </table:table-cell>
          <table:table-cell office:value-type="float" office:value="42593.993340000052" table:style-name="ce304">
            <text:p>42,594</text:p>
          </table:table-cell>
          <table:table-cell office:value-type="float" office:value="43541" table:style-name="ce303">
            <text:p>43,541</text:p>
          </table:table-cell>
          <table:table-cell office:value-type="float" office:value="45967" table:style-name="ce323">
            <text:p>45,96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9">
            <text:p>99</text:p>
          </table:table-cell>
          <table:table-cell office:value-type="string" table:style-name="ce190">
            <text:p>Unclassified</text:p>
          </table:table-cell>
          <table:table-cell office:value-type="float" office:value="4806.0869399999992" table:style-name="ce58">
            <text:p><text:s/>4,806<text:s/></text:p>
          </table:table-cell>
          <table:table-cell office:value-type="float" office:value="9239.8310950752348" table:style-name="ce58">
            <text:p><text:s/>9,240<text:s/></text:p>
          </table:table-cell>
          <table:table-cell office:value-type="float" office:value="4234.0168767981231" table:style-name="ce58">
            <text:p><text:s/>4,234<text:s/></text:p>
          </table:table-cell>
          <table:table-cell office:value-type="float" office:value="5147.6942246612161" table:style-name="ce58">
            <text:p><text:s/>5,148<text:s/></text:p>
          </table:table-cell>
          <table:table-cell office:value-type="float" office:value="9429.3954999999987" table:style-name="ce58">
            <text:p><text:s/>9,429<text:s/></text:p>
          </table:table-cell>
          <table:table-cell office:value-type="float" office:value="4710.5332835316658" table:style-name="ce58">
            <text:p><text:s/>4,711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247">
            <text:p><text:s/>-<text:s/></text:p>
          </table:table-cell>
          <table:table-cell office:value-type="float" office:value="0" table:style-name="ce247">
            <text:p><text:s/>-<text:s/></text:p>
          </table:table-cell>
          <table:table-cell office:value-type="float" office:value="0" table:style-name="ce247">
            <text:p><text:s/>-<text:s/></text:p>
          </table:table-cell>
          <table:table-cell office:value-type="float" office:value="0" table:style-name="ce326">
            <text:p><text:s/>-<text:s/></text:p>
          </table:table-cell>
          <table:table-cell office:value-type="float" office:value="0" table:style-name="ce248">
            <text:p><text:s/>-<text:s/></text:p>
          </table:table-cell>
          <table:table-cell table:number-columns-repeated="16356"/>
        </table:table-row>
        <table:table-row table:style-name="ro19">
          <table:table-cell/>
          <table:table-cell table:style-name="ce191"/>
          <table:table-cell office:value-type="string" table:style-name="ce192">
            <text:p>Total<text:s/></text:p>
          </table:table-cell>
          <table:table-cell office:value-type="float" office:value="621191.24108999991" table:formula="of:=SUM([.D15:.D35])" table:style-name="ce116">
            <text:p><text:s/>621,191<text:s/></text:p>
          </table:table-cell>
          <table:table-cell office:value-type="float" office:value="639592.64805438404" table:formula="of:=SUM([.E15:.E35])" table:style-name="ce116">
            <text:p><text:s/>639,593<text:s/></text:p>
          </table:table-cell>
          <table:table-cell office:value-type="float" office:value="584238.71955576714" table:formula="of:=SUM([.F15:.F35])" table:style-name="ce116">
            <text:p><text:s/>584,239<text:s/></text:p>
          </table:table-cell>
          <table:table-cell office:value-type="float" office:value="617390.63237338967" table:formula="of:=SUM([.G15:.G35])" table:style-name="ce116">
            <text:p><text:s/>617,391<text:s/></text:p>
          </table:table-cell>
          <table:table-cell office:value-type="float" office:value="571627.31986000005" table:formula="of:=SUM([.H15:.H35])" table:style-name="ce116">
            <text:p><text:s/>571,627<text:s/></text:p>
          </table:table-cell>
          <table:table-cell office:value-type="float" office:value="801354.7450254563" table:formula="of:=SUM([.I15:.I35])" table:style-name="ce116">
            <text:p><text:s/>801,355<text:s/></text:p>
          </table:table-cell>
          <table:table-cell office:value-type="float" office:value="486602.22502000013" table:formula="of:=SUM([.J15:.J35])" table:style-name="ce193">
            <text:p><text:s/>486,602<text:s/></text:p>
          </table:table-cell>
          <table:table-cell office:value-type="float" office:value="499782.94949000003" table:formula="of:=SUM([.K15:.K35])" table:style-name="ce193">
            <text:p><text:s/>499,783<text:s/></text:p>
          </table:table-cell>
          <table:table-cell office:value-type="float" office:value="457934.0859200001" table:formula="of:=SUM([.L15:.L35])" table:style-name="ce193">
            <text:p><text:s/>457,934<text:s/></text:p>
          </table:table-cell>
          <table:table-cell office:value-type="float" office:value="387485.1698700001" table:formula="of:=SUM([.M15:.M35])" table:style-name="ce193">
            <text:p><text:s/>387,485<text:s/></text:p>
          </table:table-cell>
          <table:table-cell office:value-type="float" office:value="435238.52369000006" table:formula="of:=SUM([.N15:.N35])" table:style-name="ce193">
            <text:p><text:s/>435,239<text:s/></text:p>
          </table:table-cell>
          <table:table-cell office:value-type="float" office:value="460333.18931000005" table:formula="of:=SUM([.O15:.O35])" table:style-name="ce193">
            <text:p><text:s/>460,333<text:s/></text:p>
          </table:table-cell>
          <table:table-cell office:value-type="float" office:value="509092.33902000001" table:formula="of:=SUM([.P15:.P35])" table:style-name="ce193">
            <text:p><text:s/>509,092<text:s/></text:p>
          </table:table-cell>
          <table:table-cell office:value-type="float" office:value="455579.18946000008" table:formula="of:=SUM([.Q15:.Q35])" table:style-name="ce193">
            <text:p><text:s/>455,579<text:s/></text:p>
          </table:table-cell>
          <table:table-cell office:value-type="float" office:value="521534.15080000006" table:formula="of:=SUM([.R15:.R35])" table:style-name="ce193">
            <text:p><text:s/>521,534<text:s/></text:p>
          </table:table-cell>
          <table:table-cell office:value-type="float" office:value="724093.51871999982" table:formula="of:=SUM([.S15:.S35])" table:style-name="ce193">
            <text:p><text:s/>724,094<text:s/></text:p>
          </table:table-cell>
          <table:table-cell office:value-type="float" office:value="620247.5702999999" table:formula="of:=SUM([.T15:.T35])" table:style-name="ce193">
            <text:p><text:s/>620,248<text:s/></text:p>
          </table:table-cell>
          <table:table-cell office:value-type="float" office:value="831378.48744000017" table:formula="of:=SUM([.U15:.U35])" table:style-name="ce193">
            <text:p><text:s/>831,378<text:s/></text:p>
          </table:table-cell>
          <table:table-cell office:value-type="float" office:value="629080.11209000007" table:formula="of:=SUM([.V15:.V35])" table:style-name="ce194">
            <text:p><text:s/>629,080<text:s/></text:p>
          </table:table-cell>
          <table:table-cell office:value-type="float" office:value="680390.20025999995" table:formula="of:=SUM([.W15:.W35])" table:style-name="ce194">
            <text:p><text:s/>680,390<text:s/></text:p>
          </table:table-cell>
          <table:table-cell office:value-type="float" office:value="597400" table:style-name="ce194">
            <text:p><text:s/>597,400<text:s/></text:p>
          </table:table-cell>
          <table:table-cell office:value-type="float" office:value="665629.95857999998" table:formula="of:=SUM([.Y15:.Y35])" table:style-name="ce194">
            <text:p><text:s/>665,630<text:s/></text:p>
          </table:table-cell>
          <table:table-cell office:value-type="float" office:value="732248.07363" table:formula="of:=SUM([.Z15:.Z35])" table:style-name="ce194">
            <text:p><text:s/>732,248<text:s/></text:p>
          </table:table-cell>
          <table:table-cell office:value-type="float" office:value="646304" table:formula="of:=SUM([.AA15:.AA35])" table:style-name="ce325">
            <text:p><text:s/>646,304<text:s/></text:p>
          </table:table-cell>
          <table:table-cell office:value-type="float" office:value="761148" table:style-name="ce194">
            <text:p><text:s/>761,148<text:s/></text:p>
          </table:table-cell>
          <table:table-cell table:number-columns-repeated="16356"/>
        </table:table-row>
        <table:table-row table:style-name="ro5">
          <table:table-cell/>
          <table:table-cell table:style-name="ce15"/>
          <table:table-cell table:number-columns-repeated="15" table:style-name="ce191"/>
          <table:table-cell table:number-columns-repeated="16367" table:style-name="ce15"/>
        </table:table-row>
        <table:table-row table:style-name="ro5">
          <table:table-cell/>
          <table:table-cell table:style-name="ce196"/>
          <table:table-cell table:number-columns-repeated="15" table:style-name="ce177"/>
          <table:table-cell table:number-columns-repeated="16367" table:style-name="ce15"/>
        </table:table-row>
        <table:table-row table:style-name="ro6">
          <table:table-cell/>
          <table:table-cell office:value-type="string" table:style-name="ce16">
            <text:p>Yorkshire and the Humber: Hazardous waste deposited by EWC chapter from 1998 to 2024 (tonnes)</text:p>
          </table:table-cell>
          <table:table-cell table:number-columns-repeated="9" table:style-name="ce197"/>
          <table:table-cell table:number-columns-repeated="6" table:style-name="ce177"/>
          <table:table-cell table:number-columns-repeated="16367" table:style-name="ce15"/>
        </table:table-row>
        <table:table-row table:style-name="ro5">
          <table:table-cell/>
          <table:table-cell table:number-columns-repeated="10" table:style-name="ce197"/>
          <table:table-cell table:number-columns-repeated="6" table:style-name="ce177"/>
          <table:table-cell table:number-columns-repeated="16367" table:style-name="ce15"/>
        </table:table-row>
        <table:table-row table:style-name="ro3">
          <table:table-cell/>
          <table:table-cell office:value-type="string" table:style-name="ce178">
            <text:p>EWC chapter</text:p>
          </table:table-cell>
          <table:table-cell office:value-type="string" table:style-name="ce179">
            <text:p>EWC Chapter Description</text:p>
          </table:table-cell>
          <table:table-cell office:value-type="string" table:style-name="ce178">
            <text:p>1998/9</text:p>
          </table:table-cell>
          <table:table-cell office:value-type="float" office:value="2000" table:style-name="ce179">
            <text:p>2000</text:p>
          </table:table-cell>
          <table:table-cell office:value-type="float" office:value="2001" table:style-name="ce179">
            <text:p>2001</text:p>
          </table:table-cell>
          <table:table-cell office:value-type="float" office:value="2002" table:style-name="ce179">
            <text:p>2002</text:p>
          </table:table-cell>
          <table:table-cell office:value-type="float" office:value="2003" table:style-name="ce179">
            <text:p>2003</text:p>
          </table:table-cell>
          <table:table-cell office:value-type="float" office:value="2004" table:style-name="ce179">
            <text:p>2004</text:p>
          </table:table-cell>
          <table:table-cell office:value-type="float" office:value="2006" table:style-name="ce179">
            <text:p>2006</text:p>
          </table:table-cell>
          <table:table-cell office:value-type="float" office:value="2007" table:style-name="ce179">
            <text:p>2007</text:p>
          </table:table-cell>
          <table:table-cell office:value-type="float" office:value="2008" table:style-name="ce179">
            <text:p>2008</text:p>
          </table:table-cell>
          <table:table-cell office:value-type="float" office:value="2009" table:style-name="ce179">
            <text:p>2009</text:p>
          </table:table-cell>
          <table:table-cell office:value-type="float" office:value="2010" table:style-name="ce179">
            <text:p>2010</text:p>
          </table:table-cell>
          <table:table-cell office:value-type="float" office:value="2011" table:style-name="ce180">
            <text:p>2011</text:p>
          </table:table-cell>
          <table:table-cell office:value-type="float" office:value="2012" table:style-name="ce180">
            <text:p>2012</text:p>
          </table:table-cell>
          <table:table-cell office:value-type="float" office:value="2013" table:style-name="ce179">
            <text:p>2013</text:p>
          </table:table-cell>
          <table:table-cell office:value-type="float" office:value="2014" table:style-name="ce179">
            <text:p>2014</text:p>
          </table:table-cell>
          <table:table-cell office:value-type="float" office:value="2015" table:style-name="ce179">
            <text:p>2015</text:p>
          </table:table-cell>
          <table:table-cell office:value-type="float" office:value="2016" table:style-name="ce179">
            <text:p>2016</text:p>
          </table:table-cell>
          <table:table-cell office:value-type="float" office:value="2017" table:style-name="ce179">
            <text:p>2017</text:p>
          </table:table-cell>
          <table:table-cell office:value-type="float" office:value="2018" table:style-name="ce180">
            <text:p>2018</text:p>
          </table:table-cell>
          <table:table-cell office:value-type="float" office:value="2019" table:style-name="ce180">
            <text:p>2019</text:p>
          </table:table-cell>
          <table:table-cell office:value-type="float" office:value="2020" table:style-name="ce180">
            <text:p>2020</text:p>
          </table:table-cell>
          <table:table-cell office:value-type="float" office:value="2021" table:style-name="ce180">
            <text:p>2021</text:p>
          </table:table-cell>
          <table:table-cell office:value-type="float" office:value="2022" table:style-name="ce327">
            <text:p>2022</text:p>
          </table:table-cell>
          <table:table-cell office:value-type="float" office:value="2023" table:style-name="ce324">
            <text:p>2023</text:p>
          </table:table-cell>
          <table:table-cell office:value-type="float" office:value="2024" table:style-name="ce181">
            <text:p>20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8">
            <text:p>01</text:p>
          </table:table-cell>
          <table:table-cell office:value-type="string" table:style-name="ce199">
            <text:p>Mining and Minerals</text:p>
          </table:table-cell>
          <table:table-cell office:value-type="float" office:value="130.64250000000001" table:style-name="ce200">
            <text:p><text:s/>131<text:s/></text:p>
          </table:table-cell>
          <table:table-cell office:value-type="float" office:value="346.00339372456074" table:style-name="ce200">
            <text:p><text:s/>346<text:s/></text:p>
          </table:table-cell>
          <table:table-cell office:value-type="float" office:value="99.300000637769699" table:style-name="ce200">
            <text:p><text:s/>99<text:s/></text:p>
          </table:table-cell>
          <table:table-cell office:value-type="float" office:value="1838.9072712659836" table:style-name="ce200">
            <text:p><text:s/>1,839<text:s/></text:p>
          </table:table-cell>
          <table:table-cell office:value-type="float" office:value="467.05099999999999" table:style-name="ce200">
            <text:p><text:s/>467<text:s/></text:p>
          </table:table-cell>
          <table:table-cell office:value-type="float" office:value="702.28401823341846" table:style-name="ce200">
            <text:p><text:s/>702<text:s/></text:p>
          </table:table-cell>
          <table:table-cell office:value-type="float" office:value="1799.348" table:style-name="ce82">
            <text:p><text:s/>1,799<text:s/></text:p>
          </table:table-cell>
          <table:table-cell office:value-type="float" office:value="2877.1749999999997" table:style-name="ce201">
            <text:p><text:s/>2,877<text:s/></text:p>
          </table:table-cell>
          <table:table-cell office:value-type="float" office:value="59.56" table:style-name="ce33">
            <text:p><text:s/>60<text:s/></text:p>
          </table:table-cell>
          <table:table-cell office:value-type="float" office:value="197.29599999999999" table:style-name="ce184">
            <text:p><text:s/>197<text:s/></text:p>
          </table:table-cell>
          <table:table-cell office:value-type="float" office:value="179.13659999999996" table:style-name="ce184">
            <text:p><text:s/>179<text:s/></text:p>
          </table:table-cell>
          <table:table-cell office:value-type="float" office:value="225.26100000000002" table:style-name="ce185">
            <text:p><text:s/>225<text:s/></text:p>
          </table:table-cell>
          <table:table-cell office:value-type="float" office:value="526.673" table:style-name="ce89">
            <text:p><text:s/>527<text:s/></text:p>
          </table:table-cell>
          <table:table-cell office:value-type="float" office:value="213.078" table:style-name="ce184">
            <text:p><text:s/>213<text:s/></text:p>
          </table:table-cell>
          <table:table-cell office:value-type="float" office:value="164.16" table:style-name="ce137">
            <text:p><text:s/>164<text:s/></text:p>
          </table:table-cell>
          <table:table-cell office:value-type="float" office:value="23.531000000000002" table:style-name="ce137">
            <text:p><text:s/>24<text:s/></text:p>
          </table:table-cell>
          <table:table-cell office:value-type="float" office:value="12.763" table:style-name="ce137">
            <text:p><text:s/>13<text:s/></text:p>
          </table:table-cell>
          <table:table-cell office:value-type="string" table:style-name="ce137">
            <text:p>-</text:p>
          </table:table-cell>
          <table:table-cell office:value-type="float" office:value="5.0659999999999998" table:style-name="ce202">
            <text:p>5</text:p>
          </table:table-cell>
          <table:table-cell office:value-type="float" office:value="270.64999999999998" table:style-name="ce203">
            <text:p>271</text:p>
          </table:table-cell>
          <table:table-cell office:value-type="float" office:value="30.19" table:style-name="ce136">
            <text:p>30</text:p>
          </table:table-cell>
          <table:table-cell office:value-type="float" office:value="924.33999999999992" table:style-name="ce136">
            <text:p>924</text:p>
          </table:table-cell>
          <table:table-cell office:value-type="float" office:value="294.613" table:style-name="ce304">
            <text:p>295</text:p>
          </table:table-cell>
          <table:table-cell office:value-type="float" office:value="53" table:style-name="ce303">
            <text:p>53</text:p>
          </table:table-cell>
          <table:table-cell office:value-type="float" office:value="333" table:style-name="ce323">
            <text:p>33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02</text:p>
          </table:table-cell>
          <table:table-cell office:value-type="string" table:style-name="ce205">
            <text:p>Agricultural and Food Production</text:p>
          </table:table-cell>
          <table:table-cell office:value-type="float" office:value="322.91092000000003" table:style-name="ce58">
            <text:p><text:s/>323<text:s/></text:p>
          </table:table-cell>
          <table:table-cell office:value-type="float" office:value="411.18216051789932" table:style-name="ce58">
            <text:p><text:s/>411<text:s/></text:p>
          </table:table-cell>
          <table:table-cell office:value-type="float" office:value="579.46538818906993" table:style-name="ce58">
            <text:p><text:s/>579<text:s/></text:p>
          </table:table-cell>
          <table:table-cell office:value-type="float" office:value="850.23489805171266" table:style-name="ce58">
            <text:p><text:s/>850<text:s/></text:p>
          </table:table-cell>
          <table:table-cell office:value-type="float" office:value="339.86557999999997" table:style-name="ce58">
            <text:p><text:s/>340<text:s/></text:p>
          </table:table-cell>
          <table:table-cell office:value-type="float" office:value="433.91117385774851" table:style-name="ce58">
            <text:p><text:s/>434<text:s/></text:p>
          </table:table-cell>
          <table:table-cell office:value-type="float" office:value="51.263300000000001" table:style-name="ce58">
            <text:p><text:s/>51<text:s/></text:p>
          </table:table-cell>
          <table:table-cell office:value-type="float" office:value="148.65" table:style-name="ce206">
            <text:p><text:s/>149<text:s/></text:p>
          </table:table-cell>
          <table:table-cell office:value-type="float" office:value="128.86884999999998" table:style-name="ce33">
            <text:p><text:s/>129<text:s/></text:p>
          </table:table-cell>
          <table:table-cell office:value-type="float" office:value="100.23200000000001" table:style-name="ce185">
            <text:p><text:s/>100<text:s/></text:p>
          </table:table-cell>
          <table:table-cell office:value-type="float" office:value="73.877499999999998" table:style-name="ce185">
            <text:p><text:s/>74<text:s/></text:p>
          </table:table-cell>
          <table:table-cell office:value-type="float" office:value="116.92600000000002" table:style-name="ce185">
            <text:p><text:s/>117<text:s/></text:p>
          </table:table-cell>
          <table:table-cell office:value-type="float" office:value="134.11199999999999" table:style-name="ce89">
            <text:p><text:s/>134<text:s/></text:p>
          </table:table-cell>
          <table:table-cell office:value-type="float" office:value="125.99409999999999" table:style-name="ce185">
            <text:p><text:s/>126<text:s/></text:p>
          </table:table-cell>
          <table:table-cell office:value-type="float" office:value="142.24639999999999" table:style-name="ce89">
            <text:p><text:s/>142<text:s/></text:p>
          </table:table-cell>
          <table:table-cell office:value-type="float" office:value="141.98000000000002" table:style-name="ce89">
            <text:p><text:s/>142<text:s/></text:p>
          </table:table-cell>
          <table:table-cell office:value-type="float" office:value="128.63" table:style-name="ce89">
            <text:p><text:s/>129<text:s/></text:p>
          </table:table-cell>
          <table:table-cell office:value-type="float" office:value="93.712440000000001" table:style-name="ce89">
            <text:p><text:s/>94<text:s/></text:p>
          </table:table-cell>
          <table:table-cell office:value-type="float" office:value="127.80068" table:style-name="ce202">
            <text:p>128</text:p>
          </table:table-cell>
          <table:table-cell office:value-type="float" office:value="213.93061" table:style-name="ce136">
            <text:p>214</text:p>
          </table:table-cell>
          <table:table-cell office:value-type="float" office:value="205.99723000000003" table:style-name="ce136">
            <text:p>206</text:p>
          </table:table-cell>
          <table:table-cell office:value-type="float" office:value="137.82968" table:style-name="ce136">
            <text:p>138</text:p>
          </table:table-cell>
          <table:table-cell office:value-type="float" office:value="80.917900000000003" table:style-name="ce304">
            <text:p>81</text:p>
          </table:table-cell>
          <table:table-cell office:value-type="float" office:value="125" table:style-name="ce303">
            <text:p>125</text:p>
          </table:table-cell>
          <table:table-cell office:value-type="float" office:value="101" table:style-name="ce323">
            <text:p>10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03</text:p>
          </table:table-cell>
          <table:table-cell office:value-type="string" table:style-name="ce205">
            <text:p>Wood and Paper Production</text:p>
          </table:table-cell>
          <table:table-cell office:value-type="float" office:value="427.38878" table:style-name="ce58">
            <text:p><text:s/>427<text:s/></text:p>
          </table:table-cell>
          <table:table-cell office:value-type="float" office:value="153.66322906315327" table:style-name="ce58">
            <text:p><text:s/>154<text:s/></text:p>
          </table:table-cell>
          <table:table-cell office:value-type="float" office:value="274.48810055817012" table:style-name="ce58">
            <text:p><text:s/>274<text:s/></text:p>
          </table:table-cell>
          <table:table-cell office:value-type="float" office:value="821.22851638495922" table:style-name="ce58">
            <text:p><text:s/>821<text:s/></text:p>
          </table:table-cell>
          <table:table-cell office:value-type="float" office:value="494.00165999999996" table:style-name="ce58">
            <text:p><text:s/>494<text:s/></text:p>
          </table:table-cell>
          <table:table-cell office:value-type="float" office:value="507.0989386588335" table:style-name="ce58">
            <text:p><text:s/>507<text:s/></text:p>
          </table:table-cell>
          <table:table-cell office:value-type="float" office:value="82.753500000000003" table:style-name="ce58">
            <text:p><text:s/>83<text:s/></text:p>
          </table:table-cell>
          <table:table-cell office:value-type="float" office:value="62.342500000000001" table:style-name="ce206">
            <text:p><text:s/>62<text:s/></text:p>
          </table:table-cell>
          <table:table-cell office:value-type="float" office:value="65.144999999999996" table:style-name="ce33">
            <text:p><text:s/>65<text:s/></text:p>
          </table:table-cell>
          <table:table-cell office:value-type="float" office:value="18.762" table:style-name="ce185">
            <text:p><text:s/>19<text:s/></text:p>
          </table:table-cell>
          <table:table-cell office:value-type="float" office:value="5.0784000000000002" table:style-name="ce185">
            <text:p><text:s/>5<text:s/></text:p>
          </table:table-cell>
          <table:table-cell office:value-type="float" office:value="8.9410000000000007" table:style-name="ce185">
            <text:p><text:s/>9<text:s/></text:p>
          </table:table-cell>
          <table:table-cell office:value-type="float" office:value="42.683999999999997" table:style-name="ce89">
            <text:p><text:s/>43<text:s/></text:p>
          </table:table-cell>
          <table:table-cell office:value-type="float" office:value="1.25" table:style-name="ce185">
            <text:p><text:s/>1<text:s/></text:p>
          </table:table-cell>
          <table:table-cell office:value-type="float" office:value="44.814999999999998" table:style-name="ce89">
            <text:p><text:s/>45<text:s/></text:p>
          </table:table-cell>
          <table:table-cell office:value-type="float" office:value="49.250999999999998" table:style-name="ce89">
            <text:p><text:s/>49<text:s/></text:p>
          </table:table-cell>
          <table:table-cell office:value-type="float" office:value="0.63200000000000001" table:style-name="ce89">
            <text:p><text:s/>1<text:s/></text:p>
          </table:table-cell>
          <table:table-cell office:value-type="float" office:value="6.5149999999999997" table:style-name="ce89">
            <text:p><text:s/>7<text:s/></text:p>
          </table:table-cell>
          <table:table-cell office:value-type="float" office:value="20.718" table:style-name="ce202">
            <text:p>21</text:p>
          </table:table-cell>
          <table:table-cell office:value-type="float" office:value="40.636000000000003" table:style-name="ce136">
            <text:p>41</text:p>
          </table:table-cell>
          <table:table-cell office:value-type="float" office:value="2.3249999999999997" table:style-name="ce136">
            <text:p>2</text:p>
          </table:table-cell>
          <table:table-cell office:value-type="float" office:value="37.064" table:style-name="ce136">
            <text:p>37</text:p>
          </table:table-cell>
          <table:table-cell office:value-type="float" office:value="28.263999999999999" table:style-name="ce304">
            <text:p>28</text:p>
          </table:table-cell>
          <table:table-cell office:value-type="float" office:value="336" table:style-name="ce303">
            <text:p>336</text:p>
          </table:table-cell>
          <table:table-cell office:value-type="float" office:value="36" table:style-name="ce323">
            <text:p>3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04</text:p>
          </table:table-cell>
          <table:table-cell office:value-type="string" table:style-name="ce205">
            <text:p>Leather and Textile Production</text:p>
          </table:table-cell>
          <table:table-cell office:value-type="float" office:value="341.36295999999999" table:style-name="ce58">
            <text:p><text:s/>341<text:s/></text:p>
          </table:table-cell>
          <table:table-cell office:value-type="float" office:value="905.85414959490299" table:style-name="ce58">
            <text:p><text:s/>906<text:s/></text:p>
          </table:table-cell>
          <table:table-cell office:value-type="float" office:value="829.89948154985905" table:style-name="ce58">
            <text:p><text:s/>830<text:s/></text:p>
          </table:table-cell>
          <table:table-cell office:value-type="float" office:value="706.67300154082477" table:style-name="ce58">
            <text:p><text:s/>707<text:s/></text:p>
          </table:table-cell>
          <table:table-cell office:value-type="float" office:value="3391.6677799999993" table:style-name="ce58">
            <text:p><text:s/>3,392<text:s/></text:p>
          </table:table-cell>
          <table:table-cell office:value-type="float" office:value="4099.2134185731411" table:style-name="ce58">
            <text:p><text:s/>4,099<text:s/></text:p>
          </table:table-cell>
          <table:table-cell office:value-type="float" office:value="178.233" table:style-name="ce58">
            <text:p><text:s/>178<text:s/></text:p>
          </table:table-cell>
          <table:table-cell office:value-type="float" office:value="200.62650000000002" table:style-name="ce206">
            <text:p><text:s/>201<text:s/></text:p>
          </table:table-cell>
          <table:table-cell office:value-type="float" office:value="192.17400000000001" table:style-name="ce33">
            <text:p><text:s/>192<text:s/></text:p>
          </table:table-cell>
          <table:table-cell office:value-type="float" office:value="143.977" table:style-name="ce185">
            <text:p><text:s/>144<text:s/></text:p>
          </table:table-cell>
          <table:table-cell office:value-type="float" office:value="195.2141" table:style-name="ce185">
            <text:p><text:s/>195<text:s/></text:p>
          </table:table-cell>
          <table:table-cell office:value-type="float" office:value="194.64010000000002" table:style-name="ce185">
            <text:p><text:s/>195<text:s/></text:p>
          </table:table-cell>
          <table:table-cell office:value-type="float" office:value="211.53100000000001" table:style-name="ce89">
            <text:p><text:s/>212<text:s/></text:p>
          </table:table-cell>
          <table:table-cell office:value-type="float" office:value="195.61500000000001" table:style-name="ce185">
            <text:p><text:s/>196<text:s/></text:p>
          </table:table-cell>
          <table:table-cell office:value-type="float" office:value="158.012" table:style-name="ce89">
            <text:p><text:s/>158<text:s/></text:p>
          </table:table-cell>
          <table:table-cell office:value-type="float" office:value="103.05153" table:style-name="ce89">
            <text:p><text:s/>103<text:s/></text:p>
          </table:table-cell>
          <table:table-cell office:value-type="float" office:value="153.69300000000004" table:style-name="ce89">
            <text:p><text:s/>154<text:s/></text:p>
          </table:table-cell>
          <table:table-cell office:value-type="float" office:value="133.119" table:style-name="ce89">
            <text:p><text:s/>133<text:s/></text:p>
          </table:table-cell>
          <table:table-cell office:value-type="float" office:value="125" table:style-name="ce202">
            <text:p>125</text:p>
          </table:table-cell>
          <table:table-cell office:value-type="float" office:value="121.827" table:style-name="ce136">
            <text:p>122</text:p>
          </table:table-cell>
          <table:table-cell office:value-type="float" office:value="28.062000000000001" table:style-name="ce136">
            <text:p>28</text:p>
          </table:table-cell>
          <table:table-cell office:value-type="float" office:value="1.5649999999999999" table:style-name="ce136">
            <text:p>2</text:p>
          </table:table-cell>
          <table:table-cell office:value-type="float" office:value="1.25" table:style-name="ce304">
            <text:p>1</text:p>
          </table:table-cell>
          <table:table-cell office:value-type="float" office:value="0" table:style-name="ce303">
            <text:p>0</text:p>
          </table:table-cell>
          <table:table-cell office:value-type="float" office:value="2" table:style-name="ce323">
            <text:p>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05</text:p>
          </table:table-cell>
          <table:table-cell office:value-type="string" table:style-name="ce207">
            <text:p>Petrol, Gas and Coal Refining/Treatment</text:p>
          </table:table-cell>
          <table:table-cell office:value-type="float" office:value="109465.49721999999" table:style-name="ce83">
            <text:p><text:s/>109,465<text:s/></text:p>
          </table:table-cell>
          <table:table-cell office:value-type="float" office:value="5806.9317567571998" table:style-name="ce58">
            <text:p><text:s/>5,807<text:s/></text:p>
          </table:table-cell>
          <table:table-cell office:value-type="float" office:value="17325.248677514493" table:style-name="ce58">
            <text:p><text:s/>17,325<text:s/></text:p>
          </table:table-cell>
          <table:table-cell office:value-type="float" office:value="9131.6662433324382" table:style-name="ce58">
            <text:p><text:s/>9,132<text:s/></text:p>
          </table:table-cell>
          <table:table-cell office:value-type="float" office:value="9154.5419199999978" table:style-name="ce58">
            <text:p><text:s/>9,155<text:s/></text:p>
          </table:table-cell>
          <table:table-cell office:value-type="float" office:value="13004.433881601319" table:style-name="ce58">
            <text:p><text:s/>13,004<text:s/></text:p>
          </table:table-cell>
          <table:table-cell office:value-type="float" office:value="1252.3010199999999" table:style-name="ce58">
            <text:p><text:s/>1,252<text:s/></text:p>
          </table:table-cell>
          <table:table-cell office:value-type="float" office:value="1719.6783799999998" table:style-name="ce206">
            <text:p><text:s/>1,720<text:s/></text:p>
          </table:table-cell>
          <table:table-cell office:value-type="float" office:value="966.00824999999998" table:style-name="ce33">
            <text:p><text:s/>966<text:s/></text:p>
          </table:table-cell>
          <table:table-cell office:value-type="float" office:value="544.2165" table:style-name="ce185">
            <text:p><text:s/>544<text:s/></text:p>
          </table:table-cell>
          <table:table-cell office:value-type="float" office:value="900.25769999999989" table:style-name="ce185">
            <text:p><text:s/>900<text:s/></text:p>
          </table:table-cell>
          <table:table-cell office:value-type="float" office:value="263.40800000000002" table:style-name="ce185">
            <text:p><text:s/>263<text:s/></text:p>
          </table:table-cell>
          <table:table-cell office:value-type="float" office:value="356.64499999999998" table:style-name="ce89">
            <text:p><text:s/>357<text:s/></text:p>
          </table:table-cell>
          <table:table-cell office:value-type="float" office:value="298.88400000000001" table:style-name="ce185">
            <text:p><text:s/>299<text:s/></text:p>
          </table:table-cell>
          <table:table-cell office:value-type="float" office:value="156.79000000000002" table:style-name="ce89">
            <text:p><text:s/>157<text:s/></text:p>
          </table:table-cell>
          <table:table-cell office:value-type="float" office:value="124.754" table:style-name="ce89">
            <text:p><text:s/>125<text:s/></text:p>
          </table:table-cell>
          <table:table-cell office:value-type="float" office:value="1735.9469999999992" table:style-name="ce89">
            <text:p><text:s/>1,736<text:s/></text:p>
          </table:table-cell>
          <table:table-cell office:value-type="float" office:value="2065.8249999999998" table:style-name="ce89">
            <text:p><text:s/>2,066<text:s/></text:p>
          </table:table-cell>
          <table:table-cell office:value-type="float" office:value="26.768999999999998" table:style-name="ce202">
            <text:p>27</text:p>
          </table:table-cell>
          <table:table-cell office:value-type="float" office:value="287.71100000000001" table:style-name="ce136">
            <text:p>288</text:p>
          </table:table-cell>
          <table:table-cell office:value-type="float" office:value="28.997" table:style-name="ce136">
            <text:p>29</text:p>
          </table:table-cell>
          <table:table-cell office:value-type="float" office:value="7.3010000000000002" table:style-name="ce136">
            <text:p>7</text:p>
          </table:table-cell>
          <table:table-cell office:value-type="float" office:value="59.31" table:style-name="ce304">
            <text:p>59</text:p>
          </table:table-cell>
          <table:table-cell office:value-type="float" office:value="2" table:style-name="ce303">
            <text:p>2</text:p>
          </table:table-cell>
          <table:table-cell office:value-type="float" office:value="30" table:style-name="ce323">
            <text:p>3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06</text:p>
          </table:table-cell>
          <table:table-cell office:value-type="string" table:style-name="ce207">
            <text:p>Inorganic Chemical Processes</text:p>
          </table:table-cell>
          <table:table-cell office:value-type="float" office:value="40358.11559999999" table:style-name="ce83">
            <text:p><text:s/>40,358<text:s/></text:p>
          </table:table-cell>
          <table:table-cell office:value-type="float" office:value="56675.452727815471" table:style-name="ce58">
            <text:p><text:s/>56,675<text:s/></text:p>
          </table:table-cell>
          <table:table-cell office:value-type="float" office:value="41191.709081202353" table:style-name="ce58">
            <text:p><text:s/>41,192<text:s/></text:p>
          </table:table-cell>
          <table:table-cell office:value-type="float" office:value="58555.191159943075" table:style-name="ce58">
            <text:p><text:s/>58,555<text:s/></text:p>
          </table:table-cell>
          <table:table-cell office:value-type="float" office:value="42111.641100000023" table:style-name="ce58">
            <text:p><text:s/>42,112<text:s/></text:p>
          </table:table-cell>
          <table:table-cell office:value-type="float" office:value="25594.219972073704" table:style-name="ce58">
            <text:p><text:s/>25,594<text:s/></text:p>
          </table:table-cell>
          <table:table-cell office:value-type="float" office:value="20294.316130000003" table:style-name="ce58">
            <text:p><text:s/>20,294<text:s/></text:p>
          </table:table-cell>
          <table:table-cell office:value-type="float" office:value="20590.080419999998" table:style-name="ce206">
            <text:p><text:s/>20,590<text:s/></text:p>
          </table:table-cell>
          <table:table-cell office:value-type="float" office:value="18354.337340000005" table:style-name="ce33">
            <text:p><text:s/>18,354<text:s/></text:p>
          </table:table-cell>
          <table:table-cell office:value-type="float" office:value="17688.789819999991" table:style-name="ce185">
            <text:p><text:s/>17,689<text:s/></text:p>
          </table:table-cell>
          <table:table-cell office:value-type="float" office:value="15277.857510000002" table:style-name="ce185">
            <text:p><text:s/>15,278<text:s/></text:p>
          </table:table-cell>
          <table:table-cell office:value-type="float" office:value="16828.171969999996" table:style-name="ce185">
            <text:p><text:s/>16,828<text:s/></text:p>
          </table:table-cell>
          <table:table-cell office:value-type="float" office:value="7219.1770999999999" table:style-name="ce89">
            <text:p><text:s/>7,219<text:s/></text:p>
          </table:table-cell>
          <table:table-cell office:value-type="float" office:value="8732.3223699999999" table:style-name="ce185">
            <text:p><text:s/>8,732<text:s/></text:p>
          </table:table-cell>
          <table:table-cell office:value-type="float" office:value="6399.2565700000005" table:style-name="ce89">
            <text:p><text:s/>6,399<text:s/></text:p>
          </table:table-cell>
          <table:table-cell office:value-type="float" office:value="11110.573899999999" table:style-name="ce89">
            <text:p><text:s/>11,111<text:s/></text:p>
          </table:table-cell>
          <table:table-cell office:value-type="float" office:value="16049.947719999996" table:style-name="ce89">
            <text:p><text:s/>16,050<text:s/></text:p>
          </table:table-cell>
          <table:table-cell office:value-type="float" office:value="16029.475710000001" table:style-name="ce89">
            <text:p><text:s/>16,029<text:s/></text:p>
          </table:table-cell>
          <table:table-cell office:value-type="float" office:value="15917.043299999998" table:style-name="ce202">
            <text:p>15,917</text:p>
          </table:table-cell>
          <table:table-cell office:value-type="float" office:value="17358.958400000003" table:style-name="ce136">
            <text:p>17,359</text:p>
          </table:table-cell>
          <table:table-cell office:value-type="float" office:value="17829.330930000004" table:style-name="ce136">
            <text:p>17,829</text:p>
          </table:table-cell>
          <table:table-cell office:value-type="float" office:value="15596.261480000005" table:style-name="ce136">
            <text:p>15,596</text:p>
          </table:table-cell>
          <table:table-cell office:value-type="float" office:value="14129.773200000003" table:style-name="ce304">
            <text:p>14,130</text:p>
          </table:table-cell>
          <table:table-cell office:value-type="float" office:value="12692" table:style-name="ce303">
            <text:p>12,692</text:p>
          </table:table-cell>
          <table:table-cell office:value-type="float" office:value="13204" table:style-name="ce323">
            <text:p>13,20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07</text:p>
          </table:table-cell>
          <table:table-cell office:value-type="string" table:style-name="ce207">
            <text:p>Organic Chemical Processes</text:p>
          </table:table-cell>
          <table:table-cell office:value-type="float" office:value="67214.920530000032" table:style-name="ce208">
            <text:p><text:s/>67,215<text:s/></text:p>
          </table:table-cell>
          <table:table-cell office:value-type="float" office:value="86480.712066951339" table:style-name="ce206">
            <text:p><text:s/>86,481<text:s/></text:p>
          </table:table-cell>
          <table:table-cell office:value-type="float" office:value="84872.48535621661" table:style-name="ce206">
            <text:p><text:s/>84,872<text:s/></text:p>
          </table:table-cell>
          <table:table-cell office:value-type="float" office:value="89088.67951739188" table:style-name="ce206">
            <text:p><text:s/>89,089<text:s/></text:p>
          </table:table-cell>
          <table:table-cell office:value-type="float" office:value="84441.592150000011" table:style-name="ce206">
            <text:p><text:s/>84,442<text:s/></text:p>
          </table:table-cell>
          <table:table-cell office:value-type="float" office:value="93703.373181797564" table:style-name="ce58">
            <text:p><text:s/>93,703<text:s/></text:p>
          </table:table-cell>
          <table:table-cell office:value-type="float" office:value="31728.147180000014" table:style-name="ce58">
            <text:p><text:s/>31,728<text:s/></text:p>
          </table:table-cell>
          <table:table-cell office:value-type="float" office:value="38066.201150000008" table:style-name="ce206">
            <text:p><text:s/>38,066<text:s/></text:p>
          </table:table-cell>
          <table:table-cell office:value-type="float" office:value="37791.153630000001" table:style-name="ce33">
            <text:p><text:s/>37,791<text:s/></text:p>
          </table:table-cell>
          <table:table-cell office:value-type="float" office:value="26019.441610000002" table:style-name="ce185">
            <text:p><text:s/>26,019<text:s/></text:p>
          </table:table-cell>
          <table:table-cell office:value-type="float" office:value="25250.40265" table:style-name="ce185">
            <text:p><text:s/>25,250<text:s/></text:p>
          </table:table-cell>
          <table:table-cell office:value-type="float" office:value="29542.592559999983" table:style-name="ce185">
            <text:p><text:s/>29,543<text:s/></text:p>
          </table:table-cell>
          <table:table-cell office:value-type="float" office:value="32149.1175" table:style-name="ce89">
            <text:p><text:s/>32,149<text:s/></text:p>
          </table:table-cell>
          <table:table-cell office:value-type="float" office:value="47855.478239999997" table:style-name="ce185">
            <text:p><text:s/>47,855<text:s/></text:p>
          </table:table-cell>
          <table:table-cell office:value-type="float" office:value="86385.251730000018" table:style-name="ce89">
            <text:p><text:s/>86,385<text:s/></text:p>
          </table:table-cell>
          <table:table-cell office:value-type="float" office:value="109315.04145000002" table:style-name="ce89">
            <text:p><text:s/>109,315<text:s/></text:p>
          </table:table-cell>
          <table:table-cell office:value-type="float" office:value="103383.57797999996" table:style-name="ce89">
            <text:p><text:s/>103,384<text:s/></text:p>
          </table:table-cell>
          <table:table-cell office:value-type="float" office:value="85219.835100000011" table:style-name="ce89">
            <text:p><text:s/>85,220<text:s/></text:p>
          </table:table-cell>
          <table:table-cell office:value-type="float" office:value="60774.198599999982" table:style-name="ce202">
            <text:p>60,774</text:p>
          </table:table-cell>
          <table:table-cell office:value-type="float" office:value="32868.372729999995" table:style-name="ce136">
            <text:p>32,868</text:p>
          </table:table-cell>
          <table:table-cell office:value-type="float" office:value="21540.86559999999" table:style-name="ce136">
            <text:p>21,541</text:p>
          </table:table-cell>
          <table:table-cell office:value-type="float" office:value="8381.9977899999976" table:style-name="ce136">
            <text:p>8,382</text:p>
          </table:table-cell>
          <table:table-cell office:value-type="float" office:value="6484.038700000001" table:style-name="ce304">
            <text:p>6,484</text:p>
          </table:table-cell>
          <table:table-cell office:value-type="float" office:value="6464" table:style-name="ce303">
            <text:p>6,464</text:p>
          </table:table-cell>
          <table:table-cell office:value-type="float" office:value="5501" table:style-name="ce323">
            <text:p>5,50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08</text:p>
          </table:table-cell>
          <table:table-cell office:value-type="string" table:style-name="ce207">
            <text:p>MFSU Paints, Varnish, Adhesive and Inks</text:p>
          </table:table-cell>
          <table:table-cell office:value-type="float" office:value="30534.481239999976" table:style-name="ce208">
            <text:p><text:s/>30,534<text:s/></text:p>
          </table:table-cell>
          <table:table-cell office:value-type="float" office:value="30069.058283028309" table:style-name="ce206">
            <text:p><text:s/>30,069<text:s/></text:p>
          </table:table-cell>
          <table:table-cell office:value-type="float" office:value="31504.891534855047" table:style-name="ce206">
            <text:p><text:s/>31,505<text:s/></text:p>
          </table:table-cell>
          <table:table-cell office:value-type="float" office:value="29687.930177097442" table:style-name="ce206">
            <text:p><text:s/>29,688<text:s/></text:p>
          </table:table-cell>
          <table:table-cell office:value-type="float" office:value="24681.285019999996" table:style-name="ce206">
            <text:p><text:s/>24,681<text:s/></text:p>
          </table:table-cell>
          <table:table-cell office:value-type="float" office:value="27429.19563707232" table:style-name="ce206">
            <text:p><text:s/>27,429<text:s/></text:p>
          </table:table-cell>
          <table:table-cell office:value-type="float" office:value="45629.331390000036" table:style-name="ce58">
            <text:p><text:s/>45,629<text:s/></text:p>
          </table:table-cell>
          <table:table-cell office:value-type="float" office:value="26542.724590000013" table:style-name="ce206">
            <text:p><text:s/>26,543<text:s/></text:p>
          </table:table-cell>
          <table:table-cell office:value-type="float" office:value="30169.74145000002" table:style-name="ce33">
            <text:p><text:s/>30,170<text:s/></text:p>
          </table:table-cell>
          <table:table-cell office:value-type="float" office:value="22335.401359999996" table:style-name="ce185">
            <text:p><text:s/>22,335<text:s/></text:p>
          </table:table-cell>
          <table:table-cell office:value-type="float" office:value="21921.917899999993" table:style-name="ce185">
            <text:p><text:s/>21,922<text:s/></text:p>
          </table:table-cell>
          <table:table-cell office:value-type="float" office:value="22312.527110000014" table:style-name="ce185">
            <text:p><text:s/>22,313<text:s/></text:p>
          </table:table-cell>
          <table:table-cell office:value-type="float" office:value="23970.68015" table:style-name="ce89">
            <text:p><text:s/>23,971<text:s/></text:p>
          </table:table-cell>
          <table:table-cell office:value-type="float" office:value="27686.252569999997" table:style-name="ce185">
            <text:p><text:s/>27,686<text:s/></text:p>
          </table:table-cell>
          <table:table-cell office:value-type="float" office:value="21390.265129999996" table:style-name="ce89">
            <text:p><text:s/>21,390<text:s/></text:p>
          </table:table-cell>
          <table:table-cell office:value-type="float" office:value="20178.919320000001" table:style-name="ce89">
            <text:p><text:s/>20,179<text:s/></text:p>
          </table:table-cell>
          <table:table-cell office:value-type="float" office:value="15712.674509999999" table:style-name="ce89">
            <text:p><text:s/>15,713<text:s/></text:p>
          </table:table-cell>
          <table:table-cell office:value-type="float" office:value="16195.786150000007" table:style-name="ce89">
            <text:p><text:s/>16,196<text:s/></text:p>
          </table:table-cell>
          <table:table-cell office:value-type="float" office:value="14356.226860000004" table:style-name="ce202">
            <text:p>14,356</text:p>
          </table:table-cell>
          <table:table-cell office:value-type="float" office:value="15469.021360000008" table:style-name="ce136">
            <text:p>15,469</text:p>
          </table:table-cell>
          <table:table-cell office:value-type="float" office:value="11812.081030000001" table:style-name="ce136">
            <text:p>11,812</text:p>
          </table:table-cell>
          <table:table-cell office:value-type="float" office:value="10697.89359" table:style-name="ce136">
            <text:p>10,698</text:p>
          </table:table-cell>
          <table:table-cell office:value-type="float" office:value="8164.1349699999955" table:style-name="ce304">
            <text:p>8,164</text:p>
          </table:table-cell>
          <table:table-cell office:value-type="float" office:value="7537" table:style-name="ce303">
            <text:p>7,537</text:p>
          </table:table-cell>
          <table:table-cell office:value-type="float" office:value="7912" table:style-name="ce323">
            <text:p>7,91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09</text:p>
          </table:table-cell>
          <table:table-cell office:value-type="string" table:style-name="ce205">
            <text:p>Photographic Industry</text:p>
          </table:table-cell>
          <table:table-cell office:value-type="float" office:value="916.67710999999974" table:style-name="ce206">
            <text:p><text:s/>917<text:s/></text:p>
          </table:table-cell>
          <table:table-cell office:value-type="float" office:value="610.24483655393124" table:style-name="ce206">
            <text:p><text:s/>610<text:s/></text:p>
          </table:table-cell>
          <table:table-cell office:value-type="float" office:value="6612.2497421558946" table:style-name="ce206">
            <text:p><text:s/>6,612<text:s/></text:p>
          </table:table-cell>
          <table:table-cell office:value-type="float" office:value="11448.56312041718" table:style-name="ce206">
            <text:p><text:s/>11,449<text:s/></text:p>
          </table:table-cell>
          <table:table-cell office:value-type="float" office:value="10955.263800000001" table:style-name="ce206">
            <text:p><text:s/>10,955<text:s/></text:p>
          </table:table-cell>
          <table:table-cell office:value-type="float" office:value="9906.411236949265" table:style-name="ce206">
            <text:p><text:s/>9,906<text:s/></text:p>
          </table:table-cell>
          <table:table-cell office:value-type="float" office:value="1887.1988299999987" table:style-name="ce58">
            <text:p><text:s/>1,887<text:s/></text:p>
          </table:table-cell>
          <table:table-cell office:value-type="float" office:value="343.77723000000009" table:style-name="ce206">
            <text:p><text:s/>344<text:s/></text:p>
          </table:table-cell>
          <table:table-cell office:value-type="float" office:value="91.032750000000007" table:style-name="ce33">
            <text:p><text:s/>91<text:s/></text:p>
          </table:table-cell>
          <table:table-cell office:value-type="float" office:value="58.369799999999991" table:style-name="ce185">
            <text:p><text:s/>58<text:s/></text:p>
          </table:table-cell>
          <table:table-cell office:value-type="float" office:value="115.83433999999998" table:style-name="ce185">
            <text:p><text:s/>116<text:s/></text:p>
          </table:table-cell>
          <table:table-cell office:value-type="float" office:value="485.93709999999999" table:style-name="ce185">
            <text:p><text:s/>486<text:s/></text:p>
          </table:table-cell>
          <table:table-cell office:value-type="float" office:value="1412.7057499999999" table:style-name="ce89">
            <text:p><text:s/>1,413<text:s/></text:p>
          </table:table-cell>
          <table:table-cell office:value-type="float" office:value="1244.8620000000001" table:style-name="ce185">
            <text:p><text:s/>1,245<text:s/></text:p>
          </table:table-cell>
          <table:table-cell office:value-type="float" office:value="800.73400000000004" table:style-name="ce89">
            <text:p><text:s/>801<text:s/></text:p>
          </table:table-cell>
          <table:table-cell office:value-type="float" office:value="549.7059999999999" table:style-name="ce89">
            <text:p><text:s/>550<text:s/></text:p>
          </table:table-cell>
          <table:table-cell office:value-type="float" office:value="520.28359999999986" table:style-name="ce89">
            <text:p><text:s/>520<text:s/></text:p>
          </table:table-cell>
          <table:table-cell office:value-type="float" office:value="577.81399999999996" table:style-name="ce89">
            <text:p><text:s/>578<text:s/></text:p>
          </table:table-cell>
          <table:table-cell office:value-type="float" office:value="515.90899999999999" table:style-name="ce202">
            <text:p>516</text:p>
          </table:table-cell>
          <table:table-cell office:value-type="float" office:value="430.45929999999998" table:style-name="ce136">
            <text:p>430</text:p>
          </table:table-cell>
          <table:table-cell office:value-type="float" office:value="274.50900000000024" table:style-name="ce136">
            <text:p>275</text:p>
          </table:table-cell>
          <table:table-cell office:value-type="float" office:value="216.04099000000002" table:style-name="ce136">
            <text:p>216</text:p>
          </table:table-cell>
          <table:table-cell office:value-type="float" office:value="262.34150000000022" table:style-name="ce304">
            <text:p>262</text:p>
          </table:table-cell>
          <table:table-cell office:value-type="float" office:value="281" table:style-name="ce303">
            <text:p>281</text:p>
          </table:table-cell>
          <table:table-cell office:value-type="float" office:value="307" table:style-name="ce323">
            <text:p>30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0</text:p>
          </table:table-cell>
          <table:table-cell office:value-type="string" table:style-name="ce205">
            <text:p>Thermal Process Waste (inorganic)</text:p>
          </table:table-cell>
          <table:table-cell office:value-type="float" office:value="30698.451489999989" table:style-name="ce206">
            <text:p><text:s/>30,698<text:s/></text:p>
          </table:table-cell>
          <table:table-cell office:value-type="float" office:value="43207.624794741161" table:style-name="ce206">
            <text:p><text:s/>43,208<text:s/></text:p>
          </table:table-cell>
          <table:table-cell office:value-type="float" office:value="60139.189453427767" table:style-name="ce206">
            <text:p><text:s/>60,139<text:s/></text:p>
          </table:table-cell>
          <table:table-cell office:value-type="float" office:value="42134.16278696619" table:style-name="ce206">
            <text:p><text:s/>42,134<text:s/></text:p>
          </table:table-cell>
          <table:table-cell office:value-type="float" office:value="33544.735699999997" table:style-name="ce206">
            <text:p><text:s/>33,545<text:s/></text:p>
          </table:table-cell>
          <table:table-cell office:value-type="float" office:value="24367.268573727313" table:style-name="ce206">
            <text:p><text:s/>24,367<text:s/></text:p>
          </table:table-cell>
          <table:table-cell office:value-type="float" office:value="21140.315640000001" table:style-name="ce58">
            <text:p><text:s/>21,140<text:s/></text:p>
          </table:table-cell>
          <table:table-cell office:value-type="float" office:value="22915.18634" table:style-name="ce206">
            <text:p><text:s/>22,915<text:s/></text:p>
          </table:table-cell>
          <table:table-cell office:value-type="float" office:value="19837.8053" table:style-name="ce33">
            <text:p><text:s/>19,838<text:s/></text:p>
          </table:table-cell>
          <table:table-cell office:value-type="float" office:value="8073.0140000000001" table:style-name="ce185">
            <text:p><text:s/>8,073<text:s/></text:p>
          </table:table-cell>
          <table:table-cell office:value-type="float" office:value="5035.5319999999992" table:style-name="ce185">
            <text:p><text:s/>5,036<text:s/></text:p>
          </table:table-cell>
          <table:table-cell office:value-type="float" office:value="8649.5793599999997" table:style-name="ce185">
            <text:p><text:s/>8,650<text:s/></text:p>
          </table:table-cell>
          <table:table-cell office:value-type="float" office:value="18259.28786" table:style-name="ce89">
            <text:p><text:s/>18,259<text:s/></text:p>
          </table:table-cell>
          <table:table-cell office:value-type="float" office:value="20415.700080000002" table:style-name="ce185">
            <text:p><text:s/>20,416<text:s/></text:p>
          </table:table-cell>
          <table:table-cell office:value-type="float" office:value="25671.706989999999" table:style-name="ce89">
            <text:p><text:s/>25,672<text:s/></text:p>
          </table:table-cell>
          <table:table-cell office:value-type="float" office:value="37814.576000000001" table:style-name="ce89">
            <text:p><text:s/>37,815<text:s/></text:p>
          </table:table-cell>
          <table:table-cell office:value-type="float" office:value="37733.228999999992" table:style-name="ce89">
            <text:p><text:s/>37,733<text:s/></text:p>
          </table:table-cell>
          <table:table-cell office:value-type="float" office:value="35786.022100000002" table:style-name="ce89">
            <text:p><text:s/>35,786<text:s/></text:p>
          </table:table-cell>
          <table:table-cell office:value-type="float" office:value="32073.134000000002" table:style-name="ce202">
            <text:p>32,073</text:p>
          </table:table-cell>
          <table:table-cell office:value-type="float" office:value="35295.430850000004" table:style-name="ce136">
            <text:p>35,295</text:p>
          </table:table-cell>
          <table:table-cell office:value-type="float" office:value="30981.307999999997" table:style-name="ce136">
            <text:p>30,981</text:p>
          </table:table-cell>
          <table:table-cell office:value-type="float" office:value="35473.105499999991" table:style-name="ce136">
            <text:p>35,473</text:p>
          </table:table-cell>
          <table:table-cell office:value-type="float" office:value="40673.885999999999" table:style-name="ce304">
            <text:p>40,674</text:p>
          </table:table-cell>
          <table:table-cell office:value-type="float" office:value="45401" table:style-name="ce303">
            <text:p>45,401</text:p>
          </table:table-cell>
          <table:table-cell office:value-type="float" office:value="96267" table:style-name="ce323">
            <text:p>96,26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1</text:p>
          </table:table-cell>
          <table:table-cell office:value-type="string" table:style-name="ce205">
            <text:p>Metal Treatment and Coating Processes</text:p>
          </table:table-cell>
          <table:table-cell office:value-type="float" office:value="30218.565729999991" table:style-name="ce206">
            <text:p><text:s/>30,219<text:s/></text:p>
          </table:table-cell>
          <table:table-cell office:value-type="float" office:value="23491.46983928909" table:style-name="ce206">
            <text:p><text:s/>23,491<text:s/></text:p>
          </table:table-cell>
          <table:table-cell office:value-type="float" office:value="24352.898593129048" table:style-name="ce206">
            <text:p><text:s/>24,353<text:s/></text:p>
          </table:table-cell>
          <table:table-cell office:value-type="float" office:value="31420.124398656189" table:style-name="ce206">
            <text:p><text:s/>31,420<text:s/></text:p>
          </table:table-cell>
          <table:table-cell office:value-type="float" office:value="39683.451049999974" table:style-name="ce206">
            <text:p><text:s/>39,683<text:s/></text:p>
          </table:table-cell>
          <table:table-cell office:value-type="float" office:value="34568.523044045782" table:style-name="ce206">
            <text:p><text:s/>34,569<text:s/></text:p>
          </table:table-cell>
          <table:table-cell office:value-type="float" office:value="26673.254489999992" table:style-name="ce58">
            <text:p><text:s/>26,673<text:s/></text:p>
          </table:table-cell>
          <table:table-cell office:value-type="float" office:value="37690.150630000018" table:style-name="ce206">
            <text:p><text:s/>37,690<text:s/></text:p>
          </table:table-cell>
          <table:table-cell office:value-type="float" office:value="31463.528270000003" table:style-name="ce33">
            <text:p><text:s/>31,464<text:s/></text:p>
          </table:table-cell>
          <table:table-cell office:value-type="float" office:value="22650.138599999998" table:style-name="ce185">
            <text:p><text:s/>22,650<text:s/></text:p>
          </table:table-cell>
          <table:table-cell office:value-type="float" office:value="14905.530849999992" table:style-name="ce185">
            <text:p><text:s/>14,906<text:s/></text:p>
          </table:table-cell>
          <table:table-cell office:value-type="float" office:value="15815.981040000006" table:style-name="ce185">
            <text:p><text:s/>15,816<text:s/></text:p>
          </table:table-cell>
          <table:table-cell office:value-type="float" office:value="20770.460660000001" table:style-name="ce89">
            <text:p><text:s/>20,770<text:s/></text:p>
          </table:table-cell>
          <table:table-cell office:value-type="float" office:value="18844.70752" table:style-name="ce185">
            <text:p><text:s/>18,845<text:s/></text:p>
          </table:table-cell>
          <table:table-cell office:value-type="float" office:value="20178.380399999998" table:style-name="ce89">
            <text:p><text:s/>20,178<text:s/></text:p>
          </table:table-cell>
          <table:table-cell office:value-type="float" office:value="19787.889000000003" table:style-name="ce89">
            <text:p><text:s/>19,788<text:s/></text:p>
          </table:table-cell>
          <table:table-cell office:value-type="float" office:value="16649.705750000001" table:style-name="ce89">
            <text:p><text:s/>16,650<text:s/></text:p>
          </table:table-cell>
          <table:table-cell office:value-type="float" office:value="18072.203100000002" table:style-name="ce89">
            <text:p><text:s/>18,072<text:s/></text:p>
          </table:table-cell>
          <table:table-cell office:value-type="float" office:value="19318.565000000002" table:style-name="ce202">
            <text:p>19,319</text:p>
          </table:table-cell>
          <table:table-cell office:value-type="float" office:value="17592.952000000001" table:style-name="ce136">
            <text:p>17,593</text:p>
          </table:table-cell>
          <table:table-cell office:value-type="float" office:value="12322.092999999997" table:style-name="ce136">
            <text:p>12,322</text:p>
          </table:table-cell>
          <table:table-cell office:value-type="float" office:value="14131.974499999995" table:style-name="ce136">
            <text:p>14,132</text:p>
          </table:table-cell>
          <table:table-cell office:value-type="float" office:value="11718.373000000005" table:style-name="ce304">
            <text:p>11,718</text:p>
          </table:table-cell>
          <table:table-cell office:value-type="float" office:value="12337" table:style-name="ce303">
            <text:p>12,337</text:p>
          </table:table-cell>
          <table:table-cell office:value-type="float" office:value="13647" table:style-name="ce323">
            <text:p>13,64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2</text:p>
          </table:table-cell>
          <table:table-cell office:value-type="string" table:style-name="ce205">
            <text:p>Shaping/Treatment of Metals and Plastics</text:p>
          </table:table-cell>
          <table:table-cell office:value-type="float" office:value="19074.904839999985" table:style-name="ce206">
            <text:p><text:s/>19,075<text:s/></text:p>
          </table:table-cell>
          <table:table-cell office:value-type="float" office:value="21602.211682297289" table:style-name="ce206">
            <text:p><text:s/>21,602<text:s/></text:p>
          </table:table-cell>
          <table:table-cell office:value-type="float" office:value="19612.832502430228" table:style-name="ce206">
            <text:p><text:s/>19,613<text:s/></text:p>
          </table:table-cell>
          <table:table-cell office:value-type="float" office:value="22966.995099831372" table:style-name="ce206">
            <text:p><text:s/>22,967<text:s/></text:p>
          </table:table-cell>
          <table:table-cell office:value-type="float" office:value="22912.720729999997" table:style-name="ce206">
            <text:p><text:s/>22,913<text:s/></text:p>
          </table:table-cell>
          <table:table-cell office:value-type="float" office:value="17253.39841144532" table:style-name="ce206">
            <text:p><text:s/>17,253<text:s/></text:p>
          </table:table-cell>
          <table:table-cell office:value-type="float" office:value="12646.820949999998" table:style-name="ce58">
            <text:p><text:s/>12,647<text:s/></text:p>
          </table:table-cell>
          <table:table-cell office:value-type="float" office:value="17750.998390000001" table:style-name="ce206">
            <text:p><text:s/>17,751<text:s/></text:p>
          </table:table-cell>
          <table:table-cell office:value-type="float" office:value="11338.408709999998" table:style-name="ce33">
            <text:p><text:s/>11,338<text:s/></text:p>
          </table:table-cell>
          <table:table-cell office:value-type="float" office:value="7881.2975399999996" table:style-name="ce185">
            <text:p><text:s/>7,881<text:s/></text:p>
          </table:table-cell>
          <table:table-cell office:value-type="float" office:value="7484.7606700000006" table:style-name="ce185">
            <text:p><text:s/>7,485<text:s/></text:p>
          </table:table-cell>
          <table:table-cell office:value-type="float" office:value="7966.1239399999949" table:style-name="ce185">
            <text:p><text:s/>7,966<text:s/></text:p>
          </table:table-cell>
          <table:table-cell office:value-type="float" office:value="10596.538499999999" table:style-name="ce89">
            <text:p><text:s/>10,597<text:s/></text:p>
          </table:table-cell>
          <table:table-cell office:value-type="float" office:value="9405.8029999999999" table:style-name="ce185">
            <text:p><text:s/>9,406<text:s/></text:p>
          </table:table-cell>
          <table:table-cell office:value-type="float" office:value="9733.6607000000004" table:style-name="ce89">
            <text:p><text:s/>9,734<text:s/></text:p>
          </table:table-cell>
          <table:table-cell office:value-type="float" office:value="9796.8950000000004" table:style-name="ce89">
            <text:p><text:s/>9,797<text:s/></text:p>
          </table:table-cell>
          <table:table-cell office:value-type="float" office:value="7517.825350000001" table:style-name="ce89">
            <text:p><text:s/>7,518<text:s/></text:p>
          </table:table-cell>
          <table:table-cell office:value-type="float" office:value="8762.3909999999978" table:style-name="ce89">
            <text:p><text:s/>8,762<text:s/></text:p>
          </table:table-cell>
          <table:table-cell office:value-type="float" office:value="8539.3052000000007" table:style-name="ce202">
            <text:p>8,539</text:p>
          </table:table-cell>
          <table:table-cell office:value-type="float" office:value="9826.8115000000016" table:style-name="ce136">
            <text:p>9,827</text:p>
          </table:table-cell>
          <table:table-cell office:value-type="float" office:value="9576.3771999999954" table:style-name="ce136">
            <text:p>9,576</text:p>
          </table:table-cell>
          <table:table-cell office:value-type="float" office:value="10224.481000000003" table:style-name="ce136">
            <text:p>10,224</text:p>
          </table:table-cell>
          <table:table-cell office:value-type="float" office:value="11111.387500000001" table:style-name="ce304">
            <text:p>11,111</text:p>
          </table:table-cell>
          <table:table-cell office:value-type="float" office:value="10429" table:style-name="ce303">
            <text:p>10,429</text:p>
          </table:table-cell>
          <table:table-cell office:value-type="float" office:value="11012" table:style-name="ce323">
            <text:p>11,01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3</text:p>
          </table:table-cell>
          <table:table-cell office:value-type="string" table:style-name="ce205">
            <text:p>Oil and Oil/Water Mixtures</text:p>
          </table:table-cell>
          <table:table-cell office:value-type="float" office:value="132363.26184000014" table:style-name="ce206">
            <text:p><text:s/>132,363<text:s/></text:p>
          </table:table-cell>
          <table:table-cell office:value-type="float" office:value="140245.10159020071" table:style-name="ce206">
            <text:p><text:s/>140,245<text:s/></text:p>
          </table:table-cell>
          <table:table-cell office:value-type="float" office:value="130124.11898960259" table:style-name="ce206">
            <text:p><text:s/>130,124<text:s/></text:p>
          </table:table-cell>
          <table:table-cell office:value-type="float" office:value="110785.74848505203" table:style-name="ce206">
            <text:p><text:s/>110,786<text:s/></text:p>
          </table:table-cell>
          <table:table-cell office:value-type="float" office:value="109632.90936999998" table:style-name="ce206">
            <text:p><text:s/>109,633<text:s/></text:p>
          </table:table-cell>
          <table:table-cell office:value-type="float" office:value="137112.25591537962" table:style-name="ce206">
            <text:p><text:s/>137,112<text:s/></text:p>
          </table:table-cell>
          <table:table-cell office:value-type="float" office:value="105163.34587999995" table:style-name="ce58">
            <text:p><text:s/>105,163<text:s/></text:p>
          </table:table-cell>
          <table:table-cell office:value-type="float" office:value="108717.93357999995" table:style-name="ce206">
            <text:p><text:s/>108,718<text:s/></text:p>
          </table:table-cell>
          <table:table-cell office:value-type="float" office:value="93126.039940000002" table:style-name="ce33">
            <text:p><text:s/>93,126<text:s/></text:p>
          </table:table-cell>
          <table:table-cell office:value-type="float" office:value="67952.028159999987" table:style-name="ce185">
            <text:p><text:s/>67,952<text:s/></text:p>
          </table:table-cell>
          <table:table-cell office:value-type="float" office:value="73545.756100000013" table:style-name="ce185">
            <text:p><text:s/>73,546<text:s/></text:p>
          </table:table-cell>
          <table:table-cell office:value-type="float" office:value="70104.316040000122" table:style-name="ce185">
            <text:p><text:s/>70,104<text:s/></text:p>
          </table:table-cell>
          <table:table-cell office:value-type="float" office:value="74446.745080000095" table:style-name="ce89">
            <text:p><text:s/>74,447<text:s/></text:p>
          </table:table-cell>
          <table:table-cell office:value-type="float" office:value="74865.794129999995" table:style-name="ce185">
            <text:p><text:s/>74,866<text:s/></text:p>
          </table:table-cell>
          <table:table-cell office:value-type="float" office:value="95646.548079999993" table:style-name="ce89">
            <text:p><text:s/>95,647<text:s/></text:p>
          </table:table-cell>
          <table:table-cell office:value-type="float" office:value="86743.329270000046" table:style-name="ce89">
            <text:p><text:s/>86,743<text:s/></text:p>
          </table:table-cell>
          <table:table-cell office:value-type="float" office:value="76718.892850000047" table:style-name="ce89">
            <text:p><text:s/>76,719<text:s/></text:p>
          </table:table-cell>
          <table:table-cell office:value-type="float" office:value="88654.414629999956" table:style-name="ce89">
            <text:p><text:s/>88,654<text:s/></text:p>
          </table:table-cell>
          <table:table-cell office:value-type="float" office:value="79834.7659000001" table:style-name="ce202">
            <text:p>79,835</text:p>
          </table:table-cell>
          <table:table-cell office:value-type="float" office:value="77879.22646000002" table:style-name="ce136">
            <text:p>77,879</text:p>
          </table:table-cell>
          <table:table-cell office:value-type="float" office:value="85381.047449999969" table:style-name="ce136">
            <text:p>85,381</text:p>
          </table:table-cell>
          <table:table-cell office:value-type="float" office:value="87719.589550000004" table:style-name="ce136">
            <text:p>87,720</text:p>
          </table:table-cell>
          <table:table-cell office:value-type="float" office:value="86081.532779999994" table:style-name="ce304">
            <text:p>86,082</text:p>
          </table:table-cell>
          <table:table-cell office:value-type="float" office:value="81289" table:style-name="ce303">
            <text:p>81,289</text:p>
          </table:table-cell>
          <table:table-cell office:value-type="float" office:value="109878" table:style-name="ce323">
            <text:p>109,87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4</text:p>
          </table:table-cell>
          <table:table-cell office:value-type="string" table:style-name="ce205">
            <text:p>Solvents</text:p>
          </table:table-cell>
          <table:table-cell office:value-type="float" office:value="10502.32072" table:style-name="ce206">
            <text:p><text:s/>10,502<text:s/></text:p>
          </table:table-cell>
          <table:table-cell office:value-type="float" office:value="45638.491718939011" table:style-name="ce206">
            <text:p><text:s/>45,638<text:s/></text:p>
          </table:table-cell>
          <table:table-cell office:value-type="float" office:value="22333.154475571901" table:style-name="ce206">
            <text:p><text:s/>22,333<text:s/></text:p>
          </table:table-cell>
          <table:table-cell office:value-type="float" office:value="14852.98766323179" table:style-name="ce206">
            <text:p><text:s/>14,853<text:s/></text:p>
          </table:table-cell>
          <table:table-cell office:value-type="float" office:value="9685.994130000001" table:style-name="ce206">
            <text:p><text:s/>9,686<text:s/></text:p>
          </table:table-cell>
          <table:table-cell office:value-type="float" office:value="7492.9689071479806" table:style-name="ce206">
            <text:p><text:s/>7,493<text:s/></text:p>
          </table:table-cell>
          <table:table-cell office:value-type="float" office:value="2240.3591000000001" table:style-name="ce58">
            <text:p><text:s/>2,240<text:s/></text:p>
          </table:table-cell>
          <table:table-cell office:value-type="float" office:value="1838.3662599999998" table:style-name="ce206">
            <text:p><text:s/>1,838<text:s/></text:p>
          </table:table-cell>
          <table:table-cell office:value-type="float" office:value="2052.9935500000001" table:style-name="ce33">
            <text:p><text:s/>2,053<text:s/></text:p>
          </table:table-cell>
          <table:table-cell office:value-type="float" office:value="1813.00144" table:style-name="ce185">
            <text:p><text:s/>1,813<text:s/></text:p>
          </table:table-cell>
          <table:table-cell office:value-type="float" office:value="2748.2762299999945" table:style-name="ce185">
            <text:p><text:s/>2,748<text:s/></text:p>
          </table:table-cell>
          <table:table-cell office:value-type="float" office:value="3764.0736499999989" table:style-name="ce185">
            <text:p><text:s/>3,764<text:s/></text:p>
          </table:table-cell>
          <table:table-cell office:value-type="float" office:value="3109.7685999999999" table:style-name="ce89">
            <text:p><text:s/>3,110<text:s/></text:p>
          </table:table-cell>
          <table:table-cell office:value-type="float" office:value="3542.2766899999997" table:style-name="ce185">
            <text:p><text:s/>3,542<text:s/></text:p>
          </table:table-cell>
          <table:table-cell office:value-type="float" office:value="3670.8567999999991" table:style-name="ce89">
            <text:p><text:s/>3,671<text:s/></text:p>
          </table:table-cell>
          <table:table-cell office:value-type="float" office:value="3782.6416799999997" table:style-name="ce89">
            <text:p><text:s/>3,783<text:s/></text:p>
          </table:table-cell>
          <table:table-cell office:value-type="float" office:value="2685.1271900000006" table:style-name="ce89">
            <text:p><text:s/>2,685<text:s/></text:p>
          </table:table-cell>
          <table:table-cell office:value-type="float" office:value="3462.2983000000008" table:style-name="ce89">
            <text:p><text:s/>3,462<text:s/></text:p>
          </table:table-cell>
          <table:table-cell office:value-type="float" office:value="2679.8549699999994" table:style-name="ce202">
            <text:p>2,680</text:p>
          </table:table-cell>
          <table:table-cell office:value-type="float" office:value="2502.635420000001" table:style-name="ce136">
            <text:p>2,503</text:p>
          </table:table-cell>
          <table:table-cell office:value-type="float" office:value="1590.6335100000001" table:style-name="ce136">
            <text:p>1,591</text:p>
          </table:table-cell>
          <table:table-cell office:value-type="float" office:value="870.16932000000008" table:style-name="ce136">
            <text:p>870</text:p>
          </table:table-cell>
          <table:table-cell office:value-type="float" office:value="843.34805000000006" table:style-name="ce304">
            <text:p>843</text:p>
          </table:table-cell>
          <table:table-cell office:value-type="float" office:value="714" table:style-name="ce303">
            <text:p>714</text:p>
          </table:table-cell>
          <table:table-cell office:value-type="float" office:value="745" table:style-name="ce323">
            <text:p>74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5</text:p>
          </table:table-cell>
          <table:table-cell office:value-type="string" table:style-name="ce205">
            <text:p>Packaging, Cloths, Filter Materials</text:p>
          </table:table-cell>
          <table:table-cell office:value-type="float" office:value="3134.5992899999987" table:style-name="ce206">
            <text:p><text:s/>3,135<text:s/></text:p>
          </table:table-cell>
          <table:table-cell office:value-type="float" office:value="11814.29360359069" table:style-name="ce206">
            <text:p><text:s/>11,814<text:s/></text:p>
          </table:table-cell>
          <table:table-cell office:value-type="float" office:value="9306.1610823217779" table:style-name="ce206">
            <text:p><text:s/>9,306<text:s/></text:p>
          </table:table-cell>
          <table:table-cell office:value-type="float" office:value="5480.5116886812029" table:style-name="ce206">
            <text:p><text:s/>5,481<text:s/></text:p>
          </table:table-cell>
          <table:table-cell office:value-type="float" office:value="5629.2471000000005" table:style-name="ce206">
            <text:p><text:s/>5,629<text:s/></text:p>
          </table:table-cell>
          <table:table-cell office:value-type="float" office:value="9956.2956494367681" table:style-name="ce206">
            <text:p><text:s/>9,956<text:s/></text:p>
          </table:table-cell>
          <table:table-cell office:value-type="float" office:value="11325.160439999996" table:style-name="ce58">
            <text:p><text:s/>11,325<text:s/></text:p>
          </table:table-cell>
          <table:table-cell office:value-type="float" office:value="9755.6279999999933" table:style-name="ce206">
            <text:p><text:s/>9,756<text:s/></text:p>
          </table:table-cell>
          <table:table-cell office:value-type="float" office:value="10333.379259999992" table:style-name="ce33">
            <text:p><text:s/>10,333<text:s/></text:p>
          </table:table-cell>
          <table:table-cell office:value-type="float" office:value="7883.576790000001" table:style-name="ce185">
            <text:p><text:s/>7,884<text:s/></text:p>
          </table:table-cell>
          <table:table-cell office:value-type="float" office:value="7978.9258900000004" table:style-name="ce185">
            <text:p><text:s/>7,979<text:s/></text:p>
          </table:table-cell>
          <table:table-cell office:value-type="float" office:value="9089.203969999995" table:style-name="ce185">
            <text:p><text:s/>9,089<text:s/></text:p>
          </table:table-cell>
          <table:table-cell office:value-type="float" office:value="13755.71228" table:style-name="ce89">
            <text:p><text:s/>13,756<text:s/></text:p>
          </table:table-cell>
          <table:table-cell office:value-type="float" office:value="14832.761160000002" table:style-name="ce185">
            <text:p><text:s/>14,833<text:s/></text:p>
          </table:table-cell>
          <table:table-cell office:value-type="float" office:value="16111.28793" table:style-name="ce89">
            <text:p><text:s/>16,111<text:s/></text:p>
          </table:table-cell>
          <table:table-cell office:value-type="float" office:value="14755.254249999998" table:style-name="ce89">
            <text:p><text:s/>14,755<text:s/></text:p>
          </table:table-cell>
          <table:table-cell office:value-type="float" office:value="14205.75869000001" table:style-name="ce89">
            <text:p><text:s/>14,206<text:s/></text:p>
          </table:table-cell>
          <table:table-cell office:value-type="float" office:value="16756.472689999995" table:style-name="ce89">
            <text:p><text:s/>16,756<text:s/></text:p>
          </table:table-cell>
          <table:table-cell office:value-type="float" office:value="18228.048699999996" table:style-name="ce202">
            <text:p>18,228</text:p>
          </table:table-cell>
          <table:table-cell office:value-type="float" office:value="22469.760529999992" table:style-name="ce136">
            <text:p>22,470</text:p>
          </table:table-cell>
          <table:table-cell office:value-type="float" office:value="21316.277260000017" table:style-name="ce136">
            <text:p>21,316</text:p>
          </table:table-cell>
          <table:table-cell office:value-type="float" office:value="19945.546680000007" table:style-name="ce136">
            <text:p>19,946</text:p>
          </table:table-cell>
          <table:table-cell office:value-type="float" office:value="44185.776809999996" table:style-name="ce304">
            <text:p>44,186</text:p>
          </table:table-cell>
          <table:table-cell office:value-type="float" office:value="17559" table:style-name="ce303">
            <text:p>17,559</text:p>
          </table:table-cell>
          <table:table-cell office:value-type="float" office:value="28687" table:style-name="ce323">
            <text:p>28,68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6</text:p>
          </table:table-cell>
          <table:table-cell office:value-type="string" table:style-name="ce188">
            <text:p>Not Otherwise Specified*</text:p>
          </table:table-cell>
          <table:table-cell office:value-type="float" office:value="23659.724290000009" table:style-name="ce206">
            <text:p><text:s/>23,660<text:s/></text:p>
          </table:table-cell>
          <table:table-cell office:value-type="float" office:value="28592.443216238444" table:style-name="ce206">
            <text:p><text:s/>28,592<text:s/></text:p>
          </table:table-cell>
          <table:table-cell office:value-type="float" office:value="25682.28440858284" table:style-name="ce206">
            <text:p><text:s/>25,682<text:s/></text:p>
          </table:table-cell>
          <table:table-cell office:value-type="float" office:value="30768.024593600887" table:style-name="ce206">
            <text:p><text:s/>30,768<text:s/></text:p>
          </table:table-cell>
          <table:table-cell office:value-type="float" office:value="27162.940569999999" table:style-name="ce206">
            <text:p><text:s/>27,163<text:s/></text:p>
          </table:table-cell>
          <table:table-cell office:value-type="float" office:value="19984.670360597316" table:style-name="ce206">
            <text:p><text:s/>19,985<text:s/></text:p>
          </table:table-cell>
          <table:table-cell office:value-type="float" office:value="51133.299540000007" table:style-name="ce58">
            <text:p><text:s/>51,133<text:s/></text:p>
          </table:table-cell>
          <table:table-cell office:value-type="float" office:value="38412.914739999993" table:style-name="ce206">
            <text:p><text:s/>38,413<text:s/></text:p>
          </table:table-cell>
          <table:table-cell office:value-type="float" office:value="48878.090000000091" table:style-name="ce33">
            <text:p><text:s/>48,878<text:s/></text:p>
          </table:table-cell>
          <table:table-cell office:value-type="float" office:value="47663.490389999992" table:style-name="ce185">
            <text:p><text:s/>47,663<text:s/></text:p>
          </table:table-cell>
          <table:table-cell office:value-type="float" office:value="66668.398200000054" table:style-name="ce185">
            <text:p><text:s/>66,668<text:s/></text:p>
          </table:table-cell>
          <table:table-cell office:value-type="float" office:value="79596.856510000071" table:style-name="ce185">
            <text:p><text:s/>79,597<text:s/></text:p>
          </table:table-cell>
          <table:table-cell office:value-type="float" office:value="68372.690420000101" table:style-name="ce89">
            <text:p><text:s/>68,373<text:s/></text:p>
          </table:table-cell>
          <table:table-cell office:value-type="float" office:value="82501.803190000093" table:style-name="ce185">
            <text:p><text:s/>82,502<text:s/></text:p>
          </table:table-cell>
          <table:table-cell office:value-type="float" office:value="82130.479990000022" table:style-name="ce89">
            <text:p><text:s/>82,130<text:s/></text:p>
          </table:table-cell>
          <table:table-cell office:value-type="float" office:value="91132.86069000003" table:style-name="ce89">
            <text:p><text:s/>91,133<text:s/></text:p>
          </table:table-cell>
          <table:table-cell office:value-type="float" office:value="83531.988349999971" table:style-name="ce89">
            <text:p><text:s/>83,532<text:s/></text:p>
          </table:table-cell>
          <table:table-cell office:value-type="float" office:value="94714.485530000005" table:style-name="ce89">
            <text:p><text:s/>94,714<text:s/></text:p>
          </table:table-cell>
          <table:table-cell office:value-type="float" office:value="92102.642860000095" table:style-name="ce202">
            <text:p>92,103</text:p>
          </table:table-cell>
          <table:table-cell office:value-type="float" office:value="89944.066249999989" table:style-name="ce136">
            <text:p>89,944</text:p>
          </table:table-cell>
          <table:table-cell office:value-type="float" office:value="70615.983900000036" table:style-name="ce136">
            <text:p>70,616</text:p>
          </table:table-cell>
          <table:table-cell office:value-type="float" office:value="95953.263410000014" table:style-name="ce136">
            <text:p>95,953</text:p>
          </table:table-cell>
          <table:table-cell office:value-type="float" office:value="102027.44351000007" table:style-name="ce304">
            <text:p>102,027</text:p>
          </table:table-cell>
          <table:table-cell office:value-type="float" office:value="96622" table:style-name="ce303">
            <text:p>96,622</text:p>
          </table:table-cell>
          <table:table-cell office:value-type="float" office:value="110848" table:style-name="ce323">
            <text:p>110,84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7</text:p>
          </table:table-cell>
          <table:table-cell office:value-type="string" table:style-name="ce205">
            <text:p>C&amp;D Waste and Asbestos</text:p>
          </table:table-cell>
          <table:table-cell office:value-type="float" office:value="60658.598649999985" table:style-name="ce206">
            <text:p><text:s/>60,659<text:s/></text:p>
          </table:table-cell>
          <table:table-cell office:value-type="float" office:value="67117.066664986763" table:style-name="ce206">
            <text:p><text:s/>67,117<text:s/></text:p>
          </table:table-cell>
          <table:table-cell office:value-type="float" office:value="89671.294428136753" table:style-name="ce206">
            <text:p><text:s/>89,671<text:s/></text:p>
          </table:table-cell>
          <table:table-cell office:value-type="float" office:value="112377.56102205628" table:style-name="ce206">
            <text:p><text:s/>112,378<text:s/></text:p>
          </table:table-cell>
          <table:table-cell office:value-type="float" office:value="99754.252149999986" table:style-name="ce206">
            <text:p><text:s/>99,754<text:s/></text:p>
          </table:table-cell>
          <table:table-cell office:value-type="float" office:value="198328.16492590611" table:style-name="ce206">
            <text:p><text:s/>198,328<text:s/></text:p>
          </table:table-cell>
          <table:table-cell office:value-type="float" office:value="22737.061290000005" table:style-name="ce58">
            <text:p><text:s/>22,737<text:s/></text:p>
          </table:table-cell>
          <table:table-cell office:value-type="float" office:value="32939.096240000006" table:style-name="ce206">
            <text:p><text:s/>32,939<text:s/></text:p>
          </table:table-cell>
          <table:table-cell office:value-type="float" office:value="21583.115310000001" table:style-name="ce33">
            <text:p><text:s/>21,583<text:s/></text:p>
          </table:table-cell>
          <table:table-cell office:value-type="float" office:value="28228.764909999998" table:style-name="ce185">
            <text:p><text:s/>28,229<text:s/></text:p>
          </table:table-cell>
          <table:table-cell office:value-type="float" office:value="28087.792770000007" table:style-name="ce185">
            <text:p><text:s/>28,088<text:s/></text:p>
          </table:table-cell>
          <table:table-cell office:value-type="float" office:value="43351.382050000015" table:style-name="ce185">
            <text:p><text:s/>43,351<text:s/></text:p>
          </table:table-cell>
          <table:table-cell office:value-type="float" office:value="69393.796610000019" table:style-name="ce89">
            <text:p><text:s/>69,394<text:s/></text:p>
          </table:table-cell>
          <table:table-cell office:value-type="float" office:value="45368.008830000006" table:style-name="ce185">
            <text:p><text:s/>45,368<text:s/></text:p>
          </table:table-cell>
          <table:table-cell office:value-type="float" office:value="86120.937090000007" table:style-name="ce89">
            <text:p><text:s/>86,121<text:s/></text:p>
          </table:table-cell>
          <table:table-cell office:value-type="float" office:value="211728.63845000009" table:style-name="ce89">
            <text:p><text:s/>211,729<text:s/></text:p>
          </table:table-cell>
          <table:table-cell office:value-type="float" office:value="86841.797929999942" table:style-name="ce89">
            <text:p><text:s/>86,842<text:s/></text:p>
          </table:table-cell>
          <table:table-cell office:value-type="float" office:value="221085.18239000021" table:style-name="ce89">
            <text:p><text:s/>221,085<text:s/></text:p>
          </table:table-cell>
          <table:table-cell office:value-type="float" office:value="142647.17326000004" table:style-name="ce202">
            <text:p>142,647</text:p>
          </table:table-cell>
          <table:table-cell office:value-type="float" office:value="119708.83492999995" table:style-name="ce136">
            <text:p>119,709</text:p>
          </table:table-cell>
          <table:table-cell office:value-type="float" office:value="75018.577880000055" table:style-name="ce136">
            <text:p>75,019</text:p>
          </table:table-cell>
          <table:table-cell office:value-type="float" office:value="81257.717310000065" table:style-name="ce136">
            <text:p>81,258</text:p>
          </table:table-cell>
          <table:table-cell office:value-type="float" office:value="106439.28981000002" table:style-name="ce304">
            <text:p>106,439</text:p>
          </table:table-cell>
          <table:table-cell office:value-type="float" office:value="98617" table:style-name="ce303">
            <text:p>98,617</text:p>
          </table:table-cell>
          <table:table-cell office:value-type="float" office:value="95543" table:style-name="ce323">
            <text:p>95,54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8</text:p>
          </table:table-cell>
          <table:table-cell office:value-type="string" table:style-name="ce205">
            <text:p>Healthcare</text:p>
          </table:table-cell>
          <table:table-cell office:value-type="float" office:value="5555.4848799999945" table:style-name="ce206">
            <text:p><text:s/>5,555<text:s/></text:p>
          </table:table-cell>
          <table:table-cell office:value-type="float" office:value="5804.3196652142797" table:style-name="ce206">
            <text:p><text:s/>5,804<text:s/></text:p>
          </table:table-cell>
          <table:table-cell office:value-type="float" office:value="6644.6621652289759" table:style-name="ce206">
            <text:p><text:s/>6,645<text:s/></text:p>
          </table:table-cell>
          <table:table-cell office:value-type="float" office:value="5285.0608010225078" table:style-name="ce206">
            <text:p><text:s/>5,285<text:s/></text:p>
          </table:table-cell>
          <table:table-cell office:value-type="float" office:value="6340.082459999996" table:style-name="ce206">
            <text:p><text:s/>6,340<text:s/></text:p>
          </table:table-cell>
          <table:table-cell office:value-type="float" office:value="16676.267590292031" table:style-name="ce206">
            <text:p><text:s/>16,676<text:s/></text:p>
          </table:table-cell>
          <table:table-cell office:value-type="float" office:value="15505.110640000003" table:style-name="ce58">
            <text:p><text:s/>15,505<text:s/></text:p>
          </table:table-cell>
          <table:table-cell office:value-type="float" office:value="21019.083400000007" table:style-name="ce206">
            <text:p><text:s/>21,019<text:s/></text:p>
          </table:table-cell>
          <table:table-cell office:value-type="float" office:value="22765.592669999984" table:style-name="ce33">
            <text:p><text:s/>22,766<text:s/></text:p>
          </table:table-cell>
          <table:table-cell office:value-type="float" office:value="17855.926720000039" table:style-name="ce185">
            <text:p><text:s/>17,856<text:s/></text:p>
          </table:table-cell>
          <table:table-cell office:value-type="float" office:value="19188.838090000023" table:style-name="ce185">
            <text:p><text:s/>19,189<text:s/></text:p>
          </table:table-cell>
          <table:table-cell office:value-type="float" office:value="18090.351189999998" table:style-name="ce185">
            <text:p><text:s/>18,090<text:s/></text:p>
          </table:table-cell>
          <table:table-cell office:value-type="float" office:value="25219.036290000098" table:style-name="ce89">
            <text:p><text:s/>25,219<text:s/></text:p>
          </table:table-cell>
          <table:table-cell office:value-type="float" office:value="22967.520369999998" table:style-name="ce185">
            <text:p><text:s/>22,968<text:s/></text:p>
          </table:table-cell>
          <table:table-cell office:value-type="float" office:value="23419.97296000001" table:style-name="ce89">
            <text:p><text:s/>23,420<text:s/></text:p>
          </table:table-cell>
          <table:table-cell office:value-type="float" office:value="20022.844419999998" table:style-name="ce89">
            <text:p><text:s/>20,023<text:s/></text:p>
          </table:table-cell>
          <table:table-cell office:value-type="float" office:value="19474.390400000018" table:style-name="ce89">
            <text:p><text:s/>19,474<text:s/></text:p>
          </table:table-cell>
          <table:table-cell office:value-type="float" office:value="17194.381129999998" table:style-name="ce89">
            <text:p><text:s/>17,194<text:s/></text:p>
          </table:table-cell>
          <table:table-cell office:value-type="float" office:value="14735.976869999995" table:style-name="ce202">
            <text:p>14,736</text:p>
          </table:table-cell>
          <table:table-cell office:value-type="float" office:value="10794.457109999996" table:style-name="ce136">
            <text:p>10,794</text:p>
          </table:table-cell>
          <table:table-cell office:value-type="float" office:value="14005.996200000009" table:style-name="ce136">
            <text:p>14,006</text:p>
          </table:table-cell>
          <table:table-cell office:value-type="float" office:value="18726.55702" table:style-name="ce136">
            <text:p>18,727</text:p>
          </table:table-cell>
          <table:table-cell office:value-type="float" office:value="20037.616100000007" table:style-name="ce304">
            <text:p>20,038</text:p>
          </table:table-cell>
          <table:table-cell office:value-type="float" office:value="16079" table:style-name="ce303">
            <text:p>16,079</text:p>
          </table:table-cell>
          <table:table-cell office:value-type="float" office:value="16646" table:style-name="ce323">
            <text:p>16,64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19</text:p>
          </table:table-cell>
          <table:table-cell office:value-type="string" table:style-name="ce205">
            <text:p>Waste/Water Treatment and Water Industry</text:p>
          </table:table-cell>
          <table:table-cell office:value-type="float" office:value="6044.4693100000022" table:style-name="ce206">
            <text:p><text:s/>6,044<text:s/></text:p>
          </table:table-cell>
          <table:table-cell office:value-type="float" office:value="55532.770470763324" table:style-name="ce206">
            <text:p><text:s/>55,533<text:s/></text:p>
          </table:table-cell>
          <table:table-cell office:value-type="float" office:value="56263.712747853715" table:style-name="ce206">
            <text:p><text:s/>56,264<text:s/></text:p>
          </table:table-cell>
          <table:table-cell office:value-type="float" office:value="67241.790028758347" table:style-name="ce206">
            <text:p><text:s/>67,242<text:s/></text:p>
          </table:table-cell>
          <table:table-cell office:value-type="float" office:value="67400.517320000014" table:style-name="ce206">
            <text:p><text:s/>67,401<text:s/></text:p>
          </table:table-cell>
          <table:table-cell office:value-type="float" office:value="83456.973182058835" table:style-name="ce206">
            <text:p><text:s/>83,457<text:s/></text:p>
          </table:table-cell>
          <table:table-cell office:value-type="float" office:value="151219.79071" table:style-name="ce58">
            <text:p><text:s/>151,220<text:s/></text:p>
          </table:table-cell>
          <table:table-cell office:value-type="float" office:value="100158.94862" table:style-name="ce206">
            <text:p><text:s/>100,159<text:s/></text:p>
          </table:table-cell>
          <table:table-cell office:value-type="float" office:value="59760.13781" table:style-name="ce33">
            <text:p><text:s/>59,760<text:s/></text:p>
          </table:table-cell>
          <table:table-cell office:value-type="float" office:value="51144.325669999998" table:style-name="ce185">
            <text:p><text:s/>51,144<text:s/></text:p>
          </table:table-cell>
          <table:table-cell office:value-type="float" office:value="64993.921090000003" table:style-name="ce185">
            <text:p><text:s/>64,994<text:s/></text:p>
          </table:table-cell>
          <table:table-cell office:value-type="float" office:value="72099.761410000006" table:style-name="ce185">
            <text:p><text:s/>72,100<text:s/></text:p>
          </table:table-cell>
          <table:table-cell office:value-type="float" office:value="77441.980100000001" table:style-name="ce89">
            <text:p><text:s/>77,442<text:s/></text:p>
          </table:table-cell>
          <table:table-cell office:value-type="float" office:value="121783.64904" table:style-name="ce185">
            <text:p><text:s/>121,784<text:s/></text:p>
          </table:table-cell>
          <table:table-cell office:value-type="float" office:value="89816.073999999993" table:style-name="ce89">
            <text:p><text:s/>89,816<text:s/></text:p>
          </table:table-cell>
          <table:table-cell office:value-type="float" office:value="106795.08283000001" table:style-name="ce89">
            <text:p><text:s/>106,795<text:s/></text:p>
          </table:table-cell>
          <table:table-cell office:value-type="float" office:value="180389.01749999999" table:style-name="ce89">
            <text:p><text:s/>180,389<text:s/></text:p>
          </table:table-cell>
          <table:table-cell office:value-type="float" office:value="223701.37299999993" table:style-name="ce89">
            <text:p><text:s/>223,701<text:s/></text:p>
          </table:table-cell>
          <table:table-cell office:value-type="float" office:value="127011.04687999998" table:style-name="ce202">
            <text:p>127,011</text:p>
          </table:table-cell>
          <table:table-cell office:value-type="float" office:value="149897.44579999999" table:style-name="ce136">
            <text:p>149,897</text:p>
          </table:table-cell>
          <table:table-cell office:value-type="float" office:value="126554.75967999999" table:style-name="ce136">
            <text:p>126,555</text:p>
          </table:table-cell>
          <table:table-cell office:value-type="float" office:value="116498.52316" table:style-name="ce136">
            <text:p>116,499</text:p>
          </table:table-cell>
          <table:table-cell office:value-type="float" office:value="129096.7683" table:style-name="ce304">
            <text:p>129,097</text:p>
          </table:table-cell>
          <table:table-cell office:value-type="float" office:value="150246" table:style-name="ce303">
            <text:p>150,246</text:p>
          </table:table-cell>
          <table:table-cell office:value-type="float" office:value="149231" table:style-name="ce323">
            <text:p>149,23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4">
            <text:p>20</text:p>
          </table:table-cell>
          <table:table-cell office:value-type="string" table:style-name="ce205">
            <text:p>Municipal and Similar Commercial Wastes</text:p>
          </table:table-cell>
          <table:table-cell office:value-type="float" office:value="25061.002099999998" table:style-name="ce206">
            <text:p><text:s/>25,061<text:s/></text:p>
          </table:table-cell>
          <table:table-cell office:value-type="float" office:value="79404.839063016174" table:style-name="ce206">
            <text:p><text:s/>79,405<text:s/></text:p>
          </table:table-cell>
          <table:table-cell office:value-type="float" office:value="11369.550426007016" table:style-name="ce206">
            <text:p><text:s/>11,370<text:s/></text:p>
          </table:table-cell>
          <table:table-cell office:value-type="float" office:value="18122.300988282528" table:style-name="ce206">
            <text:p><text:s/>18,122<text:s/></text:p>
          </table:table-cell>
          <table:table-cell office:value-type="float" office:value="22874.384789999993" table:style-name="ce206">
            <text:p><text:s/>22,874<text:s/></text:p>
          </table:table-cell>
          <table:table-cell office:value-type="float" office:value="16401.409484215546" table:style-name="ce206">
            <text:p><text:s/>16,401<text:s/></text:p>
          </table:table-cell>
          <table:table-cell office:value-type="float" office:value="11279.799489999994" table:style-name="ce58">
            <text:p><text:s/>11,280<text:s/></text:p>
          </table:table-cell>
          <table:table-cell office:value-type="float" office:value="18006.401530000036" table:style-name="ce206">
            <text:p><text:s/>18,006<text:s/></text:p>
          </table:table-cell>
          <table:table-cell office:value-type="float" office:value="18621.075950000035" table:style-name="ce33">
            <text:p><text:s/>18,621<text:s/></text:p>
          </table:table-cell>
          <table:table-cell office:value-type="float" office:value="20087.38531999999" table:style-name="ce185">
            <text:p><text:s/>20,087<text:s/></text:p>
          </table:table-cell>
          <table:table-cell office:value-type="float" office:value="16884.557439999997" table:style-name="ce185">
            <text:p><text:s/>16,885<text:s/></text:p>
          </table:table-cell>
          <table:table-cell office:value-type="float" office:value="22062.46938000002" table:style-name="ce185">
            <text:p><text:s/>22,062<text:s/></text:p>
          </table:table-cell>
          <table:table-cell office:value-type="float" office:value="25442.51296" table:style-name="ce89">
            <text:p><text:s/>25,443<text:s/></text:p>
          </table:table-cell>
          <table:table-cell office:value-type="float" office:value="21620.138920000001" table:style-name="ce185">
            <text:p><text:s/>21,620<text:s/></text:p>
          </table:table-cell>
          <table:table-cell office:value-type="float" office:value="25735.565289999999" table:style-name="ce89">
            <text:p><text:s/>25,736<text:s/></text:p>
          </table:table-cell>
          <table:table-cell office:value-type="float" office:value="35106.147729999982" table:style-name="ce89">
            <text:p><text:s/>35,106<text:s/></text:p>
          </table:table-cell>
          <table:table-cell office:value-type="float" office:value="43234.240980000061" table:style-name="ce89">
            <text:p><text:s/>43,234<text:s/></text:p>
          </table:table-cell>
          <table:table-cell office:value-type="float" office:value="32321.987329999974" table:style-name="ce89">
            <text:p><text:s/>32,322<text:s/></text:p>
          </table:table-cell>
          <table:table-cell office:value-type="float" office:value="34897.817350000012" table:style-name="ce202">
            <text:p>34,898</text:p>
          </table:table-cell>
          <table:table-cell office:value-type="float" office:value="32866.020460000007" table:style-name="ce136">
            <text:p>32,866</text:p>
          </table:table-cell>
          <table:table-cell office:value-type="float" office:value="31946.674069999979" table:style-name="ce136">
            <text:p>31,947</text:p>
          </table:table-cell>
          <table:table-cell office:value-type="float" office:value="30943.124890000021" table:style-name="ce136">
            <text:p>30,943</text:p>
          </table:table-cell>
          <table:table-cell office:value-type="float" office:value="33439.098590000009" table:style-name="ce304">
            <text:p>33,439</text:p>
          </table:table-cell>
          <table:table-cell office:value-type="float" office:value="43326" table:style-name="ce303">
            <text:p>43,326</text:p>
          </table:table-cell>
          <table:table-cell office:value-type="float" office:value="42363" table:style-name="ce323">
            <text:p>42,36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9">
            <text:p>99</text:p>
          </table:table-cell>
          <table:table-cell office:value-type="string" table:style-name="ce210">
            <text:p>Unclassified</text:p>
          </table:table-cell>
          <table:table-cell office:value-type="float" office:value="5137.3357000000005" table:style-name="ce206">
            <text:p><text:s/>5,137<text:s/></text:p>
          </table:table-cell>
          <table:table-cell office:value-type="float" office:value="10370.409231670084" table:style-name="ce206">
            <text:p><text:s/>10,370<text:s/></text:p>
          </table:table-cell>
          <table:table-cell office:value-type="float" office:value="3578.3914346974343" table:style-name="ce206">
            <text:p><text:s/>3,578<text:s/></text:p>
          </table:table-cell>
          <table:table-cell office:value-type="float" office:value="626.97609397768974" table:style-name="ce206">
            <text:p><text:s/>627<text:s/></text:p>
          </table:table-cell>
          <table:table-cell office:value-type="float" office:value="10488.41662" table:style-name="ce206">
            <text:p><text:s/>10,488<text:s/></text:p>
          </table:table-cell>
          <table:table-cell office:value-type="float" office:value="3475.6854222174734" table:style-name="ce206">
            <text:p><text:s/>3,476<text:s/></text:p>
          </table:table-cell>
          <table:table-cell office:value-type="float" office:value="0" table:style-name="ce211">
            <text:p><text:s/>-<text:s/></text:p>
          </table:table-cell>
          <table:table-cell office:value-type="float" office:value="0" table:style-name="ce206">
            <text:p><text:s/>-<text:s/></text:p>
          </table:table-cell>
          <table:table-cell office:value-type="float" office:value="0" table:style-name="ce212">
            <text:p><text:s/>-<text:s/></text:p>
          </table:table-cell>
          <table:table-cell office:value-type="float" office:value="0" table:style-name="ce212">
            <text:p><text:s/>-<text:s/></text:p>
          </table:table-cell>
          <table:table-cell office:value-type="float" office:value="0" table:style-name="ce212">
            <text:p><text:s/>-<text:s/></text:p>
          </table:table-cell>
          <table:table-cell office:value-type="float" office:value="0" table:style-name="ce212">
            <text:p><text:s/>-<text:s/></text:p>
          </table:table-cell>
          <table:table-cell office:value-type="float" office:value="0" table:style-name="ce212">
            <text:p><text:s/>-<text:s/></text:p>
          </table:table-cell>
          <table:table-cell office:value-type="float" office:value="0" table:style-name="ce212">
            <text:p><text:s/>-<text:s/></text:p>
          </table:table-cell>
          <table:table-cell office:value-type="float" office:value="0" table:style-name="ce21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2">
            <text:p><text:s/>-<text:s/></text:p>
          </table:table-cell>
          <table:table-cell office:value-type="float" office:value="0" table:style-name="ce140">
            <text:p><text:s/>-<text:s/></text:p>
          </table:table-cell>
          <table:table-cell office:value-type="float" office:value="0" table:style-name="ce249">
            <text:p><text:s/>-<text:s/></text:p>
          </table:table-cell>
          <table:table-cell table:number-columns-repeated="16356"/>
        </table:table-row>
        <table:table-row table:style-name="ro19">
          <table:table-cell/>
          <table:table-cell table:style-name="ce213"/>
          <table:table-cell office:value-type="string" table:style-name="ce214">
            <text:p>Total</text:p>
          </table:table-cell>
          <table:table-cell office:value-type="float" office:value="601820.71570000006" table:formula="of:=SUM([.D42:.D62])" table:style-name="ce215">
            <text:p><text:s/>601,821<text:s/></text:p>
          </table:table-cell>
          <table:table-cell office:value-type="float" office:value="714280.14414495381" table:formula="of:=SUM([.E42:.E62])" table:style-name="ce193">
            <text:p><text:s/>714,280<text:s/></text:p>
          </table:table-cell>
          <table:table-cell office:value-type="float" office:value="642367.98806986935" table:formula="of:=SUM([.F42:.F62])" table:style-name="ce193">
            <text:p><text:s/>642,368<text:s/></text:p>
          </table:table-cell>
          <table:table-cell office:value-type="float" office:value="664191.31755554245" table:formula="of:=SUM([.G42:.G62])" table:style-name="ce193">
            <text:p><text:s/>664,191<text:s/></text:p>
          </table:table-cell>
          <table:table-cell office:value-type="float" office:value="631146.56199999992" table:formula="of:=SUM([.H42:.H62])" table:style-name="ce193">
            <text:p><text:s/>631,147<text:s/></text:p>
          </table:table-cell>
          <table:table-cell office:value-type="float" office:value="744454.02292528749" table:formula="of:=SUM([.I42:.I62])" table:style-name="ce193">
            <text:p><text:s/>744,454<text:s/></text:p>
          </table:table-cell>
          <table:table-cell office:value-type="float" office:value="533967.21052000008" table:formula="of:=SUM([.J42:.J62])" table:style-name="ce193">
            <text:p><text:s/>533,967<text:s/></text:p>
          </table:table-cell>
          <table:table-cell office:value-type="float" office:value="499755.96349999995" table:formula="of:=SUM([.K42:.K62])" table:style-name="ce193">
            <text:p><text:s/>499,756<text:s/></text:p>
          </table:table-cell>
          <table:table-cell office:value-type="float" office:value="427578.18804000015" table:formula="of:=SUM([.L42:.L62])" table:style-name="ce193">
            <text:p><text:s/>427,578<text:s/></text:p>
          </table:table-cell>
          <table:table-cell office:value-type="float" office:value="348339.43562999996" table:formula="of:=SUM([.M42:.M62])" table:style-name="ce193">
            <text:p><text:s/>348,339<text:s/></text:p>
          </table:table-cell>
          <table:table-cell office:value-type="float" office:value="371441.86603000015" table:formula="of:=SUM([.N42:.N62])" table:style-name="ce193">
            <text:p><text:s/>371,442<text:s/></text:p>
          </table:table-cell>
          <table:table-cell office:value-type="float" office:value="420568.50338000024" table:formula="of:=SUM([.O42:.O62])" table:style-name="ce193">
            <text:p><text:s/>420,569<text:s/></text:p>
          </table:table-cell>
          <table:table-cell office:value-type="float" office:value="472831.85486000031" table:formula="of:=SUM([.P42:.P62])" table:style-name="ce193">
            <text:p><text:s/>472,832<text:s/></text:p>
          </table:table-cell>
          <table:table-cell office:value-type="float" office:value="522501.89921000006" table:formula="of:=SUM([.Q42:.Q62])" table:style-name="ce193">
            <text:p><text:s/>522,502<text:s/></text:p>
          </table:table-cell>
          <table:table-cell office:value-type="float" office:value="593877.00105999992" table:formula="of:=SUM([.R42:.R62])" table:style-name="ce193">
            <text:p><text:s/>593,877<text:s/></text:p>
          </table:table-cell>
          <table:table-cell office:value-type="float" office:value="779062.96752000006" table:formula="of:=SUM([.S42:.S62])" table:style-name="ce193">
            <text:p><text:s/>779,063<text:s/></text:p>
          </table:table-cell>
          <table:table-cell office:value-type="float" office:value="706680.12280000001" table:formula="of:=SUM([.T42:.T62])" table:style-name="ce193">
            <text:p><text:s/>706,680<text:s/></text:p>
          </table:table-cell>
          <table:table-cell office:value-type="float" office:value="880833.29360000021" table:formula="of:=SUM([.U42:.U62])" table:style-name="ce193">
            <text:p><text:s/>880,833<text:s/></text:p>
          </table:table-cell>
          <table:table-cell office:value-type="float" office:value="663937.06243000028" table:formula="of:=SUM([.V42:.V62])" table:style-name="ce194">
            <text:p><text:s/>663,937<text:s/></text:p>
          </table:table-cell>
          <table:table-cell office:value-type="float" office:value="635839.20770999999" table:formula="of:=SUM([.W42:.W62])" table:style-name="ce194">
            <text:p><text:s/>635,839<text:s/></text:p>
          </table:table-cell>
          <table:table-cell office:value-type="float" office:value="531062.08594000002" table:formula="of:=SUM([.X42:.X62])" table:style-name="ce194">
            <text:p><text:s/>531,062<text:s/></text:p>
          </table:table-cell>
          <table:table-cell office:value-type="float" office:value="547744.34587000008" table:formula="of:=SUM([.Y42:.Y62])" table:style-name="ce195">
            <text:p><text:s/>547,744<text:s/></text:p>
          </table:table-cell>
          <table:table-cell office:value-type="float" office:value="615159.16372000007" table:formula="of:=SUM([.Z42:.Z62])" table:style-name="ce194">
            <text:p><text:s/>615,159<text:s/></text:p>
          </table:table-cell>
          <table:table-cell office:value-type="float" office:value="600108" table:style-name="ce325">
            <text:p><text:s/>600,108<text:s/></text:p>
          </table:table-cell>
          <table:table-cell office:value-type="float" office:value="702293" table:formula="of:=SUM([.AB42:.AB62])" table:style-name="ce194">
            <text:p><text:s/>702,293<text:s/></text:p>
          </table:table-cell>
          <table:table-cell table:number-columns-repeated="16356"/>
        </table:table-row>
        <table:table-row table:style-name="ro5">
          <table:table-cell/>
          <table:table-cell table:style-name="ce15"/>
          <table:table-cell table:number-columns-repeated="9" table:style-name="ce213"/>
          <table:table-cell table:number-columns-repeated="6" table:style-name="ce191"/>
          <table:table-cell table:number-columns-repeated="16367" table:style-name="ce15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6">
            <text:p>Yorkshire and the Humber: Hazardous waste deposited by fate from 1998 to 2024 (tonnes)</text:p>
          </table:table-cell>
          <table:table-cell table:number-columns-repeated="11" table:style-name="ce177"/>
          <table:table-cell table:number-columns-repeated="16371"/>
        </table:table-row>
        <table:table-row table:style-name="ro5">
          <table:table-cell/>
          <table:table-cell table:number-columns-repeated="12" table:style-name="ce177"/>
          <table:table-cell table:number-columns-repeated="16371"/>
        </table:table-row>
        <table:table-row table:style-name="ro31">
          <table:table-cell/>
          <table:table-cell office:value-type="string" table:style-name="ce216">
            <text:p>Year</text:p>
          </table:table-cell>
          <table:table-cell office:value-type="string" table:style-name="ce217">
            <text:p>Incineration with energy recovery</text:p>
          </table:table-cell>
          <table:table-cell office:value-type="string" table:style-name="ce217">
            <text:p>Incineration without energy recovery</text:p>
          </table:table-cell>
          <table:table-cell office:value-type="string" table:style-name="ce217">
            <text:p>Landfill</text:p>
          </table:table-cell>
          <table:table-cell office:value-type="string" table:style-name="ce217">
            <text:p>Long term storage</text:p>
          </table:table-cell>
          <table:table-cell office:value-type="string" table:style-name="ce217">
            <text:p>Recovery</text:p>
          </table:table-cell>
          <table:table-cell office:value-type="string" table:style-name="ce217">
            <text:p>Transfer (Short term)</text:p>
          </table:table-cell>
          <table:table-cell office:value-type="string" table:style-name="ce217">
            <text:p>Treatment</text:p>
          </table:table-cell>
          <table:table-cell office:value-type="string" table:style-name="ce217">
            <text:p>Other</text:p>
          </table:table-cell>
          <table:table-cell office:value-type="string" table:style-name="ce218">
            <text:p>Total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string" table:style-name="ce219">
            <text:p>1998/9</text:p>
          </table:table-cell>
          <table:table-cell office:value-type="float" office:value="119.11502" table:style-name="ce220">
            <text:p>119</text:p>
          </table:table-cell>
          <table:table-cell office:value-type="float" office:value="2701.7248699999996" table:style-name="ce220">
            <text:p>2,702</text:p>
          </table:table-cell>
          <table:table-cell office:value-type="float" office:value="264624.01661999972" table:style-name="ce220">
            <text:p>264,624</text:p>
          </table:table-cell>
          <table:table-cell office:value-type="string" table:style-name="ce221">
            <text:p>-</text:p>
          </table:table-cell>
          <table:table-cell office:value-type="float" office:value="70545.74132999999" table:style-name="ce220">
            <text:p>70,546</text:p>
          </table:table-cell>
          <table:table-cell office:value-type="float" office:value="39374.066130000159" table:style-name="ce220">
            <text:p>39,374</text:p>
          </table:table-cell>
          <table:table-cell office:value-type="float" office:value="219079.58462999944" table:style-name="ce220">
            <text:p>219,080</text:p>
          </table:table-cell>
          <table:table-cell office:value-type="float" office:value="219.43140000000005" table:style-name="ce222">
            <text:p>219</text:p>
          </table:table-cell>
          <table:table-cell office:value-type="float" office:value="596663.67999999935" table:formula="of:=SUM([.C69:.J69])" table:style-name="ce223">
            <text:p>596,664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00" table:style-name="ce219">
            <text:p>2000</text:p>
          </table:table-cell>
          <table:table-cell office:value-type="float" office:value="105.90201871097088" table:style-name="ce220">
            <text:p>106</text:p>
          </table:table-cell>
          <table:table-cell office:value-type="float" office:value="6127.203168013988" table:style-name="ce220">
            <text:p>6,127</text:p>
          </table:table-cell>
          <table:table-cell office:value-type="float" office:value="274992.14171223342" table:style-name="ce220">
            <text:p>274,992</text:p>
          </table:table-cell>
          <table:table-cell office:value-type="string" table:style-name="ce221">
            <text:p>-</text:p>
          </table:table-cell>
          <table:table-cell office:value-type="float" office:value="81979.831147130812" table:style-name="ce220">
            <text:p>81,980</text:p>
          </table:table-cell>
          <table:table-cell office:value-type="float" office:value="58301.125063730608" table:style-name="ce220">
            <text:p>58,301</text:p>
          </table:table-cell>
          <table:table-cell office:value-type="float" office:value="281615.61607203388" table:style-name="ce220">
            <text:p>281,616</text:p>
          </table:table-cell>
          <table:table-cell office:value-type="string" table:style-name="ce224">
            <text:p>-</text:p>
          </table:table-cell>
          <table:table-cell office:value-type="float" office:value="703121.81918185367" table:formula="of:=SUM([.C70:.J70])" table:style-name="ce223">
            <text:p>703,122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01" table:style-name="ce219">
            <text:p>2001</text:p>
          </table:table-cell>
          <table:table-cell office:value-type="float" office:value="155.41802048031241" table:style-name="ce220">
            <text:p>155</text:p>
          </table:table-cell>
          <table:table-cell office:value-type="float" office:value="7812.838575884467" table:style-name="ce220">
            <text:p>7,813</text:p>
          </table:table-cell>
          <table:table-cell office:value-type="float" office:value="270436.48054491589" table:style-name="ce220">
            <text:p>270,436</text:p>
          </table:table-cell>
          <table:table-cell office:value-type="string" table:style-name="ce221">
            <text:p>-</text:p>
          </table:table-cell>
          <table:table-cell office:value-type="float" office:value="96820.58950734789" table:style-name="ce220">
            <text:p>96,821</text:p>
          </table:table-cell>
          <table:table-cell office:value-type="float" office:value="54584.823585335675" table:style-name="ce220">
            <text:p>54,585</text:p>
          </table:table-cell>
          <table:table-cell office:value-type="float" office:value="207634.14001518389" table:style-name="ce220">
            <text:p>207,634</text:p>
          </table:table-cell>
          <table:table-cell office:value-type="string" table:style-name="ce224">
            <text:p>-</text:p>
          </table:table-cell>
          <table:table-cell office:value-type="float" office:value="637444.29024914815" table:formula="of:=SUM([.C71:.J71])" table:style-name="ce223">
            <text:p>637,444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02" table:style-name="ce219">
            <text:p>2002</text:p>
          </table:table-cell>
          <table:table-cell office:value-type="float" office:value="1813.6519775986671" table:style-name="ce220">
            <text:p>1,814</text:p>
          </table:table-cell>
          <table:table-cell office:value-type="float" office:value="6140.5037522744387" table:style-name="ce220">
            <text:p>6,141</text:p>
          </table:table-cell>
          <table:table-cell office:value-type="float" office:value="247253.49841963322" table:style-name="ce220">
            <text:p>247,253</text:p>
          </table:table-cell>
          <table:table-cell office:value-type="string" table:style-name="ce221">
            <text:p>-</text:p>
          </table:table-cell>
          <table:table-cell office:value-type="float" office:value="105919.15417845645" table:style-name="ce220">
            <text:p>105,919</text:p>
          </table:table-cell>
          <table:table-cell office:value-type="float" office:value="60205.654908064753" table:style-name="ce220">
            <text:p>60,206</text:p>
          </table:table-cell>
          <table:table-cell office:value-type="float" office:value="242858.854319515" table:style-name="ce220">
            <text:p>242,859</text:p>
          </table:table-cell>
          <table:table-cell office:value-type="string" table:style-name="ce224">
            <text:p>-</text:p>
          </table:table-cell>
          <table:table-cell office:value-type="float" office:value="664191.31755554257" table:formula="of:=SUM([.C72:.J72])" table:style-name="ce225">
            <text:p>664,191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03" table:style-name="ce219">
            <text:p>2003</text:p>
          </table:table-cell>
          <table:table-cell office:value-type="float" office:value="8130.3389999999999" table:style-name="ce220">
            <text:p>8,130</text:p>
          </table:table-cell>
          <table:table-cell office:value-type="float" office:value="4217.4024699999964" table:style-name="ce220">
            <text:p>4,217</text:p>
          </table:table-cell>
          <table:table-cell office:value-type="float" office:value="223990.36661000003" table:style-name="ce220">
            <text:p>223,990</text:p>
          </table:table-cell>
          <table:table-cell office:value-type="string" table:style-name="ce221">
            <text:p>-</text:p>
          </table:table-cell>
          <table:table-cell office:value-type="float" office:value="77563.605910000246" table:style-name="ce220">
            <text:p>77,564</text:p>
          </table:table-cell>
          <table:table-cell office:value-type="float" office:value="46986.411140000069" table:style-name="ce220">
            <text:p>46,986</text:p>
          </table:table-cell>
          <table:table-cell office:value-type="float" office:value="270251.73687000014" table:style-name="ce220">
            <text:p>270,252</text:p>
          </table:table-cell>
          <table:table-cell office:value-type="string" table:style-name="ce224">
            <text:p>-</text:p>
          </table:table-cell>
          <table:table-cell office:value-type="float" office:value="631139.86200000055" table:formula="of:=SUM([.C73:.J73])" table:style-name="ce225">
            <text:p>631,140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04" table:style-name="ce226">
            <text:p>2004</text:p>
          </table:table-cell>
          <table:table-cell office:value-type="float" office:value="7128.2910467237234" table:style-name="ce227">
            <text:p>7,128</text:p>
          </table:table-cell>
          <table:table-cell office:value-type="float" office:value="13595.032132692635" table:style-name="ce227">
            <text:p>13,595</text:p>
          </table:table-cell>
          <table:table-cell office:value-type="float" office:value="315701.47497431375" table:style-name="ce227">
            <text:p>315,701</text:p>
          </table:table-cell>
          <table:table-cell office:value-type="string" table:style-name="ce228">
            <text:p>-</text:p>
          </table:table-cell>
          <table:table-cell office:value-type="float" office:value="68222.027077843435" table:style-name="ce227">
            <text:p>68,222</text:p>
          </table:table-cell>
          <table:table-cell office:value-type="float" office:value="58191.052655173189" table:style-name="ce227">
            <text:p>58,191</text:p>
          </table:table-cell>
          <table:table-cell office:value-type="float" office:value="281616.14503854071" table:style-name="ce227">
            <text:p>281,616</text:p>
          </table:table-cell>
          <table:table-cell office:value-type="string" table:style-name="ce228">
            <text:p>-</text:p>
          </table:table-cell>
          <table:table-cell office:value-type="float" office:value="744454.02292528749" table:formula="of:=SUM([.C74:.J74])" table:style-name="ce229">
            <text:p>744,454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table:style-name="ce191"/>
          <table:table-cell table:number-columns-repeated="9" table:style-name="ce230"/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06" table:style-name="ce231">
            <text:p>2006</text:p>
          </table:table-cell>
          <table:table-cell office:value-type="float" office:value="25744.626100000001" table:style-name="ce232">
            <text:p>25,745</text:p>
          </table:table-cell>
          <table:table-cell office:value-type="float" office:value="8074.4338399999979" table:style-name="ce233">
            <text:p>8,074</text:p>
          </table:table-cell>
          <table:table-cell office:value-type="float" office:value="107604.78170000011" table:style-name="ce233">
            <text:p>107,605</text:p>
          </table:table-cell>
          <table:table-cell office:value-type="float" office:value="500.87095000000005" table:style-name="ce233">
            <text:p>501</text:p>
          </table:table-cell>
          <table:table-cell office:value-type="float" office:value="101733.62623000005" table:style-name="ce233">
            <text:p>101,734</text:p>
          </table:table-cell>
          <table:table-cell office:value-type="float" office:value="126196.67066" table:style-name="ce233">
            <text:p>126,197</text:p>
          </table:table-cell>
          <table:table-cell office:value-type="float" office:value="164017.07093999989" table:style-name="ce233">
            <text:p>164,017</text:p>
          </table:table-cell>
          <table:table-cell office:value-type="float" office:value="95.130099999999999" table:style-name="ce234">
            <text:p>95</text:p>
          </table:table-cell>
          <table:table-cell office:value-type="float" office:value="533967.21051999996" table:formula="of:=SUM([.C76:.J76])" table:style-name="ce235">
            <text:p>533,967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07" table:style-name="ce236">
            <text:p>2007</text:p>
          </table:table-cell>
          <table:table-cell office:value-type="float" office:value="23523.442200000001" table:style-name="ce237">
            <text:p>23,523</text:p>
          </table:table-cell>
          <table:table-cell office:value-type="float" office:value="13104.486060000012" table:style-name="ce220">
            <text:p>13,104</text:p>
          </table:table-cell>
          <table:table-cell office:value-type="float" office:value="75706.633600000001" table:style-name="ce238">
            <text:p>75,707</text:p>
          </table:table-cell>
          <table:table-cell office:value-type="float" office:value="165.08" table:style-name="ce220">
            <text:p>165</text:p>
          </table:table-cell>
          <table:table-cell office:value-type="float" office:value="85865.70928000001" table:style-name="ce220">
            <text:p>85,866</text:p>
          </table:table-cell>
          <table:table-cell office:value-type="float" office:value="124074.89201000013" table:style-name="ce220">
            <text:p>124,075</text:p>
          </table:table-cell>
          <table:table-cell office:value-type="float" office:value="177284.61340999976" table:style-name="ce220">
            <text:p>177,285</text:p>
          </table:table-cell>
          <table:table-cell office:value-type="float" office:value="31.106939999999994" table:style-name="ce239">
            <text:p>31</text:p>
          </table:table-cell>
          <table:table-cell office:value-type="float" office:value="499755.96349999995" table:formula="of:=SUM([.C77:.J77])" table:style-name="ce240">
            <text:p>499,756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08" table:style-name="ce236">
            <text:p>2008</text:p>
          </table:table-cell>
          <table:table-cell office:value-type="float" office:value="15032.9051" table:style-name="ce241">
            <text:p>15,033</text:p>
          </table:table-cell>
          <table:table-cell office:value-type="float" office:value="10950.379569999997" table:style-name="ce238">
            <text:p>10,950</text:p>
          </table:table-cell>
          <table:table-cell office:value-type="float" office:value="55783.062729999991" table:style-name="ce238">
            <text:p>55,783</text:p>
          </table:table-cell>
          <table:table-cell office:value-type="string" table:style-name="ce221">
            <text:p>-</text:p>
          </table:table-cell>
          <table:table-cell office:value-type="float" office:value="93556.875629999995" table:style-name="ce238">
            <text:p>93,557</text:p>
          </table:table-cell>
          <table:table-cell office:value-type="float" office:value="116987.69257999994" table:style-name="ce220">
            <text:p>116,988</text:p>
          </table:table-cell>
          <table:table-cell office:value-type="float" office:value="135237.20123000006" table:style-name="ce238">
            <text:p>135,237</text:p>
          </table:table-cell>
          <table:table-cell office:value-type="float" office:value="30.071199999999997" table:style-name="ce239">
            <text:p>30</text:p>
          </table:table-cell>
          <table:table-cell office:value-type="float" office:value="427578.18803999998" table:formula="of:=SUM([.C78:.J78])" table:style-name="ce240">
            <text:p>427,578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09" table:style-name="ce219">
            <text:p>2009</text:p>
          </table:table-cell>
          <table:table-cell office:value-type="float" office:value="28557.219929999999" table:style-name="ce238">
            <text:p>28,557</text:p>
          </table:table-cell>
          <table:table-cell office:value-type="float" office:value="12139.841680000036" table:style-name="ce238">
            <text:p>12,140</text:p>
          </table:table-cell>
          <table:table-cell office:value-type="float" office:value="41792.142799999994" table:style-name="ce238">
            <text:p>41,792</text:p>
          </table:table-cell>
          <table:table-cell office:value-type="string" table:style-name="ce221">
            <text:p>-</text:p>
          </table:table-cell>
          <table:table-cell office:value-type="float" office:value="84415.905379999982" table:style-name="ce238">
            <text:p>84,416</text:p>
          </table:table-cell>
          <table:table-cell office:value-type="float" office:value="89641.413899999985" table:style-name="ce220">
            <text:p>89,641</text:p>
          </table:table-cell>
          <table:table-cell office:value-type="float" office:value="91743.070540000001" table:style-name="ce238">
            <text:p>91,743</text:p>
          </table:table-cell>
          <table:table-cell office:value-type="float" office:value="49.8414" table:style-name="ce220">
            <text:p>50</text:p>
          </table:table-cell>
          <table:table-cell office:value-type="float" office:value="348339.43562999996" table:formula="of:=SUM([.C79:.J79])" table:style-name="ce225">
            <text:p>348,339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10" table:style-name="ce236">
            <text:p>2010</text:p>
          </table:table-cell>
          <table:table-cell office:value-type="float" office:value="25061.614069999996" table:style-name="ce241">
            <text:p>25,062</text:p>
          </table:table-cell>
          <table:table-cell office:value-type="float" office:value="16485.164400000023" table:style-name="ce238">
            <text:p>16,485</text:p>
          </table:table-cell>
          <table:table-cell office:value-type="float" office:value="30946.372350000001" table:style-name="ce238">
            <text:p>30,946</text:p>
          </table:table-cell>
          <table:table-cell office:value-type="string" table:style-name="ce221">
            <text:p>-</text:p>
          </table:table-cell>
          <table:table-cell office:value-type="float" office:value="113113.01366999999" table:style-name="ce238">
            <text:p>113,113</text:p>
          </table:table-cell>
          <table:table-cell office:value-type="float" office:value="94967.749920000322" table:style-name="ce220">
            <text:p>94,968</text:p>
          </table:table-cell>
          <table:table-cell office:value-type="float" office:value="90795.862720000034" table:style-name="ce238">
            <text:p>90,796</text:p>
          </table:table-cell>
          <table:table-cell office:value-type="float" office:value="72.088899999999995" table:style-name="ce220">
            <text:p>72</text:p>
          </table:table-cell>
          <table:table-cell office:value-type="float" office:value="371441.86603000032" table:formula="of:=SUM([.C80:.J80])" table:style-name="ce225">
            <text:p>371,442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11" table:style-name="ce236">
            <text:p>2011</text:p>
          </table:table-cell>
          <table:table-cell office:value-type="float" office:value="26443.719799999995" table:style-name="ce242">
            <text:p>26,444</text:p>
          </table:table-cell>
          <table:table-cell office:value-type="float" office:value="10211.202949999984" table:style-name="ce243">
            <text:p>10,211</text:p>
          </table:table-cell>
          <table:table-cell office:value-type="float" office:value="51149.372999999992" table:style-name="ce243">
            <text:p>51,149</text:p>
          </table:table-cell>
          <table:table-cell office:value-type="string" table:style-name="ce221">
            <text:p>-</text:p>
          </table:table-cell>
          <table:table-cell office:value-type="float" office:value="150504.16053000002" table:style-name="ce243">
            <text:p>150,504</text:p>
          </table:table-cell>
          <table:table-cell office:value-type="float" office:value="93609.526130000071" table:style-name="ce243">
            <text:p>93,610</text:p>
          </table:table-cell>
          <table:table-cell office:value-type="float" office:value="88518.067269999985" table:style-name="ce243">
            <text:p>88,518</text:p>
          </table:table-cell>
          <table:table-cell office:value-type="float" office:value="132.4537" table:style-name="ce243">
            <text:p>132</text:p>
          </table:table-cell>
          <table:table-cell office:value-type="float" office:value="420568.50338000007" table:formula="of:=SUM([.C81:.J81])" table:style-name="ce225">
            <text:p>420,569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12" table:style-name="ce236">
            <text:p>2012</text:p>
          </table:table-cell>
          <table:table-cell office:value-type="float" office:value="28777.963409999997" table:style-name="ce242">
            <text:p>28,778</text:p>
          </table:table-cell>
          <table:table-cell office:value-type="float" office:value="6321.7022500000103" table:style-name="ce243">
            <text:p>6,322</text:p>
          </table:table-cell>
          <table:table-cell office:value-type="float" office:value="87935.790999999997" table:style-name="ce243">
            <text:p>87,936</text:p>
          </table:table-cell>
          <table:table-cell office:value-type="string" table:style-name="ce221">
            <text:p>-</text:p>
          </table:table-cell>
          <table:table-cell office:value-type="float" office:value="161655.72924999997" table:style-name="ce238">
            <text:p>161,656</text:p>
          </table:table-cell>
          <table:table-cell office:value-type="float" office:value="106518.45099000042" table:style-name="ce243">
            <text:p>106,518</text:p>
          </table:table-cell>
          <table:table-cell office:value-type="float" office:value="81605.216550000099" table:style-name="ce243">
            <text:p>81,605</text:p>
          </table:table-cell>
          <table:table-cell office:value-type="float" office:value="17.00141" table:style-name="ce243">
            <text:p>17</text:p>
          </table:table-cell>
          <table:table-cell office:value-type="float" office:value="472831.85486000055" table:formula="of:=SUM([.C82:.J82])" table:style-name="ce225">
            <text:p>472,832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13" table:style-name="ce236">
            <text:p>2013</text:p>
          </table:table-cell>
          <table:table-cell office:value-type="float" office:value="26149.80675" table:style-name="ce242">
            <text:p>26,150</text:p>
          </table:table-cell>
          <table:table-cell office:value-type="float" office:value="8384.3392000000003" table:style-name="ce243">
            <text:p>8,384</text:p>
          </table:table-cell>
          <table:table-cell office:value-type="float" office:value="107301.90999999999" table:style-name="ce243">
            <text:p>107,302</text:p>
          </table:table-cell>
          <table:table-cell office:value-type="string" table:style-name="ce221">
            <text:p>-</text:p>
          </table:table-cell>
          <table:table-cell office:value-type="float" office:value="162790.46892000001" table:style-name="ce243">
            <text:p>162,790</text:p>
          </table:table-cell>
          <table:table-cell office:value-type="float" office:value="120819.31367" table:style-name="ce243">
            <text:p>120,819</text:p>
          </table:table-cell>
          <table:table-cell office:value-type="float" office:value="97044.584970000025" table:style-name="ce243">
            <text:p>97,045</text:p>
          </table:table-cell>
          <table:table-cell office:value-type="float" office:value="11.4757" table:style-name="ce243">
            <text:p>11</text:p>
          </table:table-cell>
          <table:table-cell office:value-type="float" office:value="522501.89921" table:formula="of:=SUM([.C83:.J83])" table:style-name="ce225">
            <text:p>522,502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14" table:style-name="ce219">
            <text:p>2014</text:p>
          </table:table-cell>
          <table:table-cell office:value-type="float" office:value="9076.8089999999993" table:style-name="ce244">
            <text:p>9,077</text:p>
          </table:table-cell>
          <table:table-cell office:value-type="float" office:value="9378.6004700000012" table:style-name="ce221">
            <text:p>9,379</text:p>
          </table:table-cell>
          <table:table-cell office:value-type="float" office:value="114476.54" table:style-name="ce221">
            <text:p>114,477</text:p>
          </table:table-cell>
          <table:table-cell office:value-type="float" office:value="1.06" table:style-name="ce221">
            <text:p>1</text:p>
          </table:table-cell>
          <table:table-cell office:value-type="float" office:value="181366.75081000003" table:style-name="ce221">
            <text:p>181,367</text:p>
          </table:table-cell>
          <table:table-cell office:value-type="float" office:value="146601.65416999999" table:style-name="ce221">
            <text:p>146,602</text:p>
          </table:table-cell>
          <table:table-cell office:value-type="float" office:value="132974.24341" table:style-name="ce221">
            <text:p>132,974</text:p>
          </table:table-cell>
          <table:table-cell office:value-type="float" office:value="1.3432000000000002" table:style-name="ce238">
            <text:p>1</text:p>
          </table:table-cell>
          <table:table-cell office:value-type="float" office:value="593877.00106000004" table:formula="of:=SUM([.C84:.J84])" table:style-name="ce225">
            <text:p>593,877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15" table:style-name="ce219">
            <text:p>2015</text:p>
          </table:table-cell>
          <table:table-cell office:value-type="float" office:value="35759.3531" table:style-name="ce221">
            <text:p>35,759</text:p>
          </table:table-cell>
          <table:table-cell office:value-type="float" office:value="7560.21605" table:style-name="ce221">
            <text:p>7,560</text:p>
          </table:table-cell>
          <table:table-cell office:value-type="float" office:value="148231.98000000001" table:style-name="ce221">
            <text:p>148,232</text:p>
          </table:table-cell>
          <table:table-cell office:value-type="string" table:style-name="ce221">
            <text:p>-</text:p>
          </table:table-cell>
          <table:table-cell office:value-type="float" office:value="257071" table:style-name="ce221">
            <text:p>257,071</text:p>
          </table:table-cell>
          <table:table-cell office:value-type="float" office:value="151949" table:style-name="ce221">
            <text:p>151,949</text:p>
          </table:table-cell>
          <table:table-cell office:value-type="float" office:value="178479" table:style-name="ce221">
            <text:p>178,479</text:p>
          </table:table-cell>
          <table:table-cell office:value-type="float" office:value="12.865200000000002" table:style-name="ce238">
            <text:p>13</text:p>
          </table:table-cell>
          <table:table-cell office:value-type="float" office:value="779063.41434999998" table:formula="of:=SUM([.C85:.J85])" table:style-name="ce225">
            <text:p>779,063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17" table:style-name="ce219">
            <text:p>2017</text:p>
          </table:table-cell>
          <table:table-cell office:value-type="float" office:value="32454.741999999995" table:style-name="ce221">
            <text:p>32,455</text:p>
          </table:table-cell>
          <table:table-cell office:value-type="float" office:value="7205.9878999999992" table:style-name="ce221">
            <text:p>7,206</text:p>
          </table:table-cell>
          <table:table-cell office:value-type="float" office:value="79530.66720000004" table:style-name="ce221">
            <text:p>79,531</text:p>
          </table:table-cell>
          <table:table-cell office:value-type="float" office:value="1.2" table:style-name="ce221">
            <text:p>1</text:p>
          </table:table-cell>
          <table:table-cell office:value-type="float" office:value="425832.43539999996" table:style-name="ce221">
            <text:p>425,832</text:p>
          </table:table-cell>
          <table:table-cell office:value-type="float" office:value="135949.95448999983" table:style-name="ce221">
            <text:p>135,950</text:p>
          </table:table-cell>
          <table:table-cell office:value-type="float" office:value="196791.46030999997" table:style-name="ce221">
            <text:p>196,791</text:p>
          </table:table-cell>
          <table:table-cell office:value-type="float" office:value="3066.8462999999992" table:style-name="ce238">
            <text:p>3,067</text:p>
          </table:table-cell>
          <table:table-cell office:value-type="float" office:value="880833.29359999974" table:formula="of:=SUM([.C86:.J86])" table:style-name="ce225">
            <text:p>880,833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18" table:style-name="ce219">
            <text:p>2018</text:p>
          </table:table-cell>
          <table:table-cell office:value-type="float" office:value="24741.977999999999" table:style-name="ce221">
            <text:p>24,742</text:p>
          </table:table-cell>
          <table:table-cell office:value-type="float" office:value="5403.3580000000002" table:style-name="ce221">
            <text:p>5,403</text:p>
          </table:table-cell>
          <table:table-cell office:value-type="float" office:value="67278.315000000002" table:style-name="ce221">
            <text:p>67,278</text:p>
          </table:table-cell>
          <table:table-cell office:value-type="float" office:value="800.68" table:style-name="ce221">
            <text:p>801</text:p>
          </table:table-cell>
          <table:table-cell office:value-type="float" office:value="292615.81400000001" table:style-name="ce221">
            <text:p>292,616</text:p>
          </table:table-cell>
          <table:table-cell office:value-type="float" office:value="108435" table:style-name="ce221">
            <text:p>108,435</text:p>
          </table:table-cell>
          <table:table-cell office:value-type="float" office:value="162122.796" table:style-name="ce221">
            <text:p>162,123</text:p>
          </table:table-cell>
          <table:table-cell office:value-type="float" office:value="2539" table:style-name="ce238">
            <text:p>2,539</text:p>
          </table:table-cell>
          <table:table-cell office:value-type="float" office:value="663936.94099999999" table:formula="of:=SUM([.C87:.J87])" table:style-name="ce225">
            <text:p>663,937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19" table:style-name="ce219">
            <text:p>2019</text:p>
          </table:table-cell>
          <table:table-cell office:value-type="float" office:value="31343.770199999999" table:style-name="ce241">
            <text:p>31,344</text:p>
          </table:table-cell>
          <table:table-cell office:value-type="float" office:value="7319.513390000001" table:style-name="ce238">
            <text:p>7,320</text:p>
          </table:table-cell>
          <table:table-cell office:value-type="float" office:value="60066.443000000014" table:style-name="ce238">
            <text:p>60,066</text:p>
          </table:table-cell>
          <table:table-cell office:value-type="string" table:style-name="ce221">
            <text:p>-</text:p>
          </table:table-cell>
          <table:table-cell office:value-type="float" office:value="237398.00923999998" table:style-name="ce238">
            <text:p>237,398</text:p>
          </table:table-cell>
          <table:table-cell office:value-type="float" office:value="107199" table:style-name="ce221">
            <text:p>107,199</text:p>
          </table:table-cell>
          <table:table-cell office:value-type="float" office:value="189485.36489000011" table:style-name="ce238">
            <text:p>189,485</text:p>
          </table:table-cell>
          <table:table-cell office:value-type="float" office:value="3027" table:style-name="ce245">
            <text:p>3,027</text:p>
          </table:table-cell>
          <table:table-cell office:value-type="float" office:value="635839.1007200001" table:formula="of:=SUM([.C88:.J88])" table:style-name="ce225">
            <text:p>635,839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20" table:style-name="ce219">
            <text:p>2020</text:p>
          </table:table-cell>
          <table:table-cell office:value-type="float" office:value="11328" table:style-name="ce241">
            <text:p>11,328</text:p>
          </table:table-cell>
          <table:table-cell office:value-type="float" office:value="6816" table:style-name="ce238">
            <text:p>6,816</text:p>
          </table:table-cell>
          <table:table-cell office:value-type="float" office:value="39957" table:style-name="ce238">
            <text:p>39,957</text:p>
          </table:table-cell>
          <table:table-cell office:value-type="string" table:style-name="ce250">
            <text:p>-</text:p>
          </table:table-cell>
          <table:table-cell office:value-type="float" office:value="214731.04228000017" table:style-name="ce238">
            <text:p>214,731</text:p>
          </table:table-cell>
          <table:table-cell office:value-type="float" office:value="110514" table:style-name="ce250">
            <text:p>110,514</text:p>
          </table:table-cell>
          <table:table-cell office:value-type="float" office:value="145782" table:style-name="ce238">
            <text:p>145,782</text:p>
          </table:table-cell>
          <table:table-cell office:value-type="float" office:value="1933" table:style-name="ce245">
            <text:p>1,933</text:p>
          </table:table-cell>
          <table:table-cell office:value-type="float" office:value="531062" table:style-name="ce225">
            <text:p>531,062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21" table:style-name="ce219">
            <text:p>2021</text:p>
          </table:table-cell>
          <table:table-cell office:value-type="float" office:value="6032.6594000000014" table:style-name="ce241">
            <text:p>6,033</text:p>
          </table:table-cell>
          <table:table-cell office:value-type="float" office:value="7194.1651000000011" table:style-name="ce238">
            <text:p>7,194</text:p>
          </table:table-cell>
          <table:table-cell office:value-type="float" office:value="35608.290000000008" table:style-name="ce238">
            <text:p>35,608</text:p>
          </table:table-cell>
          <table:table-cell office:value-type="float" office:value="0.02" table:style-name="ce238">
            <text:p>0</text:p>
          </table:table-cell>
          <table:table-cell office:value-type="float" office:value="236012.50153000001" table:style-name="ce238">
            <text:p>236,013</text:p>
          </table:table-cell>
          <table:table-cell office:value-type="float" office:value="120978" table:style-name="ce250">
            <text:p>120,978</text:p>
          </table:table-cell>
          <table:table-cell office:value-type="float" office:value="139566.08779999998" table:style-name="ce238">
            <text:p>139,566</text:p>
          </table:table-cell>
          <table:table-cell office:value-type="float" office:value="2353" table:style-name="ce245">
            <text:p>2,353</text:p>
          </table:table-cell>
          <table:table-cell office:value-type="float" office:value="547744" table:style-name="ce225">
            <text:p>547,744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22" table:style-name="ce219">
            <text:p>2022</text:p>
          </table:table-cell>
          <table:table-cell office:value-type="float" office:value="4276.3419999999969" table:style-name="ce328">
            <text:p>4,276</text:p>
          </table:table-cell>
          <table:table-cell office:value-type="float" office:value="7086.1140400000022" table:style-name="ce328">
            <text:p>7,086</text:p>
          </table:table-cell>
          <table:table-cell office:value-type="float" office:value="27785.240000000013" table:style-name="ce328">
            <text:p>27,785</text:p>
          </table:table-cell>
          <table:table-cell office:value-type="float" office:value="0.8" table:style-name="ce328">
            <text:p>1</text:p>
          </table:table-cell>
          <table:table-cell office:value-type="float" office:value="323982.87600999989" table:style-name="ce328">
            <text:p>323,983</text:p>
          </table:table-cell>
          <table:table-cell office:value-type="float" office:value="127263" table:style-name="ce250">
            <text:p>127,263</text:p>
          </table:table-cell>
          <table:table-cell office:value-type="float" office:value="122132.27085" table:style-name="ce328">
            <text:p>122,132</text:p>
          </table:table-cell>
          <table:table-cell office:value-type="float" office:value="2632" table:style-name="ce238">
            <text:p>2,632</text:p>
          </table:table-cell>
          <table:table-cell office:value-type="float" office:value="615158.64289999986" table:formula="of:=+SUM([.C91:.J91])" table:style-name="ce225">
            <text:p>615,159</text:p>
          </table:table-cell>
          <table:table-cell table:number-columns-repeated="2" table:style-name="ce177"/>
          <table:table-cell table:number-columns-repeated="16371"/>
        </table:table-row>
        <table:table-row table:style-name="ro5">
          <table:table-cell/>
          <table:table-cell office:value-type="float" office:value="2023" table:style-name="ce219">
            <text:p>2023</text:p>
          </table:table-cell>
          <table:table-cell office:value-type="float" office:value="901" table:style-name="ce328">
            <text:p>901</text:p>
          </table:table-cell>
          <table:table-cell office:value-type="float" office:value="3582" table:style-name="ce328">
            <text:p>3,582</text:p>
          </table:table-cell>
          <table:table-cell office:value-type="float" office:value="16571" table:style-name="ce328">
            <text:p>16,571</text:p>
          </table:table-cell>
          <table:table-cell office:value-type="float" office:value="0" table:style-name="ce328">
            <text:p>0</text:p>
          </table:table-cell>
          <table:table-cell office:value-type="float" office:value="329420" table:style-name="ce328">
            <text:p>329,420</text:p>
          </table:table-cell>
          <table:table-cell office:value-type="float" office:value="136028" table:style-name="ce250">
            <text:p>136,028</text:p>
          </table:table-cell>
          <table:table-cell office:value-type="float" office:value="111004" table:style-name="ce328">
            <text:p>111,004</text:p>
          </table:table-cell>
          <table:table-cell office:value-type="float" office:value="2602" table:style-name="ce238">
            <text:p>2,602</text:p>
          </table:table-cell>
          <table:table-cell office:value-type="float" office:value="600108" table:formula="of:=+SUM([.C92:.J92])" table:style-name="ce225">
            <text:p>600,108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4" table:style-name="ce333">
            <text:p>2024</text:p>
          </table:table-cell>
          <table:table-cell office:value-type="float" office:value="963" table:style-name="ce330">
            <text:p>963</text:p>
          </table:table-cell>
          <table:table-cell office:value-type="float" office:value="3122" table:style-name="ce330">
            <text:p>3,122</text:p>
          </table:table-cell>
          <table:table-cell office:value-type="float" office:value="8472" table:style-name="ce330">
            <text:p>8,472</text:p>
          </table:table-cell>
          <table:table-cell office:value-type="string" table:style-name="ce329">
            <text:p>-</text:p>
          </table:table-cell>
          <table:table-cell office:value-type="float" office:value="349295" table:style-name="ce330">
            <text:p>349,295</text:p>
          </table:table-cell>
          <table:table-cell office:value-type="float" office:value="232307" table:style-name="ce331">
            <text:p>232,307</text:p>
          </table:table-cell>
          <table:table-cell office:value-type="float" office:value="105586" table:style-name="ce330">
            <text:p>105,586</text:p>
          </table:table-cell>
          <table:table-cell office:value-type="float" office:value="2548" table:style-name="ce332">
            <text:p>2,548</text:p>
          </table:table-cell>
          <table:table-cell office:value-type="float" office:value="702293" table:formula="of:=+SUM([.C93:.J93])" table:style-name="ce334">
            <text:p>702,293</text:p>
          </table:table-cell>
          <table:table-cell table:number-columns-repeated="16373" table:style-name="ce15"/>
        </table:table-row>
        <table:table-row table:number-rows-repeated="104848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0" number:min-decimal-places="0" number:min-integer-digits="1" number:grouping="true" number:display-factor="1000"/>
    </number:number-style>
    <number:number-style style:name="N39">
      <number:text>  </number:text>
      <number:number number:decimal-places="0" number:min-decimal-places="0" number:min-integer-digits="1" number:grouping="true" number:display-factor="1000"/>
    </number:number-style>
    <style:style style:name="Comma" style:family="table-cell" style:data-style-name="N37"/>
    <style:style style:name="Comma_32__91_0_93_" style:display-name="Comma [0]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EWHaz09_Final" style:display-name="Normal_Copy of EWHaz09_Final" style:family="table-cell" style:data-style-name="N0">
      <style:table-cell-properties style:vertical-align="automatic" fo:background-color="transparent"/>
    </style:style>
    <style:style style:name="Normal_E_38_WIncin09" style:display-name="Normal_E&amp;WIncin09" style:family="table-cell" style:data-style-name="N0">
      <style:table-cell-properties style:vertical-align="automatic" fo:background-color="transparent"/>
    </style:style>
    <style:style style:name="Normal_emhaztables06_1902562" style:family="table-cell" style:data-style-name="N0">
      <style:table-cell-properties style:vertical-align="automatic" fo:background-color="transparent"/>
    </style:style>
    <style:style style:name="Normal_eoehaztables06_190257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yhhaztables06_190255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DPullen</meta:initial-creator>
    <dc:creator>Mike Anderson</dc:creator>
    <meta:creation-date>2006-10-24T13:52:52Z</meta:creation-date>
    <dc:date>2025-09-04T08:12:20Z</dc:date>
    <meta:user-defined meta:name="_NewReviewCycle"/>
    <meta:user-defined meta:name="_EmailSubject">Data Tables 2006</meta:user-defined>
    <meta:user-defined meta:name="_AuthorEmail">david.wynn@environment-agency.gov.uk</meta:user-defined>
    <meta:user-defined meta:name="_AuthorEmailDisplayName">Wynn, David</meta:user-defined>
    <meta:user-defined meta:name="_ReviewingToolsShownOnce"/>
    <meta:user-defined meta:name="InformationType"/>
    <meta:user-defined meta:name="Distribution">9;#Internal EA|b77da37e-7166-4741-8c12-4679faab22d9</meta:user-defined>
    <meta:user-defined meta:name="MediaServiceImageTags"/>
    <meta:user-defined meta:name="ContentTypeId">0x010100A5BF1C78D9F64B679A5EBDE1C6598EBC010034932E5E1F003A46AB4B0DB84D8159EA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</office:meta>
</office:document-meta>
</file>