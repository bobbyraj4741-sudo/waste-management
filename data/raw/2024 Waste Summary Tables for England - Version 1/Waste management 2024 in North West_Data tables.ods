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B7DEE8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7DEE8"/>
      <style:text-properties fo:color="#1F497D"/>
    </style:style>
    <style:style style:name="ce5" style:family="table-cell" style:parent-style-name="Default" style:data-style-name="N0">
      <style:table-cell-properties fo:background-color="#B7DEE8"/>
    </style:style>
    <style:style style:name="ce6" style:family="table-cell" style:parent-style-name="Default" style:data-style-name="N0">
      <style:table-cell-properties fo:background-color="#FFFFFF"/>
      <style:text-properties fo:color="#1F497D" style:font-name="Calibri" style:font-name-asian="Calibri" style:font-name-complex="Calibri"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FFFFFF"/>
      <style:text-properties fo:color="#1F497D"/>
    </style:style>
    <style:style style:name="ce8" style:family="table-cell" style:parent-style-name="Hyperlink" style:data-style-name="N0">
      <style:table-cell-properties style:vertical-align="automatic" fo:background-color="#FFFFFF"/>
      <style:text-properties fo:color="#0000FF" fo:font-size="20pt" style:font-size-asian="20pt" style:font-size-complex="20pt" style:text-underline-style="solid" style:text-underline-type="single"/>
    </style:style>
    <style:style style:name="ce9" style:family="table-cell" style:parent-style-name="Default" style:data-style-name="N0">
      <style:table-cell-properties fo:background-color="#FFFFFF"/>
      <style:text-properties style:font-name="Wingdings" style:font-name-asian="Wingdings" style:font-name-complex="Wingdings" fo:font-size="14pt" style:font-size-asian="14pt" style:font-size-complex="14pt" style:font-charset="x-symbol"/>
    </style:style>
    <style:style style:name="ce10" style:family="table-cell" style:parent-style-name="Default" style:data-style-name="N0">
      <style:text-properties style:font-name="Wingdings" style:font-name-asian="Wingdings" style:font-name-complex="Wingdings" style:font-charset="x-symbol"/>
    </style:style>
    <style:style style:name="ce11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20pt" style:font-size-asian="20pt" style:font-size-complex="20pt"/>
    </style:style>
    <style:style style:name="ce12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/>
    </style:style>
    <style:style style:name="ce13" style:family="table-cell" style:parent-style-name="Default" style:data-style-name="N0">
      <style:table-cell-properties style:vertical-align="middle"/>
      <style:text-properties style:font-name="Wingdings" style:font-name-asian="Wingdings" style:font-name-complex="Wingdings" style:font-charset="x-symbol"/>
    </style:style>
    <style:style style:name="ce14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27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4" style:family="table-cell" style:parent-style-name="Default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6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39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0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1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37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Default" style:data-style-name="N3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0" style:family="table-cell" style:parent-style-name="Default" style:data-style-name="N0">
      <style:text-properties style:font-name="Calibri" style:font-name-asian="Calibri" style:font-name-complex="Calibri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2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FFFFFF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4" style:family="table-cell" style:parent-style-name="Comma_32__91_0_93_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5" style:family="table-cell" style:parent-style-name="Comma_32__91_0_93_" style:data-style-name="N37">
      <style:table-cell-properties fo:background-color="#FFFFFF"/>
      <style:text-properties style:font-name="Calibri" style:font-name-asian="Calibri" style:font-name-complex="Calibri"/>
    </style:style>
    <style:style style:name="ce6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8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2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3" style:family="table-cell" style:parent-style-name="Default" style:data-style-name="N37">
      <style:table-cell-properties fo:border-top="thin solid #000000" fo:border-bottom="thin solid #000000" fo:border-left="none" fo:border-right="none" fo:background-color="#FFFFFF"/>
      <style:text-properties style:font-name="Calibri" style:font-name-asian="Calibri" style:font-name-complex="Calibri"/>
    </style:style>
    <style:style style:name="ce74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6" style:family="table-cell" style:parent-style-name="Default" style:data-style-name="N37">
      <style:table-cell-properties fo:background-color="#FFFFFF"/>
      <style:text-properties style:font-name="Calibri" style:font-name-asian="Calibri" style:font-name-complex="Calibri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80" style:family="table-cell" style:parent-style-name="Default" style:data-style-name="N37">
      <style:table-cell-properties fo:border-top="thin solid #000000" fo:border-bottom="none" fo:border-left="none" fo:border-right="none" fo:background-color="#FFFFFF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/>
    </style:style>
    <style:style style:name="ce84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5" style:family="table-cell" style:parent-style-name="Default" style:data-style-name="N37">
      <style:table-cell-properties fo:border-top="thin solid #000000" fo:border-bottom="thin solid #000000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6" style:family="table-cell" style:parent-style-name="Default" style:data-style-name="N37">
      <style:table-cell-properties fo:border="thin solid #000000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8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0" style:family="table-cell" style:parent-style-name="Default" style:data-style-name="N37">
      <style:table-cell-properties fo:border-top="none" fo:border-bottom="thin solid #000000" fo:border-left="none" fo:border-right="none" fo:background-color="#FFFFFF"/>
      <style:text-properties style:font-name="Calibri" style:font-name-asian="Calibri" style:font-name-complex="Calibri"/>
    </style:style>
    <style:style style:name="ce9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3" style:family="table-cell" style:parent-style-name="Default" style:data-style-name="N37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none" fo:background-color="#31869B"/>
      <style:text-properties fo:color="#FFFFFF" style:font-name="Calibri" style:font-name-asian="Calibri" style:font-name-complex="Calibri"/>
    </style:style>
    <style:style style:name="ce96" style:family="table-cell" style:parent-style-name="Comm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7" style:family="table-cell" style:parent-style-name="Comma_32__91_0_93_" style:data-style-name="N37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8" style:family="table-cell" style:parent-style-name="Comma_32__91_0_93_" style:data-style-name="N37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9" style:family="table-cell" style:parent-style-name="Comma_32__91_0_93_" style:data-style-name="N37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0" style:family="table-cell" style:parent-style-name="Comma_32__91_0_93_" style:data-style-name="N37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1" style:family="table-cell" style:parent-style-name="Comma_32__91_0_93_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2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5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06" style:family="table-cell" style:parent-style-name="Default" style:data-style-name="N3"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ext-properties fo:color="#FF0000" style:font-name="Calibri" style:font-name-asian="Calibri" style:font-name-complex="Calibri" fo:font-size="14pt" style:font-size-asian="14pt" style:font-size-complex="14pt"/>
    </style:style>
    <style:style style:name="ce108" style:family="table-cell" style:parent-style-name="Default" style:data-style-name="N1">
      <style:text-properties style:font-name="Calibri" style:font-name-asian="Calibri" style:font-name-complex="Calibri"/>
    </style:style>
    <style:style style:name="ce109" style:family="table-cell" style:parent-style-name="Default" style:data-style-name="N0"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11" style:family="table-cell" style:parent-style-name="Default" style:data-style-name="N37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2" style:family="table-cell" style:parent-style-name="Default" style:data-style-name="N0">
      <style:text-properties style:font-name="Calibri" style:font-name-asian="Calibri" style:font-name-complex="Calibri" fo:font-size="8pt" style:font-size-asian="8pt" style:font-size-complex="8pt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4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20" style:family="table-cell" style:parent-style-name="Default" style:data-style-name="N37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23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5" style:family="table-cell" style:parent-style-name="Default" style:data-style-name="N37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none" fo:border-bottom="none" fo:border-left="thin solid #C0C0C0" fo:border-right="none" style:vertical-align="middle"/>
      <style:text-properties style:font-name="Calibri" style:font-name-asian="Calibri" style:font-name-complex="Calibri"/>
    </style:style>
    <style:style style:name="ce129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30" style:family="table-cell" style:parent-style-name="Default" style:data-style-name="N37">
      <style:table-cell-properties style:vertical-align="middle"/>
      <style:text-properties style:font-name="Calibri" style:font-name-asian="Calibri" style:font-name-complex="Calibri"/>
    </style:style>
    <style:style style:name="ce13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32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3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4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5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6" style:family="table-cell" style:parent-style-name="Default" style:data-style-name="N0">
      <style:table-cell-properties fo:border-top="thin solid #FFFFFF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7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8" style:family="table-cell" style:parent-style-name="Default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39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0" style:family="table-cell" style:parent-style-name="Comma_32__91_0_93_" style:data-style-name="N37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42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4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4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0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1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52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3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4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5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58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9" style:family="table-cell" style:parent-style-name="Comma_32__91_0_93_" style:data-style-name="N37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0" style:family="table-cell" style:parent-style-name="Comma_32__91_0_93_" style:data-style-name="N37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1" style:family="table-cell" style:parent-style-name="Comma_32__91_0_93_" style:data-style-name="N37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2" style:family="table-cell" style:parent-style-name="Comma_32__91_0_93_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3" style:family="table-cell" style:parent-style-name="Comma_32__91_0_93_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4" style:family="table-cell" style:parent-style-name="Default" style:data-style-name="N37">
      <style:table-cell-properties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6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68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9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0" style:family="table-cell" style:parent-style-name="Default" style:data-style-name="N37">
      <style:table-cell-properties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172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3" style:family="table-cell" style:parent-style-name="Normal_E_38_WIncin09" style:data-style-name="N0">
      <style:table-cell-properties fo:border-top="none" fo:border-bottom="thin solid #FFFFFF" fo:border-left="thin solid #000000" fo:border-right="thin solid #000000" style:vertical-align="middle" fo:background-color="#FFFFFF"/>
      <style:text-properties style:font-name="Calibri" style:font-name-asian="Calibri" style:font-name-complex="Calibri"/>
    </style:style>
    <style:style style:name="ce174" style:family="table-cell" style:parent-style-name="Default" style:data-style-name="N0">
      <style:table-cell-properties fo:border="thin solid #000000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76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7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8" style:family="table-cell" style:parent-style-name="Normal_E_38_WIncin09" style:data-style-name="N0">
      <style:table-cell-properties fo:border-top="none" fo:border-bottom="thin solid #FFFFFF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7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8pt" style:font-size-asian="8pt" style:font-size-complex="8pt"/>
    </style:style>
    <style:style style:name="ce180" style:family="table-cell" style:parent-style-name="Normal_E_38_WIncin09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18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82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thin solid #FFFFFF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4" style:family="table-cell" style:parent-style-name="Default" style:data-style-name="N0">
      <style:table-cell-properties fo:border-top="thin solid #FFFFFF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6" style:family="table-cell" style:parent-style-name="Default" style:data-style-name="N0">
      <style:table-cell-properties style:vertical-align="middle"/>
    </style:style>
    <style:style style:name="ce18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0" style:family="table-cell" style:parent-style-name="Default" style:data-style-name="N0">
      <style:table-cell-properties fo:border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1" style:family="table-cell" style:parent-style-name="Default" style:data-style-name="N0">
      <style:table-cell-properties style:vertical-align="middle" fo:wrap-option="wrap"/>
    </style:style>
    <style:style style:name="ce19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Calibri" style:font-name-asian="Calibri" style:font-name-complex="Calibri"/>
    </style:style>
    <style:style style:name="ce19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19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5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6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9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19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20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/>
    </style:style>
    <style:style style:name="ce20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style:font-name="Calibri" style:font-name-asian="Calibri" style:font-name-complex="Calibri"/>
    </style:style>
    <style:style style:name="ce20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3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0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205" style:family="table-cell" style:parent-style-name="Comma_32__91_0_93_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06" style:family="table-cell" style:parent-style-name="Default" style:data-style-name="N37">
      <style:table-cell-properties style:vertical-align="middle"/>
    </style:style>
    <style:style style:name="ce2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8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209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0" style:family="table-cell" style:parent-style-name="Normal_emhaztables06_1902562" style:data-style-name="N0">
      <style:table-cell-properties fo:border-top="thin solid #000000" fo:border-bottom="thin solid #000000" fo:border-left="thin solid #000000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1" style:family="table-cell" style:parent-style-name="Normal_emhaztables06_1902562" style:data-style-name="N0">
      <style:table-cell-properties fo:border-top="thin solid #000000" fo:border-bottom="thin solid #000000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2" style:family="table-cell" style:parent-style-name="Normal_emhaztables06_1902562" style:data-style-name="N0">
      <style:table-cell-properties fo:border-top="thin solid #000000" fo:border-bottom="none" fo:border-left="none" fo:border-right="none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3" style:family="table-cell" style:parent-style-name="Normal_emhaztables06_1902562" style:data-style-name="N0">
      <style:table-cell-properties fo:border-top="thin solid #000000" fo:border-bottom="thin solid #000000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4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15" style:family="table-cell" style:parent-style-name="Normal_emhaztables06_190256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16" style:family="table-cell" style:parent-style-name="Normal_nwhaztables06_1902546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17" style:family="table-cell" style:parent-style-name="Normal_emhaztables06_1902562" style:data-style-name="N37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18" style:family="table-cell" style:parent-style-name="Normal_emhaztables06_1902562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19" style:family="table-cell" style:parent-style-name="Comma" style:data-style-name="N37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0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1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2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3" style:family="table-cell" style:parent-style-name="Comma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4" style:family="table-cell" style:parent-style-name="Normal_emhaztables06_1902562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5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26" style:family="table-cell" style:parent-style-name="Normal_nwhaztables06_1902546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27" style:family="table-cell" style:parent-style-name="Normal_emhaztables06_1902562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8" style:family="table-cell" style:parent-style-name="Comma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9" style:family="table-cell" style:parent-style-name="Normal_emhaztables06_1902562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30" style:family="table-cell" style:parent-style-name="Normal_emhaztables06_1902562" style:data-style-name="N0">
      <style:table-cell-properties fo:border="thin solid #00000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1" style:family="table-cell" style:parent-style-name="Normal_eoehaztables06_1902577" style:data-style-name="N37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2" style:family="table-cell" style:parent-style-name="Normal_eoehaztables06_1902577" style:data-style-name="N37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3" style:family="table-cell" style:parent-style-name="Normal_eoehaztables06_1902577" style:data-style-name="N37">
      <style:table-cell-properties fo:border-top="none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Copy_32_of_32_EWHaz09_Final" style:data-style-name="N0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235" style:family="table-cell" style:parent-style-name="Normal_yhhaztables06_1902555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6" style:family="table-cell" style:parent-style-name="Normal_yhhaztables06_1902555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37" style:family="table-cell" style:parent-style-name="Normal_yhhaztables06_1902555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38" style:family="table-cell" style:parent-style-name="Normal_nwhaztables06_1902546" style:data-style-name="N37">
      <style:table-cell-properties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39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40" style:family="table-cell" style:parent-style-name="Normal_yhhaztables06_1902555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41" style:family="table-cell" style:parent-style-name="Normal_yhhaztables06_1902555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42" style:family="table-cell" style:parent-style-name="Normal_nwhaztables06_1902546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43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44" style:family="table-cell" style:parent-style-name="Normal_yhhaztables06_1902555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45" style:family="table-cell" style:parent-style-name="Normal_yhhaztables06_1902555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46" style:family="table-cell" style:parent-style-name="Normal_yhhaztables06_1902555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47" style:family="table-cell" style:parent-style-name="Comma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48" style:family="table-cell" style:parent-style-name="Comma" style:data-style-name="N37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49" style:family="table-cell" style:parent-style-name="Normal_yhhaztables06_1902555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50" style:family="table-cell" style:parent-style-name="Normal_yhhaztables06_1902555" style:data-style-name="N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51" style:family="table-cell" style:parent-style-name="Normal_eoehaztables06_1902577" style:data-style-name="N37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52" style:family="table-cell" style:parent-style-name="Normal_emhaztables06_1902562" style:data-style-name="N0">
      <style:table-cell-properties fo:border-top="thin solid #000000" fo:border-bottom="thin solid #000000" fo:border-left="thin solid #000000" fo:border-right="thin solid #C0C0C0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3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C0C0C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4" style:family="table-cell" style:parent-style-name="Normal_emhaztables06_1902562" style:data-style-name="N0">
      <style:table-cell-properties fo:border-top="thin solid #000000" fo:border-bottom="thin solid #000000" fo:border-left="thin solid #C0C0C0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5" style:family="table-cell" style:parent-style-name="Comma_32__91_0_93_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6" style:family="table-cell" style:parent-style-name="Comma" style:data-style-name="N36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7" style:family="table-cell" style:parent-style-name="Comma_32__91_0_93_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8" style:family="table-cell" style:parent-style-name="Comma" style:data-style-name="N3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9" style:family="table-cell" style:parent-style-name="Comma_32__91_0_93_" style:data-style-name="N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0" style:family="table-cell" style:parent-style-name="Comma_32__91_0_93_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1" style:family="table-cell" style:parent-style-name="Comma_32__91_0_93_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2" style:family="table-cell" style:parent-style-name="Comma_32__91_0_93_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3" style:family="table-cell" style:parent-style-name="Comma_32__91_0_93_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5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6" style:family="table-cell" style:parent-style-name="Normal_emhaztables06_1902562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7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8" style:family="table-cell" style:parent-style-name="Normal_emhaztables06_1902562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69" style:family="table-cell" style:parent-style-name="Comma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0" style:family="table-cell" style:parent-style-name="Comma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1" style:family="table-cell" style:parent-style-name="Comma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2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3" style:family="table-cell" style:parent-style-name="Normal_emhaztables06_1902562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4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/>
      <style:text-properties style:font-name="Calibri" style:font-name-asian="Calibri" style:font-name-complex="Calibri"/>
    </style:style>
    <style:style style:name="ce275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/>
    </style:style>
    <style:style style:name="ce276" style:family="table-cell" style:parent-style-name="Normal_emhaztables06_190256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77" style:family="table-cell" style:parent-style-name="Normal_eoehaztables06_1902577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8" style:family="table-cell" style:parent-style-name="Comma_32__91_0_93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9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0" style:family="table-cell" style:parent-style-name="Comma_32__91_0_93_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1" style:family="table-cell" style:parent-style-name="Normal_emhaztables06_1902562" style:data-style-name="N0">
      <style:table-cell-properties style:vertical-align="middle" fo:background-color="transparent"/>
      <style:text-properties style:font-name="Calibri" style:font-name-asian="Calibri" style:font-name-complex="Calibri"/>
    </style:style>
    <style:style style:name="ce282" style:family="table-cell" style:parent-style-name="Normal_eoehaztables06_1902577" style:data-style-name="N3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83" style:family="table-cell" style:parent-style-name="Normal_emhaztables06_1902562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4" style:family="table-cell" style:parent-style-name="Comma_32__91_0_93_" style:data-style-name="N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5" style:family="table-cell" style:parent-style-name="Normal_emhaztables06_190256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6" style:family="table-cell" style:parent-style-name="Comma_32__91_0_93_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7" style:family="table-cell" style:parent-style-name="Comma_32__91_0_93_" style:data-style-name="N3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8" style:family="table-cell" style:parent-style-name="Normal_emhaztables06_1902562" style:data-style-name="N3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89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0" style:family="table-cell" style:parent-style-name="Default" style:data-style-name="N39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1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92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93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94" style:family="table-cell" style:parent-style-name="Default" style:data-style-name="N39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5" style:family="table-cell" style:parent-style-name="Default" style:data-style-name="N39">
      <style:table-cell-properties fo:border-top="thin solid #000000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6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7" style:family="table-cell" style:parent-style-name="Default" style:data-style-name="N39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98" style:family="table-cell" style:parent-style-name="Default" style:data-style-name="N39">
      <style:table-cell-properties fo:border-top="thin solid #000000" fo:border-bottom="thin solid #000000" fo:border-left="none" fo:border-right="none" style:vertical-align="middl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9" style:family="table-cell" style:parent-style-name="Default" style:data-style-name="N39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0" style:family="table-cell" style:parent-style-name="Default" style:data-style-name="N40">
      <style:table-cell-properties style:vertical-align="middle"/>
      <style:text-properties style:font-name="Calibri" style:font-name-asian="Calibri" style:font-name-complex="Calibri"/>
    </style:style>
    <style:style style:name="ce301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02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3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04" style:family="table-cell" style:parent-style-name="Default" style:data-style-name="N40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5" style:family="table-cell" style:parent-style-name="Default" style:data-style-name="N4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6" style:family="table-cell" style:parent-style-name="Default" style:data-style-name="N40">
      <style:table-cell-properties fo:border-top="none" fo:border-bottom="thin solid #000000" fo:border-left="thin solid #FFFFFF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7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8" style:family="table-cell" style:parent-style-name="Default" style:data-style-name="N40">
      <style:text-properties style:font-name="Calibri" style:font-name-asian="Calibri" style:font-name-complex="Calibri"/>
    </style:style>
    <style:style style:name="ce309" style:family="table-cell" style:parent-style-name="Default" style:data-style-name="N4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0" style:family="table-cell" style:parent-style-name="Default" style:data-style-name="N4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1" style:family="table-cell" style:parent-style-name="Default" style:data-style-name="N4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2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3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4" style:family="table-cell" style:parent-style-name="Default" style:data-style-name="N40">
      <style:table-cell-properties fo:border-top="thin solid #000000" fo:border-bottom="thin solid #000000" fo:border-left="none" fo:border-right="none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5" style:family="table-cell" style:parent-style-name="Default" style:data-style-name="N40">
      <style:table-cell-properties fo:border-top="thin solid #000000" fo:border-bottom="thin solid #000000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6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7" style:family="table-cell" style:parent-style-name="Default" style:data-style-name="N40">
      <style:table-cell-properties fo:border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8" style:family="table-cell" style:parent-style-name="Default" style:data-style-name="N40">
      <style:table-cell-properties fo:border-top="thin solid #000000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19" style:family="table-cell" style:parent-style-name="Default" style:data-style-name="N40">
      <style:table-cell-properties fo:border-top="none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320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1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Calibri" style:font-name-asian="Calibri" style:font-name-complex="Calibri"/>
    </style:style>
    <style:style style:name="ce322" style:family="table-cell" style:parent-style-name="Default" style:data-style-name="N4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3" style:family="table-cell" style:parent-style-name="Default" style:data-style-name="N40">
      <style:table-cell-properties fo:border-top="thin solid #000000" fo:border-bottom="none" fo:border-left="none" fo:border-right="thin solid #000000" style:vertical-align="middle"/>
      <style:text-properties style:font-name="Calibri" style:font-name-asian="Calibri" style:font-name-complex="Calibri"/>
    </style:style>
    <style:style style:name="ce324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5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6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7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8" style:family="table-cell" style:parent-style-name="Default" style:data-style-name="N40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29" style:family="table-cell" style:parent-style-name="Default" style:data-style-name="N4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0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1" style:family="table-cell" style:parent-style-name="Default" style:data-style-name="N4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32" style:family="table-cell" style:parent-style-name="Comma_32__91_0_93_" style:data-style-name="N40">
      <style:table-cell-properties fo:border-top="thin solid #000000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3" style:family="table-cell" style:parent-style-name="Default" style:data-style-name="N40">
      <style:table-cell-properties fo:border-top="none" fo:border-bottom="none" fo:border-left="thin solid #000000" fo:border-right="none" style:vertical-align="middle"/>
      <style:text-properties style:font-name="Calibri" style:font-name-asian="Calibri" style:font-name-complex="Calibri"/>
    </style:style>
    <style:style style:name="ce334" style:family="table-cell" style:parent-style-name="Default" style:data-style-name="N39">
      <style:table-cell-properties style:vertical-align="middle"/>
      <style:text-properties style:font-name="Calibri" style:font-name-asian="Calibri" style:font-name-complex="Calibri"/>
    </style:style>
    <style:style style:name="ce335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36" style:family="table-cell" style:parent-style-name="Default" style:data-style-name="N39">
      <style:table-cell-properties fo:border-top="thin solid #000000" fo:border-bottom="thin solid #000000" fo:border-left="thin solid #FFFFFF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7" style:family="table-cell" style:parent-style-name="Default" style:data-style-name="N39">
      <style:table-cell-properties fo:border-top="thin solid #000000" fo:border-bottom="thin solid #000000" fo:border-left="none" fo:border-right="thin solid #FFFFFF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8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39" style:family="table-cell" style:parent-style-name="Default" style:data-style-name="N39">
      <style:table-cell-properties fo:border-top="none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340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1" style:family="table-cell" style:parent-style-name="Default" style:data-style-name="N40">
      <style:text-properties fo:color="#242424" style:font-name="Calibri" style:font-name-asian="Calibri" style:font-name-complex="Calibri"/>
    </style:style>
    <style:style style:name="ce34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43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4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5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6" style:family="table-cell" style:parent-style-name="Default" style:data-style-name="N3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7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48" style:family="table-cell" style:parent-style-name="Comma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49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0" style:family="table-cell" style:parent-style-name="Comma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1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2" style:family="table-cell" style:parent-style-name="Default" style:data-style-name="N40">
      <style:table-cell-properties style:vertical-align="middle"/>
      <style:text-properties fo:color="#242424" style:font-name="Calibri" style:font-name-asian="Calibri" style:font-name-complex="Calibri"/>
    </style:style>
    <style:style style:name="ce353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54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Wingdings" style:font-name-asian="Wingdings" style:font-name-complex="Wingdings" style:font-charset="x-symbol"/>
    </style:style>
    <style:style style:name="ce355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56" style:family="table-cell" style:parent-style-name="Default" style:data-style-name="N39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7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8" style:family="table-cell" style:parent-style-name="Default" style:data-style-name="N39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59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360" style:family="table-cell" style:parent-style-name="Default" style:data-style-name="N3">
      <style:text-properties fo:color="#000000" style:font-name="Calibri" style:font-name-asian="Calibri" style:font-name-complex="Calibri"/>
    </style:style>
    <style:style style:name="ce361" style:family="table-cell" style:parent-style-name="Default" style:data-style-name="N3">
      <style:table-cell-properties fo:border-top="thin solid #44B3E1" fo:border-bottom="none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2" style:family="table-cell" style:parent-style-name="Default" style:data-style-name="N3">
      <style:table-cell-properties fo:border-top="thin solid #44B3E1" fo:border-bottom="none" fo:border-left="thin solid #000000" fo:border-right="thin solid #000000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3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64" style:family="table-cell" style:parent-style-name="Default" style:data-style-name="N3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65" style:family="table-cell" style:parent-style-name="Default" style:data-style-name="N3">
      <style:table-cell-properties fo:border-top="thin solid #44B3E1" fo:border-bottom="thin solid #000000" fo:border-left="none" fo:border-right="none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6" style:family="table-cell" style:parent-style-name="Default" style:data-style-name="N3">
      <style:table-cell-properties fo:border-top="thin solid #44B3E1" fo:border-bottom="thin solid #000000" fo:border-left="thin solid #000000" fo:border-right="thin solid #000000" fo:background-color="#31869B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67" style:family="table-cell" style:parent-style-name="Default" style:data-style-name="N3">
      <style:table-cell-properties fo:border-top="none" fo:border-bottom="none" fo:border-left="thin solid #000000" fo:border-right="none"/>
      <style:text-properties fo:color="#000000" style:font-name="Calibri" style:font-name-asian="Calibri" style:font-name-complex="Calibri"/>
    </style:style>
    <style:style style:name="ce368" style:family="table-cell" style:parent-style-name="Default" style:data-style-name="N0">
      <style:table-cell-properties fo:border-top="none" fo:border-bottom="none" fo:border-left="thin solid #000000" fo:border-right="none"/>
      <style:text-properties fo:color="#000000" style:font-name="Calibri" style:font-name-asian="Calibri" style:font-name-complex="Calibri"/>
    </style:style>
    <style:style style:name="ce369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0" style:family="table-cell" style:parent-style-name="Default" style:data-style-name="N3">
      <style:table-cell-properties fo:border-top="none" fo:border-bottom="none" fo:border-left="thin solid #000000" fo:border-right="thin solid #000000" style:vertical-align="middl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1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2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3" style:family="table-cell" style:parent-style-name="Default" style:data-style-name="N3">
      <style:table-cell-properties fo:border-top="none" fo:border-bottom="none" fo:border-left="none" fo:border-right="thin solid #000000" style:vertical-align="middl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4" style:family="table-cell" style:parent-style-name="Normal_emhaztables06_1902562" style:data-style-name="N0">
      <style:table-cell-properties fo:border-top="none" fo:border-bottom="none" fo:border-left="none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75" style:family="table-cell" style:parent-style-name="Comma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76" style:family="table-cell" style:parent-style-name="Normal_eoehaztables06_1902577" style:data-style-name="N37">
      <style:table-cell-properties fo:border-top="none" fo:border-bottom="none" fo:border-left="none" fo:border-right="thin solid #000000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77" style:family="table-cell" style:parent-style-name="Default" style:data-style-name="N3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8" style:family="table-cell" style:parent-style-name="Comma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79" style:family="table-cell" style:parent-style-name="Normal_emhaztables06_190256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0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1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2" style:family="table-cell" style:parent-style-name="Normal_emhaztables06_1902562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3" style:family="table-cell" style:parent-style-name="Normal_emhaztables06_1902562" style:data-style-name="N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4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5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86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automatic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7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/>
    </style:style>
    <style:style style:name="ce38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89" style:family="table-cell" style:parent-style-name="Default" style:data-style-name="N0">
      <style:table-cell-properties style:vertical-align="middle" fo:background-color="#FFFFFF"/>
      <style:text-properties fo:color="#FFFFFF" style:font-name="Calibri" style:font-name-asian="Calibri" style:font-name-complex="Calibri"/>
    </style:style>
    <style:style style:name="ce390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1" style:family="table-cell" style:parent-style-name="Default" style:data-style-name="N37">
      <style:table-cell-properties style:vertical-align="middle" fo:background-color="#FFFFFF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2" style:family="table-cell" style:parent-style-name="Default" style:data-style-name="N37">
      <style:table-cell-properties style:vertical-align="middle" fo:background-color="#FFFFFF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3" style:family="table-cell" style:parent-style-name="Default" style:data-style-name="N39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4" style:family="table-cell" style:parent-style-name="Default" style:data-style-name="N39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5" style:family="table-cell" style:parent-style-name="Default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6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Calibri" style:font-name-asian="Calibri" style:font-name-complex="Calibri"/>
    </style:style>
    <style:style style:name="ce397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98" style:family="table-cell" style:parent-style-name="Default" style:data-style-name="N39">
      <style:table-cell-properties fo:border-top="none" fo:border-bottom="thin solid #000000" fo:border-left="none" fo:border-right="none" style:vertical-align="middle" fo:background-color="#31869B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9" style:family="table-cell" style:parent-style-name="Hyperlink" style:data-style-name="N0">
      <style:table-cell-properties style:vertical-align="automatic" fo:background-color="#FFFFFF"/>
      <style:text-properties fo:color="#0000FF" style:font-name="Calibri" style:font-name-asian="Calibri" style:font-name-complex="Calibri" fo:font-size="20pt" style:font-size-asian="20pt" style:font-size-complex="20pt" style:text-underline-style="solid" style:text-underline-type="single"/>
    </style:style>
    <style:style style:name="ce400" style:family="table-cell" style:parent-style-name="Default" style:data-style-name="N39">
      <style:table-cell-properties fo:background-color="#FFFFFF"/>
      <style:text-properties style:font-name="Calibri" style:font-name-asian="Calibri" style:font-name-complex="Calibri"/>
    </style:style>
    <style:style style:name="ce401" style:family="table-cell" style:parent-style-name="Default" style:data-style-name="N0">
      <style:table-cell-properties style:vertical-align="middle" fo:background-color="#1F497D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402" style:family="table-cell" style:parent-style-name="Default" style:data-style-name="N0">
      <style:table-cell-properties style:vertical-align="middle" fo:background-color="#B7DEE8" style:repeat-content="false"/>
      <style:paragraph-properties fo:text-align="center"/>
      <style:text-properties fo:color="#1F497D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403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4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5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0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40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0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09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/>
    </style:style>
    <style:style style:name="ce410" style:family="table-cell" style:parent-style-name="Comma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11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4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13" style:family="table-cell" style:parent-style-name="Comma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14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automatic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15" style:family="table-cell" style:parent-style-name="Default" style:data-style-name="N0"/>
    <style:style style:name="ce41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1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wrap-option="wrap" fo:background-color="#CCFFCC" style:repeat-content="false"/>
      <style:paragraph-properties fo:text-align="center"/>
      <style:text-properties style:font-name="Calibri" style:font-name-asian="Calibri" style:font-name-complex="Calibri"/>
    </style:style>
    <style:style style:name="ce418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 fo:wrap-option="wrap" fo:background-color="#CCFFCC" style:repeat-content="false"/>
      <style:paragraph-properties fo:text-align="center"/>
      <style:text-properties style:font-name="Calibri" style:font-name-asian="Calibri" style:font-name-complex="Calibri"/>
    </style:style>
    <style:style style:name="ce4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/>
    </style:style>
    <style:style style:name="ce420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rotation-angle="90" style:repeat-content="false"/>
      <style:paragraph-properties fo:text-align="center"/>
      <style:text-properties style:font-name="Calibri" style:font-name-asian="Calibri" style:font-name-complex="Calibri"/>
    </style:style>
    <style:style style:name="ce421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#FFFFFF" style:rotation-angle="90" style:repeat-content="false"/>
      <style:paragraph-properties fo:text-align="center"/>
      <style:text-properties style:font-name="Calibri" style:font-name-asian="Calibri" style:font-name-complex="Calibri"/>
    </style:style>
    <style:style style:name="ce422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#31869B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23" style:family="table-cell" style:parent-style-name="Default" style:data-style-name="N37">
      <style:table-cell-properties fo:border="thin solid #000000" style:vertical-align="middle" fo:background-color="#FFFFFF" style:rotation-angle="90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4.79777777777778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617361111111111cm"/>
    </style:style>
    <style:style style:name="co5" style:family="table-column">
      <style:table-column-properties fo:break-before="auto" style:column-width="2.87513888888889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3.26319444444444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2.99861111111111cm"/>
    </style:style>
    <style:style style:name="co11" style:family="table-column">
      <style:table-column-properties fo:break-before="auto" style:column-width="3.29847222222222cm"/>
    </style:style>
    <style:style style:name="co12" style:family="table-column">
      <style:table-column-properties fo:break-before="auto" style:column-width="3.05152777777778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78152777777778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2.76930555555556cm"/>
    </style:style>
    <style:style style:name="co19" style:family="table-column">
      <style:table-column-properties fo:break-before="auto" style:column-width="0.829027777777778cm"/>
    </style:style>
    <style:style style:name="co20" style:family="table-column">
      <style:table-column-properties fo:break-before="auto" style:column-width="2.94569444444444cm"/>
    </style:style>
    <style:style style:name="co21" style:family="table-column">
      <style:table-column-properties fo:break-before="auto" style:column-width="3.68652777777778cm"/>
    </style:style>
    <style:style style:name="co22" style:family="table-column">
      <style:table-column-properties fo:break-before="auto" style:column-width="3.40430555555556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24013888888889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2.8575cm"/>
    </style:style>
    <style:style style:name="co27" style:family="table-column">
      <style:table-column-properties fo:break-before="auto" style:column-width="2.71638888888889cm"/>
    </style:style>
    <style:style style:name="co28" style:family="table-column">
      <style:table-column-properties fo:break-before="auto" style:column-width="3.52777777777778cm"/>
    </style:style>
    <style:style style:name="co29" style:family="table-column">
      <style:table-column-properties fo:break-before="auto" style:column-width="0.864305555555556cm"/>
    </style:style>
    <style:style style:name="co30" style:family="table-column">
      <style:table-column-properties fo:break-before="auto" style:column-width="3.45722222222222cm"/>
    </style:style>
    <style:style style:name="co31" style:family="table-column">
      <style:table-column-properties fo:break-before="auto" style:column-width="2.57527777777778cm"/>
    </style:style>
    <style:style style:name="co32" style:family="table-column">
      <style:table-column-properties fo:break-before="auto" style:column-width="2.52236111111111cm"/>
    </style:style>
    <style:style style:name="co33" style:family="table-column">
      <style:table-column-properties fo:break-before="auto" style:column-width="2.46944444444444cm"/>
    </style:style>
    <style:style style:name="co34" style:family="table-column">
      <style:table-column-properties fo:break-before="auto" style:column-width="5.09763888888889cm"/>
    </style:style>
    <style:style style:name="co35" style:family="table-column">
      <style:table-column-properties fo:break-before="auto" style:column-width="2.61055555555556cm"/>
    </style:style>
    <style:style style:name="co36" style:family="table-column">
      <style:table-column-properties fo:break-before="auto" style:column-width="3.35138888888889cm"/>
    </style:style>
    <style:style style:name="co37" style:family="table-column">
      <style:table-column-properties fo:break-before="auto" style:column-width="3.84527777777778cm"/>
    </style:style>
    <style:style style:name="co38" style:family="table-column">
      <style:table-column-properties fo:break-before="auto" style:column-width="2.68111111111111cm"/>
    </style:style>
    <style:style style:name="co39" style:family="table-column">
      <style:table-column-properties fo:break-before="auto" style:column-width="2.82222222222222cm"/>
    </style:style>
    <style:style style:name="co40" style:family="table-column">
      <style:table-column-properties fo:break-before="auto" style:column-width="9.86013888888889cm"/>
    </style:style>
    <style:style style:name="co41" style:family="table-column">
      <style:table-column-properties fo:break-before="auto" style:column-width="3.13972222222222cm"/>
    </style:style>
    <style:style style:name="co42" style:family="table-column">
      <style:table-column-properties fo:break-before="auto" style:column-width="3.01625cm"/>
    </style:style>
    <style:style style:name="co43" style:family="table-column">
      <style:table-column-properties fo:break-before="auto" style:column-width="3.33375cm"/>
    </style:style>
    <style:style style:name="co44" style:family="table-column">
      <style:table-column-properties fo:break-before="auto" style:column-width="3.4925cm"/>
    </style:style>
    <style:style style:name="co45" style:family="table-column">
      <style:table-column-properties fo:break-before="auto" style:column-width="3.54541666666667cm"/>
    </style:style>
    <style:style style:name="co46" style:family="table-column">
      <style:table-column-properties fo:break-before="auto" style:column-width="6.94972222222222cm"/>
    </style:style>
    <style:style style:name="co47" style:family="table-column">
      <style:table-column-properties fo:break-before="auto" style:column-width="0.687916666666667cm"/>
    </style:style>
    <style:style style:name="co48" style:family="table-column">
      <style:table-column-properties fo:break-before="auto" style:column-width="9.27805555555556cm"/>
    </style:style>
    <style:style style:name="co49" style:family="table-column">
      <style:table-column-properties fo:break-before="auto" style:column-width="3.15736111111111cm"/>
    </style:style>
    <style:style style:name="co50" style:family="table-column">
      <style:table-column-properties fo:break-before="auto" style:column-width="2.62819444444444cm"/>
    </style:style>
    <style:style style:name="co51" style:family="table-column">
      <style:table-column-properties fo:break-before="auto" style:column-width="2.36361111111111cm"/>
    </style:style>
    <style:style style:name="co52" style:family="table-column">
      <style:table-column-properties fo:break-before="auto" style:column-width="0.934861111111111cm"/>
    </style:style>
    <style:style style:name="co53" style:family="table-column">
      <style:table-column-properties fo:break-before="auto" style:column-width="6.10305555555556cm"/>
    </style:style>
    <style:style style:name="co54" style:family="table-column">
      <style:table-column-properties fo:break-before="auto" style:column-width="0.917222222222222cm"/>
    </style:style>
    <style:style style:name="co55" style:family="table-column">
      <style:table-column-properties fo:break-before="auto" style:column-width="1.5875cm"/>
    </style:style>
    <style:style style:name="co56" style:family="table-column">
      <style:table-column-properties fo:break-before="auto" style:column-width="4.07458333333333cm"/>
    </style:style>
    <style:style style:name="co57" style:family="table-column">
      <style:table-column-properties fo:break-before="auto" style:column-width="2.68111111111111cm" style:use-optimal-column-width="true"/>
    </style:style>
    <style:style style:name="co58" style:family="table-column">
      <style:table-column-properties fo:break-before="auto" style:column-width="2.76930555555556cm" style:use-optimal-column-width="true"/>
    </style:style>
    <style:style style:name="co59" style:family="table-column">
      <style:table-column-properties fo:break-before="auto" style:column-width="2.38125cm" style:use-optimal-column-width="true"/>
    </style:style>
    <style:style style:name="co60" style:family="table-column">
      <style:table-column-properties fo:break-before="auto" style:column-width="1.99319444444444cm" style:use-optimal-column-width="true"/>
    </style:style>
    <style:style style:name="co61" style:family="table-column">
      <style:table-column-properties fo:break-before="auto" style:column-width="2.99861111111111cm" style:use-optimal-column-width="true"/>
    </style:style>
    <style:style style:name="co62" style:family="table-column">
      <style:table-column-properties fo:break-before="auto" style:column-width="2.2225cm" style:use-optimal-column-width="true"/>
    </style:style>
    <style:style style:name="co63" style:family="table-column">
      <style:table-column-properties fo:break-before="auto" style:column-width="2.09902777777778cm"/>
    </style:style>
    <style:style style:name="co64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8.5pt" style:use-optimal-row-height="true" fo:break-before="auto"/>
    </style:style>
    <style:style style:name="ro7" style:family="table-row">
      <style:table-row-properties style:row-height="1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2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2.5pt" style:use-optimal-row-height="false" fo:break-before="auto"/>
    </style:style>
    <style:style style:name="ro15" style:family="table-row">
      <style:table-row-properties style:row-height="6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15.75pt" style:use-optimal-row-height="false" fo:break-before="auto"/>
    </style:style>
    <style:style style:name="ro18" style:family="table-row">
      <style:table-row-properties style:row-height="42.75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20.15pt" style:use-optimal-row-height="false" fo:break-before="auto"/>
    </style:style>
    <style:style style:name="ro21" style:family="table-row">
      <style:table-row-properties style:row-height="20.25pt" style:use-optimal-row-height="false" fo:break-before="auto"/>
    </style:style>
    <style:style style:name="ro22" style:family="table-row">
      <style:table-row-properties style:row-height="13pt" style:use-optimal-row-height="false" fo:break-before="auto"/>
    </style:style>
    <style:style style:name="ro23" style:family="table-row">
      <style:table-row-properties style:row-height="39.75pt" style:use-optimal-row-height="false" fo:break-before="auto"/>
    </style:style>
    <style:style style:name="ro24" style:family="table-row">
      <style:table-row-properties style:row-height="24pt" style:use-optimal-row-height="false" fo:break-before="auto"/>
    </style:style>
    <style:style style:name="ro25" style:family="table-row">
      <style:table-row-properties style:row-height="36.75pt" style:use-optimal-row-height="false" fo:break-before="auto"/>
    </style:style>
    <style:style style:name="ro26" style:family="table-row">
      <style:table-row-properties style:row-height="36pt" style:use-optimal-row-height="false" fo:break-before="auto"/>
    </style:style>
    <style:style style:name="ro27" style:family="table-row">
      <style:table-row-properties style:row-height="35.25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28.5pt" style:use-optimal-row-height="false" fo:break-before="auto"/>
    </style:style>
    <style:style style:name="ro30" style:family="table-row">
      <style:table-row-properties style:row-height="33.75pt" style:use-optimal-row-height="false" fo:break-before="auto"/>
    </style:style>
    <style:style style:name="ro31" style:family="table-row">
      <style:table-row-properties style:row-height="21pt" style:use-optimal-row-height="false" fo:break-before="auto"/>
    </style:style>
    <style:style style:name="ro32" style:family="table-row">
      <style:table-row-properties style:row-height="47.25pt" style:use-optimal-row-height="false" fo:break-before="auto"/>
    </style:style>
    <style:style style:name="ro33" style:family="table-row">
      <style:table-row-properties style:row-height="60.75pt" style:use-optimal-row-height="false" fo:break-before="auto"/>
    </style:style>
    <style:style style:name="ro34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table:tab-color="#70AD47" style:writing-mode="lr-tb"/>
    </style:style>
    <style:style style:name="ta2" style:family="table" style:master-page-name="mp2">
      <style:table-properties table:display="true" table:tab-color="#70AD47" style:writing-mode="lr-tb"/>
    </style:style>
    <style:style style:name="ta3" style:family="table" style:master-page-name="mp3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5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7" table:number-rows-spanned="1" table:style-name="ce401">
            <text:p>Waste Management Information 2024</text:p>
          </table:table-cell>
          <table:covered-table-cell table:number-columns-repeated="6"/>
          <table:table-cell office:value-type="string" table:number-columns-spanned="7" table:number-rows-spanned="1" table:style-name="ce402">
            <text:p>Former North West Planning Region</text:p>
          </table:table-cell>
          <table:covered-table-cell table:number-columns-repeated="6"/>
          <table:table-cell table:number-columns-repeated="16370" table:style-name="ce1"/>
        </table:table-row>
        <table:table-row table:style-name="ro2">
          <table:table-cell table:number-columns-repeated="14"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Category</text:p>
          </table:table-cell>
          <table:table-cell table:number-columns-repeated="2" table:style-name="ce4"/>
          <table:table-cell table:style-name="ce3"/>
          <table:table-cell office:value-type="string" table:style-name="ce3">
            <text:p>Click on the link to go to the tab</text:p>
          </table:table-cell>
          <table:table-cell table:number-columns-repeated="9" table:style-name="ce5"/>
          <table:table-cell table:number-columns-repeated="16370" table:style-name="ce1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99">
            <text:p><text:a xlink:href="#'Landfill_Inputs'.A1">Landfill inputs 2024</text:a></text:p>
          </table:table-cell>
          <table:table-cell table:number-columns-repeated="3" table:style-name="ce8"/>
          <table:table-cell table:number-columns-repeated="5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99">
            <text:p><text:a xlink:href="#'Landfill_Input_Trends'.A1">Landfill input trends from 2000 to 2024</text:a></text:p>
          </table:table-cell>
          <table:table-cell table:number-columns-repeated="9" table:style-name="ce2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99">
            <text:p><text:a xlink:href="#'Landfill_Capacity'.A1">Landfill capacity 2024</text:a></text:p>
          </table:table-cell>
          <table:table-cell table:number-columns-repeated="9" table:style-name="ce2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fill<text:s/></text:p>
          </table:table-cell>
          <table:table-cell table:number-columns-repeated="2" table:style-name="ce7"/>
          <table:table-cell table:style-name="ce6"/>
          <table:table-cell office:value-type="string" table:style-name="ce399">
            <text:p><text:a xlink:href="#'Landfill_Capacity_Trends'.A1">Landfill capacity trends from 2000 to 2024</text:a></text:p>
          </table:table-cell>
          <table:table-cell table:number-columns-repeated="9" table:style-name="ce2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Transfer, Treatment and MRS</text:p>
          </table:table-cell>
          <table:table-cell table:number-columns-repeated="3" table:style-name="ce7"/>
          <table:table-cell office:value-type="string" table:style-name="ce399">
            <text:p><text:a xlink:href="#'Transfer_Treatment_&amp;_MRS_Inputs'.A1">Transfer, treatment and MRS inputs 2024</text:a></text:p>
          </table:table-cell>
          <table:table-cell table:number-columns-repeated="9" table:style-name="ce2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Transfer, Treatment and MRS</text:p>
          </table:table-cell>
          <table:table-cell table:number-columns-repeated="3" table:style-name="ce7"/>
          <table:table-cell office:value-type="string" table:style-name="ce399">
            <text:p><text:a xlink:href="#'Transfer_Treatment_&amp;_MRS_Trends'.A1">Transfer, treatment and MRS input trends from 2000 to 2024</text:a></text:p>
          </table:table-cell>
          <table:table-cell table:number-columns-repeated="9" table:style-name="ce2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Incineration</text:p>
          </table:table-cell>
          <table:table-cell table:number-columns-repeated="3" table:style-name="ce7"/>
          <table:table-cell office:value-type="string" table:style-name="ce399">
            <text:p><text:a xlink:href="#'Incineration_Input_&amp;_Capacity'.A1">Incineration inputs and capacity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Land disposal</text:p>
          </table:table-cell>
          <table:table-cell table:number-columns-repeated="3" table:style-name="ce7"/>
          <table:table-cell office:value-type="string" table:style-name="ce399">
            <text:p><text:a xlink:href="#'Land_Disposal'.A1">Land disposal inputs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Use of waste</text:p>
          </table:table-cell>
          <table:table-cell table:number-columns-repeated="3" table:style-name="ce7"/>
          <table:table-cell office:value-type="string" table:style-name="ce399">
            <text:p><text:a xlink:href="#'Use_of_Waste'.A1">Use of waste inputs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399">
            <text:p><text:a xlink:href="#'Haz_Waste_Managed_&amp;_Deposits'.A1">Hazardous waste management and deposits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399">
            <text:p><text:a xlink:href="#'Haz_Waste_Deposits_by_Fate'.A1">Hazardous waste deposits by fate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office:value-type="string" table:style-name="ce6">
            <text:p>Hazardous waste</text:p>
          </table:table-cell>
          <table:table-cell table:number-columns-repeated="3" table:style-name="ce7"/>
          <table:table-cell office:value-type="string" table:style-name="ce399">
            <text:p><text:a xlink:href="#'Haz_Waste_Trends'.A1">Hazardous waste: trends data from 2000 to 2024</text:a></text:p>
          </table:table-cell>
          <table:table-cell table:number-columns-repeated="8" table:style-name="ce2"/>
          <table:table-cell table:style-name="ce9"/>
          <table:table-cell table:style-name="ce10"/>
          <table:table-cell table:number-columns-repeated="16369"/>
        </table:table-row>
        <table:table-row table:style-name="ro3">
          <table:table-cell table:style-name="ce11"/>
          <table:table-cell table:number-columns-repeated="13" table:style-name="ce2"/>
          <table:table-cell table:number-columns-repeated="16370" table:style-name="ce1"/>
        </table:table-row>
        <table:table-row table:number-rows-repeated="18" table:style-name="ro3">
          <table:table-cell table:style-name="ce12"/>
          <table:table-cell table:number-columns-repeated="16383"/>
        </table:table-row>
        <table:table-row table:number-rows-repeated="1048542" table:style-name="ro4">
          <table:table-cell table:number-columns-repeated="16384"/>
        </table:table-row>
      </table:table>
      <table:table table:name="Landfill_Inputs" table:style-name="ta2"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2" table:default-cell-style-name="ce14"/>
        <table:table-column table:style-name="co17" table:number-columns-repeated="4" table:default-cell-style-name="ce14"/>
        <table:table-column table:style-name="co18" table:default-cell-style-name="ce14"/>
        <table:table-column table:style-name="co17" table:default-cell-style-name="ce14"/>
        <table:table-column table:style-name="co15" table:number-columns-repeated="16365" table:default-cell-style-name="ce14"/>
        <table:table-row table:style-name="ro5">
          <table:table-cell table:style-name="ce13"/>
          <table:table-cell table:number-columns-repeated="16383" table:style-name="ce14"/>
        </table:table-row>
        <table:table-row table:style-name="ro6">
          <table:table-cell table:style-name="ce14"/>
          <table:table-cell office:value-type="string" table:style-name="ce15">
            <text:p>North West: Landfill inputs 2024</text:p>
          </table:table-cell>
          <table:table-cell table:number-columns-repeated="2" table:style-name="ce14"/>
          <table:table-cell table:style-name="ce16"/>
          <table:table-cell table:number-columns-repeated="16379" table:style-name="ce14"/>
        </table:table-row>
        <table:table-row table:style-name="ro6">
          <table:table-cell table:style-name="ce14"/>
          <table:table-cell office:value-type="string" table:style-name="ce17">
            <text:p>All figures are provided in 000s tonnes</text:p>
          </table:table-cell>
          <table:table-cell table:number-columns-repeated="16382" table:style-name="ce14"/>
        </table:table-row>
        <table:table-row table:style-name="ro7">
          <table:table-cell table:style-name="ce14"/>
          <table:table-cell table:style-name="ce18"/>
          <table:table-cell table:number-columns-repeated="16382" table:style-name="ce14"/>
        </table:table-row>
        <table:table-row table:style-name="ro8">
          <table:table-cell table:style-name="ce14"/>
          <table:table-cell office:value-type="string" table:number-columns-spanned="1" table:number-rows-spanned="2" table:style-name="ce403">
            <text:p>Landfill Type</text:p>
          </table:table-cell>
          <table:table-cell office:value-type="string" table:number-columns-spanned="5" table:number-rows-spanned="1" table:style-name="ce404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5">
            <text:p>NORTH WEST</text:p>
          </table:table-cell>
          <table:table-cell table:number-columns-repeated="16376" table:style-name="ce14"/>
        </table:table-row>
        <table:table-row table:style-name="ro9">
          <table:table-cell table:style-name="ce21"/>
          <table:covered-table-cell/>
          <table:table-cell office:value-type="string" table:style-name="ce2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covered-table-cell/>
          <table:table-cell table:number-columns-repeated="22" table:style-name="ce23"/>
          <table:table-cell table:style-name="ce24"/>
          <table:table-cell table:number-columns-repeated="16353" table:style-name="ce25"/>
        </table:table-row>
        <table:table-row table:style-name="ro10">
          <table:table-cell table:style-name="ce14"/>
          <table:table-cell office:value-type="string" table:style-name="ce26">
            <text:p>Hazardous Merchant</text:p>
          </table:table-cell>
          <table:table-cell office:value-type="float" office:value="2064" table:style-name="ce341">
            <text:p><text:s text:c="2"/>2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31215.05000000005" table:style-name="ce300">
            <text:p><text:s text:c="2"/>131</text:p>
          </table:table-cell>
          <table:table-cell office:value-type="float" office:value="159.76" table:style-name="ce352">
            <text:p><text:s text:c="2"/>0</text:p>
          </table:table-cell>
          <table:table-cell office:value-type="float" office:value="133438.81000000006" table:formula="of:=SUM([.C7:.G7])" table:style-name="ce301">
            <text:p><text:s text:c="2"/>133</text:p>
          </table:table-cell>
          <table:table-cell table:number-columns-repeated="16376" table:style-name="ce14"/>
        </table:table-row>
        <table:table-row table:style-name="ro10">
          <table:table-cell table:style-name="ce14"/>
          <table:table-cell office:value-type="string" table:style-name="ce29">
            <text:p>Hazardous Restricted</text:p>
          </table:table-cell>
          <table:table-cell office:value-type="float" office:value="0" table:style-name="ce307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53">
            <text:p>0</text:p>
          </table:table-cell>
          <table:table-cell table:number-columns-repeated="16376" table:style-name="ce14"/>
        </table:table-row>
        <table:table-row table:style-name="ro10">
          <table:table-cell table:style-name="ce14"/>
          <table:table-cell office:value-type="string" table:style-name="ce33">
            <text:p>Non Hazardous with SNRHW cell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82043.469999999987" table:style-name="ce300">
            <text:p><text:s text:c="2"/>82</text:p>
          </table:table-cell>
          <table:table-cell office:value-type="float" office:value="140676.88" table:style-name="ce300">
            <text:p><text:s text:c="2"/>141</text:p>
          </table:table-cell>
          <table:table-cell office:value-type="float" office:value="134060.93899999995" table:style-name="ce300">
            <text:p><text:s text:c="2"/>134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356781.28899999993" table:formula="of:=SUM([.C9:.G9])" table:style-name="ce303">
            <text:p><text:s text:c="2"/>357</text:p>
          </table:table-cell>
          <table:table-cell table:number-columns-repeated="16376" table:style-name="ce14"/>
        </table:table-row>
        <table:table-row table:style-name="ro10">
          <table:table-cell table:style-name="ce14"/>
          <table:table-cell office:value-type="string" table:style-name="ce33">
            <text:p>Non Hazardous</text:p>
          </table:table-cell>
          <table:table-cell office:value-type="float" office:value="88809.73000000001" table:style-name="ce300">
            <text:p><text:s text:c="2"/>89</text:p>
          </table:table-cell>
          <table:table-cell office:value-type="float" office:value="110700.03" table:style-name="ce300">
            <text:p><text:s text:c="2"/>111</text:p>
          </table:table-cell>
          <table:table-cell office:value-type="float" office:value="576160.19699999993" table:style-name="ce300">
            <text:p><text:s text:c="2"/>576</text:p>
          </table:table-cell>
          <table:table-cell office:value-type="float" office:value="1046141.5299999999" table:style-name="ce300">
            <text:p><text:s text:c="2"/>1,046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821811.4869999997" table:formula="of:=SUM([.C10:.G10])" table:style-name="ce303">
            <text:p><text:s text:c="2"/>1,822</text:p>
          </table:table-cell>
          <table:table-cell table:number-columns-repeated="16376" table:style-name="ce14"/>
        </table:table-row>
        <table:table-row table:style-name="ro10">
          <table:table-cell table:style-name="ce14"/>
          <table:table-cell office:value-type="string" table:style-name="ce37">
            <text:p>Non Hazardous Restricted</text:p>
          </table:table-cell>
          <table:table-cell office:value-type="float" office:value="0" table:style-name="ce307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59982.5" table:style-name="ce300">
            <text:p><text:s text:c="2"/>60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59982.5" table:formula="of:=SUM([.C11:.G11])" table:style-name="ce303">
            <text:p><text:s text:c="2"/>60</text:p>
          </table:table-cell>
          <table:table-cell table:number-columns-repeated="16376" table:style-name="ce14"/>
        </table:table-row>
        <table:table-row table:style-name="ro10">
          <table:table-cell table:style-name="ce14"/>
          <table:table-cell office:value-type="string" table:style-name="ce38">
            <text:p>Inert</text:p>
          </table:table-cell>
          <table:table-cell office:value-type="float" office:value="257647" table:style-name="ce300">
            <text:p><text:s text:c="2"/>258</text:p>
          </table:table-cell>
          <table:table-cell office:value-type="float" office:value="11886.583999999999" table:style-name="ce300">
            <text:p><text:s text:c="2"/>12</text:p>
          </table:table-cell>
          <table:table-cell office:value-type="float" office:value="186538.23" table:style-name="ce300">
            <text:p><text:s text:c="2"/>187</text:p>
          </table:table-cell>
          <table:table-cell office:value-type="float" office:value="64350.34" table:style-name="ce300">
            <text:p><text:s text:c="2"/>64</text:p>
          </table:table-cell>
          <table:table-cell office:value-type="float" office:value="62179" table:style-name="ce300">
            <text:p><text:s text:c="2"/>62</text:p>
          </table:table-cell>
          <table:table-cell office:value-type="float" office:value="582601.15399999998" table:formula="of:=SUM([.C12:.G12])" table:style-name="ce303">
            <text:p><text:s text:c="2"/>583</text:p>
          </table:table-cell>
          <table:table-cell table:number-columns-repeated="16376" table:style-name="ce14"/>
        </table:table-row>
        <table:table-row table:style-name="ro11">
          <table:table-cell table:style-name="ce14"/>
          <table:table-cell office:value-type="string" table:style-name="ce42">
            <text:p>Total</text:p>
          </table:table-cell>
          <table:table-cell office:value-type="float" office:value="348520.73" table:formula="of:=SUM([.C7:.C12])" table:style-name="ce304">
            <text:p><text:s text:c="2"/>349</text:p>
          </table:table-cell>
          <table:table-cell office:value-type="float" office:value="204630.084" table:formula="of:=SUM([.D7:.D12])" table:style-name="ce305">
            <text:p><text:s text:c="2"/>205</text:p>
          </table:table-cell>
          <table:table-cell office:value-type="float" office:value="903375.30699999991" table:formula="of:=SUM([.E7:.E12])" table:style-name="ce305">
            <text:p><text:s text:c="2"/>903</text:p>
          </table:table-cell>
          <table:table-cell office:value-type="float" office:value="1435750.3589999999" table:formula="of:=SUM([.F7:.F12])" table:style-name="ce305">
            <text:p><text:s text:c="2"/>1,436</text:p>
          </table:table-cell>
          <table:table-cell office:value-type="float" office:value="62338.76" table:formula="of:=SUM([.G7:.G12])" table:style-name="ce305">
            <text:p><text:s text:c="2"/>62</text:p>
          </table:table-cell>
          <table:table-cell office:value-type="float" office:value="2954615.2399999998" table:formula="of:=SUM([.H7:.H12])" table:style-name="ce306">
            <text:p><text:s text:c="2"/>2,955</text:p>
          </table:table-cell>
          <table:table-cell table:number-columns-repeated="16376" table:style-name="ce14"/>
        </table:table-row>
        <table:table-row table:style-name="ro12">
          <table:table-cell table:number-columns-repeated="2" table:style-name="ce14"/>
          <table:table-cell office:value-type="string" table:style-name="ce45">
            <text:p>-</text:p>
          </table:table-cell>
          <table:table-cell table:number-columns-repeated="16381" table:style-name="ce14"/>
        </table:table-row>
        <table:table-row table:style-name="ro12">
          <table:table-cell table:style-name="ce14"/>
          <table:table-cell office:value-type="string" table:style-name="ce46">
            <text:p>Table Notes:</text:p>
          </table:table-cell>
          <table:table-cell table:number-columns-repeated="6" table:style-name="ce47"/>
          <table:table-cell table:number-columns-repeated="16376" table:style-name="ce14"/>
        </table:table-row>
        <table:table-row table:style-name="ro13">
          <table:table-cell table:style-name="ce14"/>
          <table:table-cell office:value-type="string" table:style-name="ce14">
            <text:p>Data since 2005 has been reclassified into categories used under the PPC permitting of landfills and because of the ban on the co-disposal of waste in landfills in July 2004.</text:p>
          </table:table-cell>
          <table:table-cell table:number-columns-repeated="16382" table:style-name="ce14"/>
        </table:table-row>
        <table:table-row table:style-name="ro13">
          <table:table-cell/>
          <table:table-cell office:value-type="string" table:style-name="ce14">
            <text:p>From 16 July 2004, hazardous landfills have only been able to accept wastes classified as hazardous under the Hazardous Waste Directive.</text:p>
          </table:table-cell>
          <table:table-cell table:number-columns-repeated="16382" table:style-name="ce14"/>
        </table:table-row>
        <table:table-row table:style-name="ro13">
          <table:table-cell/>
          <table:table-cell office:value-type="string" table:number-columns-spanned="9" table:number-rows-spanned="1" table:style-name="ce406">
            <text:p>Some non-hazardous sites can accept some Stable Non Reactive Hazardous Wastes (SNRHW) into a dedicated cell, but this is usually a small part of the overall capacity of the site.</text:p>
          </table:table-cell>
          <table:covered-table-cell table:number-columns-repeated="8"/>
          <table:table-cell table:number-columns-repeated="16374"/>
        </table:table-row>
        <table:table-row table:style-name="ro13">
          <table:table-cell/>
          <table:table-cell office:value-type="string" table:number-columns-spanned="8" table:number-rows-spanned="1" table:style-name="ce407">
            <text:p>The above data do not include waste received by closed landfills for restoration purposes.<text:s/></text:p>
          </table:table-cell>
          <table:covered-table-cell table:number-columns-repeated="7"/>
          <table:table-cell table:number-columns-repeated="16375" table:style-name="ce14"/>
        </table:table-row>
        <table:table-row table:style-name="ro13">
          <table:table-cell/>
          <table:table-cell table:number-columns-repeated="8" table:style-name="ce48"/>
          <table:table-cell table:number-columns-repeated="16375" table:style-name="ce14"/>
        </table:table-row>
        <table:table-row table:number-rows-repeated="1048556" table:style-name="ro5">
          <table:table-cell table:number-columns-repeated="16384"/>
        </table:table-row>
        <table:named-expressions>
          <table:named-range table:name="Print_Area" table:cell-range-address="Landfill_Inputs.$B$2:Landfill_Inputs.$J$20" table:base-cell-address="Landfill_Inputs.$A$1"/>
        </table:named-expressions>
      </table:table>
      <table:table table:name="Landfill_Input_Trends" table:style-name="ta1">
        <table:table-column table:style-name="co19" table:default-cell-style-name="ce50"/>
        <table:table-column table:style-name="co20" table:default-cell-style-name="ce50"/>
        <table:table-column table:style-name="co21" table:default-cell-style-name="ce50"/>
        <table:table-column table:style-name="co22" table:default-cell-style-name="ce50"/>
        <table:table-column table:style-name="co18" table:default-cell-style-name="ce50"/>
        <table:table-column table:style-name="co23" table:default-cell-style-name="ce50"/>
        <table:table-column table:style-name="co24" table:default-cell-style-name="ce50"/>
        <table:table-column table:style-name="co5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15" table:number-columns-repeated="16373" table:default-cell-style-name="ce50"/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5">
            <text:p>North West: Waste deposit trends: Landfill deposits by site type, waste type and sub-region from 2000/1 to 2024</text:p>
          </table:table-cell>
          <table:table-cell table:style-name="ce14"/>
          <table:table-cell table:style-name="ce51"/>
          <table:table-cell table:number-columns-repeated="7" table:style-name="ce14"/>
          <table:table-cell table:number-columns-repeated="16373"/>
        </table:table-row>
        <table:table-row table:style-name="ro6">
          <table:table-cell/>
          <table:table-cell office:value-type="string" table:style-name="ce52">
            <text:p>All figures are provided in 000s tonnes</text:p>
          </table:table-cell>
          <table:table-cell table:style-name="ce14"/>
          <table:table-cell table:style-name="ce51"/>
          <table:table-cell table:number-columns-repeated="7" table:style-name="ce14"/>
          <table:table-cell table:number-columns-repeated="16373"/>
        </table:table-row>
        <table:table-row table:style-name="ro5">
          <table:table-cell/>
          <table:table-cell table:number-columns-repeated="2" table:style-name="ce50"/>
          <table:table-cell table:style-name="ce53"/>
          <table:table-cell table:number-columns-repeated="16380" table:style-name="ce50"/>
        </table:table-row>
        <table:table-row table:style-name="ro5">
          <table:table-cell/>
          <table:table-cell table:style-name="ce54"/>
          <table:table-cell table:style-name="ce55"/>
          <table:table-cell office:value-type="string" table:number-columns-spanned="7" table:number-rows-spanned="1" table:style-name="ce404">
            <text:p>Sub Region</text:p>
          </table:table-cell>
          <table:covered-table-cell table:number-columns-repeated="6"/>
          <table:table-cell table:style-name="ce56"/>
          <table:table-cell table:number-columns-repeated="16373"/>
        </table:table-row>
        <table:table-row table:style-name="ro3">
          <table:table-cell/>
          <table:table-cell office:value-type="string" table:style-name="ce57">
            <text:p>Year</text:p>
          </table:table-cell>
          <table:table-cell office:value-type="string" table:style-name="ce58">
            <text:p>Site Type</text:p>
          </table:table-cell>
          <table:table-cell office:value-type="string" table:style-name="ce59">
            <text:p>Waste type</text:p>
          </table:table-cell>
          <table:table-cell office:value-type="string" table:style-name="ce2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table-cell office:value-type="string" table:style-name="ce60">
            <text:p>Warrington &amp; Halton</text:p>
          </table:table-cell>
          <table:table-cell office:value-type="string" table:style-name="ce61">
            <text:p>NORTH WEST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6" table:style-name="ce408">
            <text:p>2000/1</text:p>
          </table:table-cell>
          <table:table-cell office:value-type="string" table:number-columns-spanned="1" table:number-rows-spanned="3" table:style-name="ce409">
            <text:p>Co disposal</text:p>
          </table:table-cell>
          <table:table-cell office:value-type="string" table:style-name="ce63">
            <text:p>Inert/C&amp;D</text:p>
          </table:table-cell>
          <table:table-cell office:value-type="float" office:value="164" table:style-name="ce64">
            <text:p><text:s/>164<text:s/></text:p>
          </table:table-cell>
          <table:table-cell office:value-type="float" office:value="213" table:style-name="ce64">
            <text:p><text:s/>213<text:s/></text:p>
          </table:table-cell>
          <table:table-cell office:value-type="float" office:value="103" table:style-name="ce64">
            <text:p><text:s/>103<text:s/></text:p>
          </table:table-cell>
          <table:table-cell office:value-type="float" office:value="259" table:style-name="ce64">
            <text:p><text:s/>259<text:s/></text:p>
          </table:table-cell>
          <table:table-cell office:value-type="float" office:value="189" table:style-name="ce64">
            <text:p><text:s/>189<text:s/></text:p>
          </table:table-cell>
          <table:table-cell office:value-type="float" office:value="102" table:style-name="ce65">
            <text:p><text:s/>102<text:s/></text:p>
          </table:table-cell>
          <table:table-cell office:value-type="float" office:value="1030" table:formula="of:=SUM([.E7:.J7])" table:style-name="ce66">
            <text:p><text:s/>1,03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560" table:style-name="ce64">
            <text:p><text:s/>560<text:s/></text:p>
          </table:table-cell>
          <table:table-cell office:value-type="float" office:value="389" table:style-name="ce64">
            <text:p><text:s/>389<text:s/></text:p>
          </table:table-cell>
          <table:table-cell office:value-type="float" office:value="881" table:style-name="ce64">
            <text:p><text:s/>881<text:s/></text:p>
          </table:table-cell>
          <table:table-cell office:value-type="float" office:value="1078" table:style-name="ce64">
            <text:p><text:s/>1,078<text:s/></text:p>
          </table:table-cell>
          <table:table-cell office:value-type="float" office:value="419" table:style-name="ce64">
            <text:p><text:s/>419<text:s/></text:p>
          </table:table-cell>
          <table:table-cell office:value-type="float" office:value="1212" table:style-name="ce65">
            <text:p><text:s/>1,212<text:s/></text:p>
          </table:table-cell>
          <table:table-cell office:value-type="float" office:value="4539" table:formula="of:=SUM([.E8:.J8])" table:style-name="ce68">
            <text:p><text:s/>4,53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120" table:style-name="ce64">
            <text:p><text:s/>120<text:s/></text:p>
          </table:table-cell>
          <table:table-cell office:value-type="float" office:value="34" table:style-name="ce64">
            <text:p><text:s/>34<text:s/></text:p>
          </table:table-cell>
          <table:table-cell office:value-type="float" office:value="57" table:style-name="ce64">
            <text:p><text:s/>57<text:s/></text:p>
          </table:table-cell>
          <table:table-cell office:value-type="float" office:value="41" table:style-name="ce64">
            <text:p><text:s/>41<text:s/></text:p>
          </table:table-cell>
          <table:table-cell office:value-type="float" office:value="99" table:style-name="ce64">
            <text:p><text:s/>99<text:s/></text:p>
          </table:table-cell>
          <table:table-cell office:value-type="float" office:value="187" table:style-name="ce65">
            <text:p><text:s/>187<text:s/></text:p>
          </table:table-cell>
          <table:table-cell office:value-type="float" office:value="538" table:formula="of:=SUM([.E9:.J9])" table:style-name="ce68">
            <text:p><text:s/>5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Co disposal Total</text:p>
          </table:table-cell>
          <table:table-cell table:style-name="ce71"/>
          <table:table-cell office:value-type="float" office:value="844" table:formula="of:=SUBTOTAL(9;[.E7:.E9])" table:style-name="ce72">
            <text:p><text:s/>844<text:s/></text:p>
          </table:table-cell>
          <table:table-cell office:value-type="float" office:value="636" table:formula="of:=SUBTOTAL(9;[.F7:.F9])" table:style-name="ce72">
            <text:p><text:s/>636<text:s/>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float" office:value="707" table:formula="of:=SUBTOTAL(9;[.I7:.I9])" table:style-name="ce72">
            <text:p><text:s/>707<text:s/></text:p>
          </table:table-cell>
          <table:table-cell office:value-type="float" office:value="1501" table:formula="of:=SUBTOTAL(9;[.J7:.J9])" table:style-name="ce73">
            <text:p><text:s/>1,501<text:s/></text:p>
          </table:table-cell>
          <table:table-cell office:value-type="float" office:value="6107" table:formula="of:=SUBTOTAL(9;[.K7:.K9])" table:style-name="ce74">
            <text:p><text:s/>6,1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75">
            <text:p>Inert/C&amp;D</text:p>
          </table:table-cell>
          <table:table-cell office:value-type="float" office:value="9" table:style-name="ce30">
            <text:p><text:s/>9<text:s/></text:p>
          </table:table-cell>
          <table:table-cell office:value-type="float" office:value="99" table:style-name="ce31">
            <text:p><text:s/>99<text:s/></text:p>
          </table:table-cell>
          <table:table-cell office:value-type="float" office:value="120" table:style-name="ce31">
            <text:p><text:s/>120<text:s/></text:p>
          </table:table-cell>
          <table:table-cell office:value-type="float" office:value="784" table:style-name="ce31">
            <text:p><text:s/>78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90.2" table:style-name="ce76">
            <text:p><text:s/>190<text:s/></text:p>
          </table:table-cell>
          <table:table-cell office:value-type="float" office:value="1202.2" table:formula="of:=SUM([.E11:.J11])" table:style-name="ce68">
            <text:p><text:s/>1,2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7" table:style-name="ce31">
            <text:p><text:s/>57<text:s/></text:p>
          </table:table-cell>
          <table:table-cell office:value-type="float" office:value="217" table:style-name="ce31">
            <text:p><text:s/>217<text:s/></text:p>
          </table:table-cell>
          <table:table-cell office:value-type="float" office:value="611" table:style-name="ce31">
            <text:p><text:s/>611<text:s/></text:p>
          </table:table-cell>
          <table:table-cell office:value-type="float" office:value="115" table:style-name="ce31">
            <text:p><text:s/>115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1000" table:formula="of:=SUM([.E12:.J12])" table:style-name="ce68">
            <text:p><text:s/>1,00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0" table:formula="of:=SUM([.E13:.J13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71"/>
          <table:table-cell office:value-type="float" office:value="9" table:formula="of:=SUBTOTAL(9;[.E11:.E13])" table:style-name="ce72">
            <text:p><text:s/>9<text:s/></text:p>
          </table:table-cell>
          <table:table-cell office:value-type="float" office:value="156" table:formula="of:=SUBTOTAL(9;[.F11:.F13])" table:style-name="ce72">
            <text:p><text:s/>156<text:s/>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float" office:value="115" table:formula="of:=SUBTOTAL(9;[.I11:.I13])" table:style-name="ce72">
            <text:p><text:s/>115<text:s/></text:p>
          </table:table-cell>
          <table:table-cell office:value-type="float" office:value="190.2" table:formula="of:=SUBTOTAL(9;[.J11:.J13])" table:style-name="ce73">
            <text:p><text:s/>190<text:s/></text:p>
          </table:table-cell>
          <table:table-cell office:value-type="float" office:value="2202.1999999999998" table:formula="of:=SUBTOTAL(9;[.K11:.K13])" table:style-name="ce74">
            <text:p><text:s/>2,2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75">
            <text:p>Inert/C&amp;D</text:p>
          </table:table-cell>
          <table:table-cell office:value-type="float" office:value="250" table:style-name="ce30">
            <text:p><text:s/>250<text:s/></text:p>
          </table:table-cell>
          <table:table-cell office:value-type="float" office:value="79" table:style-name="ce31">
            <text:p><text:s/>79<text:s/></text:p>
          </table:table-cell>
          <table:table-cell office:value-type="float" office:value="31" table:style-name="ce31">
            <text:p><text:s/>3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15" table:style-name="ce31">
            <text:p><text:s/>215<text:s/></text:p>
          </table:table-cell>
          <table:table-cell office:value-type="float" office:value="36" table:style-name="ce76">
            <text:p><text:s/>36<text:s/></text:p>
          </table:table-cell>
          <table:table-cell office:value-type="float" office:value="612" table:formula="of:=SUM([.E15:.J15])" table:style-name="ce68">
            <text:p><text:s/>6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40" table:style-name="ce31">
            <text:p><text:s/>40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76">
            <text:p><text:s/>2<text:s/></text:p>
          </table:table-cell>
          <table:table-cell office:value-type="float" office:value="43" table:formula="of:=SUM([.E16:.J16])" table:style-name="ce68">
            <text:p><text:s/>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0" table:formula="of:=SUM([.E17:.J17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71"/>
          <table:table-cell office:value-type="float" office:value="250" table:formula="of:=SUBTOTAL(9;[.E15:.E17])" table:style-name="ce72">
            <text:p><text:s/>250<text:s/></text:p>
          </table:table-cell>
          <table:table-cell office:value-type="float" office:value="119" table:formula="of:=SUBTOTAL(9;[.F15:.F17])" table:style-name="ce72">
            <text:p><text:s/>119<text:s/>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float" office:value="215" table:formula="of:=SUBTOTAL(9;[.I15:.I17])" table:style-name="ce72">
            <text:p><text:s/>215<text:s/></text:p>
          </table:table-cell>
          <table:table-cell office:value-type="float" office:value="38" table:formula="of:=SUBTOTAL(9;[.J15:.J17])" table:style-name="ce73">
            <text:p><text:s/>38<text:s/></text:p>
          </table:table-cell>
          <table:table-cell office:value-type="float" office:value="655" table:formula="of:=SUBTOTAL(9;[.K15:.K17])" table:style-name="ce74">
            <text:p><text:s/>6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75">
            <text:p>Inert/C&amp;D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128" table:style-name="ce31">
            <text:p><text:s/>128<text:s/></text:p>
          </table:table-cell>
          <table:table-cell office:value-type="float" office:value="112" table:style-name="ce31">
            <text:p><text:s/>112<text:s/></text:p>
          </table:table-cell>
          <table:table-cell office:value-type="float" office:value="286" table:style-name="ce31">
            <text:p><text:s/>286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11" table:style-name="ce76">
            <text:p><text:s/>11<text:s/></text:p>
          </table:table-cell>
          <table:table-cell office:value-type="float" office:value="550" table:formula="of:=SUM([.E19:.J19])" table:style-name="ce68">
            <text:p><text:s/>55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63" table:style-name="ce31">
            <text:p><text:s/>63<text:s/></text:p>
          </table:table-cell>
          <table:table-cell office:value-type="float" office:value="28" table:style-name="ce31">
            <text:p><text:s/>28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16" table:style-name="ce31">
            <text:p><text:s/>16<text:s/></text:p>
          </table:table-cell>
          <table:table-cell office:value-type="float" office:value="102" table:style-name="ce76">
            <text:p><text:s/>102<text:s/></text:p>
          </table:table-cell>
          <table:table-cell office:value-type="float" office:value="212" table:formula="of:=SUM([.E20:.J20])" table:style-name="ce68">
            <text:p><text:s/>2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6" table:style-name="ce30">
            <text:p><text:s/>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2" table:style-name="ce76">
            <text:p><text:s/>82<text:s/></text:p>
          </table:table-cell>
          <table:table-cell office:value-type="float" office:value="90" table:formula="of:=SUM([.E21:.J21])" table:style-name="ce68">
            <text:p><text:s/>9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Restricted-user Total</text:p>
          </table:table-cell>
          <table:table-cell table:style-name="ce71"/>
          <table:table-cell office:value-type="float" office:value="10" table:formula="of:=SUBTOTAL(9;[.E19:.E21])" table:style-name="ce27">
            <text:p><text:s/>10<text:s/></text:p>
          </table:table-cell>
          <table:table-cell office:value-type="float" office:value="191" table:formula="of:=SUBTOTAL(9;[.F19:.F21])" table:style-name="ce27">
            <text:p><text:s/>191<text:s/>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25" table:formula="of:=SUBTOTAL(9;[.I19:.I21])" table:style-name="ce27">
            <text:p><text:s/>25<text:s/></text:p>
          </table:table-cell>
          <table:table-cell office:value-type="float" office:value="195" table:formula="of:=SUBTOTAL(9;[.J19:.J21])" table:style-name="ce80">
            <text:p><text:s/>195<text:s/></text:p>
          </table:table-cell>
          <table:table-cell office:value-type="float" office:value="852" table:formula="of:=SUBTOTAL(9;[.K19:.K21])" table:style-name="ce66">
            <text:p><text:s/>85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0/1 Total</text:p>
          </table:table-cell>
          <table:table-cell table:style-name="ce82"/>
          <table:table-cell table:style-name="ce83"/>
          <table:table-cell office:value-type="float" office:value="1113" table:formula="of:=SUBTOTAL(9;[.E7:.E21])" table:style-name="ce84">
            <text:p><text:s/>1,113<text:s/></text:p>
          </table:table-cell>
          <table:table-cell office:value-type="float" office:value="1102" table:formula="of:=SUBTOTAL(9;[.F7:.F21])" table:style-name="ce84">
            <text:p><text:s/>1,102<text:s/></text:p>
          </table:table-cell>
          <table:table-cell office:value-type="float" office:value="1550" table:formula="of:=SUBTOTAL(9;[.G7:.G21])" table:style-name="ce84">
            <text:p><text:s/>1,550<text:s/></text:p>
          </table:table-cell>
          <table:table-cell office:value-type="float" office:value="3065" table:formula="of:=SUBTOTAL(9;[.H7:.H21])" table:style-name="ce84">
            <text:p><text:s/>3,065<text:s/></text:p>
          </table:table-cell>
          <table:table-cell office:value-type="float" office:value="1062" table:formula="of:=SUBTOTAL(9;[.I7:.I21])" table:style-name="ce84">
            <text:p><text:s/>1,062<text:s/></text:p>
          </table:table-cell>
          <table:table-cell office:value-type="float" office:value="1924.2" table:formula="of:=SUBTOTAL(9;[.J7:.J21])" table:style-name="ce85">
            <text:p><text:s/>1,924<text:s/></text:p>
          </table:table-cell>
          <table:table-cell office:value-type="float" office:value="9816.2000000000007" table:formula="of:=SUBTOTAL(9;[.K7:.K21])" table:style-name="ce86">
            <text:p><text:s/>9,81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6" table:style-name="ce408">
            <text:p>2002/3</text:p>
          </table:table-cell>
          <table:table-cell office:value-type="string" table:number-columns-spanned="1" table:number-rows-spanned="3" table:style-name="ce409">
            <text:p>Co disposal</text:p>
          </table:table-cell>
          <table:table-cell office:value-type="string" table:style-name="ce75">
            <text:p>Inert/C&amp;D</text:p>
          </table:table-cell>
          <table:table-cell office:value-type="float" office:value="83.5" table:style-name="ce30">
            <text:p><text:s/>84<text:s/></text:p>
          </table:table-cell>
          <table:table-cell office:value-type="float" office:value="105.5" table:style-name="ce31">
            <text:p><text:s/>106<text:s/></text:p>
          </table:table-cell>
          <table:table-cell office:value-type="float" office:value="167" table:style-name="ce31">
            <text:p><text:s/>167<text:s/></text:p>
          </table:table-cell>
          <table:table-cell office:value-type="float" office:value="172.8" table:style-name="ce31">
            <text:p><text:s/>173<text:s/></text:p>
          </table:table-cell>
          <table:table-cell office:value-type="float" office:value="223.4" table:style-name="ce31">
            <text:p><text:s/>223<text:s/></text:p>
          </table:table-cell>
          <table:table-cell office:value-type="float" office:value="67.599999999999994" table:style-name="ce76">
            <text:p><text:s/>68<text:s/></text:p>
          </table:table-cell>
          <table:table-cell office:value-type="float" office:value="819.8" table:formula="of:=SUM([.E24:.J24])" table:style-name="ce68">
            <text:p><text:s/>8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747.6" table:style-name="ce30">
            <text:p><text:s/>748<text:s/></text:p>
          </table:table-cell>
          <table:table-cell office:value-type="float" office:value="420.7" table:style-name="ce31">
            <text:p><text:s/>421<text:s/></text:p>
          </table:table-cell>
          <table:table-cell office:value-type="float" office:value="1469.9" table:style-name="ce31">
            <text:p><text:s/>1,470<text:s/></text:p>
          </table:table-cell>
          <table:table-cell office:value-type="float" office:value="1251.9000000000001" table:style-name="ce31">
            <text:p><text:s/>1,252<text:s/></text:p>
          </table:table-cell>
          <table:table-cell office:value-type="float" office:value="611.6" table:style-name="ce31">
            <text:p><text:s/>612<text:s/></text:p>
          </table:table-cell>
          <table:table-cell office:value-type="float" office:value="1326.4" table:style-name="ce76">
            <text:p><text:s/>1,326<text:s/></text:p>
          </table:table-cell>
          <table:table-cell office:value-type="float" office:value="5828.1" table:formula="of:=SUM([.E25:.J25])" table:style-name="ce68">
            <text:p><text:s/>5,82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20.399999999999999" table:style-name="ce30">
            <text:p><text:s/>20<text:s/></text:p>
          </table:table-cell>
          <table:table-cell office:value-type="float" office:value="8.5" table:style-name="ce31">
            <text:p><text:s/>9<text:s/></text:p>
          </table:table-cell>
          <table:table-cell office:value-type="float" office:value="68.900000000000006" table:style-name="ce31">
            <text:p><text:s/>69<text:s/></text:p>
          </table:table-cell>
          <table:table-cell office:value-type="float" office:value="60" table:style-name="ce31">
            <text:p><text:s/>60<text:s/></text:p>
          </table:table-cell>
          <table:table-cell office:value-type="float" office:value="15.5" table:style-name="ce31">
            <text:p><text:s/>16<text:s/></text:p>
          </table:table-cell>
          <table:table-cell office:value-type="float" office:value="231.3" table:style-name="ce76">
            <text:p><text:s/>231<text:s/></text:p>
          </table:table-cell>
          <table:table-cell office:value-type="float" office:value="404.6" table:formula="of:=SUM([.E26:.J26])" table:style-name="ce68">
            <text:p><text:s/>4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Co disposal Total</text:p>
          </table:table-cell>
          <table:table-cell table:style-name="ce71"/>
          <table:table-cell office:value-type="float" office:value="851.5" table:formula="of:=SUBTOTAL(9;[.E24:.E26])" table:style-name="ce72">
            <text:p><text:s/>852<text:s/></text:p>
          </table:table-cell>
          <table:table-cell office:value-type="float" office:value="534.70000000000005" table:formula="of:=SUBTOTAL(9;[.F24:.F26])" table:style-name="ce72">
            <text:p><text:s/>535<text:s/>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float" office:value="850.5" table:formula="of:=SUBTOTAL(9;[.I24:.I26])" table:style-name="ce72">
            <text:p><text:s/>851<text:s/></text:p>
          </table:table-cell>
          <table:table-cell office:value-type="float" office:value="1625.3" table:formula="of:=SUBTOTAL(9;[.J24:.J26])" table:style-name="ce73">
            <text:p><text:s/>1,625<text:s/></text:p>
          </table:table-cell>
          <table:table-cell office:value-type="float" office:value="7052.5000000000009" table:formula="of:=SUBTOTAL(9;[.K24:.K26])" table:style-name="ce74">
            <text:p><text:s/>7,0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75">
            <text:p>Inert/C&amp;D</text:p>
          </table:table-cell>
          <table:table-cell office:value-type="float" office:value="747.5" table:style-name="ce30">
            <text:p><text:s/>748<text:s/></text:p>
          </table:table-cell>
          <table:table-cell office:value-type="float" office:value="2.4" table:style-name="ce31">
            <text:p><text:s/>2<text:s/></text:p>
          </table:table-cell>
          <table:table-cell office:value-type="float" office:value="214.9" table:style-name="ce31">
            <text:p><text:s/>215<text:s/></text:p>
          </table:table-cell>
          <table:table-cell office:value-type="float" office:value="426.4" table:style-name="ce31">
            <text:p><text:s/>42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21.9" table:style-name="ce76">
            <text:p><text:s/>122<text:s/></text:p>
          </table:table-cell>
          <table:table-cell office:value-type="float" office:value="1513.1" table:formula="of:=SUM([.E28:.J28])" table:style-name="ce68">
            <text:p><text:s/>1,5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315.89999999999998" table:style-name="ce30">
            <text:p><text:s/>316<text:s/></text:p>
          </table:table-cell>
          <table:table-cell office:value-type="float" office:value="36.4" table:style-name="ce31">
            <text:p><text:s/>36<text:s/></text:p>
          </table:table-cell>
          <table:table-cell office:value-type="float" office:value="39.299999999999997" table:style-name="ce31">
            <text:p><text:s/>39<text:s/></text:p>
          </table:table-cell>
          <table:table-cell office:value-type="float" office:value="890.2" table:style-name="ce31">
            <text:p><text:s/>89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1281.8" table:formula="of:=SUM([.E29:.J29])" table:style-name="ce68">
            <text:p><text:s/>1,2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.4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1.4" table:formula="of:=SUM([.E30:.J30])" table:style-name="ce68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71"/>
          <table:table-cell office:value-type="float" office:value="1063.4000000000001" table:formula="of:=SUBTOTAL(9;[.E28:.E30])" table:style-name="ce72">
            <text:p><text:s/>1,063<text:s/></text:p>
          </table:table-cell>
          <table:table-cell office:value-type="float" office:value="38.799999999999997" table:formula="of:=SUBTOTAL(9;[.F28:.F30])" table:style-name="ce72">
            <text:p><text:s/>39<text:s/>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float" office:value="0" table:formula="of:=SUBTOTAL(9;[.I28:.I30])" table:style-name="ce72">
            <text:p><text:s/>-<text:s/></text:p>
          </table:table-cell>
          <table:table-cell office:value-type="float" office:value="121.9" table:formula="of:=SUBTOTAL(9;[.J28:.J30])" table:style-name="ce73">
            <text:p><text:s/>122<text:s/></text:p>
          </table:table-cell>
          <table:table-cell office:value-type="float" office:value="2796.2999999999997" table:formula="of:=SUBTOTAL(9;[.K28:.K30])" table:style-name="ce74">
            <text:p><text:s/>2,7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75">
            <text:p>Inert/C&amp;D</text:p>
          </table:table-cell>
          <table:table-cell office:value-type="float" office:value="122.7" table:style-name="ce30">
            <text:p><text:s/>123<text:s/></text:p>
          </table:table-cell>
          <table:table-cell office:value-type="float" office:value="94.9" table:style-name="ce31">
            <text:p><text:s/>95<text:s/></text:p>
          </table:table-cell>
          <table:table-cell office:value-type="float" office:value="54.5" table:style-name="ce31">
            <text:p><text:s/>55<text:s/></text:p>
          </table:table-cell>
          <table:table-cell office:value-type="float" office:value="33.799999999999997" table:style-name="ce31">
            <text:p><text:s/>34<text:s/></text:p>
          </table:table-cell>
          <table:table-cell office:value-type="float" office:value="147.5" table:style-name="ce31">
            <text:p><text:s/>148<text:s/></text:p>
          </table:table-cell>
          <table:table-cell office:value-type="float" office:value="365.3" table:style-name="ce76">
            <text:p><text:s/>365<text:s/></text:p>
          </table:table-cell>
          <table:table-cell office:value-type="float" office:value="818.7" table:formula="of:=SUM([.E32:.J32])" table:style-name="ce68">
            <text:p><text:s/>81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28.7" table:style-name="ce30">
            <text:p><text:s/>29<text:s/></text:p>
          </table:table-cell>
          <table:table-cell office:value-type="float" office:value="0.2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.3" table:style-name="ce31">
            <text:p><text:s/>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35.199999999999996" table:formula="of:=SUM([.E33:.J33])" table:style-name="ce68">
            <text:p><text:s/>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.3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0.3" table:formula="of:=SUM([.E34:.J34])" table:style-name="ce68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71"/>
          <table:table-cell office:value-type="float" office:value="151.4" table:formula="of:=SUBTOTAL(9;[.E32:.E34])" table:style-name="ce72">
            <text:p><text:s/>151<text:s/></text:p>
          </table:table-cell>
          <table:table-cell office:value-type="float" office:value="95.4" table:formula="of:=SUBTOTAL(9;[.F32:.F34])" table:style-name="ce72">
            <text:p><text:s/>95<text:s/>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float" office:value="147.5" table:formula="of:=SUBTOTAL(9;[.I32:.I34])" table:style-name="ce72">
            <text:p><text:s/>148<text:s/></text:p>
          </table:table-cell>
          <table:table-cell office:value-type="float" office:value="365.3" table:formula="of:=SUBTOTAL(9;[.J32:.J34])" table:style-name="ce73">
            <text:p><text:s/>365<text:s/></text:p>
          </table:table-cell>
          <table:table-cell office:value-type="float" office:value="854.2" table:formula="of:=SUBTOTAL(9;[.K32:.K34])" table:style-name="ce74">
            <text:p><text:s/>8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75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8.047040006637573" table:style-name="ce31">
            <text:p><text:s/>18<text:s/></text:p>
          </table:table-cell>
          <table:table-cell office:value-type="float" office:value="1.9199999809265136E-2" table:style-name="ce31">
            <text:p><text:s/>0<text:s/></text:p>
          </table:table-cell>
          <table:table-cell office:value-type="float" office:value="0.3042799987792969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18.370520005226137" table:formula="of:=SUM([.E36:.J36])" table:style-name="ce68">
            <text:p><text:s/>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2.66" table:style-name="ce30">
            <text:p><text:s/>3<text:s/></text:p>
          </table:table-cell>
          <table:table-cell office:value-type="float" office:value="144.90690002441406" table:style-name="ce31">
            <text:p><text:s/>145<text:s/></text:p>
          </table:table-cell>
          <table:table-cell office:value-type="float" office:value="9.4568999490737919" table:style-name="ce31">
            <text:p><text:s/>9<text:s/></text:p>
          </table:table-cell>
          <table:table-cell office:value-type="float" office:value="0.51228000450134281" table:style-name="ce31">
            <text:p><text:s/>1<text:s/></text:p>
          </table:table-cell>
          <table:table-cell office:value-type="float" office:value="2.5495999599844219" table:style-name="ce31">
            <text:p><text:s/>3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160.08567993797362" table:formula="of:=SUM([.E37:.J37])" table:style-name="ce68">
            <text:p><text:s/>16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.5540000915527339E-2" table:style-name="ce31">
            <text:p><text:s/>0<text:s/></text:p>
          </table:table-cell>
          <table:table-cell office:value-type="float" office:value="1.843912046432495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1.9294520473480226" table:formula="of:=SUM([.E38:.J38])" table:style-name="ce68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Restricted-user Total</text:p>
          </table:table-cell>
          <table:table-cell table:style-name="ce71"/>
          <table:table-cell office:value-type="float" office:value="2.66" table:formula="of:=SUBTOTAL(9;[.E36:.E38])" table:style-name="ce27">
            <text:p><text:s/>3<text:s/></text:p>
          </table:table-cell>
          <table:table-cell office:value-type="float" office:value="162.95394003105162" table:formula="of:=SUBTOTAL(9;[.F36:.F38])" table:style-name="ce27">
            <text:p><text:s/>163<text:s/>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2.5495999599844219" table:formula="of:=SUBTOTAL(9;[.I36:.I38])" table:style-name="ce27">
            <text:p><text:s/>3<text:s/></text:p>
          </table:table-cell>
          <table:table-cell office:value-type="float" office:value="0" table:formula="of:=SUBTOTAL(9;[.J36:.J38])" table:style-name="ce80">
            <text:p><text:s/>-<text:s/></text:p>
          </table:table-cell>
          <table:table-cell office:value-type="float" office:value="180.38565199054779" table:formula="of:=SUBTOTAL(9;[.K36:.K38])" table:style-name="ce66">
            <text:p><text:s/>18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2/3 Total</text:p>
          </table:table-cell>
          <table:table-cell table:style-name="ce82"/>
          <table:table-cell table:style-name="ce83"/>
          <table:table-cell office:value-type="float" office:value="2068.96" table:formula="of:=SUBTOTAL(9;[.E24:.E38])" table:style-name="ce84">
            <text:p><text:s/>2,069<text:s/></text:p>
          </table:table-cell>
          <table:table-cell office:value-type="float" office:value="831.85394003105159" table:formula="of:=SUBTOTAL(9;[.F24:.F38])" table:style-name="ce84">
            <text:p><text:s/>832<text:s/></text:p>
          </table:table-cell>
          <table:table-cell office:value-type="float" office:value="2024.0616399497987" table:formula="of:=SUBTOTAL(9;[.G24:.G38])" table:style-name="ce84">
            <text:p><text:s/>2,024<text:s/></text:p>
          </table:table-cell>
          <table:table-cell office:value-type="float" office:value="2845.4604720497141" table:formula="of:=SUBTOTAL(9;[.H24:.H38])" table:style-name="ce84">
            <text:p><text:s/>2,845<text:s/></text:p>
          </table:table-cell>
          <table:table-cell office:value-type="float" office:value="1000.5495999599844" table:formula="of:=SUBTOTAL(9;[.I24:.I38])" table:style-name="ce84">
            <text:p><text:s/>1,001<text:s/></text:p>
          </table:table-cell>
          <table:table-cell office:value-type="float" office:value="2112.5" table:formula="of:=SUBTOTAL(9;[.J24:.J38])" table:style-name="ce85">
            <text:p><text:s/>2,113<text:s/></text:p>
          </table:table-cell>
          <table:table-cell office:value-type="float" office:value="10883.385651990549" table:formula="of:=SUBTOTAL(9;[.K24:.K38])" table:style-name="ce86">
            <text:p><text:s/>10,883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6" table:style-name="ce408">
            <text:p>2004/5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75">
            <text:p>Inert/C&amp;D</text:p>
          </table:table-cell>
          <table:table-cell office:value-type="float" office:value="6.4630000000000001" table:style-name="ce30">
            <text:p><text:s/>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6.4630000000000001" table:formula="of:=SUM([.E41:.J41])" table:style-name="ce68">
            <text:p><text:s/>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0" table:formula="of:=SUM([.E42:.J42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22.11" table:style-name="ce30">
            <text:p><text:s/>2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9.238382517149205" table:style-name="ce31">
            <text:p><text:s/>7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101.3483825171492" table:formula="of:=SUM([.E43:.J43])" table:style-name="ce68">
            <text:p><text:s/>1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71"/>
          <table:table-cell office:value-type="float" office:value="28.573" table:formula="of:=SUBTOTAL(9;[.E41:.E43])" table:style-name="ce72">
            <text:p><text:s/>29<text:s/></text:p>
          </table:table-cell>
          <table:table-cell office:value-type="float" office:value="0" table:formula="of:=SUBTOTAL(9;[.F41:.F43])" table:style-name="ce72">
            <text:p><text:s/>-<text:s/>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float" office:value="0" table:formula="of:=SUBTOTAL(9;[.I41:.I43])" table:style-name="ce72">
            <text:p><text:s/>-<text:s/></text:p>
          </table:table-cell>
          <table:table-cell office:value-type="float" office:value="0" table:formula="of:=SUBTOTAL(9;[.J41:.J43])" table:style-name="ce73">
            <text:p><text:s/>-<text:s/></text:p>
          </table:table-cell>
          <table:table-cell office:value-type="float" office:value="107.8113825171492" table:formula="of:=SUBTOTAL(9;[.K41:.K43])" table:style-name="ce74">
            <text:p><text:s/>10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75">
            <text:p>Inert/C&amp;D</text:p>
          </table:table-cell>
          <table:table-cell office:value-type="float" office:value="874.4433797805309" table:style-name="ce30">
            <text:p><text:s/>874<text:s/></text:p>
          </table:table-cell>
          <table:table-cell office:value-type="float" office:value="123.7912613170147" table:style-name="ce31">
            <text:p><text:s/>124<text:s/></text:p>
          </table:table-cell>
          <table:table-cell office:value-type="float" office:value="442.33533262634279" table:style-name="ce31">
            <text:p><text:s/>442<text:s/></text:p>
          </table:table-cell>
          <table:table-cell office:value-type="float" office:value="803.2337428785562" table:style-name="ce31">
            <text:p><text:s/>803<text:s/></text:p>
          </table:table-cell>
          <table:table-cell office:value-type="float" office:value="582.62624321031569" table:style-name="ce31">
            <text:p><text:s/>583<text:s/></text:p>
          </table:table-cell>
          <table:table-cell office:value-type="float" office:value="248.92828003263475" table:style-name="ce76">
            <text:p><text:s/>249<text:s/></text:p>
          </table:table-cell>
          <table:table-cell office:value-type="float" office:value="3075.358239845395" table:formula="of:=SUM([.E45:.J45])" table:style-name="ce68">
            <text:p><text:s/>3,0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455.2585996266082" table:style-name="ce30">
            <text:p><text:s/>455<text:s/></text:p>
          </table:table-cell>
          <table:table-cell office:value-type="float" office:value="374.34998057619481" table:style-name="ce31">
            <text:p><text:s/>374<text:s/></text:p>
          </table:table-cell>
          <table:table-cell office:value-type="float" office:value="1153.6503733525276" table:style-name="ce31">
            <text:p><text:s/>1,154<text:s/></text:p>
          </table:table-cell>
          <table:table-cell office:value-type="float" office:value="1827.645409980543" table:style-name="ce31">
            <text:p><text:s/>1,828<text:s/></text:p>
          </table:table-cell>
          <table:table-cell office:value-type="float" office:value="883.18528793647886" table:style-name="ce31">
            <text:p><text:s/>883<text:s/></text:p>
          </table:table-cell>
          <table:table-cell office:value-type="float" office:value="1296.3753881870509" table:style-name="ce76">
            <text:p><text:s/>1,296<text:s/></text:p>
          </table:table-cell>
          <table:table-cell office:value-type="float" office:value="5990.4650396594034" table:formula="of:=SUM([.E46:.J46])" table:style-name="ce68">
            <text:p><text:s/>5,99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15.805440138816833" table:style-name="ce30">
            <text:p><text:s/>16<text:s/></text:p>
          </table:table-cell>
          <table:table-cell office:value-type="float" office:value="3.7109100037515161" table:style-name="ce31">
            <text:p><text:s/>4<text:s/></text:p>
          </table:table-cell>
          <table:table-cell office:value-type="float" office:value="99.302920230865482" table:style-name="ce31">
            <text:p><text:s/>99<text:s/></text:p>
          </table:table-cell>
          <table:table-cell office:value-type="float" office:value="62.093191600799564" table:style-name="ce31">
            <text:p><text:s/>62<text:s/></text:p>
          </table:table-cell>
          <table:table-cell office:value-type="float" office:value="38.842619533061978" table:style-name="ce31">
            <text:p><text:s/>39<text:s/></text:p>
          </table:table-cell>
          <table:table-cell office:value-type="float" office:value="263.75470160675047" table:style-name="ce76">
            <text:p><text:s/>264<text:s/></text:p>
          </table:table-cell>
          <table:table-cell office:value-type="float" office:value="483.50978311404583" table:formula="of:=SUM([.E47:.J47])" table:style-name="ce68">
            <text:p><text:s/>4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71"/>
          <table:table-cell office:value-type="float" office:value="1345.5074195459558" table:formula="of:=SUBTOTAL(9;[.E45:.E47])" table:style-name="ce72">
            <text:p><text:s/>1,346<text:s/></text:p>
          </table:table-cell>
          <table:table-cell office:value-type="float" office:value="501.852151896961" table:formula="of:=SUBTOTAL(9;[.F45:.F47])" table:style-name="ce72">
            <text:p><text:s/>502<text:s/>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float" office:value="1504.6541506798565" table:formula="of:=SUBTOTAL(9;[.I45:.I47])" table:style-name="ce72">
            <text:p><text:s/>1,505<text:s/></text:p>
          </table:table-cell>
          <table:table-cell office:value-type="float" office:value="1809.0583698264363" table:formula="of:=SUBTOTAL(9;[.J45:.J47])" table:style-name="ce73">
            <text:p><text:s/>1,809<text:s/></text:p>
          </table:table-cell>
          <table:table-cell office:value-type="float" office:value="9549.3330626188454" table:formula="of:=SUBTOTAL(9;[.K45:.K47])" table:style-name="ce74">
            <text:p><text:s/>9,5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75">
            <text:p>Inert/C&amp;D</text:p>
          </table:table-cell>
          <table:table-cell office:value-type="float" office:value="138.34637019348145" table:style-name="ce30">
            <text:p><text:s/>138<text:s/></text:p>
          </table:table-cell>
          <table:table-cell office:value-type="float" office:value="94.867200012207036" table:style-name="ce31">
            <text:p><text:s/>95<text:s/></text:p>
          </table:table-cell>
          <table:table-cell office:value-type="float" office:value="87.642797069549559" table:style-name="ce31">
            <text:p><text:s/>88<text:s/></text:p>
          </table:table-cell>
          <table:table-cell office:value-type="float" office:value="7.8994999999999997" table:style-name="ce31">
            <text:p><text:s/>8<text:s/></text:p>
          </table:table-cell>
          <table:table-cell office:value-type="float" office:value="198.03399999999999" table:style-name="ce31">
            <text:p><text:s/>198<text:s/></text:p>
          </table:table-cell>
          <table:table-cell office:value-type="float" office:value="407.08" table:style-name="ce76">
            <text:p><text:s/>407<text:s/></text:p>
          </table:table-cell>
          <table:table-cell office:value-type="float" office:value="933.86986727523799" table:formula="of:=SUM([.E49:.J49])" table:style-name="ce68">
            <text:p><text:s/>9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115.30976010131836" table:style-name="ce30">
            <text:p><text:s/>11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.6023500061035154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117.91211010742188" table:formula="of:=SUM([.E50:.J50])" table:style-name="ce68">
            <text:p><text:s/>1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azardous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0" table:formula="of:=SUM([.E51:.J51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71"/>
          <table:table-cell office:value-type="float" office:value="253.65613029479982" table:formula="of:=SUBTOTAL(9;[.E49:.E51])" table:style-name="ce72">
            <text:p><text:s/>254<text:s/></text:p>
          </table:table-cell>
          <table:table-cell office:value-type="float" office:value="94.867200012207036" table:formula="of:=SUBTOTAL(9;[.F49:.F51])" table:style-name="ce72">
            <text:p><text:s/>95<text:s/>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float" office:value="198.03399999999999" table:formula="of:=SUBTOTAL(9;[.I49:.I51])" table:style-name="ce72">
            <text:p><text:s/>198<text:s/></text:p>
          </table:table-cell>
          <table:table-cell office:value-type="float" office:value="407.08" table:formula="of:=SUBTOTAL(9;[.J49:.J51])" table:style-name="ce73">
            <text:p><text:s/>407<text:s/></text:p>
          </table:table-cell>
          <table:table-cell office:value-type="float" office:value="1051.78197738266" table:formula="of:=SUBTOTAL(9;[.K49:.K51])" table:style-name="ce74">
            <text:p><text:s/>1,0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75">
            <text:p>Inert/C&amp;D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8.2375700168609622" table:style-name="ce31">
            <text:p><text:s/>8<text:s/></text:p>
          </table:table-cell>
          <table:table-cell office:value-type="float" office:value="7.2137882690429684" table:style-name="ce31">
            <text:p><text:s/>7<text:s/></text:p>
          </table:table-cell>
          <table:table-cell office:value-type="float" office:value="0.59299999999999997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16.044358285903932" table:formula="of:=SUM([.E53:.J53])" table:style-name="ce68">
            <text:p><text:s/>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75">
            <text:p>HIC</text:p>
          </table:table-cell>
          <table:table-cell office:value-type="float" office:value="1.716" table:style-name="ce30">
            <text:p><text:s/>2<text:s/></text:p>
          </table:table-cell>
          <table:table-cell office:value-type="float" office:value="136.21153603363038" table:style-name="ce31">
            <text:p><text:s/>136<text:s/></text:p>
          </table:table-cell>
          <table:table-cell office:value-type="float" office:value="3.8687600877285004" table:style-name="ce31">
            <text:p><text:s/>4<text:s/></text:p>
          </table:table-cell>
          <table:table-cell office:value-type="float" office:value="1.3479999542236328E-2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141.80977612090112" table:formula="of:=SUM([.E54:.J54])" table:style-name="ce68">
            <text:p><text:s/>1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87">
            <text:p>Hazardous</text:p>
          </table:table-cell>
          <table:table-cell office:value-type="float" office:value="0" table:style-name="ce88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1.0573149909973145" table:style-name="ce89">
            <text:p><text:s/>1<text:s/></text:p>
          </table:table-cell>
          <table:table-cell office:value-type="float" office:value="0" table:style-name="ce89">
            <text:p><text:s/>-<text:s/></text:p>
          </table:table-cell>
          <table:table-cell office:value-type="float" office:value="0" table:style-name="ce90">
            <text:p><text:s/>-<text:s/></text:p>
          </table:table-cell>
          <table:table-cell office:value-type="float" office:value="1.0573149909973145" table:formula="of:=SUM([.E55:.J55])" table:style-name="ce91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Restricted-user Total</text:p>
          </table:table-cell>
          <table:table-cell table:style-name="ce71"/>
          <table:table-cell office:value-type="float" office:value="1.716" table:formula="of:=SUBTOTAL(9;[.E53:.E55])" table:style-name="ce31">
            <text:p><text:s/>2<text:s/></text:p>
          </table:table-cell>
          <table:table-cell office:value-type="float" office:value="144.44910605049134" table:formula="of:=SUBTOTAL(9;[.F53:.F55])" table:style-name="ce31">
            <text:p><text:s/>144<text:s/>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float" office:value="0" table:formula="of:=SUBTOTAL(9;[.I53:.I55])" table:style-name="ce31">
            <text:p><text:s/>-<text:s/></text:p>
          </table:table-cell>
          <table:table-cell office:value-type="float" office:value="0" table:formula="of:=SUBTOTAL(9;[.J53:.J55])" table:style-name="ce76">
            <text:p><text:s/>-<text:s/></text:p>
          </table:table-cell>
          <table:table-cell office:value-type="float" office:value="158.91144939780239" table:formula="of:=SUBTOTAL(9;[.K53:.K55])" table:style-name="ce68">
            <text:p><text:s/>159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4/5 Total</text:p>
          </table:table-cell>
          <table:table-cell table:style-name="ce82"/>
          <table:table-cell table:style-name="ce92"/>
          <table:table-cell office:value-type="float" office:value="1629.4525498407556" table:formula="of:=SUBTOTAL(9;[.E41:.E55])" table:style-name="ce84">
            <text:p><text:s/>1,629<text:s/></text:p>
          </table:table-cell>
          <table:table-cell office:value-type="float" office:value="741.16845795965946" table:formula="of:=SUBTOTAL(9;[.F41:.F55])" table:style-name="ce84">
            <text:p><text:s/>741<text:s/></text:p>
          </table:table-cell>
          <table:table-cell office:value-type="float" office:value="1794.0139716360568" table:formula="of:=SUBTOTAL(9;[.G41:.G55])" table:style-name="ce84">
            <text:p><text:s/>1,794<text:s/></text:p>
          </table:table-cell>
          <table:table-cell office:value-type="float" office:value="2784.3763719736908" table:formula="of:=SUBTOTAL(9;[.H41:.H55])" table:style-name="ce84">
            <text:p><text:s/>2,784<text:s/></text:p>
          </table:table-cell>
          <table:table-cell office:value-type="float" office:value="1702.6881506798563" table:formula="of:=SUBTOTAL(9;[.I41:.I55])" table:style-name="ce84">
            <text:p><text:s/>1,703<text:s/></text:p>
          </table:table-cell>
          <table:table-cell office:value-type="float" office:value="2216.1383698264362" table:formula="of:=SUBTOTAL(9;[.J41:.J55])" table:style-name="ce85">
            <text:p><text:s/>2,216<text:s/></text:p>
          </table:table-cell>
          <table:table-cell office:value-type="float" office:value="10867.837871916458" table:formula="of:=SUBTOTAL(9;[.K41:.K55])" table:style-name="ce86">
            <text:p><text:s/>10,86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5" table:number-columns-spanned="1" table:number-rows-spanned="16" table:style-name="ce408">
            <text:p>2005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41.478999999999999" table:style-name="ce31">
            <text:p><text:s/>4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.21300001144409E-2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93">
            <text:p><text:s/>-<text:s/></text:p>
          </table:table-cell>
          <table:table-cell office:value-type="float" office:value="41.491130000114438" table:formula="of:=SUM([.E58:.J58])" table:style-name="ce68">
            <text:p><text:s/>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469170018970966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0.469170018970966" table:formula="of:=SUM([.E59:.J59])" table:style-name="ce68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3.3889999999999998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5.757783657814002" table:style-name="ce31">
            <text:p><text:s/>6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7.614309509277298" table:style-name="ce76">
            <text:p><text:s/>48<text:s/></text:p>
          </table:table-cell>
          <table:table-cell office:value-type="float" office:value="116.7610931670913" table:formula="of:=SUM([.E60:.J60])" table:style-name="ce68">
            <text:p><text:s/>1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71"/>
          <table:table-cell office:value-type="float" office:value="44.868000000000002" table:formula="of:=SUBTOTAL(9;[.E58:.E60])" table:style-name="ce72">
            <text:p><text:s/>45<text:s/></text:p>
          </table:table-cell>
          <table:table-cell office:value-type="float" office:value="0" table:formula="of:=SUBTOTAL(9;[.F58:.F60])" table:style-name="ce72">
            <text:p><text:s/>-<text:s/></text:p>
          </table:table-cell>
          <table:table-cell office:value-type="float" office:value="0" table:formula="of:=SUBTOTAL(9;[.G58:.G60])" table:style-name="ce72">
            <text:p><text:s/>-<text:s/></text:p>
          </table:table-cell>
          <table:table-cell office:value-type="float" office:value="66.239083676899412" table:formula="of:=SUBTOTAL(9;[.H58:.H60])" table:style-name="ce72">
            <text:p><text:s/>66<text:s/></text:p>
          </table:table-cell>
          <table:table-cell office:value-type="float" office:value="0" table:formula="of:=SUBTOTAL(9;[.I58:.I60])" table:style-name="ce72">
            <text:p><text:s/>-<text:s/></text:p>
          </table:table-cell>
          <table:table-cell office:value-type="float" office:value="47.614309509277298" table:formula="of:=SUBTOTAL(9;[.J58:.J60])" table:style-name="ce73">
            <text:p><text:s/>48<text:s/></text:p>
          </table:table-cell>
          <table:table-cell office:value-type="float" office:value="158.7213931861767" table:formula="of:=SUBTOTAL(9;[.K58:.K60])" table:style-name="ce74">
            <text:p><text:s/>15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80.417369597472302" table:style-name="ce31">
            <text:p><text:s/>80<text:s/></text:p>
          </table:table-cell>
          <table:table-cell office:value-type="float" office:value="150.22523905140201" table:style-name="ce31">
            <text:p><text:s/>150<text:s/></text:p>
          </table:table-cell>
          <table:table-cell office:value-type="float" office:value="374.35212144207998" table:style-name="ce31">
            <text:p><text:s/>374<text:s/></text:p>
          </table:table-cell>
          <table:table-cell office:value-type="float" office:value="809.52818204784398" table:style-name="ce31">
            <text:p><text:s/>810<text:s/></text:p>
          </table:table-cell>
          <table:table-cell office:value-type="float" office:value="689.78166992646504" table:style-name="ce31">
            <text:p><text:s/>690<text:s/></text:p>
          </table:table-cell>
          <table:table-cell office:value-type="float" office:value="545.10745927032804" table:style-name="ce76">
            <text:p><text:s/>545<text:s/></text:p>
          </table:table-cell>
          <table:table-cell office:value-type="float" office:value="2649.4120413355913" table:formula="of:=SUM([.E62:.J62])" table:style-name="ce66">
            <text:p><text:s/>2,6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562.698351733923" table:style-name="ce31">
            <text:p><text:s/>563<text:s/></text:p>
          </table:table-cell>
          <table:table-cell office:value-type="float" office:value="371.66598928425202" table:style-name="ce31">
            <text:p><text:s/>372<text:s/></text:p>
          </table:table-cell>
          <table:table-cell office:value-type="float" office:value="1120.9281673780099" table:style-name="ce31">
            <text:p><text:s/>1,121<text:s/></text:p>
          </table:table-cell>
          <table:table-cell office:value-type="float" office:value="1731.6510735673201" table:style-name="ce31">
            <text:p><text:s/>1,732<text:s/></text:p>
          </table:table-cell>
          <table:table-cell office:value-type="float" office:value="817.534029837042" table:style-name="ce31">
            <text:p><text:s/>818<text:s/></text:p>
          </table:table-cell>
          <table:table-cell office:value-type="float" office:value="1247.6062728405" table:style-name="ce76">
            <text:p><text:s/>1,248<text:s/></text:p>
          </table:table-cell>
          <table:table-cell office:value-type="float" office:value="5852.0838846410461" table:formula="of:=SUM([.E63:.J63])" table:style-name="ce68">
            <text:p><text:s/>5,8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1.8519999980926499E-2" table:style-name="ce31">
            <text:p><text:s/>0<text:s/></text:p>
          </table:table-cell>
          <table:table-cell office:value-type="float" office:value="3.8640256971977598" table:style-name="ce31">
            <text:p><text:s/>4<text:s/></text:p>
          </table:table-cell>
          <table:table-cell office:value-type="float" office:value="14.691769409179599" table:style-name="ce31">
            <text:p><text:s/>15<text:s/></text:p>
          </table:table-cell>
          <table:table-cell office:value-type="float" office:value="5.61235630798339" table:style-name="ce31">
            <text:p><text:s/>6<text:s/></text:p>
          </table:table-cell>
          <table:table-cell office:value-type="float" office:value="0.11575999951362601" table:style-name="ce31">
            <text:p><text:s/>0<text:s/></text:p>
          </table:table-cell>
          <table:table-cell office:value-type="float" office:value="41.724740356445302" table:style-name="ce76">
            <text:p><text:s/>42<text:s/></text:p>
          </table:table-cell>
          <table:table-cell office:value-type="float" office:value="66.027171770300598" table:formula="of:=SUM([.E64:.J64])" table:style-name="ce91">
            <text:p><text:s/>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71"/>
          <table:table-cell office:value-type="float" office:value="643.1342413313763" table:formula="of:=SUBTOTAL(9;[.E62:.E64])" table:style-name="ce72">
            <text:p><text:s/>643<text:s/></text:p>
          </table:table-cell>
          <table:table-cell office:value-type="float" office:value="525.75525403285178" table:formula="of:=SUBTOTAL(9;[.F62:.F64])" table:style-name="ce72">
            <text:p><text:s/>526<text:s/></text:p>
          </table:table-cell>
          <table:table-cell office:value-type="float" office:value="1509.9720582292696" table:formula="of:=SUBTOTAL(9;[.G62:.G64])" table:style-name="ce72">
            <text:p><text:s/>1,510<text:s/></text:p>
          </table:table-cell>
          <table:table-cell office:value-type="float" office:value="2546.7916119231472" table:formula="of:=SUBTOTAL(9;[.H62:.H64])" table:style-name="ce72">
            <text:p><text:s/>2,547<text:s/></text:p>
          </table:table-cell>
          <table:table-cell office:value-type="float" office:value="1507.4314597630205" table:formula="of:=SUBTOTAL(9;[.I62:.I64])" table:style-name="ce72">
            <text:p><text:s/>1,507<text:s/></text:p>
          </table:table-cell>
          <table:table-cell office:value-type="float" office:value="1834.4384724672734" table:formula="of:=SUBTOTAL(9;[.J62:.J64])" table:style-name="ce73">
            <text:p><text:s/>1,834<text:s/></text:p>
          </table:table-cell>
          <table:table-cell office:value-type="float" office:value="8567.5230977469364" table:formula="of:=SUBTOTAL(9;[.K62:.K64])" table:style-name="ce74">
            <text:p><text:s/>8,56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146.244370315552" table:style-name="ce31">
            <text:p><text:s/>146<text:s/></text:p>
          </table:table-cell>
          <table:table-cell office:value-type="float" office:value="65.403699951171802" table:style-name="ce31">
            <text:p><text:s/>65<text:s/></text:p>
          </table:table-cell>
          <table:table-cell office:value-type="float" office:value="65.978129882812496" table:style-name="ce31">
            <text:p><text:s/>66<text:s/></text:p>
          </table:table-cell>
          <table:table-cell office:value-type="float" office:value="2.895" table:style-name="ce31">
            <text:p><text:s/>3<text:s/></text:p>
          </table:table-cell>
          <table:table-cell office:value-type="float" office:value="108.333349731445" table:style-name="ce31">
            <text:p><text:s/>108<text:s/></text:p>
          </table:table-cell>
          <table:table-cell office:value-type="float" office:value="596.31799999999998" table:style-name="ce76">
            <text:p><text:s/>596<text:s/></text:p>
          </table:table-cell>
          <table:table-cell office:value-type="float" office:value="985.17254988098125" table:formula="of:=SUM([.E66:.J66])" table:style-name="ce68">
            <text:p><text:s/>9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78.692999999999998" table:style-name="ce31">
            <text:p><text:s/>7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78.692999999999998" table:formula="of:=SUM([.E67:.J67])" table:style-name="ce68">
            <text:p><text:s/>7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76">
            <text:p><text:s/>-<text:s/></text:p>
          </table:table-cell>
          <table:table-cell office:value-type="float" office:value="0" table:formula="of:=SUM([.E68:.J68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71"/>
          <table:table-cell office:value-type="float" office:value="224.93737031555202" table:formula="of:=SUBTOTAL(9;[.E66:.E68])" table:style-name="ce72">
            <text:p><text:s/>225<text:s/></text:p>
          </table:table-cell>
          <table:table-cell office:value-type="float" office:value="65.403699951171802" table:formula="of:=SUBTOTAL(9;[.F66:.F68])" table:style-name="ce72">
            <text:p><text:s/>65<text:s/></text:p>
          </table:table-cell>
          <table:table-cell office:value-type="float" office:value="65.978129882812496" table:formula="of:=SUBTOTAL(9;[.G66:.G68])" table:style-name="ce72">
            <text:p><text:s/>66<text:s/></text:p>
          </table:table-cell>
          <table:table-cell office:value-type="float" office:value="2.895" table:formula="of:=SUBTOTAL(9;[.H66:.H68])" table:style-name="ce72">
            <text:p><text:s/>3<text:s/></text:p>
          </table:table-cell>
          <table:table-cell office:value-type="float" office:value="108.333349731445" table:formula="of:=SUBTOTAL(9;[.I66:.I68])" table:style-name="ce72">
            <text:p><text:s/>108<text:s/></text:p>
          </table:table-cell>
          <table:table-cell office:value-type="float" office:value="596.31799999999998" table:formula="of:=SUBTOTAL(9;[.J66:.J68])" table:style-name="ce73">
            <text:p><text:s/>596<text:s/></text:p>
          </table:table-cell>
          <table:table-cell office:value-type="float" office:value="1063.8655498809812" table:formula="of:=SUBTOTAL(9;[.K66:.K68])" table:style-name="ce74">
            <text:p><text:s/>1,0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763.80600000000004" table:style-name="ce31">
            <text:p><text:s/>764<text:s/></text:p>
          </table:table-cell>
          <table:table-cell office:value-type="float" office:value="6.7000000000000004E-2" table:style-name="ce31">
            <text:p><text:s/>0<text:s/></text:p>
          </table:table-cell>
          <table:table-cell office:value-type="float" office:value="2.8572860851287798" table:style-name="ce31">
            <text:p><text:s/>3<text:s/></text:p>
          </table:table-cell>
          <table:table-cell office:value-type="float" office:value="1.9E-2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.1779999999999999" table:style-name="ce76">
            <text:p><text:s/>1<text:s/></text:p>
          </table:table-cell>
          <table:table-cell office:value-type="float" office:value="767.9272860851288" table:formula="of:=SUM([.E70:.J70])" table:style-name="ce68">
            <text:p><text:s/>76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.9570000000000001" table:style-name="ce31">
            <text:p><text:s/>2<text:s/></text:p>
          </table:table-cell>
          <table:table-cell office:value-type="float" office:value="152.596" table:style-name="ce31">
            <text:p><text:s/>153<text:s/></text:p>
          </table:table-cell>
          <table:table-cell office:value-type="float" office:value="4.8210800666809002" table:style-name="ce31">
            <text:p><text:s/>5<text:s/></text:p>
          </table:table-cell>
          <table:table-cell office:value-type="float" office:value="7.4989526414871204" table:style-name="ce31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0.353000000000002" table:style-name="ce76">
            <text:p><text:s/>40<text:s/></text:p>
          </table:table-cell>
          <table:table-cell office:value-type="float" office:value="207.22603270816802" table:formula="of:=SUM([.E71:.J71])" table:style-name="ce68">
            <text:p><text:s/>2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.85341624546050998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8.274999999999999" table:style-name="ce76">
            <text:p><text:s/>18<text:s/></text:p>
          </table:table-cell>
          <table:table-cell office:value-type="float" office:value="19.12841624546051" table:formula="of:=SUM([.E72:.J72])" table:style-name="ce91">
            <text:p><text:s/>1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71"/>
          <table:table-cell office:value-type="float" office:value="765.76300000000003" table:formula="of:=SUBTOTAL(9;[.E70:.E72])" table:style-name="ce72">
            <text:p><text:s/>766<text:s/></text:p>
          </table:table-cell>
          <table:table-cell office:value-type="float" office:value="152.66300000000001" table:formula="of:=SUBTOTAL(9;[.F70:.F72])" table:style-name="ce72">
            <text:p><text:s/>153<text:s/></text:p>
          </table:table-cell>
          <table:table-cell office:value-type="float" office:value="7.67836615180968" table:formula="of:=SUBTOTAL(9;[.G70:.G72])" table:style-name="ce72">
            <text:p><text:s/>8<text:s/></text:p>
          </table:table-cell>
          <table:table-cell office:value-type="float" office:value="8.3713688869476304" table:formula="of:=SUBTOTAL(9;[.H70:.H72])" table:style-name="ce72">
            <text:p><text:s/>8<text:s/></text:p>
          </table:table-cell>
          <table:table-cell office:value-type="float" office:value="0" table:formula="of:=SUBTOTAL(9;[.I70:.I72])" table:style-name="ce72">
            <text:p><text:s/>-<text:s/></text:p>
          </table:table-cell>
          <table:table-cell office:value-type="float" office:value="59.805999999999997" table:formula="of:=SUBTOTAL(9;[.J70:.J72])" table:style-name="ce73">
            <text:p><text:s/>60<text:s/></text:p>
          </table:table-cell>
          <table:table-cell office:value-type="float" office:value="994.28173503875735" table:formula="of:=SUBTOTAL(9;[.K70:.K72])" table:style-name="ce74">
            <text:p><text:s/>99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5 Total</text:p>
          </table:table-cell>
          <table:table-cell table:style-name="ce95"/>
          <table:table-cell table:style-name="ce92"/>
          <table:table-cell office:value-type="float" office:value="1678.7026116469285" table:formula="of:=SUBTOTAL(9;[.E58:.E72])" table:style-name="ce84">
            <text:p><text:s/>1,679<text:s/></text:p>
          </table:table-cell>
          <table:table-cell office:value-type="float" office:value="743.82195398402359" table:formula="of:=SUBTOTAL(9;[.F58:.F72])" table:style-name="ce84">
            <text:p><text:s/>744<text:s/></text:p>
          </table:table-cell>
          <table:table-cell office:value-type="float" office:value="1583.6285542638918" table:formula="of:=SUBTOTAL(9;[.G58:.G72])" table:style-name="ce84">
            <text:p><text:s/>1,584<text:s/></text:p>
          </table:table-cell>
          <table:table-cell office:value-type="float" office:value="2624.2970644869943" table:formula="of:=SUBTOTAL(9;[.H58:.H72])" table:style-name="ce84">
            <text:p><text:s/>2,624<text:s/></text:p>
          </table:table-cell>
          <table:table-cell office:value-type="float" office:value="1615.7648094944655" table:formula="of:=SUBTOTAL(9;[.I58:.I72])" table:style-name="ce84">
            <text:p><text:s/>1,616<text:s/></text:p>
          </table:table-cell>
          <table:table-cell office:value-type="float" office:value="2538.1767819765505" table:formula="of:=SUBTOTAL(9;[.J58:.J72])" table:style-name="ce85">
            <text:p><text:s/>2,538<text:s/></text:p>
          </table:table-cell>
          <table:table-cell office:value-type="float" office:value="10784.391775852851" table:formula="of:=SUBTOTAL(9;[.K58:.K72])" table:style-name="ce86">
            <text:p><text:s/>10,78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6" table:number-columns-spanned="1" table:number-rows-spanned="16" table:style-name="ce408">
            <text:p>2006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0" table:formula="of:=SUM([.E75:.J75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covered-table-cell/>
          <table:table-cell office:value-type="float" office:value="0" table:formula="of:=SUM([.E76:.J76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43.418999999999997" table:style-name="ce96">
            <text:p><text:s/>43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98.655463859884094" table:style-name="ce96">
            <text:p><text:s/>99<text:s/></text:p>
          </table:table-cell>
          <table:table-cell office:value-type="float" office:value="22.713639892578101" table:style-name="ce96">
            <text:p><text:s/>23<text:s/></text:p>
          </table:table-cell>
          <table:covered-table-cell/>
          <table:table-cell office:value-type="float" office:value="164.78810375246218" table:formula="of:=SUM([.E77:.J77])" table:style-name="ce68">
            <text:p><text:s/>1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71"/>
          <table:table-cell office:value-type="float" office:value="43.418999999999997" table:formula="of:=SUBTOTAL(9;[.E75:.E77])" table:style-name="ce72">
            <text:p><text:s/>43<text:s/></text:p>
          </table:table-cell>
          <table:table-cell office:value-type="float" office:value="0" table:formula="of:=SUBTOTAL(9;[.F75:.F77])" table:style-name="ce72">
            <text:p><text:s/>-<text:s/></text:p>
          </table:table-cell>
          <table:table-cell office:value-type="float" office:value="0" table:formula="of:=SUBTOTAL(9;[.G75:.G77])" table:style-name="ce72">
            <text:p><text:s/>-<text:s/></text:p>
          </table:table-cell>
          <table:table-cell office:value-type="float" office:value="98.655463859884094" table:formula="of:=SUBTOTAL(9;[.H75:.H77])" table:style-name="ce72">
            <text:p><text:s/>99<text:s/></text:p>
          </table:table-cell>
          <table:table-cell office:value-type="float" office:value="22.713639892578101" table:formula="of:=SUBTOTAL(9;[.I75:.I77])" table:style-name="ce72">
            <text:p><text:s/>23<text:s/></text:p>
          </table:table-cell>
          <table:covered-table-cell/>
          <table:table-cell office:value-type="float" office:value="164.78810375246218" table:formula="of:=SUBTOTAL(9;[.K75:.K77])" table:style-name="ce74">
            <text:p><text:s/>1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147.208899702266" table:style-name="ce97">
            <text:p><text:s/>147<text:s/></text:p>
          </table:table-cell>
          <table:table-cell office:value-type="float" office:value="199.94108354604199" table:style-name="ce98">
            <text:p><text:s/>200<text:s/></text:p>
          </table:table-cell>
          <table:table-cell office:value-type="float" office:value="996.78334147747796" table:style-name="ce98">
            <text:p><text:s/>997<text:s/></text:p>
          </table:table-cell>
          <table:table-cell office:value-type="float" office:value="701.12990107941596" table:style-name="ce98">
            <text:p><text:s/>701<text:s/></text:p>
          </table:table-cell>
          <table:table-cell office:value-type="float" office:value="665.92316040915296" table:style-name="ce98">
            <text:p><text:s/>666<text:s/></text:p>
          </table:table-cell>
          <table:covered-table-cell/>
          <table:table-cell office:value-type="float" office:value="2710.9863862143548" table:formula="of:=SUM([.E79:.J79])" table:style-name="ce66">
            <text:p><text:s/>2,7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043.7621637243101" table:style-name="ce99">
            <text:p><text:s/>2,044<text:s/></text:p>
          </table:table-cell>
          <table:table-cell office:value-type="float" office:value="340.48019500634399" table:style-name="ce64">
            <text:p><text:s/>340<text:s/></text:p>
          </table:table-cell>
          <table:table-cell office:value-type="float" office:value="623.46076414930099" table:style-name="ce64">
            <text:p><text:s/>623<text:s/></text:p>
          </table:table-cell>
          <table:table-cell office:value-type="float" office:value="1461.44504213961" table:style-name="ce64">
            <text:p><text:s/>1,461<text:s/></text:p>
          </table:table-cell>
          <table:table-cell office:value-type="float" office:value="509.394665466368" table:style-name="ce64">
            <text:p><text:s/>509<text:s/></text:p>
          </table:table-cell>
          <table:covered-table-cell/>
          <table:table-cell office:value-type="float" office:value="4978.5428304859333" table:formula="of:=SUM([.E80:.J80])" table:style-name="ce68">
            <text:p><text:s/>4,97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3.5319999694824203E-2" table:style-name="ce100">
            <text:p><text:s/>0<text:s/></text:p>
          </table:table-cell>
          <table:table-cell office:value-type="float" office:value="1.5654307805299701" table:style-name="ce101">
            <text:p><text:s/>2<text:s/></text:p>
          </table:table-cell>
          <table:table-cell office:value-type="float" office:value="14.924696401834399" table:style-name="ce101">
            <text:p><text:s/>15<text:s/></text:p>
          </table:table-cell>
          <table:table-cell office:value-type="float" office:value="3.8820000000000001" table:style-name="ce101">
            <text:p><text:s/>4<text:s/></text:p>
          </table:table-cell>
          <table:table-cell office:value-type="float" office:value="0" table:style-name="ce101">
            <text:p><text:s/>-<text:s/></text:p>
          </table:table-cell>
          <table:covered-table-cell/>
          <table:table-cell office:value-type="float" office:value="20.407447182059194" table:formula="of:=SUM([.E81:.J81])" table:style-name="ce91">
            <text:p><text:s/>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71"/>
          <table:table-cell office:value-type="float" office:value="2191.006383426271" table:formula="of:=SUBTOTAL(9;[.E79:.E81])" table:style-name="ce72">
            <text:p><text:s/>2,191<text:s/></text:p>
          </table:table-cell>
          <table:table-cell office:value-type="float" office:value="541.98670933291589" table:formula="of:=SUBTOTAL(9;[.F79:.F81])" table:style-name="ce72">
            <text:p><text:s/>542<text:s/></text:p>
          </table:table-cell>
          <table:table-cell office:value-type="float" office:value="1635.1688020286133" table:formula="of:=SUBTOTAL(9;[.G79:.G81])" table:style-name="ce72">
            <text:p><text:s/>1,635<text:s/></text:p>
          </table:table-cell>
          <table:table-cell office:value-type="float" office:value="2166.456943219026" table:formula="of:=SUBTOTAL(9;[.H79:.H81])" table:style-name="ce72">
            <text:p><text:s/>2,166<text:s/></text:p>
          </table:table-cell>
          <table:table-cell office:value-type="float" office:value="1175.3178258755211" table:formula="of:=SUBTOTAL(9;[.I79:.I81])" table:style-name="ce72">
            <text:p><text:s/>1,175<text:s/></text:p>
          </table:table-cell>
          <table:covered-table-cell/>
          <table:table-cell office:value-type="float" office:value="7709.9366638823476" table:formula="of:=SUBTOTAL(9;[.K79:.K81])" table:style-name="ce74">
            <text:p><text:s/>7,7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537.01107986450199" table:style-name="ce99">
            <text:p><text:s/>537<text:s/></text:p>
          </table:table-cell>
          <table:table-cell office:value-type="float" office:value="38.962000000000003" table:style-name="ce98">
            <text:p><text:s/>39<text:s/></text:p>
          </table:table-cell>
          <table:table-cell office:value-type="float" office:value="478.56802929687501" table:style-name="ce98">
            <text:p><text:s/>479<text:s/></text:p>
          </table:table-cell>
          <table:table-cell office:value-type="float" office:value="0.61" table:style-name="ce98">
            <text:p><text:s/>1<text:s/></text:p>
          </table:table-cell>
          <table:table-cell office:value-type="float" office:value="96.736119873046903" table:style-name="ce64">
            <text:p><text:s/>97<text:s/></text:p>
          </table:table-cell>
          <table:covered-table-cell/>
          <table:table-cell office:value-type="float" office:value="1151.8872290344236" table:formula="of:=SUM([.E83:.J83])" table:style-name="ce68">
            <text:p><text:s/>1,15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.94715997314453104" table:style-name="ce64">
            <text:p><text:s/>1<text:s/></text:p>
          </table:table-cell>
          <table:covered-table-cell/>
          <table:table-cell office:value-type="float" office:value="0.94715997314453104" table:formula="of:=SUM([.E84:.J84])" table:style-name="ce68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101">
            <text:p><text:s/>-<text:s/></text:p>
          </table:table-cell>
          <table:table-cell office:value-type="float" office:value="0" table:style-name="ce101">
            <text:p><text:s/>-<text:s/></text:p>
          </table:table-cell>
          <table:table-cell office:value-type="float" office:value="0" table:style-name="ce101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85:.J85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71"/>
          <table:table-cell office:value-type="float" office:value="537.01107986450199" table:formula="of:=SUBTOTAL(9;[.E83:.E85])" table:style-name="ce72">
            <text:p><text:s/>537<text:s/></text:p>
          </table:table-cell>
          <table:table-cell office:value-type="float" office:value="38.962000000000003" table:formula="of:=SUBTOTAL(9;[.F83:.F85])" table:style-name="ce72">
            <text:p><text:s/>39<text:s/></text:p>
          </table:table-cell>
          <table:table-cell office:value-type="float" office:value="478.56802929687501" table:formula="of:=SUBTOTAL(9;[.G83:.G85])" table:style-name="ce72">
            <text:p><text:s/>479<text:s/></text:p>
          </table:table-cell>
          <table:table-cell office:value-type="float" office:value="0.61" table:formula="of:=SUBTOTAL(9;[.H83:.H85])" table:style-name="ce72">
            <text:p><text:s/>1<text:s/></text:p>
          </table:table-cell>
          <table:table-cell office:value-type="float" office:value="97.683279846191439" table:formula="of:=SUBTOTAL(9;[.I83:.I85])" table:style-name="ce72">
            <text:p><text:s/>98<text:s/></text:p>
          </table:table-cell>
          <table:covered-table-cell/>
          <table:table-cell office:value-type="float" office:value="1152.8343890075682" table:formula="of:=SUBTOTAL(9;[.K83:.K85])" table:style-name="ce74">
            <text:p><text:s/>1,1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339.68203125000002" table:style-name="ce64">
            <text:p><text:s/>340<text:s/></text:p>
          </table:table-cell>
          <table:table-cell office:value-type="float" office:value="4.1449999999999996" table:style-name="ce64">
            <text:p><text:s/>4<text:s/></text:p>
          </table:table-cell>
          <table:table-cell office:value-type="float" office:value="5.0952798442840503" table:style-name="ce64">
            <text:p><text:s/>5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348.92231109428405" table:formula="of:=SUM([.E87:.J87])" table:style-name="ce68">
            <text:p><text:s/>3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.0444000015258701" table:style-name="ce64">
            <text:p><text:s/>1<text:s/></text:p>
          </table:table-cell>
          <table:table-cell office:value-type="float" office:value="114.43574853515599" table:style-name="ce64">
            <text:p><text:s/>114<text:s/></text:p>
          </table:table-cell>
          <table:table-cell office:value-type="float" office:value="3.3477600097656199" table:style-name="ce64">
            <text:p><text:s/>3<text:s/></text:p>
          </table:table-cell>
          <table:table-cell office:value-type="float" office:value="4.5430593080520598" table:style-name="ce64">
            <text:p><text:s/>5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23.37096785449955" table:formula="of:=SUM([.E88:.J88])" table:style-name="ce68">
            <text:p><text:s/>1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8.8225399780273399" table:style-name="ce64">
            <text:p><text:s/>9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8.8225399780273399" table:formula="of:=SUM([.E89:.J89])" table:style-name="ce91">
            <text:p><text:s/>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71"/>
          <table:table-cell office:value-type="float" office:value="349.54897122955322" table:formula="of:=SUBTOTAL(9;[.E87:.E89])" table:style-name="ce72">
            <text:p><text:s/>350<text:s/></text:p>
          </table:table-cell>
          <table:table-cell office:value-type="float" office:value="118.58074853515599" table:formula="of:=SUBTOTAL(9;[.F87:.F89])" table:style-name="ce72">
            <text:p><text:s/>119<text:s/></text:p>
          </table:table-cell>
          <table:table-cell office:value-type="float" office:value="8.4430398540496707" table:formula="of:=SUBTOTAL(9;[.G87:.G89])" table:style-name="ce72">
            <text:p><text:s/>8<text:s/></text:p>
          </table:table-cell>
          <table:table-cell office:value-type="float" office:value="4.5430593080520598" table:formula="of:=SUBTOTAL(9;[.H87:.H89])" table:style-name="ce72">
            <text:p><text:s/>5<text:s/></text:p>
          </table:table-cell>
          <table:table-cell office:value-type="float" office:value="0" table:formula="of:=SUBTOTAL(9;[.I87:.I89])" table:style-name="ce72">
            <text:p><text:s/>-<text:s/></text:p>
          </table:table-cell>
          <table:covered-table-cell/>
          <table:table-cell office:value-type="float" office:value="481.11581892681096" table:formula="of:=SUBTOTAL(9;[.K87:.K89])" table:style-name="ce74">
            <text:p><text:s/>481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6 Total</text:p>
          </table:table-cell>
          <table:table-cell table:style-name="ce95"/>
          <table:table-cell table:style-name="ce92"/>
          <table:table-cell office:value-type="float" office:value="3120.9854345203257" table:formula="of:=SUBTOTAL(9;[.E75:.E89])" table:style-name="ce84">
            <text:p><text:s/>3,121<text:s/></text:p>
          </table:table-cell>
          <table:table-cell office:value-type="float" office:value="699.52945786807186" table:formula="of:=SUBTOTAL(9;[.F75:.F89])" table:style-name="ce84">
            <text:p><text:s/>700<text:s/></text:p>
          </table:table-cell>
          <table:table-cell office:value-type="float" office:value="2122.1798711795382" table:formula="of:=SUBTOTAL(9;[.G75:.G89])" table:style-name="ce84">
            <text:p><text:s/>2,122<text:s/></text:p>
          </table:table-cell>
          <table:table-cell office:value-type="float" office:value="2270.2654663869621" table:formula="of:=SUBTOTAL(9;[.H75:.H89])" table:style-name="ce84">
            <text:p><text:s/>2,270<text:s/></text:p>
          </table:table-cell>
          <table:table-cell office:value-type="float" office:value="1295.7147456142905" table:formula="of:=SUBTOTAL(9;[.I75:.I89])" table:style-name="ce84">
            <text:p><text:s/>1,296<text:s/></text:p>
          </table:table-cell>
          <table:table-cell table:style-name="ce102"/>
          <table:table-cell office:value-type="float" office:value="9508.674975569189" table:formula="of:=SUBTOTAL(9;[.K75:.K89])" table:style-name="ce86">
            <text:p><text:s/>9,50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7" table:number-columns-spanned="1" table:number-rows-spanned="16" table:style-name="ce408">
            <text:p>2007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3.79" table:style-name="ce96">
            <text:p><text:s/>4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3.79" table:formula="of:=SUM([.E92:.J92])" table:style-name="ce68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.11489999866485595" table:style-name="ce96">
            <text:p><text:s/>0<text:s/></text:p>
          </table:table-cell>
          <table:table-cell office:value-type="float" office:value="0" table:style-name="ce96">
            <text:p><text:s/>-<text:s/></text:p>
          </table:table-cell>
          <table:covered-table-cell/>
          <table:table-cell office:value-type="float" office:value="0.11489999866485595" table:formula="of:=SUM([.E93:.J93])" table:style-name="ce68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45.908059936523436" table:style-name="ce96">
            <text:p><text:s/>46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71.331830040708184" table:style-name="ce96">
            <text:p><text:s/>71<text:s/></text:p>
          </table:table-cell>
          <table:table-cell office:value-type="float" office:value="17.950625827426091" table:style-name="ce96">
            <text:p><text:s/>18<text:s/></text:p>
          </table:table-cell>
          <table:covered-table-cell/>
          <table:table-cell office:value-type="float" office:value="135.19051580465771" table:formula="of:=SUM([.E94:.J94])" table:style-name="ce68">
            <text:p><text:s/>1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49.698059936523435" table:formula="of:=SUM([.E92:.E94])" table:style-name="ce72">
            <text:p><text:s/>50<text:s/></text:p>
          </table:table-cell>
          <table:table-cell office:value-type="float" office:value="0" table:formula="of:=SUM([.F92:.F94])" table:style-name="ce72">
            <text:p><text:s/>-<text:s/></text:p>
          </table:table-cell>
          <table:table-cell office:value-type="float" office:value="0" table:formula="of:=SUM([.G92:.G94])" table:style-name="ce72">
            <text:p><text:s/>-<text:s/></text:p>
          </table:table-cell>
          <table:table-cell office:value-type="float" office:value="71.446730039373037" table:formula="of:=SUM([.H92:.H94])" table:style-name="ce72">
            <text:p><text:s/>71<text:s/></text:p>
          </table:table-cell>
          <table:table-cell office:value-type="float" office:value="17.950625827426091" table:formula="of:=SUM([.I92:.I94])" table:style-name="ce72">
            <text:p><text:s/>18<text:s/></text:p>
          </table:table-cell>
          <table:covered-table-cell/>
          <table:table-cell office:value-type="float" office:value="139.09541580332257" table:formula="of:=SUM([.K92:.K94])" table:style-name="ce74">
            <text:p><text:s/>13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202.30373989141734" table:style-name="ce64">
            <text:p><text:s/>202<text:s/></text:p>
          </table:table-cell>
          <table:table-cell office:value-type="float" office:value="197.07039256069064" table:style-name="ce64">
            <text:p><text:s/>197<text:s/></text:p>
          </table:table-cell>
          <table:table-cell office:value-type="float" office:value="575.99521415909032" table:style-name="ce64">
            <text:p><text:s/>576<text:s/></text:p>
          </table:table-cell>
          <table:table-cell office:value-type="float" office:value="493.98079357051847" table:style-name="ce64">
            <text:p><text:s/>494<text:s/></text:p>
          </table:table-cell>
          <table:table-cell office:value-type="float" office:value="402.18344964706898" table:style-name="ce64">
            <text:p><text:s/>402<text:s/></text:p>
          </table:table-cell>
          <table:covered-table-cell/>
          <table:table-cell office:value-type="float" office:value="1871.5335898287858" table:formula="of:=SUM([.E96:.J96])" table:style-name="ce66">
            <text:p><text:s/>1,8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921.7516464757362" table:style-name="ce64">
            <text:p><text:s/>1,922<text:s/></text:p>
          </table:table-cell>
          <table:table-cell office:value-type="float" office:value="294.30535813261105" table:style-name="ce64">
            <text:p><text:s/>294<text:s/></text:p>
          </table:table-cell>
          <table:table-cell office:value-type="float" office:value="740.73572907127652" table:style-name="ce64">
            <text:p><text:s/>741<text:s/></text:p>
          </table:table-cell>
          <table:table-cell office:value-type="float" office:value="1635.951569356233" table:style-name="ce64">
            <text:p><text:s/>1,636<text:s/></text:p>
          </table:table-cell>
          <table:table-cell office:value-type="float" office:value="535.92933958660069" table:style-name="ce64">
            <text:p><text:s/>536<text:s/></text:p>
          </table:table-cell>
          <table:covered-table-cell/>
          <table:table-cell office:value-type="float" office:value="5128.6736426224579" table:formula="of:=SUM([.E97:.J97])" table:style-name="ce68">
            <text:p><text:s/>5,1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.76342999958992008" table:style-name="ce64">
            <text:p><text:s/>1<text:s/></text:p>
          </table:table-cell>
          <table:table-cell office:value-type="float" office:value="13.358690097570419" table:style-name="ce64">
            <text:p><text:s/>13<text:s/></text:p>
          </table:table-cell>
          <table:table-cell office:value-type="float" office:value="3.3050000000000002" table:style-name="ce64">
            <text:p><text:s/>3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7.427120097160341" table:formula="of:=SUM([.E98:.J98])" table:style-name="ce91">
            <text:p><text:s/>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2124.0553863671535" table:formula="of:=SUM([.E96:.E98])" table:style-name="ce72">
            <text:p><text:s/>2,124<text:s/></text:p>
          </table:table-cell>
          <table:table-cell office:value-type="float" office:value="492.13918069289161" table:formula="of:=SUM([.F96:.F98])" table:style-name="ce72">
            <text:p><text:s/>492<text:s/></text:p>
          </table:table-cell>
          <table:table-cell office:value-type="float" office:value="1330.0896333279372" table:formula="of:=SUM([.G96:.G98])" table:style-name="ce72">
            <text:p><text:s/>1,330<text:s/></text:p>
          </table:table-cell>
          <table:table-cell office:value-type="float" office:value="2133.2373629267513" table:formula="of:=SUM([.H96:.H98])" table:style-name="ce72">
            <text:p><text:s/>2,133<text:s/></text:p>
          </table:table-cell>
          <table:table-cell office:value-type="float" office:value="938.11278923366967" table:formula="of:=SUM([.I96:.I98])" table:style-name="ce72">
            <text:p><text:s/>938<text:s/></text:p>
          </table:table-cell>
          <table:covered-table-cell/>
          <table:table-cell office:value-type="float" office:value="7017.6343525484044" table:formula="of:=SUM([.K96:.K98])" table:style-name="ce74">
            <text:p><text:s/>7,0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389.96472998046875" table:style-name="ce64">
            <text:p><text:s/>390<text:s/></text:p>
          </table:table-cell>
          <table:table-cell office:value-type="float" office:value="42.415999999999997" table:style-name="ce64">
            <text:p><text:s/>42<text:s/></text:p>
          </table:table-cell>
          <table:table-cell office:value-type="float" office:value="244.10120000076293" table:style-name="ce64">
            <text:p><text:s/>244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.54" table:style-name="ce64">
            <text:p><text:s/>1<text:s/></text:p>
          </table:table-cell>
          <table:covered-table-cell/>
          <table:table-cell office:value-type="float" office:value="677.02192998123166" table:formula="of:=SUM([.E100:.J100])" table:style-name="ce66">
            <text:p><text:s/>6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3.449239746093749" table:style-name="ce64">
            <text:p><text:s/>23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65.702627929687495" table:style-name="ce64">
            <text:p><text:s/>66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89.151867675781247" table:formula="of:=SUM([.E101:.J101])" table:style-name="ce68">
            <text:p><text:s/>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02:.J102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413.41396972656247" table:formula="of:=SUM([.E100:.E102])" table:style-name="ce72">
            <text:p><text:s/>413<text:s/></text:p>
          </table:table-cell>
          <table:table-cell office:value-type="float" office:value="42.415999999999997" table:formula="of:=SUM([.F100:.F102])" table:style-name="ce72">
            <text:p><text:s/>42<text:s/></text:p>
          </table:table-cell>
          <table:table-cell office:value-type="float" office:value="309.80382793045044" table:formula="of:=SUM([.G100:.G102])" table:style-name="ce72">
            <text:p><text:s/>310<text:s/></text:p>
          </table:table-cell>
          <table:table-cell office:value-type="float" office:value="0" table:formula="of:=SUM([.H100:.H102])" table:style-name="ce72">
            <text:p><text:s/>-<text:s/></text:p>
          </table:table-cell>
          <table:table-cell office:value-type="float" office:value="0.54" table:formula="of:=SUM([.I100:.I102])" table:style-name="ce72">
            <text:p><text:s/>1<text:s/></text:p>
          </table:table-cell>
          <table:covered-table-cell/>
          <table:table-cell office:value-type="float" office:value="766.17379765701287" table:formula="of:=SUM([.K100:.K102])" table:style-name="ce74">
            <text:p><text:s/>7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314.00234423828124" table:style-name="ce64">
            <text:p><text:s/>314<text:s/></text:p>
          </table:table-cell>
          <table:table-cell office:value-type="float" office:value="1.0999999999999999E-2" table:style-name="ce64">
            <text:p><text:s/>0<text:s/></text:p>
          </table:table-cell>
          <table:table-cell office:value-type="float" office:value="156.61932031250001" table:style-name="ce64">
            <text:p><text:s/>157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470.63266455078127" table:formula="of:=SUM([.E104:.J104])" table:style-name="ce66">
            <text:p><text:s/>4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7.3611999998092648" table:style-name="ce64">
            <text:p><text:s/>7<text:s/></text:p>
          </table:table-cell>
          <table:table-cell office:value-type="float" office:value="3.3465800170898437" table:style-name="ce64">
            <text:p><text:s/>3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0.707780016899108" table:formula="of:=SUM([.E105:.J105])" table:style-name="ce68">
            <text:p><text:s/>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3.2923499450683593" table:style-name="ce64">
            <text:p><text:s/>3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3.2923499450683593" table:formula="of:=SUM([.E106:.J106])" table:style-name="ce91">
            <text:p><text:s/>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314.00234423828124" table:formula="of:=SUM([.E104:.E106])" table:style-name="ce72">
            <text:p><text:s/>314<text:s/></text:p>
          </table:table-cell>
          <table:table-cell office:value-type="float" office:value="7.3721999998092649" table:formula="of:=SUM([.F104:.F106])" table:style-name="ce72">
            <text:p><text:s/>7<text:s/></text:p>
          </table:table-cell>
          <table:table-cell office:value-type="float" office:value="159.96590032958986" table:formula="of:=SUM([.G104:.G106])" table:style-name="ce72">
            <text:p><text:s/>160<text:s/></text:p>
          </table:table-cell>
          <table:table-cell office:value-type="float" office:value="3.2923499450683593" table:formula="of:=SUM([.H104:.H106])" table:style-name="ce72">
            <text:p><text:s/>3<text:s/></text:p>
          </table:table-cell>
          <table:table-cell office:value-type="float" office:value="0" table:formula="of:=SUM([.I104:.I106])" table:style-name="ce72">
            <text:p><text:s/>-<text:s/></text:p>
          </table:table-cell>
          <table:covered-table-cell/>
          <table:table-cell office:value-type="float" office:value="484.63279451274872" table:formula="of:=SUM([.K104:.K106])" table:style-name="ce74">
            <text:p><text:s/>48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7 Total</text:p>
          </table:table-cell>
          <table:table-cell table:style-name="ce95"/>
          <table:table-cell table:style-name="ce92"/>
          <table:table-cell office:value-type="float" office:value="2901.1697602685208" table:formula="of:=+[.E107]+[.E103]+[.E99]+[.E95]" table:style-name="ce84">
            <text:p><text:s/>2,901<text:s/></text:p>
          </table:table-cell>
          <table:table-cell office:value-type="float" office:value="541.92738069270092" table:formula="of:=+[.F107]+[.F103]+[.F99]+[.F95]" table:style-name="ce84">
            <text:p><text:s/>542<text:s/></text:p>
          </table:table-cell>
          <table:table-cell office:value-type="float" office:value="1799.8593615879777" table:formula="of:=+[.G107]+[.G103]+[.G99]+[.G95]" table:style-name="ce84">
            <text:p><text:s/>1,800<text:s/></text:p>
          </table:table-cell>
          <table:table-cell office:value-type="float" office:value="2207.9764429111929" table:formula="of:=+[.H107]+[.H103]+[.H99]+[.H95]" table:style-name="ce84">
            <text:p><text:s/>2,208<text:s/></text:p>
          </table:table-cell>
          <table:table-cell office:value-type="float" office:value="956.60341506109569" table:formula="of:=+[.I107]+[.I103]+[.I99]+[.I95]" table:style-name="ce84">
            <text:p><text:s/>957<text:s/></text:p>
          </table:table-cell>
          <table:table-cell table:style-name="ce85"/>
          <table:table-cell office:value-type="float" office:value="8407.5363605214879" table:formula="of:=+[.K107]+[.K103]+[.K99]+[.K95]" table:style-name="ce86">
            <text:p><text:s/>8,40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8" table:number-columns-spanned="1" table:number-rows-spanned="16" table:style-name="ce408">
            <text:p>2008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0" table:formula="of:=SUM([.E109:.J109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covered-table-cell/>
          <table:table-cell office:value-type="float" office:value="0" table:formula="of:=SUM([.E110:.J110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59.516999999999996" table:style-name="ce96">
            <text:p><text:s/>60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36.214420390095896" table:style-name="ce96">
            <text:p><text:s/>36<text:s/></text:p>
          </table:table-cell>
          <table:table-cell office:value-type="float" office:value="25.305371183201672" table:style-name="ce96">
            <text:p><text:s/>25<text:s/></text:p>
          </table:table-cell>
          <table:covered-table-cell/>
          <table:table-cell office:value-type="float" office:value="121.03679157329756" table:formula="of:=SUM([.E111:.J111])" table:style-name="ce68">
            <text:p><text:s/>1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59.516999999999996" table:formula="of:=SUM([.E109:.E111])" table:style-name="ce72">
            <text:p><text:s/>60<text:s/></text:p>
          </table:table-cell>
          <table:table-cell office:value-type="float" office:value="0" table:formula="of:=SUM([.F109:.F111])" table:style-name="ce72">
            <text:p><text:s/>-<text:s/></text:p>
          </table:table-cell>
          <table:table-cell office:value-type="float" office:value="0" table:formula="of:=SUM([.G109:.G111])" table:style-name="ce72">
            <text:p><text:s/>-<text:s/></text:p>
          </table:table-cell>
          <table:table-cell office:value-type="float" office:value="36.214420390095896" table:formula="of:=SUM([.H109:.H111])" table:style-name="ce72">
            <text:p><text:s/>36<text:s/></text:p>
          </table:table-cell>
          <table:table-cell office:value-type="float" office:value="25.305371183201672" table:formula="of:=SUM([.I109:.I111])" table:style-name="ce72">
            <text:p><text:s/>25<text:s/></text:p>
          </table:table-cell>
          <table:covered-table-cell/>
          <table:table-cell office:value-type="float" office:value="121.03679157329756" table:formula="of:=SUM([.K109:.K111])" table:style-name="ce74">
            <text:p><text:s/>1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35.815150225393467" table:style-name="ce64">
            <text:p><text:s/>36<text:s/></text:p>
          </table:table-cell>
          <table:table-cell office:value-type="float" office:value="80.239269466716792" table:style-name="ce64">
            <text:p><text:s/>80<text:s/></text:p>
          </table:table-cell>
          <table:table-cell office:value-type="float" office:value="351.9011090039611" table:style-name="ce64">
            <text:p><text:s/>352<text:s/></text:p>
          </table:table-cell>
          <table:table-cell office:value-type="float" office:value="797.64946356880671" table:style-name="ce64">
            <text:p><text:s/>798<text:s/></text:p>
          </table:table-cell>
          <table:table-cell office:value-type="float" office:value="236.73684850591422" table:style-name="ce64">
            <text:p><text:s/>237<text:s/></text:p>
          </table:table-cell>
          <table:covered-table-cell/>
          <table:table-cell office:value-type="float" office:value="1502.3418407707923" table:formula="of:=SUM([.E113:.J113])" table:style-name="ce66">
            <text:p><text:s/>1,5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861.4744755666852" table:style-name="ce64">
            <text:p><text:s/>1,861<text:s/></text:p>
          </table:table-cell>
          <table:table-cell office:value-type="float" office:value="252.43165777242373" table:style-name="ce64">
            <text:p><text:s/>252<text:s/></text:p>
          </table:table-cell>
          <table:table-cell office:value-type="float" office:value="796.38087159737211" table:style-name="ce64">
            <text:p><text:s/>796<text:s/></text:p>
          </table:table-cell>
          <table:table-cell office:value-type="float" office:value="1022.5754165685884" table:style-name="ce64">
            <text:p><text:s/>1,023<text:s/></text:p>
          </table:table-cell>
          <table:table-cell office:value-type="float" office:value="379.5155799029954" table:style-name="ce64">
            <text:p><text:s/>380<text:s/></text:p>
          </table:table-cell>
          <table:covered-table-cell/>
          <table:table-cell office:value-type="float" office:value="4312.3780014080648" table:formula="of:=SUM([.E114:.J114])" table:style-name="ce68">
            <text:p><text:s/>4,3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25.053969442367556" table:style-name="ce64">
            <text:p><text:s/>25<text:s/></text:p>
          </table:table-cell>
          <table:table-cell office:value-type="float" office:value="1.3958800062686203" table:style-name="ce64">
            <text:p><text:s/>1<text:s/></text:p>
          </table:table-cell>
          <table:table-cell office:value-type="float" office:value="18.00737005416304" table:style-name="ce64">
            <text:p><text:s/>18<text:s/></text:p>
          </table:table-cell>
          <table:table-cell office:value-type="float" office:value="9.3790399999618526" table:style-name="ce64">
            <text:p><text:s/>9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53.836259502761074" table:formula="of:=SUM([.E115:.J115])" table:style-name="ce91">
            <text:p><text:s/>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1922.3435952344462" table:formula="of:=SUM([.E113:.E115])" table:style-name="ce72">
            <text:p><text:s/>1,922<text:s/></text:p>
          </table:table-cell>
          <table:table-cell office:value-type="float" office:value="334.06680724540911" table:formula="of:=SUM([.F113:.F115])" table:style-name="ce72">
            <text:p><text:s/>334<text:s/></text:p>
          </table:table-cell>
          <table:table-cell office:value-type="float" office:value="1166.289350655496" table:formula="of:=SUM([.G113:.G115])" table:style-name="ce72">
            <text:p><text:s/>1,166<text:s/></text:p>
          </table:table-cell>
          <table:table-cell office:value-type="float" office:value="1829.6039201373569" table:formula="of:=SUM([.H113:.H115])" table:style-name="ce72">
            <text:p><text:s/>1,830<text:s/></text:p>
          </table:table-cell>
          <table:table-cell office:value-type="float" office:value="616.25242840890962" table:formula="of:=SUM([.I113:.I115])" table:style-name="ce72">
            <text:p><text:s/>616<text:s/></text:p>
          </table:table-cell>
          <table:covered-table-cell/>
          <table:table-cell office:value-type="float" office:value="5868.5561016816182" table:formula="of:=SUM([.K113:.K115])" table:style-name="ce74">
            <text:p><text:s/>5,8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247.64443994140626" table:style-name="ce64">
            <text:p><text:s/>248<text:s/></text:p>
          </table:table-cell>
          <table:table-cell office:value-type="float" office:value="67.546559753417966" table:style-name="ce64">
            <text:p><text:s/>68<text:s/></text:p>
          </table:table-cell>
          <table:table-cell office:value-type="float" office:value="240.88775341701506" table:style-name="ce64">
            <text:p><text:s/>241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556.07875311183921" table:formula="of:=SUM([.E117:.J117])" table:style-name="ce66">
            <text:p><text:s/>55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1.361920074462891" table:style-name="ce64">
            <text:p><text:s/>21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26.03856018066406" table:style-name="ce64">
            <text:p><text:s/>26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47.400480255126951" table:formula="of:=SUM([.E118:.J118])" table:style-name="ce68">
            <text:p><text:s/>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19:.J119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269.00636001586918" table:formula="of:=SUM([.E117:.E119])" table:style-name="ce72">
            <text:p><text:s/>269<text:s/></text:p>
          </table:table-cell>
          <table:table-cell office:value-type="float" office:value="67.546559753417966" table:formula="of:=SUM([.F117:.F119])" table:style-name="ce72">
            <text:p><text:s/>68<text:s/></text:p>
          </table:table-cell>
          <table:table-cell office:value-type="float" office:value="266.9263135976791" table:formula="of:=SUM([.G117:.G119])" table:style-name="ce72">
            <text:p><text:s/>267<text:s/></text:p>
          </table:table-cell>
          <table:table-cell office:value-type="float" office:value="0" table:formula="of:=SUM([.H117:.H119])" table:style-name="ce72">
            <text:p><text:s/>-<text:s/></text:p>
          </table:table-cell>
          <table:table-cell office:value-type="float" office:value="0" table:formula="of:=SUM([.I117:.I119])" table:style-name="ce72">
            <text:p><text:s/>-<text:s/></text:p>
          </table:table-cell>
          <table:covered-table-cell/>
          <table:table-cell office:value-type="float" office:value="603.47923336696613" table:formula="of:=SUM([.K117:.K119])" table:style-name="ce74">
            <text:p><text:s/>6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487.1677353515625" table:style-name="ce64">
            <text:p><text:s/>487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29.128681640625" table:style-name="ce64">
            <text:p><text:s/>29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516.29641699218746" table:formula="of:=SUM([.E121:.J121])" table:style-name="ce66">
            <text:p><text:s/>5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22:.J122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23:.J123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487.1677353515625" table:formula="of:=SUM([.E121:.E123])" table:style-name="ce72">
            <text:p><text:s/>487<text:s/></text:p>
          </table:table-cell>
          <table:table-cell office:value-type="float" office:value="0" table:formula="of:=SUM([.F121:.F123])" table:style-name="ce72">
            <text:p><text:s/>-<text:s/></text:p>
          </table:table-cell>
          <table:table-cell office:value-type="float" office:value="29.128681640625" table:formula="of:=SUM([.G121:.G123])" table:style-name="ce72">
            <text:p><text:s/>29<text:s/></text:p>
          </table:table-cell>
          <table:table-cell office:value-type="float" office:value="0" table:formula="of:=SUM([.H121:.H123])" table:style-name="ce72">
            <text:p><text:s/>-<text:s/></text:p>
          </table:table-cell>
          <table:table-cell office:value-type="float" office:value="0" table:formula="of:=SUM([.I121:.I123])" table:style-name="ce72">
            <text:p><text:s/>-<text:s/></text:p>
          </table:table-cell>
          <table:covered-table-cell/>
          <table:table-cell office:value-type="float" office:value="516.29641699218746" table:formula="of:=SUM([.K121:.K123])" table:style-name="ce74">
            <text:p><text:s/>51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8 Total</text:p>
          </table:table-cell>
          <table:table-cell table:style-name="ce95"/>
          <table:table-cell table:style-name="ce92"/>
          <table:table-cell office:value-type="float" office:value="2738.0346906018776" table:formula="of:=+[.E124]+[.E120]+[.E116]+[.E112]" table:style-name="ce84">
            <text:p><text:s/>2,738<text:s/></text:p>
          </table:table-cell>
          <table:table-cell office:value-type="float" office:value="401.61336699882708" table:formula="of:=+[.F124]+[.F120]+[.F116]+[.F112]" table:style-name="ce84">
            <text:p><text:s/>402<text:s/></text:p>
          </table:table-cell>
          <table:table-cell office:value-type="float" office:value="1462.3443458938002" table:formula="of:=+[.G124]+[.G120]+[.G116]+[.G112]" table:style-name="ce84">
            <text:p><text:s/>1,462<text:s/></text:p>
          </table:table-cell>
          <table:table-cell office:value-type="float" office:value="1865.8183405274528" table:formula="of:=+[.H124]+[.H120]+[.H116]+[.H112]" table:style-name="ce84">
            <text:p><text:s/>1,866<text:s/></text:p>
          </table:table-cell>
          <table:table-cell office:value-type="float" office:value="641.55779959211134" table:formula="of:=+[.I124]+[.I120]+[.I116]+[.I112]" table:style-name="ce84">
            <text:p><text:s/>642<text:s/></text:p>
          </table:table-cell>
          <table:table-cell table:style-name="ce85"/>
          <table:table-cell office:value-type="float" office:value="7109.3685436140695" table:formula="of:=+[.K124]+[.K120]+[.K116]+[.K112]" table:style-name="ce86">
            <text:p><text:s/>7,10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9" table:number-columns-spanned="1" table:number-rows-spanned="16" table:style-name="ce408">
            <text:p>2009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0" table:formula="of:=SUM([.E126:.J126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1.66E-3" table:style-name="ce96">
            <text:p><text:s/>0<text:s/></text:p>
          </table:table-cell>
          <table:table-cell office:value-type="string" table:style-name="ce96">
            <text:p>-</text:p>
          </table:table-cell>
          <table:covered-table-cell/>
          <table:table-cell office:value-type="float" office:value="1.66E-3" table:formula="of:=SUM([.E127:.J127])" table:style-name="ce68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31.954000000000001" table:style-name="ce96">
            <text:p><text:s/>32<text:s/></text:p>
          </table:table-cell>
          <table:table-cell office:value-type="string" table:style-name="ce96">
            <text:p>-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26.387099999999993" table:style-name="ce96">
            <text:p><text:s/>26<text:s/></text:p>
          </table:table-cell>
          <table:table-cell office:value-type="float" office:value="19.177810000000001" table:style-name="ce96">
            <text:p><text:s/>19<text:s/></text:p>
          </table:table-cell>
          <table:covered-table-cell/>
          <table:table-cell office:value-type="float" office:value="77.518910000000005" table:formula="of:=SUM([.E128:.J128])" table:style-name="ce68">
            <text:p><text:s/>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31.954000000000001" table:formula="of:=SUM([.E126:.E128])" table:style-name="ce72">
            <text:p><text:s/>32<text:s/></text:p>
          </table:table-cell>
          <table:table-cell office:value-type="float" office:value="0" table:formula="of:=SUM([.F126:.F128])" table:style-name="ce72">
            <text:p><text:s/>-<text:s/></text:p>
          </table:table-cell>
          <table:table-cell office:value-type="float" office:value="0" table:formula="of:=SUM([.G126:.G128])" table:style-name="ce72">
            <text:p><text:s/>-<text:s/></text:p>
          </table:table-cell>
          <table:table-cell office:value-type="float" office:value="26.388759999999994" table:formula="of:=SUM([.H126:.H128])" table:style-name="ce72">
            <text:p><text:s/>26<text:s/></text:p>
          </table:table-cell>
          <table:table-cell office:value-type="float" office:value="19.177810000000001" table:formula="of:=SUM([.I126:.I128])" table:style-name="ce72">
            <text:p><text:s/>19<text:s/></text:p>
          </table:table-cell>
          <table:covered-table-cell/>
          <table:table-cell office:value-type="float" office:value="77.520570000000006" table:formula="of:=SUM([.K126:.K128])" table:style-name="ce74">
            <text:p><text:s/>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32.793940000000006" table:style-name="ce64">
            <text:p><text:s/>33<text:s/></text:p>
          </table:table-cell>
          <table:table-cell office:value-type="float" office:value="61.022120000000015" table:style-name="ce64">
            <text:p><text:s/>61<text:s/></text:p>
          </table:table-cell>
          <table:table-cell office:value-type="float" office:value="132.53564999999998" table:style-name="ce64">
            <text:p><text:s/>133<text:s/></text:p>
          </table:table-cell>
          <table:table-cell office:value-type="float" office:value="484.71279999999996" table:style-name="ce64">
            <text:p><text:s/>485<text:s/></text:p>
          </table:table-cell>
          <table:table-cell office:value-type="float" office:value="200.14440999999999" table:style-name="ce64">
            <text:p><text:s/>200<text:s/></text:p>
          </table:table-cell>
          <table:covered-table-cell/>
          <table:table-cell office:value-type="float" office:value="911.20891999999992" table:formula="of:=SUM([.E130:.J130])" table:style-name="ce66">
            <text:p><text:s/>9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752.6225000000006" table:style-name="ce64">
            <text:p><text:s/>1,753<text:s/></text:p>
          </table:table-cell>
          <table:table-cell office:value-type="float" office:value="255.09806999999986" table:style-name="ce64">
            <text:p><text:s/>255<text:s/></text:p>
          </table:table-cell>
          <table:table-cell office:value-type="float" office:value="611.88532000000009" table:style-name="ce64">
            <text:p><text:s/>612<text:s/></text:p>
          </table:table-cell>
          <table:table-cell office:value-type="float" office:value="777.98224000000005" table:style-name="ce64">
            <text:p><text:s/>778<text:s/></text:p>
          </table:table-cell>
          <table:table-cell office:value-type="float" office:value="178.70045999999985" table:style-name="ce64">
            <text:p><text:s/>179<text:s/></text:p>
          </table:table-cell>
          <table:covered-table-cell/>
          <table:table-cell office:value-type="float" office:value="3576.288590000001" table:formula="of:=SUM([.E131:.J131])" table:style-name="ce68">
            <text:p><text:s/>3,5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5.8990799999999988" table:style-name="ce64">
            <text:p><text:s/>6<text:s/></text:p>
          </table:table-cell>
          <table:table-cell office:value-type="float" office:value="1.5896400000000004" table:style-name="ce64">
            <text:p><text:s/>2<text:s/></text:p>
          </table:table-cell>
          <table:table-cell office:value-type="float" office:value="16.409109999999998" table:style-name="ce64">
            <text:p><text:s/>16<text:s/></text:p>
          </table:table-cell>
          <table:table-cell office:value-type="float" office:value="2.9895399999999999" table:style-name="ce64">
            <text:p><text:s/>3<text:s/></text:p>
          </table:table-cell>
          <table:table-cell office:value-type="float" office:value="0" table:style-name="ce96">
            <text:p><text:s/>-<text:s/></text:p>
          </table:table-cell>
          <table:covered-table-cell/>
          <table:table-cell office:value-type="float" office:value="26.887369999999997" table:formula="of:=SUM([.E132:.J132])" table:style-name="ce91">
            <text:p><text:s/>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1791.3155200000006" table:formula="of:=SUM([.E130:.E132])" table:style-name="ce72">
            <text:p><text:s/>1,791<text:s/></text:p>
          </table:table-cell>
          <table:table-cell office:value-type="float" office:value="317.70982999999984" table:formula="of:=SUM([.F130:.F132])" table:style-name="ce72">
            <text:p><text:s/>318<text:s/></text:p>
          </table:table-cell>
          <table:table-cell office:value-type="float" office:value="760.83008000000018" table:formula="of:=SUM([.G130:.G132])" table:style-name="ce72">
            <text:p><text:s/>761<text:s/></text:p>
          </table:table-cell>
          <table:table-cell office:value-type="float" office:value="1265.6845800000001" table:formula="of:=SUM([.H130:.H132])" table:style-name="ce72">
            <text:p><text:s/>1,266<text:s/></text:p>
          </table:table-cell>
          <table:table-cell office:value-type="float" office:value="378.84486999999984" table:formula="of:=SUM([.I130:.I132])" table:style-name="ce72">
            <text:p><text:s/>379<text:s/></text:p>
          </table:table-cell>
          <table:covered-table-cell/>
          <table:table-cell office:value-type="float" office:value="4514.3848800000014" table:formula="of:=SUM([.K130:.K132])" table:style-name="ce74">
            <text:p><text:s/>4,51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123.84889999999999" table:style-name="ce64">
            <text:p><text:s/>124<text:s/></text:p>
          </table:table-cell>
          <table:table-cell office:value-type="float" office:value="10.001999999999999" table:style-name="ce64">
            <text:p><text:s/>10<text:s/></text:p>
          </table:table-cell>
          <table:table-cell office:value-type="float" office:value="24.211430000000004" table:style-name="ce64">
            <text:p><text:s/>24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58.06233" table:formula="of:=SUM([.E134:.J134])" table:style-name="ce66">
            <text:p><text:s/>15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6.199000000000002" table:style-name="ce64">
            <text:p><text:s/>16<text:s/></text:p>
          </table:table-cell>
          <table:table-cell office:value-type="float" office:value="3.3547799999999999" table:style-name="ce64">
            <text:p><text:s/>3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9.553780000000003" table:formula="of:=SUM([.E135:.J135])" table:style-name="ce68">
            <text:p><text:s/>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36:.J136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123.84889999999999" table:formula="of:=SUM([.E134:.E136])" table:style-name="ce72">
            <text:p><text:s/>124<text:s/></text:p>
          </table:table-cell>
          <table:table-cell office:value-type="float" office:value="26.201000000000001" table:formula="of:=SUM([.F134:.F136])" table:style-name="ce72">
            <text:p><text:s/>26<text:s/></text:p>
          </table:table-cell>
          <table:table-cell office:value-type="float" office:value="27.566210000000005" table:formula="of:=SUM([.G134:.G136])" table:style-name="ce72">
            <text:p><text:s/>28<text:s/></text:p>
          </table:table-cell>
          <table:table-cell office:value-type="float" office:value="0" table:formula="of:=SUM([.H134:.H136])" table:style-name="ce72">
            <text:p><text:s/>-<text:s/></text:p>
          </table:table-cell>
          <table:table-cell office:value-type="float" office:value="0" table:formula="of:=SUM([.I134:.I136])" table:style-name="ce72">
            <text:p><text:s/>-<text:s/></text:p>
          </table:table-cell>
          <table:covered-table-cell/>
          <table:table-cell office:value-type="float" office:value="177.61610999999999" table:formula="of:=SUM([.K134:.K136])" table:style-name="ce74">
            <text:p><text:s/>1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404.11635999999999" table:style-name="ce64">
            <text:p><text:s/>404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404.11635999999999" table:formula="of:=SUM([.E138:.J138])" table:style-name="ce66">
            <text:p><text:s/>4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39:.J139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40:.J140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404.11635999999999" table:formula="of:=SUM([.E138:.E140])" table:style-name="ce72">
            <text:p><text:s/>404<text:s/></text:p>
          </table:table-cell>
          <table:table-cell office:value-type="float" office:value="0" table:formula="of:=SUM([.F138:.F140])" table:style-name="ce72">
            <text:p><text:s/>-<text:s/></text:p>
          </table:table-cell>
          <table:table-cell office:value-type="float" office:value="0" table:formula="of:=SUM([.G138:.G140])" table:style-name="ce72">
            <text:p><text:s/>-<text:s/></text:p>
          </table:table-cell>
          <table:table-cell office:value-type="float" office:value="0" table:formula="of:=SUM([.H138:.H140])" table:style-name="ce72">
            <text:p><text:s/>-<text:s/></text:p>
          </table:table-cell>
          <table:table-cell office:value-type="float" office:value="0" table:formula="of:=SUM([.I138:.I140])" table:style-name="ce72">
            <text:p><text:s/>-<text:s/></text:p>
          </table:table-cell>
          <table:covered-table-cell/>
          <table:table-cell office:value-type="float" office:value="404.11635999999999" table:formula="of:=SUM([.K138:.K140])" table:style-name="ce74">
            <text:p><text:s/>40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9 Total</text:p>
          </table:table-cell>
          <table:table-cell table:style-name="ce95"/>
          <table:table-cell table:style-name="ce92"/>
          <table:table-cell office:value-type="float" office:value="2351.2347800000007" table:formula="of:=+[.E141]+[.E137]+[.E133]+[.E129]" table:style-name="ce84">
            <text:p><text:s/>2,351<text:s/></text:p>
          </table:table-cell>
          <table:table-cell office:value-type="float" office:value="343.91082999999986" table:formula="of:=+[.F141]+[.F137]+[.F133]+[.F129]" table:style-name="ce84">
            <text:p><text:s/>344<text:s/></text:p>
          </table:table-cell>
          <table:table-cell office:value-type="float" office:value="788.39629000000014" table:formula="of:=+[.G141]+[.G137]+[.G133]+[.G129]" table:style-name="ce84">
            <text:p><text:s/>788<text:s/></text:p>
          </table:table-cell>
          <table:table-cell office:value-type="float" office:value="1292.0733400000001" table:formula="of:=+[.H141]+[.H137]+[.H133]+[.H129]" table:style-name="ce84">
            <text:p><text:s/>1,292<text:s/></text:p>
          </table:table-cell>
          <table:table-cell office:value-type="float" office:value="398.02267999999987" table:formula="of:=+[.I141]+[.I137]+[.I133]+[.I129]" table:style-name="ce84">
            <text:p><text:s/>398<text:s/></text:p>
          </table:table-cell>
          <table:table-cell table:style-name="ce85"/>
          <table:table-cell office:value-type="float" office:value="5173.637920000001" table:formula="of:=+[.K141]+[.K137]+[.K133]+[.K129]" table:style-name="ce104">
            <text:p><text:s/>5,17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0" table:number-columns-spanned="1" table:number-rows-spanned="16" table:style-name="ce408">
            <text:p>2010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.91600000000000004" table:style-name="ce96">
            <text:p><text:s/>1<text:s/></text:p>
          </table:table-cell>
          <table:table-cell office:value-type="float" office:value="0" table:style-name="ce96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0.91600000000000004" table:formula="of:=SUM([.E143:.J143])" table:style-name="ce68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covered-table-cell/>
          <table:table-cell office:value-type="float" office:value="0" table:formula="of:=SUM([.E144:.J144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29.408000000000001" table:style-name="ce96">
            <text:p><text:s/>29<text:s/></text:p>
          </table:table-cell>
          <table:table-cell office:value-type="string" table:style-name="ce96">
            <text:p>-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25.805" table:style-name="ce96">
            <text:p><text:s/>26<text:s/></text:p>
          </table:table-cell>
          <table:table-cell office:value-type="float" office:value="15.129" table:style-name="ce96">
            <text:p><text:s/>15<text:s/></text:p>
          </table:table-cell>
          <table:covered-table-cell/>
          <table:table-cell office:value-type="float" office:value="70.341999999999999" table:formula="of:=SUM([.E145:.J145])" table:style-name="ce68">
            <text:p><text:s/>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29.408000000000001" table:formula="of:=SUM([.E143:.E145])" table:style-name="ce72">
            <text:p><text:s/>29<text:s/></text:p>
          </table:table-cell>
          <table:table-cell office:value-type="float" office:value="0" table:formula="of:=SUM([.F143:.F145])" table:style-name="ce72">
            <text:p><text:s/>-<text:s/></text:p>
          </table:table-cell>
          <table:table-cell office:value-type="float" office:value="0" table:formula="of:=SUM([.G143:.G145])" table:style-name="ce72">
            <text:p><text:s/>-<text:s/></text:p>
          </table:table-cell>
          <table:table-cell office:value-type="float" office:value="26.721" table:formula="of:=SUM([.H143:.H145])" table:style-name="ce72">
            <text:p><text:s/>27<text:s/></text:p>
          </table:table-cell>
          <table:table-cell office:value-type="float" office:value="15.129" table:formula="of:=SUM([.I143:.I145])" table:style-name="ce72">
            <text:p><text:s/>15<text:s/></text:p>
          </table:table-cell>
          <table:covered-table-cell/>
          <table:table-cell office:value-type="float" office:value="71.257999999999996" table:formula="of:=SUM([.K143:.K145])" table:style-name="ce74">
            <text:p><text:s/>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59.641000000000012" table:style-name="ce64">
            <text:p><text:s/>60<text:s/></text:p>
          </table:table-cell>
          <table:table-cell office:value-type="float" office:value="64.961000000000013" table:style-name="ce64">
            <text:p><text:s/>65<text:s/></text:p>
          </table:table-cell>
          <table:table-cell office:value-type="float" office:value="150.387" table:style-name="ce64">
            <text:p><text:s/>150<text:s/></text:p>
          </table:table-cell>
          <table:table-cell office:value-type="float" office:value="487.70600000000002" table:style-name="ce64">
            <text:p><text:s/>488<text:s/></text:p>
          </table:table-cell>
          <table:table-cell office:value-type="float" office:value="205.18600000000001" table:style-name="ce64">
            <text:p><text:s/>205<text:s/></text:p>
          </table:table-cell>
          <table:covered-table-cell/>
          <table:table-cell office:value-type="float" office:value="967.88100000000009" table:formula="of:=SUM([.E147:.J147])" table:style-name="ce66">
            <text:p><text:s/>96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050.1259999999997" table:style-name="ce64">
            <text:p><text:s/>2,050<text:s/></text:p>
          </table:table-cell>
          <table:table-cell office:value-type="float" office:value="239.30100000000002" table:style-name="ce64">
            <text:p><text:s/>239<text:s/></text:p>
          </table:table-cell>
          <table:table-cell office:value-type="float" office:value="631.78199999999947" table:style-name="ce64">
            <text:p><text:s/>632<text:s/></text:p>
          </table:table-cell>
          <table:table-cell office:value-type="float" office:value="652.71299999999985" table:style-name="ce64">
            <text:p><text:s/>653<text:s/></text:p>
          </table:table-cell>
          <table:table-cell office:value-type="float" office:value="153.50199999999995" table:style-name="ce64">
            <text:p><text:s/>154<text:s/></text:p>
          </table:table-cell>
          <table:covered-table-cell/>
          <table:table-cell office:value-type="float" office:value="3727.4239999999986" table:formula="of:=SUM([.E148:.J148])" table:style-name="ce68">
            <text:p><text:s/>3,7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13.715" table:style-name="ce64">
            <text:p><text:s/>14<text:s/></text:p>
          </table:table-cell>
          <table:table-cell office:value-type="float" office:value="1.3120000000000001" table:style-name="ce64">
            <text:p><text:s/>1<text:s/></text:p>
          </table:table-cell>
          <table:table-cell office:value-type="float" office:value="20.401" table:style-name="ce64">
            <text:p><text:s/>20<text:s/></text:p>
          </table:table-cell>
          <table:table-cell office:value-type="float" office:value="2.234" table:style-name="ce64">
            <text:p><text:s/>2<text:s/></text:p>
          </table:table-cell>
          <table:table-cell office:value-type="float" office:value="1.4999999999999999E-2" table:style-name="ce96">
            <text:p><text:s/>0<text:s/></text:p>
          </table:table-cell>
          <table:covered-table-cell/>
          <table:table-cell office:value-type="float" office:value="37.677" table:formula="of:=SUM([.E149:.J149])" table:style-name="ce91">
            <text:p><text:s/>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2123.482" table:formula="of:=SUM([.E147:.E149])" table:style-name="ce72">
            <text:p><text:s/>2,123<text:s/></text:p>
          </table:table-cell>
          <table:table-cell office:value-type="float" office:value="305.57400000000007" table:formula="of:=SUM([.F147:.F149])" table:style-name="ce72">
            <text:p><text:s/>306<text:s/></text:p>
          </table:table-cell>
          <table:table-cell office:value-type="float" office:value="802.56999999999937" table:formula="of:=SUM([.G147:.G149])" table:style-name="ce72">
            <text:p><text:s/>803<text:s/></text:p>
          </table:table-cell>
          <table:table-cell office:value-type="float" office:value="1142.6529999999998" table:formula="of:=SUM([.H147:.H149])" table:style-name="ce72">
            <text:p><text:s/>1,143<text:s/></text:p>
          </table:table-cell>
          <table:table-cell office:value-type="float" office:value="358.70299999999997" table:formula="of:=SUM([.I147:.I149])" table:style-name="ce72">
            <text:p><text:s/>359<text:s/></text:p>
          </table:table-cell>
          <table:covered-table-cell/>
          <table:table-cell office:value-type="float" office:value="4732.9819999999982" table:formula="of:=SUM([.K147:.K149])" table:style-name="ce74">
            <text:p><text:s/>4,7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8.8740000000000006" table:style-name="ce64">
            <text:p><text:s/>9<text:s/></text:p>
          </table:table-cell>
          <table:table-cell office:value-type="float" office:value="250.43" table:style-name="ce64">
            <text:p><text:s/>250<text:s/></text:p>
          </table:table-cell>
          <table:table-cell office:value-type="float" office:value="33.42" table:style-name="ce64">
            <text:p><text:s/>33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92.72400000000005" table:formula="of:=SUM([.E151:.J151])" table:style-name="ce66">
            <text:p><text:s/>2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.8360000000000001" table:style-name="ce64">
            <text:p><text:s/>2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.8360000000000001" table:formula="of:=SUM([.E152:.J152])" table:style-name="ce68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53:.J153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0" table:formula="of:=SUM([.E151:.E153])" table:style-name="ce72">
            <text:p><text:s/>-<text:s/></text:p>
          </table:table-cell>
          <table:table-cell office:value-type="float" office:value="8.8740000000000006" table:formula="of:=SUM([.F151:.F153])" table:style-name="ce72">
            <text:p><text:s/>9<text:s/></text:p>
          </table:table-cell>
          <table:table-cell office:value-type="float" office:value="252.26600000000002" table:formula="of:=SUM([.G151:.G153])" table:style-name="ce72">
            <text:p><text:s/>252<text:s/></text:p>
          </table:table-cell>
          <table:table-cell office:value-type="float" office:value="33.42" table:formula="of:=SUM([.H151:.H153])" table:style-name="ce72">
            <text:p><text:s/>33<text:s/></text:p>
          </table:table-cell>
          <table:table-cell office:value-type="float" office:value="0" table:formula="of:=SUM([.I151:.I153])" table:style-name="ce72">
            <text:p><text:s/>-<text:s/></text:p>
          </table:table-cell>
          <table:covered-table-cell/>
          <table:table-cell office:value-type="float" office:value="294.56000000000006" table:formula="of:=SUM([.K151:.K153])" table:style-name="ce74">
            <text:p><text:s/>2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77.317999999999998" table:style-name="ce64">
            <text:p><text:s/>77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77.317999999999998" table:formula="of:=SUM([.E155:.J155])" table:style-name="ce66">
            <text:p><text:s/>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56:.J156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57:.J157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77.317999999999998" table:formula="of:=SUM([.E155:.E157])" table:style-name="ce72">
            <text:p><text:s/>77<text:s/></text:p>
          </table:table-cell>
          <table:table-cell office:value-type="float" office:value="0" table:formula="of:=SUM([.F155:.F157])" table:style-name="ce72">
            <text:p><text:s/>-<text:s/></text:p>
          </table:table-cell>
          <table:table-cell office:value-type="float" office:value="0" table:formula="of:=SUM([.G155:.G157])" table:style-name="ce72">
            <text:p><text:s/>-<text:s/></text:p>
          </table:table-cell>
          <table:table-cell office:value-type="float" office:value="0" table:formula="of:=SUM([.H155:.H157])" table:style-name="ce72">
            <text:p><text:s/>-<text:s/></text:p>
          </table:table-cell>
          <table:table-cell office:value-type="float" office:value="0" table:formula="of:=SUM([.I155:.I157])" table:style-name="ce72">
            <text:p><text:s/>-<text:s/></text:p>
          </table:table-cell>
          <table:covered-table-cell/>
          <table:table-cell office:value-type="float" office:value="77.317999999999998" table:formula="of:=SUM([.K155:.K157])" table:style-name="ce74">
            <text:p><text:s/>77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0 Total</text:p>
          </table:table-cell>
          <table:table-cell table:style-name="ce95"/>
          <table:table-cell table:style-name="ce92"/>
          <table:table-cell office:value-type="float" office:value="2230.2080000000001" table:formula="of:=+[.E158]+[.E154]+[.E150]+[.E146]" table:style-name="ce84">
            <text:p><text:s/>2,230<text:s/></text:p>
          </table:table-cell>
          <table:table-cell office:value-type="float" office:value="314.44800000000009" table:formula="of:=+[.F158]+[.F154]+[.F150]+[.F146]" table:style-name="ce84">
            <text:p><text:s/>314<text:s/></text:p>
          </table:table-cell>
          <table:table-cell office:value-type="float" office:value="1054.8359999999993" table:formula="of:=+[.G158]+[.G154]+[.G150]+[.G146]" table:style-name="ce84">
            <text:p><text:s/>1,055<text:s/></text:p>
          </table:table-cell>
          <table:table-cell office:value-type="float" office:value="1202.7939999999999" table:formula="of:=+[.H158]+[.H154]+[.H150]+[.H146]" table:style-name="ce84">
            <text:p><text:s/>1,203<text:s/></text:p>
          </table:table-cell>
          <table:table-cell office:value-type="float" office:value="373.83199999999999" table:formula="of:=+[.I158]+[.I154]+[.I150]+[.I146]" table:style-name="ce84">
            <text:p><text:s/>374<text:s/></text:p>
          </table:table-cell>
          <table:table-cell table:style-name="ce85"/>
          <table:table-cell office:value-type="float" office:value="5176.1179999999977" table:formula="of:=+[.K158]+[.K154]+[.K150]+[.K146]" table:style-name="ce104">
            <text:p><text:s/>5,17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1" table:number-columns-spanned="1" table:number-rows-spanned="16" table:style-name="ce408">
            <text:p>2011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5.5967200000000004" table:style-name="ce96">
            <text:p><text:s/>6<text:s/></text:p>
          </table:table-cell>
          <table:table-cell office:value-type="float" office:value="0" table:style-name="ce96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5.5967200000000004" table:formula="of:=SUM([.E160:.J160])" table:style-name="ce68">
            <text:p><text:s/>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.12792000000000001" table:style-name="ce96">
            <text:p><text:s/>0<text:s/></text:p>
          </table:table-cell>
          <table:table-cell office:value-type="float" office:value="0" table:style-name="ce96">
            <text:p><text:s/>-<text:s/></text:p>
          </table:table-cell>
          <table:covered-table-cell/>
          <table:table-cell office:value-type="float" office:value="0.12792000000000001" table:formula="of:=SUM([.E161:.J161])" table:style-name="ce68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54.65128" table:style-name="ce96">
            <text:p><text:s/>55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21.323140000000002" table:style-name="ce96">
            <text:p><text:s/>21<text:s/></text:p>
          </table:table-cell>
          <table:table-cell office:value-type="float" office:value="28.92539" table:style-name="ce96">
            <text:p><text:s/>29<text:s/></text:p>
          </table:table-cell>
          <table:covered-table-cell/>
          <table:table-cell office:value-type="float" office:value="104.89981" table:formula="of:=SUM([.E162:.J162])" table:style-name="ce68">
            <text:p><text:s/>1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54.65128" table:formula="of:=SUM([.E160:.E162])" table:style-name="ce72">
            <text:p><text:s/>55<text:s/></text:p>
          </table:table-cell>
          <table:table-cell office:value-type="float" office:value="0" table:formula="of:=SUM([.F160:.F162])" table:style-name="ce72">
            <text:p><text:s/>-<text:s/></text:p>
          </table:table-cell>
          <table:table-cell office:value-type="float" office:value="0" table:formula="of:=SUM([.G160:.G162])" table:style-name="ce72">
            <text:p><text:s/>-<text:s/></text:p>
          </table:table-cell>
          <table:table-cell office:value-type="float" office:value="27.047780000000003" table:formula="of:=SUM([.H160:.H162])" table:style-name="ce72">
            <text:p><text:s/>27<text:s/></text:p>
          </table:table-cell>
          <table:table-cell office:value-type="float" office:value="28.92539" table:formula="of:=SUM([.I160:.I162])" table:style-name="ce72">
            <text:p><text:s/>29<text:s/></text:p>
          </table:table-cell>
          <table:covered-table-cell/>
          <table:table-cell office:value-type="float" office:value="110.62445" table:formula="of:=SUM([.K160:.K162])" table:style-name="ce74">
            <text:p><text:s/>1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114.31571899999999" table:style-name="ce64">
            <text:p><text:s/>114<text:s/></text:p>
          </table:table-cell>
          <table:table-cell office:value-type="float" office:value="76.756082000000006" table:style-name="ce64">
            <text:p><text:s/>77<text:s/></text:p>
          </table:table-cell>
          <table:table-cell office:value-type="float" office:value="192.37867999999997" table:style-name="ce64">
            <text:p><text:s/>192<text:s/></text:p>
          </table:table-cell>
          <table:table-cell office:value-type="float" office:value="371.75563" table:style-name="ce64">
            <text:p><text:s/>372<text:s/></text:p>
          </table:table-cell>
          <table:table-cell office:value-type="float" office:value="83.305279999999996" table:style-name="ce64">
            <text:p><text:s/>83<text:s/></text:p>
          </table:table-cell>
          <table:covered-table-cell/>
          <table:table-cell office:value-type="float" office:value="838.511391" table:formula="of:=SUM([.E164:.J164])" table:style-name="ce66">
            <text:p><text:s/>83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923.0553989999999" table:style-name="ce64">
            <text:p><text:s/>1,923<text:s/></text:p>
          </table:table-cell>
          <table:table-cell office:value-type="float" office:value="196.83177799999999" table:style-name="ce64">
            <text:p><text:s/>197<text:s/></text:p>
          </table:table-cell>
          <table:table-cell office:value-type="float" office:value="636.03595700000017" table:style-name="ce64">
            <text:p><text:s/>636<text:s/></text:p>
          </table:table-cell>
          <table:table-cell office:value-type="float" office:value="586.28663000000029" table:style-name="ce64">
            <text:p><text:s/>586<text:s/></text:p>
          </table:table-cell>
          <table:table-cell office:value-type="float" office:value="142.93531999999999" table:style-name="ce64">
            <text:p><text:s/>143<text:s/></text:p>
          </table:table-cell>
          <table:covered-table-cell/>
          <table:table-cell office:value-type="float" office:value="3485.1450840000002" table:formula="of:=SUM([.E165:.J165])" table:style-name="ce68">
            <text:p><text:s/>3,4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26.62284" table:style-name="ce64">
            <text:p><text:s/>27<text:s/></text:p>
          </table:table-cell>
          <table:table-cell office:value-type="float" office:value="1.0661299999999998" table:style-name="ce64">
            <text:p><text:s/>1<text:s/></text:p>
          </table:table-cell>
          <table:table-cell office:value-type="float" office:value="16.21049" table:style-name="ce64">
            <text:p><text:s/>16<text:s/></text:p>
          </table:table-cell>
          <table:table-cell office:value-type="float" office:value="1.6308400000000001" table:style-name="ce64">
            <text:p><text:s/>2<text:s/></text:p>
          </table:table-cell>
          <table:table-cell office:value-type="float" office:value="0" table:style-name="ce96">
            <text:p><text:s/>-<text:s/></text:p>
          </table:table-cell>
          <table:covered-table-cell/>
          <table:table-cell office:value-type="float" office:value="45.530300000000004" table:formula="of:=SUM([.E166:.J166])" table:style-name="ce91">
            <text:p><text:s/>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2063.993958" table:formula="of:=SUM([.E164:.E166])" table:style-name="ce72">
            <text:p><text:s/>2,064<text:s/></text:p>
          </table:table-cell>
          <table:table-cell office:value-type="float" office:value="274.65398999999996" table:formula="of:=SUM([.F164:.F166])" table:style-name="ce72">
            <text:p><text:s/>275<text:s/></text:p>
          </table:table-cell>
          <table:table-cell office:value-type="float" office:value="844.62512700000013" table:formula="of:=SUM([.G164:.G166])" table:style-name="ce72">
            <text:p><text:s/>845<text:s/></text:p>
          </table:table-cell>
          <table:table-cell office:value-type="float" office:value="959.67310000000032" table:formula="of:=SUM([.H164:.H166])" table:style-name="ce72">
            <text:p><text:s/>960<text:s/></text:p>
          </table:table-cell>
          <table:table-cell office:value-type="float" office:value="226.24059999999997" table:formula="of:=SUM([.I164:.I166])" table:style-name="ce72">
            <text:p><text:s/>226<text:s/></text:p>
          </table:table-cell>
          <table:covered-table-cell/>
          <table:table-cell office:value-type="float" office:value="4369.1867750000001" table:formula="of:=SUM([.K164:.K166])" table:style-name="ce74">
            <text:p><text:s/>4,3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4.628" table:style-name="ce64">
            <text:p><text:s/>15<text:s/></text:p>
          </table:table-cell>
          <table:table-cell office:value-type="float" office:value="346.95" table:style-name="ce64">
            <text:p><text:s/>347<text:s/></text:p>
          </table:table-cell>
          <table:table-cell office:value-type="float" office:value="81.215999999999994" table:style-name="ce64">
            <text:p><text:s/>81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442.79399999999998" table:formula="of:=SUM([.E168:.J168])" table:style-name="ce66">
            <text:p><text:s/>4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69:.J169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70:.J170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0" table:formula="of:=SUM([.E168:.E170])" table:style-name="ce72">
            <text:p><text:s/>-<text:s/></text:p>
          </table:table-cell>
          <table:table-cell office:value-type="float" office:value="14.628" table:formula="of:=SUM([.F168:.F170])" table:style-name="ce72">
            <text:p><text:s/>15<text:s/></text:p>
          </table:table-cell>
          <table:table-cell office:value-type="float" office:value="346.95" table:formula="of:=SUM([.G168:.G170])" table:style-name="ce72">
            <text:p><text:s/>347<text:s/></text:p>
          </table:table-cell>
          <table:table-cell office:value-type="float" office:value="81.215999999999994" table:formula="of:=SUM([.H168:.H170])" table:style-name="ce72">
            <text:p><text:s/>81<text:s/></text:p>
          </table:table-cell>
          <table:table-cell office:value-type="float" office:value="0" table:formula="of:=SUM([.I168:.I170])" table:style-name="ce72">
            <text:p><text:s/>-<text:s/></text:p>
          </table:table-cell>
          <table:covered-table-cell/>
          <table:table-cell office:value-type="float" office:value="442.79399999999998" table:formula="of:=SUM([.K168:.K170])" table:style-name="ce74">
            <text:p><text:s/>4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158.27513100000002" table:style-name="ce64">
            <text:p><text:s/>158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49.356000000000002" table:style-name="ce64">
            <text:p><text:s/>49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07.63113100000001" table:formula="of:=SUM([.E172:.J172])" table:style-name="ce66">
            <text:p><text:s/>20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87.37400000000002" table:style-name="ce64">
            <text:p><text:s/>287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3.4730000000000003" table:style-name="ce64">
            <text:p><text:s/>3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90.84700000000004" table:formula="of:=SUM([.E173:.J173])" table:style-name="ce68">
            <text:p><text:s/>29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74:.J174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445.64913100000001" table:formula="of:=SUM([.E172:.E174])" table:style-name="ce72">
            <text:p><text:s/>446<text:s/></text:p>
          </table:table-cell>
          <table:table-cell office:value-type="float" office:value="0" table:formula="of:=SUM([.F172:.F174])" table:style-name="ce72">
            <text:p><text:s/>-<text:s/></text:p>
          </table:table-cell>
          <table:table-cell office:value-type="float" office:value="0" table:formula="of:=SUM([.G172:.G174])" table:style-name="ce72">
            <text:p><text:s/>-<text:s/></text:p>
          </table:table-cell>
          <table:table-cell office:value-type="float" office:value="52.829000000000001" table:formula="of:=SUM([.H172:.H174])" table:style-name="ce72">
            <text:p><text:s/>53<text:s/></text:p>
          </table:table-cell>
          <table:table-cell office:value-type="float" office:value="0" table:formula="of:=SUM([.I172:.I174])" table:style-name="ce72">
            <text:p><text:s/>-<text:s/></text:p>
          </table:table-cell>
          <table:covered-table-cell/>
          <table:table-cell office:value-type="float" office:value="498.47813100000008" table:formula="of:=SUM([.K172:.K174])" table:style-name="ce74">
            <text:p><text:s/>498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1 Total</text:p>
          </table:table-cell>
          <table:table-cell table:style-name="ce95"/>
          <table:table-cell table:style-name="ce92"/>
          <table:table-cell office:value-type="float" office:value="2564.2943690000002" table:formula="of:=+[.E175]+[.E171]+[.E167]+[.E163]" table:style-name="ce84">
            <text:p><text:s/>2,564<text:s/></text:p>
          </table:table-cell>
          <table:table-cell office:value-type="float" office:value="289.28198999999995" table:formula="of:=+[.F175]+[.F171]+[.F167]+[.F163]" table:style-name="ce84">
            <text:p><text:s/>289<text:s/></text:p>
          </table:table-cell>
          <table:table-cell office:value-type="float" office:value="1191.5751270000001" table:formula="of:=+[.G175]+[.G171]+[.G167]+[.G163]" table:style-name="ce84">
            <text:p><text:s/>1,192<text:s/></text:p>
          </table:table-cell>
          <table:table-cell office:value-type="float" office:value="1120.7658800000004" table:formula="of:=+[.H175]+[.H171]+[.H167]+[.H163]" table:style-name="ce84">
            <text:p><text:s/>1,121<text:s/></text:p>
          </table:table-cell>
          <table:table-cell office:value-type="float" office:value="255.16598999999997" table:formula="of:=+[.I175]+[.I171]+[.I167]+[.I163]" table:style-name="ce84">
            <text:p><text:s/>255<text:s/></text:p>
          </table:table-cell>
          <table:table-cell table:style-name="ce85"/>
          <table:table-cell office:value-type="float" office:value="5421.0833560000001" table:formula="of:=+[.K175]+[.K171]+[.K167]+[.K163]" table:style-name="ce104">
            <text:p><text:s/>5,42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2" table:number-columns-spanned="1" table:number-rows-spanned="16" table:style-name="ce408">
            <text:p>2012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18.727" table:style-name="ce31">
            <text:p><text:s/>19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.1759200000000001" table:style-name="ce31">
            <text:p><text:s/>1<text:s/></text:p>
          </table:table-cell>
          <table:table-cell office:value-type="float" office:value="0" table:style-name="ce64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19.902920000000002" table:formula="of:=SUM([.E177:.J177])" table:style-name="ce68">
            <text:p><text:s/>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.23605999999999999" table:style-name="ce31">
            <text:p><text:s/>0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.23605999999999999" table:formula="of:=SUM([.E178:.J178])" table:style-name="ce68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36.566499999999998" table:style-name="ce31">
            <text:p><text:s/>37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35.777391999999985" table:style-name="ce31">
            <text:p><text:s/>36<text:s/></text:p>
          </table:table-cell>
          <table:table-cell office:value-type="float" office:value="5.7991800000000007" table:style-name="ce31">
            <text:p><text:s/>6<text:s/></text:p>
          </table:table-cell>
          <table:covered-table-cell/>
          <table:table-cell office:value-type="float" office:value="78.143071999999989" table:formula="of:=SUM([.E179:.J179])" table:style-name="ce68">
            <text:p><text:s/>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55.293499999999995" table:formula="of:=SUM([.E177:.E179])" table:style-name="ce72">
            <text:p><text:s/>55<text:s/></text:p>
          </table:table-cell>
          <table:table-cell office:value-type="float" office:value="0" table:formula="of:=SUM([.F177:.F179])" table:style-name="ce72">
            <text:p><text:s/>-<text:s/></text:p>
          </table:table-cell>
          <table:table-cell office:value-type="float" office:value="0" table:formula="of:=SUM([.G177:.G179])" table:style-name="ce72">
            <text:p><text:s/>-<text:s/></text:p>
          </table:table-cell>
          <table:table-cell office:value-type="float" office:value="37.189371999999985" table:formula="of:=SUM([.H177:.H179])" table:style-name="ce72">
            <text:p><text:s/>37<text:s/></text:p>
          </table:table-cell>
          <table:table-cell office:value-type="float" office:value="5.7991800000000007" table:formula="of:=SUM([.I177:.I179])" table:style-name="ce72">
            <text:p><text:s/>6<text:s/></text:p>
          </table:table-cell>
          <table:covered-table-cell/>
          <table:table-cell office:value-type="float" office:value="98.282051999999993" table:formula="of:=SUM([.K177:.K179])" table:style-name="ce74">
            <text:p><text:s/>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438.36429400000003" table:style-name="ce31">
            <text:p><text:s/>438<text:s/></text:p>
          </table:table-cell>
          <table:table-cell office:value-type="float" office:value="100.21115899999999" table:style-name="ce31">
            <text:p><text:s/>100<text:s/></text:p>
          </table:table-cell>
          <table:table-cell office:value-type="float" office:value="407.18977899999999" table:style-name="ce31">
            <text:p><text:s/>407<text:s/></text:p>
          </table:table-cell>
          <table:table-cell office:value-type="float" office:value="377.89417100000009" table:style-name="ce31">
            <text:p><text:s/>378<text:s/></text:p>
          </table:table-cell>
          <table:table-cell office:value-type="float" office:value="44.951400000000007" table:style-name="ce31">
            <text:p><text:s/>45<text:s/></text:p>
          </table:table-cell>
          <table:covered-table-cell/>
          <table:table-cell office:value-type="float" office:value="1368.610803" table:formula="of:=SUM([.E181:.J181])" table:style-name="ce66">
            <text:p><text:s/>1,3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470.6108750000005" table:style-name="ce31">
            <text:p><text:s/>1,471<text:s/></text:p>
          </table:table-cell>
          <table:table-cell office:value-type="float" office:value="134.668994" table:style-name="ce31">
            <text:p><text:s/>135<text:s/></text:p>
          </table:table-cell>
          <table:table-cell office:value-type="float" office:value="591.81544899999972" table:style-name="ce31">
            <text:p><text:s/>592<text:s/></text:p>
          </table:table-cell>
          <table:table-cell office:value-type="float" office:value="473.69816600000007" table:style-name="ce31">
            <text:p><text:s/>474<text:s/></text:p>
          </table:table-cell>
          <table:table-cell office:value-type="float" office:value="158.33527999999995" table:style-name="ce31">
            <text:p><text:s/>158<text:s/></text:p>
          </table:table-cell>
          <table:covered-table-cell/>
          <table:table-cell office:value-type="float" office:value="2829.128764" table:formula="of:=SUM([.E182:.J182])" table:style-name="ce68">
            <text:p><text:s/>2,8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28.291409999999999" table:style-name="ce31">
            <text:p><text:s/>28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1.9849" table:style-name="ce31">
            <text:p><text:s/>12<text:s/></text:p>
          </table:table-cell>
          <table:table-cell office:value-type="float" office:value="1.69398" table:style-name="ce31">
            <text:p><text:s/>2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41.970289999999999" table:formula="of:=SUM([.E183:.J183])" table:style-name="ce91">
            <text:p><text:s/>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1937.2665790000005" table:formula="of:=SUM([.E181:.E183])" table:style-name="ce72">
            <text:p><text:s/>1,937<text:s/></text:p>
          </table:table-cell>
          <table:table-cell office:value-type="float" office:value="234.88015300000001" table:formula="of:=SUM([.F181:.F183])" table:style-name="ce72">
            <text:p><text:s/>235<text:s/></text:p>
          </table:table-cell>
          <table:table-cell office:value-type="float" office:value="1010.9901279999998" table:formula="of:=SUM([.G181:.G183])" table:style-name="ce72">
            <text:p><text:s/>1,011<text:s/></text:p>
          </table:table-cell>
          <table:table-cell office:value-type="float" office:value="853.28631700000017" table:formula="of:=SUM([.H181:.H183])" table:style-name="ce72">
            <text:p><text:s/>853<text:s/></text:p>
          </table:table-cell>
          <table:table-cell office:value-type="float" office:value="203.28667999999996" table:formula="of:=SUM([.I181:.I183])" table:style-name="ce72">
            <text:p><text:s/>203<text:s/></text:p>
          </table:table-cell>
          <table:covered-table-cell/>
          <table:table-cell office:value-type="float" office:value="4239.7098570000007" table:formula="of:=SUM([.K181:.K183])" table:style-name="ce74">
            <text:p><text:s/>4,2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6.029319999999998" table:style-name="ce31">
            <text:p><text:s/>16<text:s/></text:p>
          </table:table-cell>
          <table:table-cell office:value-type="float" office:value="417.57650000000012" table:style-name="ce31">
            <text:p><text:s/>418<text:s/></text:p>
          </table:table-cell>
          <table:table-cell office:value-type="float" office:value="39.392000000000003" table:style-name="ce31">
            <text:p><text:s/>39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472.9978200000001" table:formula="of:=SUM([.E185:.J185])" table:style-name="ce66">
            <text:p><text:s/>4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86:.J186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87:.J187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0" table:formula="of:=SUM([.E185:.E187])" table:style-name="ce72">
            <text:p><text:s/>-<text:s/></text:p>
          </table:table-cell>
          <table:table-cell office:value-type="float" office:value="16.029319999999998" table:formula="of:=SUM([.F185:.F187])" table:style-name="ce72">
            <text:p><text:s/>16<text:s/></text:p>
          </table:table-cell>
          <table:table-cell office:value-type="float" office:value="417.57650000000012" table:formula="of:=SUM([.G185:.G187])" table:style-name="ce72">
            <text:p><text:s/>418<text:s/></text:p>
          </table:table-cell>
          <table:table-cell office:value-type="float" office:value="39.392000000000003" table:formula="of:=SUM([.H185:.H187])" table:style-name="ce72">
            <text:p><text:s/>39<text:s/></text:p>
          </table:table-cell>
          <table:table-cell office:value-type="float" office:value="0" table:formula="of:=SUM([.I185:.I187])" table:style-name="ce72">
            <text:p><text:s/>-<text:s/></text:p>
          </table:table-cell>
          <table:covered-table-cell/>
          <table:table-cell office:value-type="float" office:value="472.9978200000001" table:formula="of:=SUM([.K185:.K187])" table:style-name="ce74">
            <text:p><text:s/>4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211.63356199999998" table:style-name="ce31">
            <text:p><text:s/>212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.15" table:style-name="ce31">
            <text:p><text:s/>0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11.78356199999999" table:formula="of:=SUM([.E189:.J189])" table:style-name="ce66">
            <text:p><text:s/>2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69.01900000000001" table:style-name="ce31">
            <text:p><text:s/>169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69.01900000000001" table:formula="of:=SUM([.E190:.J190])" table:style-name="ce68">
            <text:p><text:s/>1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191:.J191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380.65256199999999" table:formula="of:=SUM([.E189:.E191])" table:style-name="ce72">
            <text:p><text:s/>381<text:s/></text:p>
          </table:table-cell>
          <table:table-cell office:value-type="float" office:value="0" table:formula="of:=SUM([.F189:.F191])" table:style-name="ce72">
            <text:p><text:s/>-<text:s/></text:p>
          </table:table-cell>
          <table:table-cell office:value-type="float" office:value="0.15" table:formula="of:=SUM([.G189:.G191])" table:style-name="ce72">
            <text:p><text:s/>0<text:s/></text:p>
          </table:table-cell>
          <table:table-cell office:value-type="float" office:value="0" table:formula="of:=SUM([.H189:.H191])" table:style-name="ce72">
            <text:p><text:s/>-<text:s/></text:p>
          </table:table-cell>
          <table:table-cell office:value-type="float" office:value="0" table:formula="of:=SUM([.I189:.I191])" table:style-name="ce72">
            <text:p><text:s/>-<text:s/></text:p>
          </table:table-cell>
          <table:covered-table-cell/>
          <table:table-cell office:value-type="float" office:value="380.80256199999997" table:formula="of:=SUM([.K189:.K191])" table:style-name="ce74">
            <text:p><text:s/>381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2 Total</text:p>
          </table:table-cell>
          <table:table-cell table:style-name="ce95"/>
          <table:table-cell table:style-name="ce92"/>
          <table:table-cell office:value-type="float" office:value="2373.2126410000001" table:formula="of:=+[.E192]+[.E188]+[.E184]+[.E180]" table:style-name="ce84">
            <text:p><text:s/>2,373<text:s/></text:p>
          </table:table-cell>
          <table:table-cell office:value-type="float" office:value="250.90947299999999" table:formula="of:=+[.F192]+[.F188]+[.F184]+[.F180]" table:style-name="ce84">
            <text:p><text:s/>251<text:s/></text:p>
          </table:table-cell>
          <table:table-cell office:value-type="float" office:value="1428.7166279999999" table:formula="of:=+[.G192]+[.G188]+[.G184]+[.G180]" table:style-name="ce84">
            <text:p><text:s/>1,429<text:s/></text:p>
          </table:table-cell>
          <table:table-cell office:value-type="float" office:value="929.86768900000015" table:formula="of:=+[.H192]+[.H188]+[.H184]+[.H180]" table:style-name="ce84">
            <text:p><text:s/>930<text:s/></text:p>
          </table:table-cell>
          <table:table-cell office:value-type="float" office:value="209.08585999999997" table:formula="of:=+[.I192]+[.I188]+[.I184]+[.I180]" table:style-name="ce84">
            <text:p><text:s/>209<text:s/></text:p>
          </table:table-cell>
          <table:table-cell table:style-name="ce85"/>
          <table:table-cell office:value-type="float" office:value="5191.7922910000007" table:formula="of:=+[.K192]+[.K188]+[.K184]+[.K180]" table:style-name="ce104">
            <text:p><text:s/>5,19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3" table:number-columns-spanned="1" table:number-rows-spanned="16" table:style-name="ce408">
            <text:p>2013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.68899999999999995" table:style-name="ce31">
            <text:p><text:s/>1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6.0270380000000001" table:style-name="ce31">
            <text:p><text:s/>6<text:s/></text:p>
          </table:table-cell>
          <table:table-cell office:value-type="float" office:value="0" table:style-name="ce64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6.7160380000000002" table:formula="of:=SUM([.E194:.J194])" table:style-name="ce68">
            <text:p><text:s/>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9.7239999999999993E-2" table:style-name="ce31">
            <text:p><text:s/>0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9.7239999999999993E-2" table:formula="of:=SUM([.E195:.J195])" table:style-name="ce68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35.946399999999997" table:style-name="ce31">
            <text:p><text:s/>36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69.88546199999999" table:style-name="ce31">
            <text:p><text:s/>70<text:s/></text:p>
          </table:table-cell>
          <table:table-cell office:value-type="float" office:value="5.3045400000000003" table:style-name="ce31">
            <text:p><text:s/>5<text:s/></text:p>
          </table:table-cell>
          <table:covered-table-cell/>
          <table:table-cell office:value-type="float" office:value="111.13640199999999" table:formula="of:=SUM([.E196:.J196])" table:style-name="ce68">
            <text:p><text:s/>1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36.635399999999997" table:formula="of:=SUM([.E194:.E196])" table:style-name="ce72">
            <text:p><text:s/>37<text:s/></text:p>
          </table:table-cell>
          <table:table-cell office:value-type="float" office:value="0" table:formula="of:=SUM([.F194:.F196])" table:style-name="ce72">
            <text:p><text:s/>-<text:s/></text:p>
          </table:table-cell>
          <table:table-cell office:value-type="float" office:value="0" table:formula="of:=SUM([.G194:.G196])" table:style-name="ce72">
            <text:p><text:s/>-<text:s/></text:p>
          </table:table-cell>
          <table:table-cell office:value-type="float" office:value="76.009739999999994" table:formula="of:=SUM([.H194:.H196])" table:style-name="ce72">
            <text:p><text:s/>76<text:s/></text:p>
          </table:table-cell>
          <table:table-cell office:value-type="float" office:value="5.3045400000000003" table:formula="of:=SUM([.I194:.I196])" table:style-name="ce72">
            <text:p><text:s/>5<text:s/></text:p>
          </table:table-cell>
          <table:covered-table-cell/>
          <table:table-cell office:value-type="float" office:value="117.94967999999999" table:formula="of:=SUM([.K194:.K196])" table:style-name="ce74">
            <text:p><text:s/>1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680.58493000000021" table:style-name="ce31">
            <text:p><text:s/>681<text:s/></text:p>
          </table:table-cell>
          <table:table-cell office:value-type="float" office:value="76.930680000000009" table:style-name="ce31">
            <text:p><text:s/>77<text:s/></text:p>
          </table:table-cell>
          <table:table-cell office:value-type="float" office:value="456.67761199999984" table:style-name="ce31">
            <text:p><text:s/>457<text:s/></text:p>
          </table:table-cell>
          <table:table-cell office:value-type="float" office:value="215.82701999999998" table:style-name="ce31">
            <text:p><text:s/>216<text:s/></text:p>
          </table:table-cell>
          <table:table-cell office:value-type="float" office:value="55.227839999999993" table:style-name="ce31">
            <text:p><text:s/>55<text:s/></text:p>
          </table:table-cell>
          <table:covered-table-cell/>
          <table:table-cell office:value-type="float" office:value="1485.2480820000001" table:formula="of:=SUM([.E198:.J198])" table:style-name="ce66">
            <text:p><text:s/>1,4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210.9814189999993" table:style-name="ce31">
            <text:p><text:s/>1,211<text:s/></text:p>
          </table:table-cell>
          <table:table-cell office:value-type="float" office:value="163.42176599999999" table:style-name="ce31">
            <text:p><text:s/>163<text:s/></text:p>
          </table:table-cell>
          <table:table-cell office:value-type="float" office:value="579.70485199999996" table:style-name="ce31">
            <text:p><text:s/>580<text:s/></text:p>
          </table:table-cell>
          <table:table-cell office:value-type="float" office:value="382.66779300000019" table:style-name="ce31">
            <text:p><text:s/>383<text:s/></text:p>
          </table:table-cell>
          <table:table-cell office:value-type="float" office:value="165.15035" table:style-name="ce31">
            <text:p><text:s/>165<text:s/></text:p>
          </table:table-cell>
          <table:covered-table-cell/>
          <table:table-cell office:value-type="float" office:value="2501.926179999999" table:formula="of:=SUM([.E199:.J199])" table:style-name="ce68">
            <text:p><text:s/>2,5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24.440420000000003" table:style-name="ce31">
            <text:p><text:s/>24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2.781360000000001" table:style-name="ce31">
            <text:p><text:s/>13<text:s/></text:p>
          </table:table-cell>
          <table:table-cell office:value-type="float" office:value="4.0936599999999999" table:style-name="ce31">
            <text:p><text:s/>4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41.315440000000002" table:formula="of:=SUM([.E200:.J200])" table:style-name="ce91">
            <text:p><text:s/>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1916.0067689999994" table:formula="of:=SUM([.E198:.E200])" table:style-name="ce72">
            <text:p><text:s/>1,916<text:s/></text:p>
          </table:table-cell>
          <table:table-cell office:value-type="float" office:value="240.35244599999999" table:formula="of:=SUM([.F198:.F200])" table:style-name="ce72">
            <text:p><text:s/>240<text:s/></text:p>
          </table:table-cell>
          <table:table-cell office:value-type="float" office:value="1049.1638239999997" table:formula="of:=SUM([.G198:.G200])" table:style-name="ce72">
            <text:p><text:s/>1,049<text:s/></text:p>
          </table:table-cell>
          <table:table-cell office:value-type="float" office:value="602.58847300000014" table:formula="of:=SUM([.H198:.H200])" table:style-name="ce72">
            <text:p><text:s/>603<text:s/></text:p>
          </table:table-cell>
          <table:table-cell office:value-type="float" office:value="220.37818999999999" table:formula="of:=SUM([.I198:.I200])" table:style-name="ce72">
            <text:p><text:s/>220<text:s/></text:p>
          </table:table-cell>
          <table:covered-table-cell/>
          <table:table-cell office:value-type="float" office:value="4028.4897019999989" table:formula="of:=SUM([.K198:.K200])" table:style-name="ce74">
            <text:p><text:s/>4,02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75.42" table:style-name="ce31">
            <text:p><text:s/>75<text:s/></text:p>
          </table:table-cell>
          <table:table-cell office:value-type="float" office:value="18.565900000000003" table:style-name="ce31">
            <text:p><text:s/>19<text:s/></text:p>
          </table:table-cell>
          <table:table-cell office:value-type="float" office:value="633.524" table:style-name="ce31">
            <text:p><text:s/>634<text:s/></text:p>
          </table:table-cell>
          <table:table-cell office:value-type="float" office:value="49.311" table:style-name="ce31">
            <text:p><text:s/>49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776.82090000000005" table:formula="of:=SUM([.E202:.J202])" table:style-name="ce66">
            <text:p><text:s/>7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.62" table:style-name="ce31">
            <text:p><text:s/>2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.62" table:formula="of:=SUM([.E203:.J203])" table:style-name="ce68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204:.J204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77.040000000000006" table:formula="of:=SUM([.E202:.E204])" table:style-name="ce72">
            <text:p><text:s/>77<text:s/></text:p>
          </table:table-cell>
          <table:table-cell office:value-type="float" office:value="18.565900000000003" table:formula="of:=SUM([.F202:.F204])" table:style-name="ce72">
            <text:p><text:s/>19<text:s/></text:p>
          </table:table-cell>
          <table:table-cell office:value-type="float" office:value="633.524" table:formula="of:=SUM([.G202:.G204])" table:style-name="ce72">
            <text:p><text:s/>634<text:s/></text:p>
          </table:table-cell>
          <table:table-cell office:value-type="float" office:value="49.311" table:formula="of:=SUM([.H202:.H204])" table:style-name="ce72">
            <text:p><text:s/>49<text:s/></text:p>
          </table:table-cell>
          <table:table-cell office:value-type="float" office:value="0" table:formula="of:=SUM([.I202:.I204])" table:style-name="ce72">
            <text:p><text:s/>-<text:s/></text:p>
          </table:table-cell>
          <table:covered-table-cell/>
          <table:table-cell office:value-type="float" office:value="778.44090000000006" table:formula="of:=SUM([.K202:.K204])" table:style-name="ce74">
            <text:p><text:s/>7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244.46748700000001" table:style-name="ce31">
            <text:p><text:s/>244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57.874688999999996" table:style-name="ce31">
            <text:p><text:s/>58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302.34217599999999" table:formula="of:=SUM([.E206:.J206])" table:style-name="ce66">
            <text:p><text:s/>3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62.612591999999999" table:style-name="ce31">
            <text:p><text:s/>63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62.612591999999999" table:formula="of:=SUM([.E207:.J207])" table:style-name="ce68">
            <text:p><text:s/>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208:.J208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244.46748700000001" table:formula="of:=SUM([.E206:.E208])" table:style-name="ce72">
            <text:p><text:s/>244<text:s/></text:p>
          </table:table-cell>
          <table:table-cell office:value-type="float" office:value="0" table:formula="of:=SUM([.F206:.F208])" table:style-name="ce72">
            <text:p><text:s/>-<text:s/></text:p>
          </table:table-cell>
          <table:table-cell office:value-type="float" office:value="0" table:formula="of:=SUM([.G206:.G208])" table:style-name="ce72">
            <text:p><text:s/>-<text:s/></text:p>
          </table:table-cell>
          <table:table-cell office:value-type="float" office:value="120.487281" table:formula="of:=SUM([.H206:.H208])" table:style-name="ce72">
            <text:p><text:s/>120<text:s/></text:p>
          </table:table-cell>
          <table:table-cell office:value-type="float" office:value="0" table:formula="of:=SUM([.I206:.I208])" table:style-name="ce72">
            <text:p><text:s/>-<text:s/></text:p>
          </table:table-cell>
          <table:covered-table-cell/>
          <table:table-cell office:value-type="float" office:value="364.954768" table:formula="of:=SUM([.K206:.K208])" table:style-name="ce74">
            <text:p><text:s/>36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3 Total</text:p>
          </table:table-cell>
          <table:table-cell table:style-name="ce95"/>
          <table:table-cell table:style-name="ce92"/>
          <table:table-cell office:value-type="float" office:value="2274.1496559999996" table:formula="of:=+[.E209]+[.E205]+[.E201]+[.E197]" table:style-name="ce84">
            <text:p><text:s/>2,274<text:s/></text:p>
          </table:table-cell>
          <table:table-cell office:value-type="float" office:value="258.91834599999999" table:formula="of:=+[.F209]+[.F205]+[.F201]+[.F197]" table:style-name="ce84">
            <text:p><text:s/>259<text:s/></text:p>
          </table:table-cell>
          <table:table-cell office:value-type="float" office:value="1682.6878239999996" table:formula="of:=+[.G209]+[.G205]+[.G201]+[.G197]" table:style-name="ce84">
            <text:p><text:s/>1,683<text:s/></text:p>
          </table:table-cell>
          <table:table-cell office:value-type="float" office:value="848.39649400000008" table:formula="of:=+[.H209]+[.H205]+[.H201]+[.H197]" table:style-name="ce84">
            <text:p><text:s/>848<text:s/></text:p>
          </table:table-cell>
          <table:table-cell office:value-type="float" office:value="225.68272999999999" table:formula="of:=+[.I209]+[.I205]+[.I201]+[.I197]" table:style-name="ce84">
            <text:p><text:s/>226<text:s/></text:p>
          </table:table-cell>
          <table:table-cell table:style-name="ce85"/>
          <table:table-cell office:value-type="float" office:value="5289.8350499999988" table:formula="of:=+[.K209]+[.K205]+[.K201]+[.K197]" table:style-name="ce104">
            <text:p><text:s/>5,29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4" table:number-columns-spanned="1" table:number-rows-spanned="16" table:style-name="ce408">
            <text:p>2014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string" table:style-name="ce31">
            <text:p>-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2.2394400000000001" table:style-name="ce31">
            <text:p><text:s/>2<text:s/></text:p>
          </table:table-cell>
          <table:table-cell office:value-type="float" office:value="0" table:style-name="ce64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2.2394400000000001" table:formula="of:=SUM([.E211:.J211])" table:style-name="ce68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.155" table:style-name="ce31">
            <text:p><text:s/>0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.11768000000000001" table:style-name="ce31">
            <text:p><text:s/>0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.27268000000000003" table:formula="of:=SUM([.E212:.J212])" table:style-name="ce68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32.553879999999999" table:style-name="ce31">
            <text:p><text:s/>33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46.820579999999993" table:style-name="ce31">
            <text:p><text:s/>47<text:s/></text:p>
          </table:table-cell>
          <table:table-cell office:value-type="float" office:value="4.5741899999999998" table:style-name="ce31">
            <text:p><text:s/>5<text:s/></text:p>
          </table:table-cell>
          <table:covered-table-cell/>
          <table:table-cell office:value-type="float" office:value="83.948650000000001" table:formula="of:=SUM([.E213:.J213])" table:style-name="ce68">
            <text:p><text:s/>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32.708880000000001" table:formula="of:=SUM([.E211:.E213])" table:style-name="ce72">
            <text:p><text:s/>33<text:s/></text:p>
          </table:table-cell>
          <table:table-cell office:value-type="float" office:value="0" table:formula="of:=SUM([.F211:.F213])" table:style-name="ce72">
            <text:p><text:s/>-<text:s/></text:p>
          </table:table-cell>
          <table:table-cell office:value-type="float" office:value="0" table:formula="of:=SUM([.G211:.G213])" table:style-name="ce72">
            <text:p><text:s/>-<text:s/></text:p>
          </table:table-cell>
          <table:table-cell office:value-type="float" office:value="49.177699999999994" table:formula="of:=SUM([.H211:.H213])" table:style-name="ce72">
            <text:p><text:s/>49<text:s/></text:p>
          </table:table-cell>
          <table:table-cell office:value-type="float" office:value="4.5741899999999998" table:formula="of:=SUM([.I211:.I213])" table:style-name="ce72">
            <text:p><text:s/>5<text:s/></text:p>
          </table:table-cell>
          <table:covered-table-cell/>
          <table:table-cell office:value-type="float" office:value="86.460769999999997" table:formula="of:=SUM([.K211:.K213])" table:style-name="ce74">
            <text:p><text:s/>8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490.78229199999998" table:style-name="ce31">
            <text:p><text:s/>491<text:s/></text:p>
          </table:table-cell>
          <table:table-cell office:value-type="float" office:value="147.96734100000003" table:style-name="ce31">
            <text:p><text:s/>148<text:s/></text:p>
          </table:table-cell>
          <table:table-cell office:value-type="float" office:value="566.80742499999985" table:style-name="ce31">
            <text:p><text:s/>567<text:s/></text:p>
          </table:table-cell>
          <table:table-cell office:value-type="float" office:value="243.17582100000001" table:style-name="ce31">
            <text:p><text:s/>243<text:s/></text:p>
          </table:table-cell>
          <table:table-cell office:value-type="float" office:value="63.258979999999994" table:style-name="ce31">
            <text:p><text:s/>63<text:s/></text:p>
          </table:table-cell>
          <table:covered-table-cell/>
          <table:table-cell office:value-type="float" office:value="1511.991859" table:formula="of:=SUM([.E215:.J215])" table:style-name="ce66">
            <text:p><text:s/>1,5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983.01005399999985" table:style-name="ce31">
            <text:p><text:s/>983<text:s/></text:p>
          </table:table-cell>
          <table:table-cell office:value-type="float" office:value="139.28832900000003" table:style-name="ce31">
            <text:p><text:s/>139<text:s/></text:p>
          </table:table-cell>
          <table:table-cell office:value-type="float" office:value="498.81912199999999" table:style-name="ce31">
            <text:p><text:s/>499<text:s/></text:p>
          </table:table-cell>
          <table:table-cell office:value-type="float" office:value="367.48557999999997" table:style-name="ce31">
            <text:p><text:s/>367<text:s/></text:p>
          </table:table-cell>
          <table:table-cell office:value-type="float" office:value="173.34548000000001" table:style-name="ce31">
            <text:p><text:s/>173<text:s/></text:p>
          </table:table-cell>
          <table:covered-table-cell/>
          <table:table-cell office:value-type="float" office:value="2161.9485649999997" table:formula="of:=SUM([.E216:.J216])" table:style-name="ce68">
            <text:p><text:s/>2,16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14.08596" table:style-name="ce31">
            <text:p><text:s/>1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.5731699999999993" table:style-name="ce31">
            <text:p><text:s/>8<text:s/></text:p>
          </table:table-cell>
          <table:table-cell office:value-type="float" office:value="1.0568499999999998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22.715979999999998" table:formula="of:=SUM([.E217:.J217])" table:style-name="ce91">
            <text:p><text:s/>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1487.8783059999996" table:formula="of:=SUM([.E215:.E217])" table:style-name="ce72">
            <text:p><text:s/>1,488<text:s/></text:p>
          </table:table-cell>
          <table:table-cell office:value-type="float" office:value="287.25567000000007" table:formula="of:=SUM([.F215:.F217])" table:style-name="ce72">
            <text:p><text:s/>287<text:s/></text:p>
          </table:table-cell>
          <table:table-cell office:value-type="float" office:value="1073.1997169999997" table:formula="of:=SUM([.G215:.G217])" table:style-name="ce72">
            <text:p><text:s/>1,073<text:s/></text:p>
          </table:table-cell>
          <table:table-cell office:value-type="float" office:value="611.71825100000001" table:formula="of:=SUM([.H215:.H217])" table:style-name="ce72">
            <text:p><text:s/>612<text:s/></text:p>
          </table:table-cell>
          <table:table-cell office:value-type="float" office:value="236.60446000000002" table:formula="of:=SUM([.I215:.I217])" table:style-name="ce72">
            <text:p><text:s/>237<text:s/></text:p>
          </table:table-cell>
          <table:covered-table-cell/>
          <table:table-cell office:value-type="float" office:value="3696.6564039999994" table:formula="of:=SUM([.K215:.K217])" table:style-name="ce74">
            <text:p><text:s/>3,6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161.83690000000001" table:style-name="ce31">
            <text:p><text:s/>162<text:s/></text:p>
          </table:table-cell>
          <table:table-cell office:value-type="float" office:value="16.44312" table:style-name="ce31">
            <text:p><text:s/>16<text:s/></text:p>
          </table:table-cell>
          <table:table-cell office:value-type="float" office:value="371.7355" table:style-name="ce31">
            <text:p><text:s/>372<text:s/></text:p>
          </table:table-cell>
          <table:table-cell office:value-type="float" office:value="397.61534" table:style-name="ce31">
            <text:p><text:s/>398<text:s/></text:p>
          </table:table-cell>
          <table:table-cell office:value-type="float" office:value="47.116999999999997" table:style-name="ce31">
            <text:p><text:s/>47<text:s/></text:p>
          </table:table-cell>
          <table:covered-table-cell/>
          <table:table-cell office:value-type="float" office:value="994.74785999999995" table:formula="of:=SUM([.E219:.J219])" table:style-name="ce66">
            <text:p><text:s/>9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.08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2.08" table:formula="of:=SUM([.E220:.J220])" table:style-name="ce68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.5499999999999998E-2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7.5499999999999998E-2" table:formula="of:=SUM([.E221:.J221])" table:style-name="ce91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163.91690000000003" table:formula="of:=SUM([.E219:.E221])" table:style-name="ce72">
            <text:p><text:s/>164<text:s/></text:p>
          </table:table-cell>
          <table:table-cell office:value-type="float" office:value="16.44312" table:formula="of:=SUM([.F219:.F221])" table:style-name="ce72">
            <text:p><text:s/>16<text:s/></text:p>
          </table:table-cell>
          <table:table-cell office:value-type="float" office:value="371.81099999999998" table:formula="of:=SUM([.G219:.G221])" table:style-name="ce72">
            <text:p><text:s/>372<text:s/></text:p>
          </table:table-cell>
          <table:table-cell office:value-type="float" office:value="397.61534" table:formula="of:=SUM([.H219:.H221])" table:style-name="ce72">
            <text:p><text:s/>398<text:s/></text:p>
          </table:table-cell>
          <table:table-cell office:value-type="float" office:value="47.116999999999997" table:formula="of:=SUM([.I219:.I221])" table:style-name="ce72">
            <text:p><text:s/>47<text:s/></text:p>
          </table:table-cell>
          <table:covered-table-cell/>
          <table:table-cell office:value-type="float" office:value="996.90336000000002" table:formula="of:=SUM([.K219:.K221])" table:style-name="ce74">
            <text:p><text:s/>9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117.33027199999999" table:style-name="ce31">
            <text:p><text:s/>117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14.53046000000001" table:style-name="ce31">
            <text:p><text:s/>115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31.86073199999998" table:formula="of:=SUM([.E223:.J223])" table:style-name="ce66">
            <text:p><text:s/>2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45.818869999999997" table:style-name="ce31">
            <text:p><text:s/>46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45.818869999999997" table:formula="of:=SUM([.E224:.J224])" table:style-name="ce68">
            <text:p><text:s/>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225:.J225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117.33027199999999" table:formula="of:=SUM([.E223:.E225])" table:style-name="ce72">
            <text:p><text:s/>117<text:s/></text:p>
          </table:table-cell>
          <table:table-cell office:value-type="float" office:value="0" table:formula="of:=SUM([.F223:.F225])" table:style-name="ce72">
            <text:p><text:s/>-<text:s/></text:p>
          </table:table-cell>
          <table:table-cell office:value-type="float" office:value="0" table:formula="of:=SUM([.G223:.G225])" table:style-name="ce72">
            <text:p><text:s/>-<text:s/></text:p>
          </table:table-cell>
          <table:table-cell office:value-type="float" office:value="160.34933000000001" table:formula="of:=SUM([.H223:.H225])" table:style-name="ce72">
            <text:p><text:s/>160<text:s/></text:p>
          </table:table-cell>
          <table:table-cell office:value-type="float" office:value="0" table:formula="of:=SUM([.I223:.I225])" table:style-name="ce72">
            <text:p><text:s/>-<text:s/></text:p>
          </table:table-cell>
          <table:covered-table-cell/>
          <table:table-cell office:value-type="float" office:value="277.67960199999999" table:formula="of:=SUM([.K223:.K225])" table:style-name="ce74">
            <text:p><text:s/>278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4 Total</text:p>
          </table:table-cell>
          <table:table-cell table:style-name="ce95"/>
          <table:table-cell table:style-name="ce92"/>
          <table:table-cell office:value-type="float" office:value="1801.8343579999996" table:formula="of:=+[.E226]+[.E222]+[.E218]+[.E214]" table:style-name="ce84">
            <text:p><text:s/>1,802<text:s/></text:p>
          </table:table-cell>
          <table:table-cell office:value-type="float" office:value="303.69879000000009" table:formula="of:=+[.F226]+[.F222]+[.F218]+[.F214]" table:style-name="ce84">
            <text:p><text:s/>304<text:s/></text:p>
          </table:table-cell>
          <table:table-cell office:value-type="float" office:value="1445.0107169999997" table:formula="of:=+[.G226]+[.G222]+[.G218]+[.G214]" table:style-name="ce84">
            <text:p><text:s/>1,445<text:s/></text:p>
          </table:table-cell>
          <table:table-cell office:value-type="float" office:value="1218.860621" table:formula="of:=+[.H226]+[.H222]+[.H218]+[.H214]" table:style-name="ce84">
            <text:p><text:s/>1,219<text:s/></text:p>
          </table:table-cell>
          <table:table-cell office:value-type="float" office:value="288.29565000000002" table:formula="of:=+[.I226]+[.I222]+[.I218]+[.I214]" table:style-name="ce84">
            <text:p><text:s/>288<text:s/></text:p>
          </table:table-cell>
          <table:table-cell table:style-name="ce85"/>
          <table:table-cell office:value-type="float" office:value="5057.7001359999995" table:formula="of:=+[.K226]+[.K222]+[.K218]+[.K214]" table:style-name="ce104">
            <text:p><text:s/>5,05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5" table:number-columns-spanned="1" table:number-rows-spanned="16" table:style-name="ce408">
            <text:p>2015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0" table:style-name="ce64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10" table:formula="of:=SUM([.E228:.J228])" table:style-name="ce68">
            <text:p><text:s/>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229:.J229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27" table:style-name="ce31">
            <text:p><text:s/>27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28" table:style-name="ce31">
            <text:p><text:s/>28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55" table:formula="of:=SUM([.E230:.J230])" table:style-name="ce68">
            <text:p><text:s/>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27" table:formula="of:=SUM([.E228:.E230])" table:style-name="ce72">
            <text:p><text:s/>27<text:s/></text:p>
          </table:table-cell>
          <table:table-cell office:value-type="float" office:value="0" table:formula="of:=SUM([.F228:.F230])" table:style-name="ce72">
            <text:p><text:s/>-<text:s/></text:p>
          </table:table-cell>
          <table:table-cell office:value-type="float" office:value="0" table:formula="of:=SUM([.G228:.G230])" table:style-name="ce72">
            <text:p><text:s/>-<text:s/></text:p>
          </table:table-cell>
          <table:table-cell office:value-type="float" office:value="38" table:formula="of:=SUM([.H228:.H230])" table:style-name="ce72">
            <text:p><text:s/>38<text:s/></text:p>
          </table:table-cell>
          <table:table-cell office:value-type="float" office:value="0" table:formula="of:=SUM([.I228:.I230])" table:style-name="ce72">
            <text:p><text:s/>-<text:s/></text:p>
          </table:table-cell>
          <table:covered-table-cell/>
          <table:table-cell office:value-type="float" office:value="65" table:formula="of:=SUM([.K228:.K230])" table:style-name="ce74">
            <text:p><text:s/>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122.74871900000002" table:style-name="ce31">
            <text:p><text:s/>123<text:s/></text:p>
          </table:table-cell>
          <table:table-cell office:value-type="float" office:value="120.26424599999999" table:style-name="ce31">
            <text:p><text:s/>120<text:s/></text:p>
          </table:table-cell>
          <table:table-cell office:value-type="float" office:value="488.89516099999992" table:style-name="ce31">
            <text:p><text:s/>489<text:s/></text:p>
          </table:table-cell>
          <table:table-cell office:value-type="float" office:value="261.931872" table:style-name="ce31">
            <text:p><text:s/>262<text:s/></text:p>
          </table:table-cell>
          <table:table-cell office:value-type="float" office:value="111.95372999999999" table:style-name="ce31">
            <text:p><text:s/>112<text:s/></text:p>
          </table:table-cell>
          <table:covered-table-cell/>
          <table:table-cell office:value-type="float" office:value="1105.7937279999999" table:formula="of:=SUM([.E232:.J232])" table:style-name="ce66">
            <text:p><text:s/>1,1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907.92597000000012" table:style-name="ce31">
            <text:p><text:s/>908<text:s/></text:p>
          </table:table-cell>
          <table:table-cell office:value-type="float" office:value="151.52492400000008" table:style-name="ce31">
            <text:p><text:s/>152<text:s/></text:p>
          </table:table-cell>
          <table:table-cell office:value-type="float" office:value="502.24196300000011" table:style-name="ce31">
            <text:p><text:s/>502<text:s/></text:p>
          </table:table-cell>
          <table:table-cell office:value-type="float" office:value="285.01232100000016" table:style-name="ce31">
            <text:p><text:s/>285<text:s/></text:p>
          </table:table-cell>
          <table:table-cell office:value-type="float" office:value="149.49097000000003" table:style-name="ce31">
            <text:p><text:s/>149<text:s/></text:p>
          </table:table-cell>
          <table:covered-table-cell/>
          <table:table-cell office:value-type="float" office:value="1996.1961480000007" table:formula="of:=SUM([.E233:.J233])" table:style-name="ce68">
            <text:p><text:s/>1,9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string" table:style-name="ce31">
            <text:p>-</text:p>
          </table:table-cell>
          <table:table-cell office:value-type="float" office:value="8.0579999999999999E-2" table:style-name="ce31">
            <text:p><text:s/>0<text:s/></text:p>
          </table:table-cell>
          <table:table-cell office:value-type="float" office:value="8.0975999999999999" table:style-name="ce31">
            <text:p><text:s/>8<text:s/></text:p>
          </table:table-cell>
          <table:table-cell office:value-type="float" office:value="1.2435000000000003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9.4216800000000003" table:formula="of:=SUM([.E234:.J234])" table:style-name="ce91">
            <text:p><text:s/>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1030.6746890000002" table:formula="of:=SUM([.E232:.E234])" table:style-name="ce72">
            <text:p><text:s/>1,031<text:s/></text:p>
          </table:table-cell>
          <table:table-cell office:value-type="float" office:value="271.86975000000007" table:formula="of:=SUM([.F232:.F234])" table:style-name="ce72">
            <text:p><text:s/>272<text:s/></text:p>
          </table:table-cell>
          <table:table-cell office:value-type="float" office:value="999.23472400000014" table:formula="of:=SUM([.G232:.G234])" table:style-name="ce72">
            <text:p><text:s/>999<text:s/></text:p>
          </table:table-cell>
          <table:table-cell office:value-type="float" office:value="548.18769300000019" table:formula="of:=SUM([.H232:.H234])" table:style-name="ce72">
            <text:p><text:s/>548<text:s/></text:p>
          </table:table-cell>
          <table:table-cell office:value-type="float" office:value="261.44470000000001" table:formula="of:=SUM([.I232:.I234])" table:style-name="ce72">
            <text:p><text:s/>261<text:s/></text:p>
          </table:table-cell>
          <table:covered-table-cell/>
          <table:table-cell office:value-type="float" office:value="3111.4115560000005" table:formula="of:=SUM([.K232:.K234])" table:style-name="ce74">
            <text:p><text:s/>3,1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219.61695999999998" table:style-name="ce31">
            <text:p><text:s/>220<text:s/></text:p>
          </table:table-cell>
          <table:table-cell office:value-type="float" office:value="27.699159999999999" table:style-name="ce31">
            <text:p><text:s/>28<text:s/></text:p>
          </table:table-cell>
          <table:table-cell office:value-type="float" office:value="289.38605000000001" table:style-name="ce31">
            <text:p><text:s/>289<text:s/></text:p>
          </table:table-cell>
          <table:table-cell office:value-type="float" office:value="229.194547" table:style-name="ce31">
            <text:p><text:s/>229<text:s/></text:p>
          </table:table-cell>
          <table:table-cell office:value-type="float" office:value="227.31299999999999" table:style-name="ce31">
            <text:p><text:s/>227<text:s/></text:p>
          </table:table-cell>
          <table:covered-table-cell/>
          <table:table-cell office:value-type="float" office:value="993.20971700000007" table:formula="of:=SUM([.E236:.J236])" table:style-name="ce66">
            <text:p><text:s/>9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.72" table:style-name="ce31">
            <text:p><text:s/>2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.72" table:formula="of:=SUM([.E237:.J237])" table:style-name="ce68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238:.J238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221.33695999999998" table:formula="of:=SUM([.E236:.E238])" table:style-name="ce72">
            <text:p><text:s/>221<text:s/></text:p>
          </table:table-cell>
          <table:table-cell office:value-type="float" office:value="27.699159999999999" table:formula="of:=SUM([.F236:.F238])" table:style-name="ce72">
            <text:p><text:s/>28<text:s/></text:p>
          </table:table-cell>
          <table:table-cell office:value-type="float" office:value="289.38605000000001" table:formula="of:=SUM([.G236:.G238])" table:style-name="ce72">
            <text:p><text:s/>289<text:s/></text:p>
          </table:table-cell>
          <table:table-cell office:value-type="float" office:value="229.194547" table:formula="of:=SUM([.H236:.H238])" table:style-name="ce72">
            <text:p><text:s/>229<text:s/></text:p>
          </table:table-cell>
          <table:table-cell office:value-type="float" office:value="227.31299999999999" table:formula="of:=SUM([.I236:.I238])" table:style-name="ce72">
            <text:p><text:s/>227<text:s/></text:p>
          </table:table-cell>
          <table:covered-table-cell/>
          <table:table-cell office:value-type="float" office:value="994.9297170000001" table:formula="of:=SUM([.K236:.K238])" table:style-name="ce74">
            <text:p><text:s/>9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108.179541" table:style-name="ce31">
            <text:p><text:s/>108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15.839321" table:style-name="ce31">
            <text:p><text:s/>116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24.01886200000001" table:formula="of:=SUM([.E240:.J240])" table:style-name="ce66">
            <text:p><text:s/>2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2.4476799999999996" table:style-name="ce31">
            <text:p><text:s/>2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.4476799999999996" table:formula="of:=SUM([.E241:.J241])" table:style-name="ce68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242:.J242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108.179541" table:formula="of:=SUM([.E240:.E242])" table:style-name="ce72">
            <text:p><text:s/>108<text:s/></text:p>
          </table:table-cell>
          <table:table-cell office:value-type="float" office:value="0" table:formula="of:=SUM([.F240:.F242])" table:style-name="ce72">
            <text:p><text:s/>-<text:s/></text:p>
          </table:table-cell>
          <table:table-cell office:value-type="float" office:value="0" table:formula="of:=SUM([.G240:.G242])" table:style-name="ce72">
            <text:p><text:s/>-<text:s/></text:p>
          </table:table-cell>
          <table:table-cell office:value-type="float" office:value="118.287001" table:formula="of:=SUM([.H240:.H242])" table:style-name="ce72">
            <text:p><text:s/>118<text:s/></text:p>
          </table:table-cell>
          <table:table-cell office:value-type="float" office:value="0" table:formula="of:=SUM([.I240:.I242])" table:style-name="ce72">
            <text:p><text:s/>-<text:s/></text:p>
          </table:table-cell>
          <table:covered-table-cell/>
          <table:table-cell office:value-type="float" office:value="226.466542" table:formula="of:=SUM([.K240:.K242])" table:style-name="ce74">
            <text:p><text:s/>22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5 Total</text:p>
          </table:table-cell>
          <table:table-cell table:style-name="ce95"/>
          <table:table-cell table:style-name="ce92"/>
          <table:table-cell office:value-type="float" office:value="1387.19119" table:formula="of:=+[.E243]+[.E239]+[.E235]+[.E231]" table:style-name="ce84">
            <text:p><text:s/>1,387<text:s/></text:p>
          </table:table-cell>
          <table:table-cell office:value-type="float" office:value="299.56891000000007" table:formula="of:=+[.F243]+[.F239]+[.F235]+[.F231]" table:style-name="ce84">
            <text:p><text:s/>300<text:s/></text:p>
          </table:table-cell>
          <table:table-cell office:value-type="float" office:value="1288.6207740000002" table:formula="of:=+[.G243]+[.G239]+[.G235]+[.G231]" table:style-name="ce84">
            <text:p><text:s/>1,289<text:s/></text:p>
          </table:table-cell>
          <table:table-cell office:value-type="float" office:value="933.66924100000017" table:formula="of:=+[.H243]+[.H239]+[.H235]+[.H231]" table:style-name="ce84">
            <text:p><text:s/>934<text:s/></text:p>
          </table:table-cell>
          <table:table-cell office:value-type="float" office:value="488.7577" table:formula="of:=+[.I243]+[.I239]+[.I235]+[.I231]" table:style-name="ce84">
            <text:p><text:s/>489<text:s/></text:p>
          </table:table-cell>
          <table:table-cell table:style-name="ce85"/>
          <table:table-cell office:value-type="float" office:value="4397.8078150000001" table:formula="of:=+[.K243]+[.K239]+[.K235]+[.K231]" table:style-name="ce104">
            <text:p><text:s/>4,39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6" table:number-columns-spanned="1" table:number-rows-spanned="16" table:style-name="ce408">
            <text:p>2016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5.4678650000000006" table:style-name="ce31">
            <text:p><text:s/>5<text:s/></text:p>
          </table:table-cell>
          <table:table-cell office:value-type="float" office:value="0" table:style-name="ce64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5.4678650000000006" table:formula="of:=SUM([.E245:.J245])" table:style-name="ce68">
            <text:p><text:s/>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33.134489000000002" table:style-name="ce64">
            <text:p><text:s/>33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33.134489000000002" table:formula="of:=SUM([.E246:.J246])" table:style-name="ce68">
            <text:p><text:s/>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247:.J247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0" table:formula="of:=SUM([.E245:.E247])" table:style-name="ce72">
            <text:p><text:s/>-<text:s/></text:p>
          </table:table-cell>
          <table:table-cell office:value-type="float" office:value="0" table:formula="of:=SUM([.F245:.F247])" table:style-name="ce72">
            <text:p><text:s/>-<text:s/></text:p>
          </table:table-cell>
          <table:table-cell office:value-type="float" office:value="0" table:formula="of:=SUM([.G245:.G247])" table:style-name="ce72">
            <text:p><text:s/>-<text:s/></text:p>
          </table:table-cell>
          <table:table-cell office:value-type="float" office:value="38.602354000000005" table:formula="of:=SUM([.H245:.H247])" table:style-name="ce72">
            <text:p><text:s/>39<text:s/></text:p>
          </table:table-cell>
          <table:table-cell office:value-type="float" office:value="0" table:formula="of:=SUM([.I245:.I247])" table:style-name="ce72">
            <text:p><text:s/>-<text:s/></text:p>
          </table:table-cell>
          <table:covered-table-cell/>
          <table:table-cell office:value-type="float" office:value="38.602354000000005" table:formula="of:=SUM([.K245:.K247])" table:style-name="ce74">
            <text:p><text:s/>3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117.91255999999998" table:style-name="ce31">
            <text:p><text:s/>118<text:s/></text:p>
          </table:table-cell>
          <table:table-cell office:value-type="float" office:value="82.730559999999997" table:style-name="ce31">
            <text:p><text:s/>83<text:s/></text:p>
          </table:table-cell>
          <table:table-cell office:value-type="float" office:value="606.55507200000034" table:style-name="ce31">
            <text:p><text:s/>607<text:s/></text:p>
          </table:table-cell>
          <table:table-cell office:value-type="float" office:value="281.20178200000004" table:style-name="ce31">
            <text:p><text:s/>281<text:s/></text:p>
          </table:table-cell>
          <table:table-cell office:value-type="float" office:value="185.14037999999991" table:style-name="ce31">
            <text:p><text:s/>185<text:s/></text:p>
          </table:table-cell>
          <table:covered-table-cell/>
          <table:table-cell office:value-type="float" office:value="1273.5403540000002" table:formula="of:=SUM([.E249:.J249])" table:style-name="ce66">
            <text:p><text:s/>1,27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878.97025900000051" table:style-name="ce31">
            <text:p><text:s/>879<text:s/></text:p>
          </table:table-cell>
          <table:table-cell office:value-type="float" office:value="159.95898500000001" table:style-name="ce31">
            <text:p><text:s/>160<text:s/></text:p>
          </table:table-cell>
          <table:table-cell office:value-type="float" office:value="507.1350709999993" table:style-name="ce31">
            <text:p><text:s/>507<text:s/></text:p>
          </table:table-cell>
          <table:table-cell office:value-type="float" office:value="417.387271" table:style-name="ce31">
            <text:p><text:s/>417<text:s/></text:p>
          </table:table-cell>
          <table:table-cell office:value-type="float" office:value="85.162360000000021" table:style-name="ce31">
            <text:p><text:s/>85<text:s/></text:p>
          </table:table-cell>
          <table:covered-table-cell/>
          <table:table-cell office:value-type="float" office:value="2048.6139459999999" table:formula="of:=SUM([.E250:.J250])" table:style-name="ce68">
            <text:p><text:s/>2,0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float" office:value="8.8478399999999997" table:style-name="ce31">
            <text:p><text:s/>9<text:s/></text:p>
          </table:table-cell>
          <table:table-cell office:value-type="float" office:value="1.014080000000000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9.8619199999999996" table:formula="of:=SUM([.E251:.J251])" table:style-name="ce91">
            <text:p><text:s/>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996.8828190000005" table:formula="of:=SUM([.E249:.E251])" table:style-name="ce72">
            <text:p><text:s/>997<text:s/></text:p>
          </table:table-cell>
          <table:table-cell office:value-type="float" office:value="242.68954500000001" table:formula="of:=SUM([.F249:.F251])" table:style-name="ce72">
            <text:p><text:s/>243<text:s/></text:p>
          </table:table-cell>
          <table:table-cell office:value-type="float" office:value="1122.5379829999995" table:formula="of:=SUM([.G249:.G251])" table:style-name="ce72">
            <text:p><text:s/>1,123<text:s/></text:p>
          </table:table-cell>
          <table:table-cell office:value-type="float" office:value="699.60313300000007" table:formula="of:=SUM([.H249:.H251])" table:style-name="ce72">
            <text:p><text:s/>700<text:s/></text:p>
          </table:table-cell>
          <table:table-cell office:value-type="float" office:value="270.30273999999991" table:formula="of:=SUM([.I249:.I251])" table:style-name="ce72">
            <text:p><text:s/>270<text:s/></text:p>
          </table:table-cell>
          <table:covered-table-cell/>
          <table:table-cell office:value-type="float" office:value="3332.01622" table:formula="of:=SUM([.K249:.K251])" table:style-name="ce74">
            <text:p><text:s/>3,3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109.29499999999999" table:style-name="ce31">
            <text:p><text:s/>109<text:s/></text:p>
          </table:table-cell>
          <table:table-cell office:value-type="float" office:value="7.1400000000000005E-2" table:style-name="ce31">
            <text:p><text:s/>0<text:s/></text:p>
          </table:table-cell>
          <table:table-cell office:value-type="float" office:value="277.28312099999988" table:style-name="ce31">
            <text:p><text:s/>277<text:s/></text:p>
          </table:table-cell>
          <table:table-cell office:value-type="float" office:value="61.034548999999998" table:style-name="ce31">
            <text:p><text:s/>61<text:s/></text:p>
          </table:table-cell>
          <table:table-cell office:value-type="float" office:value="99.305000000000007" table:style-name="ce31">
            <text:p><text:s/>99<text:s/></text:p>
          </table:table-cell>
          <table:covered-table-cell/>
          <table:table-cell office:value-type="float" office:value="546.98906999999986" table:formula="of:=SUM([.E253:.J253])" table:style-name="ce66">
            <text:p><text:s/>5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.16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.16" table:formula="of:=SUM([.E254:.J254])" table:style-name="ce68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255:.J255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109.45499999999998" table:formula="of:=SUM([.E253:.E255])" table:style-name="ce72">
            <text:p><text:s/>109<text:s/></text:p>
          </table:table-cell>
          <table:table-cell office:value-type="float" office:value="7.1400000000000005E-2" table:formula="of:=SUM([.F253:.F255])" table:style-name="ce72">
            <text:p><text:s/>0<text:s/></text:p>
          </table:table-cell>
          <table:table-cell office:value-type="float" office:value="277.28312099999988" table:formula="of:=SUM([.G253:.G255])" table:style-name="ce72">
            <text:p><text:s/>277<text:s/></text:p>
          </table:table-cell>
          <table:table-cell office:value-type="float" office:value="61.034548999999998" table:formula="of:=SUM([.H253:.H255])" table:style-name="ce72">
            <text:p><text:s/>61<text:s/></text:p>
          </table:table-cell>
          <table:table-cell office:value-type="float" office:value="99.305000000000007" table:formula="of:=SUM([.I253:.I255])" table:style-name="ce72">
            <text:p><text:s/>99<text:s/></text:p>
          </table:table-cell>
          <table:covered-table-cell/>
          <table:table-cell office:value-type="float" office:value="547.14906999999982" table:formula="of:=SUM([.K253:.K255])" table:style-name="ce74">
            <text:p><text:s/>5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4" table:formula="of:=SUM([.E257:.J257])" table:style-name="ce66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258:.J258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259:.J259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4" table:formula="of:=SUM([.E257:.E259])" table:style-name="ce72">
            <text:p><text:s/>4<text:s/></text:p>
          </table:table-cell>
          <table:table-cell office:value-type="float" office:value="0" table:formula="of:=SUM([.F257:.F259])" table:style-name="ce72">
            <text:p><text:s/>-<text:s/></text:p>
          </table:table-cell>
          <table:table-cell office:value-type="float" office:value="0" table:formula="of:=SUM([.G257:.G259])" table:style-name="ce72">
            <text:p><text:s/>-<text:s/></text:p>
          </table:table-cell>
          <table:table-cell office:value-type="float" office:value="0" table:formula="of:=SUM([.H257:.H259])" table:style-name="ce72">
            <text:p><text:s/>-<text:s/></text:p>
          </table:table-cell>
          <table:table-cell office:value-type="float" office:value="0" table:formula="of:=SUM([.I257:.I259])" table:style-name="ce72">
            <text:p><text:s/>-<text:s/></text:p>
          </table:table-cell>
          <table:covered-table-cell/>
          <table:table-cell office:value-type="float" office:value="4" table:formula="of:=SUM([.K257:.K259])" table:style-name="ce74">
            <text:p><text:s/>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6 Total</text:p>
          </table:table-cell>
          <table:table-cell table:style-name="ce95"/>
          <table:table-cell table:style-name="ce92"/>
          <table:table-cell office:value-type="float" office:value="1110.3378190000005" table:formula="of:=+[.E260]+[.E256]+[.E252]+[.E248]" table:style-name="ce84">
            <text:p><text:s/>1,110<text:s/></text:p>
          </table:table-cell>
          <table:table-cell office:value-type="float" office:value="242.76094500000002" table:formula="of:=+[.F260]+[.F256]+[.F252]+[.F248]" table:style-name="ce84">
            <text:p><text:s/>243<text:s/></text:p>
          </table:table-cell>
          <table:table-cell office:value-type="float" office:value="1399.8211039999994" table:formula="of:=+[.G260]+[.G256]+[.G252]+[.G248]" table:style-name="ce84">
            <text:p><text:s/>1,400<text:s/></text:p>
          </table:table-cell>
          <table:table-cell office:value-type="float" office:value="799.24003600000003" table:formula="of:=+[.H260]+[.H256]+[.H252]+[.H248]" table:style-name="ce84">
            <text:p><text:s/>799<text:s/></text:p>
          </table:table-cell>
          <table:table-cell office:value-type="float" office:value="369.60773999999992" table:formula="of:=+[.I260]+[.I256]+[.I252]+[.I248]" table:style-name="ce84">
            <text:p><text:s/>370<text:s/></text:p>
          </table:table-cell>
          <table:table-cell table:style-name="ce85"/>
          <table:table-cell office:value-type="float" office:value="3921.767644" table:formula="of:=+[.K260]+[.K256]+[.K252]+[.K248]" table:style-name="ce104">
            <text:p><text:s/>3,92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7" table:number-columns-spanned="1" table:number-rows-spanned="16" table:style-name="ce408">
            <text:p>2017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float" office:value="8.7439800000000023" table:style-name="ce31">
            <text:p><text:s/>9<text:s/></text:p>
          </table:table-cell>
          <table:table-cell office:value-type="string" table:style-name="ce64">
            <text:p>-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8.7439800000000023" table:formula="of:=SUM([.E262:.J262])" table:style-name="ce68">
            <text:p><text:s/>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float" office:value="11.256069999999999" table:style-name="ce64">
            <text:p><text:s/>11<text:s/></text:p>
          </table:table-cell>
          <table:table-cell office:value-type="string" table:style-name="ce64">
            <text:p>-</text:p>
          </table:table-cell>
          <table:covered-table-cell/>
          <table:table-cell office:value-type="float" office:value="11.256069999999999" table:formula="of:=SUM([.E263:.J263])" table:style-name="ce68">
            <text:p><text:s/>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float" office:value="48.907440000000008" table:style-name="ce64">
            <text:p><text:s/>49<text:s/></text:p>
          </table:table-cell>
          <table:table-cell office:value-type="float" office:value="9.7900000000000015E-2" table:style-name="ce31">
            <text:p><text:s/>0<text:s/></text:p>
          </table:table-cell>
          <table:covered-table-cell/>
          <table:table-cell office:value-type="float" office:value="49.005340000000011" table:formula="of:=SUM([.E264:.J264])" table:style-name="ce68">
            <text:p><text:s/>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0" table:formula="of:=SUM([.E262:.E264])" table:style-name="ce72">
            <text:p><text:s/>-<text:s/></text:p>
          </table:table-cell>
          <table:table-cell office:value-type="float" office:value="0" table:formula="of:=SUM([.F262:.F264])" table:style-name="ce72">
            <text:p><text:s/>-<text:s/></text:p>
          </table:table-cell>
          <table:table-cell office:value-type="float" office:value="0" table:formula="of:=SUM([.G262:.G264])" table:style-name="ce72">
            <text:p><text:s/>-<text:s/></text:p>
          </table:table-cell>
          <table:table-cell office:value-type="float" office:value="68.90749000000001" table:formula="of:=SUM([.H262:.H264])" table:style-name="ce72">
            <text:p><text:s/>69<text:s/></text:p>
          </table:table-cell>
          <table:table-cell office:value-type="float" office:value="9.7900000000000015E-2" table:formula="of:=SUM([.I262:.I264])" table:style-name="ce72">
            <text:p><text:s/>0<text:s/></text:p>
          </table:table-cell>
          <table:covered-table-cell/>
          <table:table-cell office:value-type="float" office:value="69.005390000000006" table:formula="of:=SUM([.K262:.K264])" table:style-name="ce74">
            <text:p><text:s/>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81.075910000000007" table:style-name="ce31">
            <text:p><text:s/>81<text:s/></text:p>
          </table:table-cell>
          <table:table-cell office:value-type="float" office:value="91.281134999999992" table:style-name="ce31">
            <text:p><text:s/>91<text:s/></text:p>
          </table:table-cell>
          <table:table-cell office:value-type="float" office:value="819.43503500000043" table:style-name="ce31">
            <text:p><text:s/>819<text:s/></text:p>
          </table:table-cell>
          <table:table-cell office:value-type="float" office:value="533.70608199999981" table:style-name="ce31">
            <text:p><text:s/>534<text:s/></text:p>
          </table:table-cell>
          <table:table-cell office:value-type="float" office:value="252.47087199999999" table:style-name="ce31">
            <text:p><text:s/>252<text:s/></text:p>
          </table:table-cell>
          <table:covered-table-cell/>
          <table:table-cell office:value-type="float" office:value="1777.9690340000002" table:formula="of:=SUM([.E266:.J266])" table:style-name="ce66">
            <text:p><text:s/>1,7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561.99700099999995" table:style-name="ce31">
            <text:p><text:s/>562<text:s/></text:p>
          </table:table-cell>
          <table:table-cell office:value-type="float" office:value="147.47536000000002" table:style-name="ce31">
            <text:p><text:s/>147<text:s/></text:p>
          </table:table-cell>
          <table:table-cell office:value-type="float" office:value="329.02498899999978" table:style-name="ce31">
            <text:p><text:s/>329<text:s/></text:p>
          </table:table-cell>
          <table:table-cell office:value-type="float" office:value="430.68126799999987" table:style-name="ce31">
            <text:p><text:s/>431<text:s/></text:p>
          </table:table-cell>
          <table:table-cell office:value-type="float" office:value="72.919299999999993" table:style-name="ce31">
            <text:p><text:s/>73<text:s/></text:p>
          </table:table-cell>
          <table:covered-table-cell/>
          <table:table-cell office:value-type="float" office:value="1542.0979179999995" table:formula="of:=SUM([.E267:.J267])" table:style-name="ce68">
            <text:p><text:s/>1,5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string" table:style-name="ce31">
            <text:p>-</text:p>
          </table:table-cell>
          <table:table-cell office:value-type="float" office:value="1.8999999999999998E-3" table:style-name="ce31">
            <text:p><text:s/>0<text:s/></text:p>
          </table:table-cell>
          <table:table-cell office:value-type="float" office:value="7.7022700000000004" table:style-name="ce31">
            <text:p><text:s/>8<text:s/></text:p>
          </table:table-cell>
          <table:table-cell office:value-type="float" office:value="1.2205999999999997" table:style-name="ce31">
            <text:p><text:s/>1<text:s/></text:p>
          </table:table-cell>
          <table:table-cell office:value-type="string" table:style-name="ce31">
            <text:p>-</text:p>
          </table:table-cell>
          <table:covered-table-cell/>
          <table:table-cell office:value-type="float" office:value="8.9247700000000005" table:formula="of:=SUM([.E268:.J268])" table:style-name="ce91">
            <text:p><text:s/>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643.07291099999998" table:formula="of:=SUM([.E266:.E268])" table:style-name="ce72">
            <text:p><text:s/>643<text:s/></text:p>
          </table:table-cell>
          <table:table-cell office:value-type="float" office:value="238.75839500000004" table:formula="of:=SUM([.F266:.F268])" table:style-name="ce72">
            <text:p><text:s/>239<text:s/></text:p>
          </table:table-cell>
          <table:table-cell office:value-type="float" office:value="1156.1622940000002" table:formula="of:=SUM([.G266:.G268])" table:style-name="ce72">
            <text:p><text:s/>1,156<text:s/></text:p>
          </table:table-cell>
          <table:table-cell office:value-type="float" office:value="965.60794999999973" table:formula="of:=SUM([.H266:.H268])" table:style-name="ce72">
            <text:p><text:s/>966<text:s/></text:p>
          </table:table-cell>
          <table:table-cell office:value-type="float" office:value="325.39017200000001" table:formula="of:=SUM([.I266:.I268])" table:style-name="ce72">
            <text:p><text:s/>325<text:s/></text:p>
          </table:table-cell>
          <table:covered-table-cell/>
          <table:table-cell office:value-type="float" office:value="3328.9917219999998" table:formula="of:=SUM([.K266:.K268])" table:style-name="ce74">
            <text:p><text:s/>3,3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240.87000000000003" table:style-name="ce31">
            <text:p><text:s/>241<text:s/></text:p>
          </table:table-cell>
          <table:table-cell office:value-type="float" office:value="0.64749999999999996" table:style-name="ce31">
            <text:p><text:s/>1<text:s/></text:p>
          </table:table-cell>
          <table:table-cell office:value-type="float" office:value="377.97549999999995" table:style-name="ce31">
            <text:p><text:s/>378<text:s/></text:p>
          </table:table-cell>
          <table:table-cell office:value-type="float" office:value="252.34388999999999" table:style-name="ce31">
            <text:p><text:s/>252<text:s/></text:p>
          </table:table-cell>
          <table:table-cell office:value-type="float" office:value="2.3820000000000001" table:style-name="ce31">
            <text:p><text:s/>2<text:s/></text:p>
          </table:table-cell>
          <table:covered-table-cell/>
          <table:table-cell office:value-type="float" office:value="874.21888999999987" table:formula="of:=SUM([.E270:.J270])" table:style-name="ce66">
            <text:p><text:s/>87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.14000000000000001" table:style-name="ce31">
            <text:p><text:s/>0<text:s/>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covered-table-cell/>
          <table:table-cell office:value-type="float" office:value="0.14000000000000001" table:formula="of:=SUM([.E271:.J271])" table:style-name="ce68">
            <text:p><text:s/>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272:.J272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241.01000000000002" table:formula="of:=SUM([.E270:.E272])" table:style-name="ce72">
            <text:p><text:s/>241<text:s/></text:p>
          </table:table-cell>
          <table:table-cell office:value-type="float" office:value="0.64749999999999996" table:formula="of:=SUM([.F270:.F272])" table:style-name="ce72">
            <text:p><text:s/>1<text:s/></text:p>
          </table:table-cell>
          <table:table-cell office:value-type="float" office:value="377.97549999999995" table:formula="of:=SUM([.G270:.G272])" table:style-name="ce72">
            <text:p><text:s/>378<text:s/></text:p>
          </table:table-cell>
          <table:table-cell office:value-type="float" office:value="252.34388999999999" table:formula="of:=SUM([.H270:.H272])" table:style-name="ce72">
            <text:p><text:s/>252<text:s/></text:p>
          </table:table-cell>
          <table:table-cell office:value-type="float" office:value="2.3820000000000001" table:formula="of:=SUM([.I270:.I272])" table:style-name="ce72">
            <text:p><text:s/>2<text:s/></text:p>
          </table:table-cell>
          <table:covered-table-cell/>
          <table:table-cell office:value-type="float" office:value="874.35888999999986" table:formula="of:=SUM([.K270:.K272])" table:style-name="ce74">
            <text:p><text:s/>87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string" table:style-name="ce31">
            <text:p>-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274:.J274])" table:style-name="ce66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275:.J275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276:.J276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0" table:formula="of:=SUM([.E274:.E276])" table:style-name="ce72">
            <text:p><text:s/>-<text:s/></text:p>
          </table:table-cell>
          <table:table-cell office:value-type="float" office:value="0" table:formula="of:=SUM([.F274:.F276])" table:style-name="ce72">
            <text:p><text:s/>-<text:s/></text:p>
          </table:table-cell>
          <table:table-cell office:value-type="float" office:value="0" table:formula="of:=SUM([.G274:.G276])" table:style-name="ce72">
            <text:p><text:s/>-<text:s/></text:p>
          </table:table-cell>
          <table:table-cell office:value-type="float" office:value="0" table:formula="of:=SUM([.H274:.H276])" table:style-name="ce72">
            <text:p><text:s/>-<text:s/></text:p>
          </table:table-cell>
          <table:table-cell office:value-type="float" office:value="0" table:formula="of:=SUM([.I274:.I276])" table:style-name="ce72">
            <text:p><text:s/>-<text:s/></text:p>
          </table:table-cell>
          <table:covered-table-cell/>
          <table:table-cell office:value-type="float" office:value="0" table:formula="of:=SUM([.K274:.K276])" table:style-name="ce74">
            <text:p><text:s/>-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7 Total</text:p>
          </table:table-cell>
          <table:table-cell table:style-name="ce95"/>
          <table:table-cell table:style-name="ce92"/>
          <table:table-cell office:value-type="float" office:value="884.08291099999997" table:formula="of:=+[.E277]+[.E273]+[.E269]+[.E265]" table:style-name="ce84">
            <text:p><text:s/>884<text:s/></text:p>
          </table:table-cell>
          <table:table-cell office:value-type="float" office:value="239.40589500000004" table:formula="of:=+[.F277]+[.F273]+[.F269]+[.F265]" table:style-name="ce84">
            <text:p><text:s/>239<text:s/></text:p>
          </table:table-cell>
          <table:table-cell office:value-type="float" office:value="1534.1377940000002" table:formula="of:=+[.G277]+[.G273]+[.G269]+[.G265]" table:style-name="ce84">
            <text:p><text:s/>1,534<text:s/></text:p>
          </table:table-cell>
          <table:table-cell office:value-type="float" office:value="1286.8593299999998" table:formula="of:=+[.H277]+[.H273]+[.H269]+[.H265]" table:style-name="ce84">
            <text:p><text:s/>1,287<text:s/></text:p>
          </table:table-cell>
          <table:table-cell office:value-type="float" office:value="327.87007199999999" table:formula="of:=+[.I277]+[.I273]+[.I269]+[.I265]" table:style-name="ce84">
            <text:p><text:s/>328<text:s/></text:p>
          </table:table-cell>
          <table:table-cell table:style-name="ce85"/>
          <table:table-cell office:value-type="float" office:value="4272.3560019999995" table:formula="of:=+[.K277]+[.K273]+[.K269]+[.K265]" table:style-name="ce104">
            <text:p><text:s/>4,27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8" table:number-columns-spanned="1" table:number-rows-spanned="16" table:style-name="ce408">
            <text:p>2018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4.0999999999999996" table:style-name="ce31">
            <text:p><text:s/>4<text:s/></text:p>
          </table:table-cell>
          <table:table-cell office:value-type="float" office:value="0" table:style-name="ce64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4.0999999999999996" table:formula="of:=SUM([.E279:.J279])" table:style-name="ce68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5.8" table:style-name="ce64">
            <text:p><text:s/>16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5.8" table:formula="of:=SUM([.E280:.J280])" table:style-name="ce68">
            <text:p><text:s/>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77.3" table:style-name="ce64">
            <text:p><text:s/>77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77.3" table:formula="of:=SUM([.E281:.J281])" table:style-name="ce68">
            <text:p><text:s/>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0" table:formula="of:=SUM([.E279:.E281])" table:style-name="ce72">
            <text:p><text:s/>-<text:s/></text:p>
          </table:table-cell>
          <table:table-cell office:value-type="float" office:value="0" table:formula="of:=SUM([.F279:.F281])" table:style-name="ce72">
            <text:p><text:s/>-<text:s/></text:p>
          </table:table-cell>
          <table:table-cell office:value-type="float" office:value="0" table:formula="of:=SUM([.G279:.G281])" table:style-name="ce72">
            <text:p><text:s/>-<text:s/></text:p>
          </table:table-cell>
          <table:table-cell office:value-type="float" office:value="97.199999999999989" table:formula="of:=SUM([.H279:.H281])" table:style-name="ce72">
            <text:p><text:s/>97<text:s/></text:p>
          </table:table-cell>
          <table:table-cell office:value-type="float" office:value="0" table:formula="of:=SUM([.I279:.I281])" table:style-name="ce72">
            <text:p><text:s/>-<text:s/></text:p>
          </table:table-cell>
          <table:covered-table-cell/>
          <table:table-cell office:value-type="float" office:value="97.199999999999989" table:formula="of:=SUM([.K279:.K281])" table:style-name="ce74">
            <text:p><text:s/>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36.6" table:style-name="ce31">
            <text:p><text:s/>37<text:s/></text:p>
          </table:table-cell>
          <table:table-cell office:value-type="float" office:value="117.2" table:style-name="ce31">
            <text:p><text:s/>117<text:s/></text:p>
          </table:table-cell>
          <table:table-cell office:value-type="float" office:value="763.2" table:style-name="ce31">
            <text:p><text:s/>763<text:s/></text:p>
          </table:table-cell>
          <table:table-cell office:value-type="float" office:value="501.9" table:style-name="ce31">
            <text:p><text:s/>502<text:s/></text:p>
          </table:table-cell>
          <table:table-cell office:value-type="float" office:value="247.7" table:style-name="ce31">
            <text:p><text:s/>248<text:s/></text:p>
          </table:table-cell>
          <table:covered-table-cell/>
          <table:table-cell office:value-type="float" office:value="1666.6000000000001" table:formula="of:=SUM([.E283:.J283])" table:style-name="ce66">
            <text:p><text:s/>1,6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592.29999999999995" table:style-name="ce31">
            <text:p><text:s/>592<text:s/></text:p>
          </table:table-cell>
          <table:table-cell office:value-type="float" office:value="122.8" table:style-name="ce31">
            <text:p><text:s/>123<text:s/></text:p>
          </table:table-cell>
          <table:table-cell office:value-type="float" office:value="362.6" table:style-name="ce31">
            <text:p><text:s/>363<text:s/></text:p>
          </table:table-cell>
          <table:table-cell office:value-type="float" office:value="380.5" table:style-name="ce31">
            <text:p><text:s/>381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458.1999999999998" table:formula="of:=SUM([.E284:.J284])" table:style-name="ce68">
            <text:p><text:s/>1,45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.4" table:style-name="ce31">
            <text:p><text:s/>7<text:s/></text:p>
          </table:table-cell>
          <table:table-cell office:value-type="float" office:value="2.1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9.5" table:formula="of:=SUM([.E285:.J285])" table:style-name="ce91">
            <text:p><text:s/>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628.9" table:formula="of:=SUM([.E283:.E285])" table:style-name="ce72">
            <text:p><text:s/>629<text:s/></text:p>
          </table:table-cell>
          <table:table-cell office:value-type="float" office:value="240" table:formula="of:=SUM([.F283:.F285])" table:style-name="ce72">
            <text:p><text:s/>240<text:s/></text:p>
          </table:table-cell>
          <table:table-cell office:value-type="float" office:value="1133.2000000000003" table:formula="of:=SUM([.G283:.G285])" table:style-name="ce72">
            <text:p><text:s/>1,133<text:s/></text:p>
          </table:table-cell>
          <table:table-cell office:value-type="float" office:value="884.5" table:formula="of:=SUM([.H283:.H285])" table:style-name="ce72">
            <text:p><text:s/>885<text:s/></text:p>
          </table:table-cell>
          <table:table-cell office:value-type="float" office:value="247.7" table:formula="of:=SUM([.I283:.I285])" table:style-name="ce72">
            <text:p><text:s/>248<text:s/></text:p>
          </table:table-cell>
          <table:covered-table-cell/>
          <table:table-cell office:value-type="float" office:value="3134.3" table:formula="of:=SUM([.K283:.K285])" table:style-name="ce74">
            <text:p><text:s/>3,1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117.1" table:style-name="ce31">
            <text:p><text:s/>11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31.1" table:style-name="ce31">
            <text:p><text:s/>331<text:s/></text:p>
          </table:table-cell>
          <table:table-cell office:value-type="float" office:value="123.4" table:style-name="ce31">
            <text:p><text:s/>123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571.6" table:formula="of:=SUM([.E287:.J287])" table:style-name="ce66">
            <text:p><text:s/>5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2.5" table:style-name="ce31">
            <text:p><text:s/>1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2.5" table:formula="of:=SUM([.E288:.J288])" table:style-name="ce68">
            <text:p><text:s/>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289:.J289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117.1" table:formula="of:=SUM([.E287:.E289])" table:style-name="ce72">
            <text:p><text:s/>117<text:s/></text:p>
          </table:table-cell>
          <table:table-cell office:value-type="float" office:value="12.5" table:formula="of:=SUM([.F287:.F289])" table:style-name="ce72">
            <text:p><text:s/>13<text:s/></text:p>
          </table:table-cell>
          <table:table-cell office:value-type="float" office:value="331.1" table:formula="of:=SUM([.G287:.G289])" table:style-name="ce72">
            <text:p><text:s/>331<text:s/></text:p>
          </table:table-cell>
          <table:table-cell office:value-type="float" office:value="123.4" table:formula="of:=SUM([.H287:.H289])" table:style-name="ce72">
            <text:p><text:s/>123<text:s/></text:p>
          </table:table-cell>
          <table:table-cell office:value-type="float" office:value="0" table:formula="of:=SUM([.I287:.I289])" table:style-name="ce72">
            <text:p><text:s/>-<text:s/></text:p>
          </table:table-cell>
          <table:covered-table-cell/>
          <table:table-cell office:value-type="float" office:value="584.1" table:formula="of:=SUM([.K287:.K289])" table:style-name="ce74">
            <text:p><text:s/>5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150.69999999999999" table:style-name="ce31">
            <text:p><text:s/>151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50.69999999999999" table:formula="of:=SUM([.E291:.J291])" table:style-name="ce66">
            <text:p><text:s/>15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292:.J292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293:.J293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150.69999999999999" table:formula="of:=SUM([.E291:.E293])" table:style-name="ce72">
            <text:p><text:s/>151<text:s/></text:p>
          </table:table-cell>
          <table:table-cell office:value-type="float" office:value="0" table:formula="of:=SUM([.F291:.F293])" table:style-name="ce72">
            <text:p><text:s/>-<text:s/></text:p>
          </table:table-cell>
          <table:table-cell office:value-type="float" office:value="0" table:formula="of:=SUM([.G291:.G293])" table:style-name="ce72">
            <text:p><text:s/>-<text:s/></text:p>
          </table:table-cell>
          <table:table-cell office:value-type="float" office:value="0" table:formula="of:=SUM([.H291:.H293])" table:style-name="ce72">
            <text:p><text:s/>-<text:s/></text:p>
          </table:table-cell>
          <table:table-cell office:value-type="float" office:value="0" table:formula="of:=SUM([.I291:.I293])" table:style-name="ce72">
            <text:p><text:s/>-<text:s/></text:p>
          </table:table-cell>
          <table:covered-table-cell/>
          <table:table-cell office:value-type="float" office:value="150.69999999999999" table:formula="of:=SUM([.K291:.K293])" table:style-name="ce74">
            <text:p><text:s/>151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8 Total</text:p>
          </table:table-cell>
          <table:table-cell table:style-name="ce95"/>
          <table:table-cell table:style-name="ce92"/>
          <table:table-cell office:value-type="float" office:value="896.69999999999993" table:formula="of:=+[.E294]+[.E290]+[.E286]+[.E282]" table:style-name="ce84">
            <text:p><text:s/>897<text:s/></text:p>
          </table:table-cell>
          <table:table-cell office:value-type="float" office:value="252.5" table:formula="of:=+[.F294]+[.F290]+[.F286]+[.F282]" table:style-name="ce84">
            <text:p><text:s/>253<text:s/></text:p>
          </table:table-cell>
          <table:table-cell office:value-type="float" office:value="1464.3000000000002" table:formula="of:=+[.G294]+[.G290]+[.G286]+[.G282]" table:style-name="ce84">
            <text:p><text:s/>1,464<text:s/></text:p>
          </table:table-cell>
          <table:table-cell office:value-type="float" office:value="1105.0999999999999" table:formula="of:=+[.H294]+[.H290]+[.H286]+[.H282]" table:style-name="ce84">
            <text:p><text:s/>1,105<text:s/></text:p>
          </table:table-cell>
          <table:table-cell office:value-type="float" office:value="247.7" table:formula="of:=+[.I294]+[.I290]+[.I286]+[.I282]" table:style-name="ce84">
            <text:p><text:s/>248<text:s/></text:p>
          </table:table-cell>
          <table:table-cell table:style-name="ce85"/>
          <table:table-cell office:value-type="float" office:value="3966.3" table:formula="of:=+[.K294]+[.K290]+[.K286]+[.K282]" table:style-name="ce104">
            <text:p><text:s/>3,96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9" table:number-columns-spanned="1" table:number-rows-spanned="16" table:style-name="ce408">
            <text:p>2019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0" table:style-name="ce64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10" table:formula="of:=SUM([.E296:.J296])" table:style-name="ce68">
            <text:p><text:s/>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47" table:style-name="ce64">
            <text:p><text:s/>47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47" table:formula="of:=SUM([.E297:.J297])" table:style-name="ce68">
            <text:p><text:s/>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26" table:style-name="ce64">
            <text:p><text:s/>126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26" table:formula="of:=SUM([.E298:.J298])" table:style-name="ce68">
            <text:p><text:s/>12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0" table:formula="of:=SUM([.E296:.E298])" table:style-name="ce72">
            <text:p><text:s/>-<text:s/></text:p>
          </table:table-cell>
          <table:table-cell office:value-type="float" office:value="0" table:formula="of:=SUM([.F296:.F298])" table:style-name="ce72">
            <text:p><text:s/>-<text:s/></text:p>
          </table:table-cell>
          <table:table-cell office:value-type="float" office:value="0" table:formula="of:=SUM([.G296:.G298])" table:style-name="ce72">
            <text:p><text:s/>-<text:s/></text:p>
          </table:table-cell>
          <table:table-cell office:value-type="float" office:value="183" table:formula="of:=SUM([.H296:.H298])" table:style-name="ce72">
            <text:p><text:s/>183<text:s/></text:p>
          </table:table-cell>
          <table:table-cell office:value-type="float" office:value="0" table:formula="of:=SUM([.I296:.I298])" table:style-name="ce72">
            <text:p><text:s/>-<text:s/></text:p>
          </table:table-cell>
          <table:covered-table-cell/>
          <table:table-cell office:value-type="float" office:value="183" table:formula="of:=SUM([.K296:.K298])" table:style-name="ce74">
            <text:p><text:s/>1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640" table:style-name="ce31">
            <text:p><text:s/>640<text:s/></text:p>
          </table:table-cell>
          <table:table-cell office:value-type="float" office:value="125" table:style-name="ce31">
            <text:p><text:s/>125<text:s/></text:p>
          </table:table-cell>
          <table:table-cell office:value-type="float" office:value="225" table:style-name="ce31">
            <text:p><text:s/>225<text:s/></text:p>
          </table:table-cell>
          <table:table-cell office:value-type="float" office:value="429" table:style-name="ce31">
            <text:p><text:s/>429<text:s/></text:p>
          </table:table-cell>
          <table:table-cell office:value-type="float" office:value="19" table:style-name="ce31">
            <text:p><text:s/>19<text:s/></text:p>
          </table:table-cell>
          <table:covered-table-cell/>
          <table:table-cell office:value-type="float" office:value="1438" table:formula="of:=SUM([.E300:.J300])" table:style-name="ce66">
            <text:p><text:s/>1,4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647" table:style-name="ce31">
            <text:p><text:s/>647<text:s/></text:p>
          </table:table-cell>
          <table:table-cell office:value-type="float" office:value="115" table:style-name="ce31">
            <text:p><text:s/>115<text:s/></text:p>
          </table:table-cell>
          <table:table-cell office:value-type="float" office:value="243" table:style-name="ce31">
            <text:p><text:s/>243<text:s/></text:p>
          </table:table-cell>
          <table:table-cell office:value-type="float" office:value="386" table:style-name="ce31">
            <text:p><text:s/>386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391" table:formula="of:=SUM([.E301:.J301])" table:style-name="ce68">
            <text:p><text:s/>1,39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table:style-name="ce31"/>
          <table:table-cell office:value-type="float" office:value="1" table:style-name="ce31">
            <text:p><text:s/>1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6" table:formula="of:=SUM([.E302:.J302])" table:style-name="ce91">
            <text:p><text:s/>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1287" table:formula="of:=SUM([.E300:.E302])" table:style-name="ce72">
            <text:p><text:s/>1,287<text:s/></text:p>
          </table:table-cell>
          <table:table-cell office:value-type="float" office:value="241" table:formula="of:=SUM([.F300:.F302])" table:style-name="ce72">
            <text:p><text:s/>241<text:s/></text:p>
          </table:table-cell>
          <table:table-cell office:value-type="float" office:value="472" table:formula="of:=SUM([.G300:.G302])" table:style-name="ce72">
            <text:p><text:s/>472<text:s/></text:p>
          </table:table-cell>
          <table:table-cell office:value-type="float" office:value="816" table:formula="of:=SUM([.H300:.H302])" table:style-name="ce72">
            <text:p><text:s/>816<text:s/></text:p>
          </table:table-cell>
          <table:table-cell office:value-type="float" office:value="19" table:formula="of:=SUM([.I300:.I302])" table:style-name="ce72">
            <text:p><text:s/>19<text:s/></text:p>
          </table:table-cell>
          <table:covered-table-cell/>
          <table:table-cell office:value-type="float" office:value="2835" table:formula="of:=SUM([.K300:.K302])" table:style-name="ce74">
            <text:p><text:s/>2,8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44" table:style-name="ce31">
            <text:p><text:s/>44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419" table:style-name="ce31">
            <text:p><text:s/>419<text:s/></text:p>
          </table:table-cell>
          <table:table-cell office:value-type="float" office:value="138" table:style-name="ce31">
            <text:p><text:s/>138<text:s/></text:p>
          </table:table-cell>
          <table:table-cell office:value-type="float" office:value="140" table:style-name="ce31">
            <text:p><text:s/>140<text:s/></text:p>
          </table:table-cell>
          <table:covered-table-cell/>
          <table:table-cell office:value-type="float" office:value="750" table:formula="of:=SUM([.E304:.J304])" table:style-name="ce66">
            <text:p><text:s/>750<text:s/></text:p>
          </table:table-cell>
          <table:table-cell table:number-columns-repeated="16373"/>
        </table:table-row>
        <table:table-row table:style-name="ro8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31" table:style-name="ce31">
            <text:p><text:s/>31<text:s/></text:p>
          </table:table-cell>
          <table:table-cell office:value-type="float" office:value="48" table:style-name="ce31">
            <text:p><text:s/>48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79" table:formula="of:=SUM([.E305:.J305])" table:style-name="ce68">
            <text:p><text:s/>79<text:s/></text:p>
          </table:table-cell>
          <table:table-cell table:number-columns-repeated="16373"/>
        </table:table-row>
        <table:table-row table:style-name="ro8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306:.J306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75" table:formula="of:=SUM([.E304:.E306])" table:style-name="ce72">
            <text:p><text:s/>75<text:s/></text:p>
          </table:table-cell>
          <table:table-cell office:value-type="float" office:value="57" table:formula="of:=SUM([.F304:.F306])" table:style-name="ce72">
            <text:p><text:s/>57<text:s/></text:p>
          </table:table-cell>
          <table:table-cell office:value-type="float" office:value="419" table:formula="of:=SUM([.G304:.G306])" table:style-name="ce72">
            <text:p><text:s/>419<text:s/></text:p>
          </table:table-cell>
          <table:table-cell office:value-type="float" office:value="138" table:formula="of:=SUM([.H304:.H306])" table:style-name="ce72">
            <text:p><text:s/>138<text:s/></text:p>
          </table:table-cell>
          <table:table-cell office:value-type="float" office:value="140" table:formula="of:=SUM([.I304:.I306])" table:style-name="ce72">
            <text:p><text:s/>140<text:s/></text:p>
          </table:table-cell>
          <table:covered-table-cell/>
          <table:table-cell office:value-type="float" office:value="829" table:formula="of:=SUM([.K304:.K306])" table:style-name="ce74">
            <text:p><text:s/>8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235" table:style-name="ce64">
            <text:p><text:s/>235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35" table:formula="of:=SUM([.E308:.J308])" table:style-name="ce66">
            <text:p><text:s/>2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309:.J309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310:.J310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0" table:formula="of:=SUM([.E308:.E310])" table:style-name="ce72">
            <text:p><text:s/>-<text:s/></text:p>
          </table:table-cell>
          <table:table-cell office:value-type="float" office:value="0" table:formula="of:=SUM([.F308:.F310])" table:style-name="ce72">
            <text:p><text:s/>-<text:s/></text:p>
          </table:table-cell>
          <table:table-cell office:value-type="float" office:value="0" table:formula="of:=SUM([.G308:.G310])" table:style-name="ce72">
            <text:p><text:s/>-<text:s/></text:p>
          </table:table-cell>
          <table:table-cell office:value-type="float" office:value="235" table:formula="of:=SUM([.H308:.H310])" table:style-name="ce72">
            <text:p><text:s/>235<text:s/></text:p>
          </table:table-cell>
          <table:table-cell office:value-type="float" office:value="0" table:formula="of:=SUM([.I308:.I310])" table:style-name="ce72">
            <text:p><text:s/>-<text:s/></text:p>
          </table:table-cell>
          <table:covered-table-cell/>
          <table:table-cell office:value-type="float" office:value="235" table:formula="of:=SUM([.K308:.K310])" table:style-name="ce74">
            <text:p><text:s/>23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9 Total</text:p>
          </table:table-cell>
          <table:table-cell table:style-name="ce95"/>
          <table:table-cell table:style-name="ce92"/>
          <table:table-cell office:value-type="float" office:value="1362" table:formula="of:=+[.E311]+[.E307]+[.E303]+[.E299]" table:style-name="ce84">
            <text:p><text:s/>1,362<text:s/></text:p>
          </table:table-cell>
          <table:table-cell office:value-type="float" office:value="298" table:formula="of:=+[.F311]+[.F307]+[.F303]+[.F299]" table:style-name="ce84">
            <text:p><text:s/>298<text:s/></text:p>
          </table:table-cell>
          <table:table-cell office:value-type="float" office:value="891" table:formula="of:=+[.G311]+[.G307]+[.G303]+[.G299]" table:style-name="ce84">
            <text:p><text:s/>891<text:s/></text:p>
          </table:table-cell>
          <table:table-cell office:value-type="float" office:value="1372" table:formula="of:=+[.H311]+[.H307]+[.H303]+[.H299]" table:style-name="ce84">
            <text:p><text:s/>1,372<text:s/></text:p>
          </table:table-cell>
          <table:table-cell office:value-type="float" office:value="159" table:formula="of:=+[.I311]+[.I307]+[.I303]+[.I299]" table:style-name="ce84">
            <text:p><text:s/>159<text:s/></text:p>
          </table:table-cell>
          <table:table-cell table:style-name="ce85"/>
          <table:table-cell office:value-type="float" office:value="4082" table:formula="of:=+[.K311]+[.K307]+[.K303]+[.K299]" table:style-name="ce104">
            <text:p><text:s/>4,08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0" table:number-columns-spanned="1" table:number-rows-spanned="16" table:style-name="ce408">
            <text:p>2020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24" table:style-name="ce64">
            <text:p><text:s/>2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4" table:style-name="ce31">
            <text:p><text:s/>14<text:s/></text:p>
          </table:table-cell>
          <table:table-cell office:value-type="float" office:value="0" table:style-name="ce64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38" table:formula="of:=SUM([.E313:.J313])" table:style-name="ce68">
            <text:p><text:s/>3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23" table:style-name="ce64">
            <text:p><text:s/>23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3" table:formula="of:=SUM([.E314:.J314])" table:style-name="ce68">
            <text:p><text:s/>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32" table:style-name="ce64">
            <text:p><text:s/>132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32" table:formula="of:=SUM([.E315:.J315])" table:style-name="ce68">
            <text:p><text:s/>1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24" table:formula="of:=SUM([.E313:.E315])" table:style-name="ce72">
            <text:p><text:s/>24<text:s/></text:p>
          </table:table-cell>
          <table:table-cell office:value-type="float" office:value="0" table:formula="of:=SUM([.F313:.F315])" table:style-name="ce72">
            <text:p><text:s/>-<text:s/></text:p>
          </table:table-cell>
          <table:table-cell office:value-type="float" office:value="0" table:formula="of:=SUM([.G313:.G315])" table:style-name="ce72">
            <text:p><text:s/>-<text:s/></text:p>
          </table:table-cell>
          <table:table-cell office:value-type="float" office:value="169" table:formula="of:=SUM([.H313:.H315])" table:style-name="ce72">
            <text:p><text:s/>169<text:s/></text:p>
          </table:table-cell>
          <table:table-cell office:value-type="float" office:value="0" table:formula="of:=SUM([.I313:.I315])" table:style-name="ce72">
            <text:p><text:s/>-<text:s/></text:p>
          </table:table-cell>
          <table:covered-table-cell/>
          <table:table-cell office:value-type="float" office:value="193" table:formula="of:=SUM([.K313:.K315])" table:style-name="ce74">
            <text:p><text:s/>1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81" table:style-name="ce31">
            <text:p><text:s/>81<text:s/></text:p>
          </table:table-cell>
          <table:table-cell office:value-type="float" office:value="68" table:style-name="ce31">
            <text:p><text:s/>68<text:s/></text:p>
          </table:table-cell>
          <table:table-cell office:value-type="float" office:value="463" table:style-name="ce31">
            <text:p><text:s/>463<text:s/></text:p>
          </table:table-cell>
          <table:table-cell office:value-type="float" office:value="381" table:style-name="ce31">
            <text:p><text:s/>381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993" table:formula="of:=SUM([.E317:.J317])" table:style-name="ce66">
            <text:p><text:s/>9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433" table:style-name="ce31">
            <text:p><text:s/>433<text:s/></text:p>
          </table:table-cell>
          <table:table-cell office:value-type="float" office:value="97" table:style-name="ce31">
            <text:p><text:s/>97<text:s/></text:p>
          </table:table-cell>
          <table:table-cell office:value-type="float" office:value="211" table:style-name="ce31">
            <text:p><text:s/>211<text:s/></text:p>
          </table:table-cell>
          <table:table-cell office:value-type="float" office:value="415" table:style-name="ce31">
            <text:p><text:s/>415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156" table:formula="of:=SUM([.E318:.J318])" table:style-name="ce68">
            <text:p><text:s/>1,15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4" table:formula="of:=SUM([.E319:.J319])" table:style-name="ce91">
            <text:p><text:s/>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514" table:formula="of:=SUM([.E317:.E319])" table:style-name="ce72">
            <text:p><text:s/>514<text:s/></text:p>
          </table:table-cell>
          <table:table-cell office:value-type="float" office:value="165" table:formula="of:=SUM([.F317:.F319])" table:style-name="ce72">
            <text:p><text:s/>165<text:s/></text:p>
          </table:table-cell>
          <table:table-cell office:value-type="float" office:value="677" table:formula="of:=SUM([.G317:.G319])" table:style-name="ce72">
            <text:p><text:s/>677<text:s/></text:p>
          </table:table-cell>
          <table:table-cell office:value-type="float" office:value="797" table:formula="of:=SUM([.H317:.H319])" table:style-name="ce72">
            <text:p><text:s/>797<text:s/></text:p>
          </table:table-cell>
          <table:table-cell office:value-type="float" office:value="0" table:formula="of:=SUM([.I317:.I319])" table:style-name="ce72">
            <text:p><text:s/>-<text:s/></text:p>
          </table:table-cell>
          <table:covered-table-cell/>
          <table:table-cell office:value-type="float" office:value="2153" table:formula="of:=SUM([.K317:.K319])" table:style-name="ce74">
            <text:p><text:s/>2,1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277" table:style-name="ce31">
            <text:p><text:s/>277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174" table:style-name="ce31">
            <text:p><text:s/>174<text:s/></text:p>
          </table:table-cell>
          <table:table-cell office:value-type="float" office:value="106" table:style-name="ce31">
            <text:p><text:s/>106<text:s/></text:p>
          </table:table-cell>
          <table:table-cell office:value-type="float" office:value="85" table:style-name="ce31">
            <text:p><text:s/>85<text:s/></text:p>
          </table:table-cell>
          <table:covered-table-cell/>
          <table:table-cell office:value-type="float" office:value="646" table:formula="of:=SUM([.E321:.J321])" table:style-name="ce66">
            <text:p><text:s/>6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04" table:style-name="ce31">
            <text:p><text:s/>204<text:s/></text:p>
          </table:table-cell>
          <table:table-cell office:value-type="float" office:value="71" table:style-name="ce31">
            <text:p><text:s/>71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75" table:formula="of:=SUM([.E322:.J322])" table:style-name="ce68">
            <text:p><text:s/>2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323:.J323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481" table:formula="of:=SUM([.E321:.E323])" table:style-name="ce72">
            <text:p><text:s/>481<text:s/></text:p>
          </table:table-cell>
          <table:table-cell office:value-type="float" office:value="75" table:formula="of:=SUM([.F321:.F323])" table:style-name="ce72">
            <text:p><text:s/>75<text:s/></text:p>
          </table:table-cell>
          <table:table-cell office:value-type="float" office:value="174" table:formula="of:=SUM([.G321:.G323])" table:style-name="ce72">
            <text:p><text:s/>174<text:s/></text:p>
          </table:table-cell>
          <table:table-cell office:value-type="float" office:value="106" table:formula="of:=SUM([.H321:.H323])" table:style-name="ce72">
            <text:p><text:s/>106<text:s/></text:p>
          </table:table-cell>
          <table:table-cell office:value-type="float" office:value="85" table:formula="of:=SUM([.I321:.I323])" table:style-name="ce72">
            <text:p><text:s/>85<text:s/></text:p>
          </table:table-cell>
          <table:covered-table-cell/>
          <table:table-cell office:value-type="float" office:value="921" table:formula="of:=SUM([.K321:.K323])" table:style-name="ce74">
            <text:p><text:s/>9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156" table:style-name="ce31">
            <text:p><text:s/>15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16" table:style-name="ce64">
            <text:p><text:s/>116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272" table:formula="of:=SUM([.E325:.J325])" table:style-name="ce66">
            <text:p><text:s/>2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326:.J326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327:.J327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156" table:formula="of:=SUM([.E325:.E327])" table:style-name="ce72">
            <text:p><text:s/>156<text:s/></text:p>
          </table:table-cell>
          <table:table-cell office:value-type="float" office:value="0" table:formula="of:=SUM([.F325:.F327])" table:style-name="ce72">
            <text:p><text:s/>-<text:s/></text:p>
          </table:table-cell>
          <table:table-cell office:value-type="float" office:value="0" table:formula="of:=SUM([.G325:.G327])" table:style-name="ce72">
            <text:p><text:s/>-<text:s/></text:p>
          </table:table-cell>
          <table:table-cell office:value-type="float" office:value="116" table:formula="of:=SUM([.H325:.H327])" table:style-name="ce72">
            <text:p><text:s/>116<text:s/></text:p>
          </table:table-cell>
          <table:table-cell office:value-type="float" office:value="0" table:formula="of:=SUM([.I325:.I327])" table:style-name="ce72">
            <text:p><text:s/>-<text:s/></text:p>
          </table:table-cell>
          <table:covered-table-cell/>
          <table:table-cell office:value-type="float" office:value="272" table:formula="of:=SUM([.K325:.K327])" table:style-name="ce74">
            <text:p><text:s/>27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20 Total</text:p>
          </table:table-cell>
          <table:table-cell table:style-name="ce95"/>
          <table:table-cell table:style-name="ce92"/>
          <table:table-cell office:value-type="float" office:value="1175" table:formula="of:=+[.E328]+[.E324]+[.E320]+[.E316]" table:style-name="ce84">
            <text:p><text:s/>1,175<text:s/></text:p>
          </table:table-cell>
          <table:table-cell office:value-type="float" office:value="240" table:formula="of:=+[.F328]+[.F324]+[.F320]+[.F316]" table:style-name="ce84">
            <text:p><text:s/>240<text:s/></text:p>
          </table:table-cell>
          <table:table-cell office:value-type="float" office:value="851" table:formula="of:=+[.G328]+[.G324]+[.G320]+[.G316]" table:style-name="ce84">
            <text:p><text:s/>851<text:s/></text:p>
          </table:table-cell>
          <table:table-cell office:value-type="float" office:value="1188" table:formula="of:=+[.H328]+[.H324]+[.H320]+[.H316]" table:style-name="ce84">
            <text:p><text:s/>1,188<text:s/></text:p>
          </table:table-cell>
          <table:table-cell office:value-type="float" office:value="85" table:formula="of:=+[.I328]+[.I324]+[.I320]+[.I316]" table:style-name="ce84">
            <text:p><text:s/>85<text:s/></text:p>
          </table:table-cell>
          <table:table-cell table:style-name="ce85"/>
          <table:table-cell office:value-type="float" office:value="3539" table:formula="of:=+[.K328]+[.K324]+[.K320]+[.K316]" table:style-name="ce104">
            <text:p><text:s/>3,53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1" table:number-columns-spanned="1" table:number-rows-spanned="16" table:style-name="ce408">
            <text:p>2021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64">
            <text:p><text:s/>-<text:s/></text:p>
          </table:table-cell>
          <table:table-cell office:value-type="string" table:number-columns-spanned="1" table:number-rows-spanned="16" table:style-name="ce413">
            <text:p>See table note</text:p>
          </table:table-cell>
          <table:table-cell office:value-type="float" office:value="2" table:formula="of:=SUM([.E330:.J330])" table:style-name="ce68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2" table:style-name="ce64">
            <text:p><text:s/>12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12" table:formula="of:=SUM([.E331:.J331])" table:style-name="ce68">
            <text:p><text:s/>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11" table:style-name="ce64">
            <text:p><text:s/>111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11" table:formula="of:=SUM([.E332:.J332])" table:style-name="ce68">
            <text:p><text:s/>1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0" table:formula="of:=SUM([.E330:.E332])" table:style-name="ce72">
            <text:p><text:s/>-<text:s/></text:p>
          </table:table-cell>
          <table:table-cell office:value-type="float" office:value="0" table:formula="of:=SUM([.F330:.F332])" table:style-name="ce72">
            <text:p><text:s/>-<text:s/></text:p>
          </table:table-cell>
          <table:table-cell office:value-type="float" office:value="0" table:formula="of:=SUM([.G330:.G332])" table:style-name="ce72">
            <text:p><text:s/>-<text:s/></text:p>
          </table:table-cell>
          <table:table-cell office:value-type="float" office:value="125" table:formula="of:=SUM([.H330:.H332])" table:style-name="ce72">
            <text:p><text:s/>125<text:s/></text:p>
          </table:table-cell>
          <table:table-cell office:value-type="float" office:value="0" table:formula="of:=SUM([.I330:.I332])" table:style-name="ce72">
            <text:p><text:s/>-<text:s/></text:p>
          </table:table-cell>
          <table:covered-table-cell/>
          <table:table-cell office:value-type="float" office:value="125" table:formula="of:=SUM([.K330:.K332])" table:style-name="ce74">
            <text:p><text:s/>1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80" table:style-name="ce31">
            <text:p><text:s/>80<text:s/></text:p>
          </table:table-cell>
          <table:table-cell office:value-type="float" office:value="62" table:style-name="ce31">
            <text:p><text:s/>62<text:s/></text:p>
          </table:table-cell>
          <table:table-cell office:value-type="float" office:value="633" table:style-name="ce31">
            <text:p><text:s/>633<text:s/></text:p>
          </table:table-cell>
          <table:table-cell office:value-type="float" office:value="664" table:style-name="ce31">
            <text:p><text:s/>664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439" table:formula="of:=SUM([.E334:.J334])" table:style-name="ce66">
            <text:p><text:s/>1,43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356" table:style-name="ce31">
            <text:p><text:s/>356<text:s/></text:p>
          </table:table-cell>
          <table:table-cell office:value-type="float" office:value="125" table:style-name="ce31">
            <text:p><text:s/>125<text:s/></text:p>
          </table:table-cell>
          <table:table-cell office:value-type="float" office:value="272" table:style-name="ce31">
            <text:p><text:s/>272<text:s/></text:p>
          </table:table-cell>
          <table:table-cell office:value-type="float" office:value="419" table:style-name="ce31">
            <text:p><text:s/>419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172" table:formula="of:=SUM([.E335:.J335])" table:style-name="ce68">
            <text:p><text:s/>1,1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5" table:formula="of:=SUM([.E336:.J336])" table:style-name="ce91">
            <text:p><text:s/>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436" table:formula="of:=SUM([.E334:.E336])" table:style-name="ce72">
            <text:p><text:s/>436<text:s/></text:p>
          </table:table-cell>
          <table:table-cell office:value-type="float" office:value="187" table:formula="of:=SUM([.F334:.F336])" table:style-name="ce72">
            <text:p><text:s/>187<text:s/></text:p>
          </table:table-cell>
          <table:table-cell office:value-type="float" office:value="909" table:formula="of:=SUM([.G334:.G336])" table:style-name="ce72">
            <text:p><text:s/>909<text:s/></text:p>
          </table:table-cell>
          <table:table-cell office:value-type="float" office:value="1084" table:formula="of:=SUM([.H334:.H336])" table:style-name="ce72">
            <text:p><text:s/>1,084<text:s/></text:p>
          </table:table-cell>
          <table:table-cell office:value-type="float" office:value="0" table:formula="of:=SUM([.I334:.I336])" table:style-name="ce72">
            <text:p><text:s/>-<text:s/></text:p>
          </table:table-cell>
          <table:covered-table-cell/>
          <table:table-cell office:value-type="float" office:value="2616" table:formula="of:=SUM([.K334:.K336])" table:style-name="ce74">
            <text:p><text:s/>2,6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103" table:style-name="ce31">
            <text:p><text:s/>103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147" table:style-name="ce31">
            <text:p><text:s/>147<text:s/></text:p>
          </table:table-cell>
          <table:table-cell office:value-type="float" office:value="88" table:style-name="ce31">
            <text:p><text:s/>88<text:s/></text:p>
          </table:table-cell>
          <table:table-cell office:value-type="float" office:value="88" table:style-name="ce31">
            <text:p><text:s/>88<text:s/></text:p>
          </table:table-cell>
          <table:covered-table-cell/>
          <table:table-cell office:value-type="float" office:value="429" table:formula="of:=SUM([.E338:.J338])" table:style-name="ce66">
            <text:p><text:s/>4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89" table:style-name="ce31">
            <text:p><text:s/>189<text:s/></text:p>
          </table:table-cell>
          <table:table-cell office:value-type="float" office:value="31" table:style-name="ce31">
            <text:p><text:s/>3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220" table:formula="of:=SUM([.E339:.J339])" table:style-name="ce68">
            <text:p><text:s/>2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340:.J340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292" table:formula="of:=SUM([.E338:.E340])" table:style-name="ce72">
            <text:p><text:s/>292<text:s/></text:p>
          </table:table-cell>
          <table:table-cell office:value-type="float" office:value="34" table:formula="of:=SUM([.F338:.F340])" table:style-name="ce72">
            <text:p><text:s/>34<text:s/></text:p>
          </table:table-cell>
          <table:table-cell office:value-type="float" office:value="147" table:formula="of:=SUM([.G338:.G340])" table:style-name="ce72">
            <text:p><text:s/>147<text:s/></text:p>
          </table:table-cell>
          <table:table-cell office:value-type="float" office:value="88" table:formula="of:=SUM([.H338:.H340])" table:style-name="ce72">
            <text:p><text:s/>88<text:s/></text:p>
          </table:table-cell>
          <table:table-cell office:value-type="float" office:value="88" table:formula="of:=SUM([.I338:.I340])" table:style-name="ce72">
            <text:p><text:s/>88<text:s/></text:p>
          </table:table-cell>
          <table:covered-table-cell/>
          <table:table-cell office:value-type="float" office:value="649" table:formula="of:=SUM([.K338:.K340])" table:style-name="ce74">
            <text:p><text:s/>6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211" table:style-name="ce31">
            <text:p><text:s/>21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112" table:style-name="ce64">
            <text:p><text:s/>112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323" table:formula="of:=SUM([.E342:.J342])" table:style-name="ce66">
            <text:p><text:s/>3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covered-table-cell/>
          <table:table-cell office:value-type="float" office:value="0" table:formula="of:=SUM([.E343:.J343])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64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formula="of:=SUM([.E344:.J344])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211" table:formula="of:=SUM([.E342:.E344])" table:style-name="ce72">
            <text:p><text:s/>211<text:s/></text:p>
          </table:table-cell>
          <table:table-cell office:value-type="float" office:value="0" table:formula="of:=SUM([.F342:.F344])" table:style-name="ce72">
            <text:p><text:s/>-<text:s/></text:p>
          </table:table-cell>
          <table:table-cell office:value-type="float" office:value="0" table:formula="of:=SUM([.G342:.G344])" table:style-name="ce72">
            <text:p><text:s/>-<text:s/></text:p>
          </table:table-cell>
          <table:table-cell office:value-type="float" office:value="112" table:formula="of:=SUM([.H342:.H344])" table:style-name="ce72">
            <text:p><text:s/>112<text:s/></text:p>
          </table:table-cell>
          <table:table-cell office:value-type="float" office:value="0" table:formula="of:=SUM([.I342:.I344])" table:style-name="ce72">
            <text:p><text:s/>-<text:s/></text:p>
          </table:table-cell>
          <table:covered-table-cell/>
          <table:table-cell office:value-type="float" office:value="323" table:formula="of:=SUM([.K342:.K344])" table:style-name="ce74">
            <text:p><text:s/>323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21 Total</text:p>
          </table:table-cell>
          <table:table-cell table:style-name="ce95"/>
          <table:table-cell table:style-name="ce92"/>
          <table:table-cell office:value-type="float" office:value="939" table:formula="of:=+[.E345]+[.E341]+[.E337]+[.E333]" table:style-name="ce84">
            <text:p><text:s/>939<text:s/></text:p>
          </table:table-cell>
          <table:table-cell office:value-type="float" office:value="221" table:formula="of:=+[.F345]+[.F341]+[.F337]+[.F333]" table:style-name="ce84">
            <text:p><text:s/>221<text:s/></text:p>
          </table:table-cell>
          <table:table-cell office:value-type="float" office:value="1056" table:formula="of:=+[.G345]+[.G341]+[.G337]+[.G333]" table:style-name="ce84">
            <text:p><text:s/>1,056<text:s/></text:p>
          </table:table-cell>
          <table:table-cell office:value-type="float" office:value="1409" table:formula="of:=+[.H345]+[.H341]+[.H337]+[.H333]" table:style-name="ce84">
            <text:p><text:s/>1,409<text:s/></text:p>
          </table:table-cell>
          <table:table-cell office:value-type="float" office:value="88" table:formula="of:=+[.I345]+[.I341]+[.I337]+[.I333]" table:style-name="ce84">
            <text:p><text:s/>88<text:s/></text:p>
          </table:table-cell>
          <table:table-cell table:style-name="ce85"/>
          <table:table-cell office:value-type="float" office:value="3713" table:formula="of:=+[.K345]+[.K341]+[.K337]+[.K333]" table:style-name="ce104">
            <text:p><text:s/>3,71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2" table:number-columns-spanned="1" table:number-rows-spanned="16" table:style-name="ce408">
            <text:p>2022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185.58" table:style-name="ce308">
            <text:p><text:s text:c="2"/>7</text:p>
          </table:table-cell>
          <table:table-cell office:value-type="float" office:value="0" table:style-name="ce31">
            <text:p><text:s/>-<text:s/></text:p>
          </table:table-cell>
          <table:table-cell office:value-type="string" table:number-columns-spanned="1" table:number-rows-spanned="16" table:style-name="ce410">
            <text:p>See table note</text:p>
          </table:table-cell>
          <table:table-cell office:value-type="float" office:value="7185.58" table:formula="of:=SUM([.E347:.J347])" table:style-name="ce309">
            <text:p><text:s text:c="2"/>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2613.510000000002" table:style-name="ce308">
            <text:p><text:s text:c="2"/>13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2613.510000000002" table:formula="of:=SUM([.E348:.J348])" table:style-name="ce309">
            <text:p><text:s text:c="2"/>13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08704.64600000007" table:style-name="ce308">
            <text:p><text:s text:c="2"/>109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08704.64600000007" table:formula="of:=SUM([.E349:.J349])" table:style-name="ce309">
            <text:p><text:s text:c="2"/>10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0" table:formula="of:=SUM([.E347:.E349])" table:style-name="ce310">
            <text:p><text:s text:c="2"/>0</text:p>
          </table:table-cell>
          <table:table-cell office:value-type="float" office:value="0" table:formula="of:=SUM([.F347:.F349])" table:style-name="ce310">
            <text:p><text:s text:c="2"/>0</text:p>
          </table:table-cell>
          <table:table-cell office:value-type="float" office:value="0" table:formula="of:=SUM([.G347:.G349])" table:style-name="ce310">
            <text:p><text:s text:c="2"/>0</text:p>
          </table:table-cell>
          <table:table-cell office:value-type="float" office:value="128503.73600000006" table:formula="of:=SUM([.H347:.H349])" table:style-name="ce310">
            <text:p><text:s text:c="2"/>129</text:p>
          </table:table-cell>
          <table:table-cell office:value-type="float" office:value="0" table:formula="of:=SUM([.I347:.I349])" table:style-name="ce310">
            <text:p><text:s text:c="2"/>0</text:p>
          </table:table-cell>
          <table:covered-table-cell/>
          <table:table-cell office:value-type="float" office:value="128503.73600000006" table:formula="of:=SUM([.K347:.K349])" table:style-name="ce311">
            <text:p><text:s text:c="2"/>12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46569.07" table:style-name="ce308">
            <text:p><text:s text:c="2"/>47</text:p>
          </table:table-cell>
          <table:table-cell office:value-type="float" office:value="62230.76" table:style-name="ce302">
            <text:p><text:s text:c="2"/>62</text:p>
          </table:table-cell>
          <table:table-cell office:value-type="float" office:value="621416.76" table:style-name="ce302">
            <text:p><text:s text:c="2"/>621</text:p>
          </table:table-cell>
          <table:table-cell office:value-type="float" office:value="401861.11" table:style-name="ce302">
            <text:p><text:s text:c="2"/>402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132077.7" table:formula="of:=SUM([.E351:.J351])" table:style-name="ce312">
            <text:p><text:s text:c="2"/>1,132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211597.86" table:style-name="ce308">
            <text:p><text:s text:c="2"/>212</text:p>
          </table:table-cell>
          <table:table-cell office:value-type="float" office:value="119425.94" table:style-name="ce302">
            <text:p><text:s text:c="2"/>119</text:p>
          </table:table-cell>
          <table:table-cell office:value-type="float" office:value="480950.65" table:style-name="ce302">
            <text:p><text:s text:c="2"/>481</text:p>
          </table:table-cell>
          <table:table-cell office:value-type="float" office:value="500449.73" table:style-name="ce302">
            <text:p><text:s text:c="2"/>500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312424.18" table:formula="of:=SUM([.E352:.J352])" table:style-name="ce309">
            <text:p><text:s text:c="2"/>1,312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165.1799999999985" table:style-name="ce308">
            <text:p><text:s text:c="2"/>4</text:p>
          </table:table-cell>
          <table:table-cell office:value-type="float" office:value="711.49999999999989" table:style-name="ce308">
            <text:p><text:s text:c="2"/>1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4876.6799999999985" table:formula="of:=SUM([.E353:.J353])" table:style-name="ce313">
            <text:p><text:s text:c="2"/>5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258166.93" table:formula="of:=SUM([.E351:.E353])" table:style-name="ce310">
            <text:p><text:s text:c="2"/>258</text:p>
          </table:table-cell>
          <table:table-cell office:value-type="float" office:value="181656.7" table:formula="of:=SUM([.F351:.F353])" table:style-name="ce310">
            <text:p><text:s text:c="2"/>182</text:p>
          </table:table-cell>
          <table:table-cell office:value-type="float" office:value="1106532.5900000001" table:formula="of:=SUM([.G351:.G353])" table:style-name="ce310">
            <text:p><text:s text:c="2"/>1,107</text:p>
          </table:table-cell>
          <table:table-cell office:value-type="float" office:value="903022.34" table:formula="of:=SUM([.H351:.H353])" table:style-name="ce310">
            <text:p><text:s text:c="2"/>903</text:p>
          </table:table-cell>
          <table:table-cell office:value-type="float" office:value="0" table:formula="of:=SUM([.I351:.I353])" table:style-name="ce310">
            <text:p><text:s text:c="2"/>0</text:p>
          </table:table-cell>
          <table:covered-table-cell/>
          <table:table-cell office:value-type="float" office:value="2449378.56" table:formula="of:=SUM([.K351:.K353])" table:style-name="ce311">
            <text:p><text:s text:c="2"/>2,44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293228.39" table:style-name="ce308">
            <text:p><text:s text:c="2"/>293</text:p>
          </table:table-cell>
          <table:table-cell office:value-type="float" office:value="14944.49" table:style-name="ce308">
            <text:p><text:s text:c="2"/>15</text:p>
          </table:table-cell>
          <table:table-cell office:value-type="float" office:value="130187.18" table:style-name="ce308">
            <text:p><text:s text:c="2"/>130</text:p>
          </table:table-cell>
          <table:table-cell office:value-type="float" office:value="26902" table:style-name="ce308">
            <text:p><text:s text:c="2"/>27</text:p>
          </table:table-cell>
          <table:table-cell office:value-type="float" office:value="88208" table:style-name="ce308">
            <text:p><text:s text:c="2"/>88</text:p>
          </table:table-cell>
          <table:covered-table-cell/>
          <table:table-cell office:value-type="float" office:value="553470.06000000006" table:formula="of:=SUM([.E355:.J355])" table:style-name="ce312">
            <text:p><text:s text:c="2"/>553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5775.039999999997" table:style-name="ce308">
            <text:p><text:s text:c="2"/>26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25775.039999999997" table:formula="of:=SUM([.E356:.J356])" table:style-name="ce309">
            <text:p><text:s text:c="2"/>26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style-name="ce3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293228.39" table:formula="of:=SUM([.E355:.E357])" table:style-name="ce310">
            <text:p><text:s text:c="2"/>293</text:p>
          </table:table-cell>
          <table:table-cell office:value-type="float" office:value="40719.53" table:formula="of:=SUM([.F355:.F357])" table:style-name="ce310">
            <text:p><text:s text:c="2"/>41</text:p>
          </table:table-cell>
          <table:table-cell office:value-type="float" office:value="130187.18" table:formula="of:=SUM([.G355:.G357])" table:style-name="ce310">
            <text:p><text:s text:c="2"/>130</text:p>
          </table:table-cell>
          <table:table-cell office:value-type="float" office:value="26902" table:formula="of:=SUM([.H355:.H357])" table:style-name="ce310">
            <text:p><text:s text:c="2"/>27</text:p>
          </table:table-cell>
          <table:table-cell office:value-type="float" office:value="88208" table:formula="of:=SUM([.I355:.I357])" table:style-name="ce310">
            <text:p><text:s text:c="2"/>88</text:p>
          </table:table-cell>
          <table:covered-table-cell/>
          <table:table-cell office:value-type="float" office:value="579245.10000000009" table:formula="of:=SUM([.K355:.K357])" table:style-name="ce311">
            <text:p><text:s text:c="2"/>57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14149" table:style-name="ce308">
            <text:p><text:s text:c="2"/>14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14641.307" table:style-name="ce308">
            <text:p><text:s text:c="2"/>115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28790.307" table:formula="of:=SUM([.E359:.J359])" table:style-name="ce312">
            <text:p><text:s text:c="2"/>129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14149" table:formula="of:=SUM([.E359:.E361])" table:style-name="ce310">
            <text:p><text:s text:c="2"/>14</text:p>
          </table:table-cell>
          <table:table-cell office:value-type="float" office:value="0" table:formula="of:=SUM([.F359:.F361])" table:style-name="ce310">
            <text:p><text:s text:c="2"/>0</text:p>
          </table:table-cell>
          <table:table-cell office:value-type="float" office:value="0" table:formula="of:=SUM([.G359:.G361])" table:style-name="ce310">
            <text:p><text:s text:c="2"/>0</text:p>
          </table:table-cell>
          <table:table-cell office:value-type="float" office:value="114641.307" table:formula="of:=SUM([.H359:.H361])" table:style-name="ce310">
            <text:p><text:s text:c="2"/>115</text:p>
          </table:table-cell>
          <table:table-cell office:value-type="float" office:value="0" table:formula="of:=SUM([.I359:.I361])" table:style-name="ce310">
            <text:p><text:s text:c="2"/>0</text:p>
          </table:table-cell>
          <table:covered-table-cell/>
          <table:table-cell office:value-type="float" office:value="128790.307" table:formula="of:=SUM([.K359:.K361])" table:style-name="ce311">
            <text:p><text:s text:c="2"/>129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22 Total</text:p>
          </table:table-cell>
          <table:table-cell table:style-name="ce95"/>
          <table:table-cell table:style-name="ce92"/>
          <table:table-cell office:value-type="float" office:value="565544.32000000007" table:formula="of:=+[.E362]+[.E358]+[.E354]+[.E350]" table:style-name="ce314">
            <text:p><text:s text:c="2"/>566</text:p>
          </table:table-cell>
          <table:table-cell office:value-type="float" office:value="222376.23" table:formula="of:=+[.F362]+[.F358]+[.F354]+[.F350]" table:style-name="ce314">
            <text:p><text:s text:c="2"/>222</text:p>
          </table:table-cell>
          <table:table-cell office:value-type="float" office:value="1236719.77" table:formula="of:=+[.G362]+[.G358]+[.G354]+[.G350]" table:style-name="ce314">
            <text:p><text:s text:c="2"/>1,237</text:p>
          </table:table-cell>
          <table:table-cell office:value-type="float" office:value="1173069.3830000001" table:formula="of:=+[.H362]+[.H358]+[.H354]+[.H350]" table:style-name="ce314">
            <text:p><text:s text:c="2"/>1,173</text:p>
          </table:table-cell>
          <table:table-cell office:value-type="float" office:value="88208" table:formula="of:=+[.I362]+[.I358]+[.I354]+[.I350]" table:style-name="ce314">
            <text:p><text:s text:c="2"/>88</text:p>
          </table:table-cell>
          <table:table-cell table:style-name="ce315"/>
          <table:table-cell office:value-type="float" office:value="3285917.7030000002" table:formula="of:=+[.K362]+[.K358]+[.K354]+[.K350]" table:style-name="ce316">
            <text:p><text:s text:c="2"/>3,286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3" table:number-columns-spanned="1" table:number-rows-spanned="16" table:style-name="ce408">
            <text:p>2023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28944" table:style-name="ce340">
            <text:p><text:s text:c="2"/>29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407.3440000000001" table:style-name="ce308">
            <text:p><text:s text:c="2"/>7</text:p>
          </table:table-cell>
          <table:table-cell office:value-type="float" office:value="11720" table:style-name="ce340">
            <text:p><text:s text:c="2"/>12</text:p>
          </table:table-cell>
          <table:table-cell office:value-type="string" table:number-columns-spanned="1" table:number-rows-spanned="16" table:style-name="ce410">
            <text:p>See table note</text:p>
          </table:table-cell>
          <table:table-cell office:value-type="float" office:value="48071.343999999997" table:formula="of:=SUM([.E364:.J364])" table:style-name="ce309">
            <text:p><text:s text:c="2"/>48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9610.439999999999" table:style-name="ce308">
            <text:p><text:s text:c="2"/>20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9610.439999999999" table:formula="of:=SUM([.E365:.J365])" table:style-name="ce309">
            <text:p><text:s text:c="2"/>20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15216.091" table:style-name="ce308">
            <text:p><text:s text:c="2"/>115</text:p>
          </table:table-cell>
          <table:table-cell office:value-type="float" office:value="101197.83" table:style-name="ce340">
            <text:p><text:s text:c="2"/>101</text:p>
          </table:table-cell>
          <table:covered-table-cell/>
          <table:table-cell office:value-type="float" office:value="216413.921" table:formula="of:=SUM([.E366:.J366])" table:style-name="ce309">
            <text:p><text:s text:c="2"/>216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28944" table:formula="of:=SUM([.E364:.E366])" table:style-name="ce310">
            <text:p><text:s text:c="2"/>29</text:p>
          </table:table-cell>
          <table:table-cell office:value-type="float" office:value="0" table:formula="of:=SUM([.F364:.F366])" table:style-name="ce310">
            <text:p><text:s text:c="2"/>0</text:p>
          </table:table-cell>
          <table:table-cell office:value-type="float" office:value="0" table:formula="of:=SUM([.G364:.G366])" table:style-name="ce310">
            <text:p><text:s text:c="2"/>0</text:p>
          </table:table-cell>
          <table:table-cell office:value-type="float" office:value="142233.875" table:formula="of:=SUM([.H364:.H366])" table:style-name="ce310">
            <text:p><text:s text:c="2"/>142</text:p>
          </table:table-cell>
          <table:table-cell office:value-type="float" office:value="112917.83" table:formula="of:=SUM([.I364:.I366])" table:style-name="ce310">
            <text:p><text:s text:c="2"/>113</text:p>
          </table:table-cell>
          <table:covered-table-cell/>
          <table:table-cell office:value-type="float" office:value="284095.70500000002" table:formula="of:=SUM([.K364:.K366])" table:style-name="ce311">
            <text:p><text:s text:c="2"/>284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24362.42" table:style-name="ce308">
            <text:p><text:s text:c="2"/>24</text:p>
          </table:table-cell>
          <table:table-cell office:value-type="float" office:value="90808" table:style-name="ce302">
            <text:p><text:s text:c="2"/>91</text:p>
          </table:table-cell>
          <table:table-cell office:value-type="float" office:value="416440" table:style-name="ce302">
            <text:p><text:s text:c="2"/>416</text:p>
          </table:table-cell>
          <table:table-cell office:value-type="float" office:value="283178" table:style-name="ce302">
            <text:p><text:s text:c="2"/>283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814788.42" table:formula="of:=SUM([.E368:.J368])" table:style-name="ce312">
            <text:p><text:s text:c="2"/>815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18210.04" table:style-name="ce308">
            <text:p><text:s text:c="2"/>118</text:p>
          </table:table-cell>
          <table:table-cell office:value-type="float" office:value="91347" table:style-name="ce302">
            <text:p><text:s text:c="2"/>91</text:p>
          </table:table-cell>
          <table:table-cell office:value-type="float" office:value="648513" table:style-name="ce302">
            <text:p><text:s text:c="2"/>649</text:p>
          </table:table-cell>
          <table:table-cell office:value-type="float" office:value="475723" table:style-name="ce302">
            <text:p><text:s text:c="2"/>476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333793.04" table:formula="of:=SUM([.E369:.J369])" table:style-name="ce309">
            <text:p><text:s text:c="2"/>1,33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123.52" table:style-name="ce340">
            <text:p><text:s text:c="2"/>0</text:p>
          </table:table-cell>
          <table:table-cell office:value-type="float" office:value="162.36000000000001" table:style-name="ce341">
            <text:p><text:s text:c="2"/>0</text:p>
          </table:table-cell>
          <table:table-cell office:value-type="float" office:value="4577.24" table:style-name="ce308">
            <text:p><text:s text:c="2"/>5</text:p>
          </table:table-cell>
          <table:table-cell office:value-type="float" office:value="524" table:style-name="ce308">
            <text:p><text:s text:c="2"/>1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5387.12" table:formula="of:=SUM([.E370:.J370])" table:style-name="ce313">
            <text:p><text:s text:c="2"/>5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142695.97999999998" table:formula="of:=SUM([.E368:.E370])" table:style-name="ce310">
            <text:p><text:s text:c="2"/>143</text:p>
          </table:table-cell>
          <table:table-cell office:value-type="float" office:value="182317.36" table:formula="of:=SUM([.F368:.F370])" table:style-name="ce310">
            <text:p><text:s text:c="2"/>182</text:p>
          </table:table-cell>
          <table:table-cell office:value-type="float" office:value="1069530.24" table:formula="of:=SUM([.G368:.G370])" table:style-name="ce310">
            <text:p><text:s text:c="2"/>1,070</text:p>
          </table:table-cell>
          <table:table-cell office:value-type="float" office:value="759425" table:formula="of:=SUM([.H368:.H370])" table:style-name="ce310">
            <text:p><text:s text:c="2"/>759</text:p>
          </table:table-cell>
          <table:table-cell office:value-type="float" office:value="0" table:formula="of:=SUM([.I368:.I370])" table:style-name="ce310">
            <text:p><text:s text:c="2"/>0</text:p>
          </table:table-cell>
          <table:covered-table-cell/>
          <table:table-cell office:value-type="float" office:value="2153968.58" table:formula="of:=SUM([.K368:.K370])" table:style-name="ce311">
            <text:p><text:s text:c="2"/>2,154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141703" table:style-name="ce308">
            <text:p><text:s text:c="2"/>142</text:p>
          </table:table-cell>
          <table:table-cell office:value-type="float" office:value="12295.2" table:style-name="ce308">
            <text:p><text:s text:c="2"/>12</text:p>
          </table:table-cell>
          <table:table-cell office:value-type="float" office:value="209779" table:style-name="ce308">
            <text:p><text:s text:c="2"/>210</text:p>
          </table:table-cell>
          <table:table-cell office:value-type="float" office:value="33992" table:style-name="ce308">
            <text:p><text:s text:c="2"/>34</text:p>
          </table:table-cell>
          <table:table-cell office:value-type="float" office:value="31950" table:style-name="ce308">
            <text:p><text:s text:c="2"/>32</text:p>
          </table:table-cell>
          <table:covered-table-cell/>
          <table:table-cell office:value-type="float" office:value="429719.2" table:formula="of:=SUM([.E372:.J372])" table:style-name="ce312">
            <text:p><text:s text:c="2"/>430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94947" table:style-name="ce340">
            <text:p><text:s text:c="2"/>195</text:p>
          </table:table-cell>
          <table:table-cell office:value-type="float" office:value="16436.72" table:style-name="ce308">
            <text:p><text:s text:c="2"/>16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211383.72" table:formula="of:=SUM([.E373:.J373])" table:style-name="ce309">
            <text:p><text:s text:c="2"/>211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style-name="ce3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336650" table:formula="of:=SUM([.E372:.E374])" table:style-name="ce310">
            <text:p><text:s text:c="2"/>337</text:p>
          </table:table-cell>
          <table:table-cell office:value-type="float" office:value="28731.920000000002" table:formula="of:=SUM([.F372:.F374])" table:style-name="ce310">
            <text:p><text:s text:c="2"/>29</text:p>
          </table:table-cell>
          <table:table-cell office:value-type="float" office:value="209779" table:formula="of:=SUM([.G372:.G374])" table:style-name="ce310">
            <text:p><text:s text:c="2"/>210</text:p>
          </table:table-cell>
          <table:table-cell office:value-type="float" office:value="33992" table:formula="of:=SUM([.H372:.H374])" table:style-name="ce310">
            <text:p><text:s text:c="2"/>34</text:p>
          </table:table-cell>
          <table:table-cell office:value-type="float" office:value="31950" table:formula="of:=SUM([.I372:.I374])" table:style-name="ce310">
            <text:p><text:s text:c="2"/>32</text:p>
          </table:table-cell>
          <table:covered-table-cell/>
          <table:table-cell office:value-type="float" office:value="641102.92000000004" table:formula="of:=SUM([.K372:.K374])" table:style-name="ce311">
            <text:p><text:s text:c="2"/>641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29583" table:style-name="ce308">
            <text:p><text:s text:c="2"/>30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8647.71" table:style-name="ce308">
            <text:p><text:s text:c="2"/>39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68230.709999999992" table:formula="of:=SUM([.E376:.J376])" table:style-name="ce312">
            <text:p><text:s text:c="2"/>68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29583" table:formula="of:=SUM([.E376:.E378])" table:style-name="ce310">
            <text:p><text:s text:c="2"/>30</text:p>
          </table:table-cell>
          <table:table-cell office:value-type="float" office:value="0" table:formula="of:=SUM([.F376:.F378])" table:style-name="ce310">
            <text:p><text:s text:c="2"/>0</text:p>
          </table:table-cell>
          <table:table-cell office:value-type="float" office:value="0" table:formula="of:=SUM([.G376:.G378])" table:style-name="ce310">
            <text:p><text:s text:c="2"/>0</text:p>
          </table:table-cell>
          <table:table-cell office:value-type="float" office:value="38647.71" table:formula="of:=SUM([.H376:.H378])" table:style-name="ce310">
            <text:p><text:s text:c="2"/>39</text:p>
          </table:table-cell>
          <table:table-cell office:value-type="float" office:value="0" table:formula="of:=SUM([.I376:.I378])" table:style-name="ce310">
            <text:p><text:s text:c="2"/>0</text:p>
          </table:table-cell>
          <table:covered-table-cell/>
          <table:table-cell office:value-type="float" office:value="68230.709999999992" table:formula="of:=SUM([.K376:.K378])" table:style-name="ce311">
            <text:p><text:s text:c="2"/>68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23 Total</text:p>
          </table:table-cell>
          <table:table-cell table:style-name="ce95"/>
          <table:table-cell table:style-name="ce92"/>
          <table:table-cell office:value-type="float" office:value="537872.98" table:formula="of:=+[.E379]+[.E375]+[.E371]+[.E367]" table:style-name="ce314">
            <text:p><text:s text:c="2"/>538</text:p>
          </table:table-cell>
          <table:table-cell office:value-type="float" office:value="211049.28" table:formula="of:=+[.F379]+[.F375]+[.F371]+[.F367]" table:style-name="ce314">
            <text:p><text:s text:c="2"/>211</text:p>
          </table:table-cell>
          <table:table-cell office:value-type="float" office:value="1279309.24" table:formula="of:=+[.G379]+[.G375]+[.G371]+[.G367]" table:style-name="ce314">
            <text:p><text:s text:c="2"/>1,279</text:p>
          </table:table-cell>
          <table:table-cell office:value-type="float" office:value="974298.58499999996" table:formula="of:=+[.H379]+[.H375]+[.H371]+[.H367]" table:style-name="ce314">
            <text:p><text:s text:c="2"/>974</text:p>
          </table:table-cell>
          <table:table-cell office:value-type="float" office:value="144867.83000000002" table:formula="of:=+[.I379]+[.I375]+[.I371]+[.I367]" table:style-name="ce314">
            <text:p><text:s text:c="2"/>145</text:p>
          </table:table-cell>
          <table:table-cell table:style-name="ce315"/>
          <table:table-cell office:value-type="float" office:value="3147" table:style-name="ce342">
            <text:p>3,147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4" table:number-columns-spanned="1" table:number-rows-spanned="16" table:style-name="ce408">
            <text:p>2024</text:p>
          </table:table-cell>
          <table:table-cell office:value-type="string" table:number-columns-spanned="1" table:number-rows-spanned="3" table:style-name="ce409">
            <text:p>Hazardous</text:p>
          </table:table-cell>
          <table:table-cell office:value-type="string" table:style-name="ce63">
            <text:p>Inert/C&amp;D</text:p>
          </table:table-cell>
          <table:table-cell office:value-type="float" office:value="2064" table:style-name="ce384">
            <text:p>2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452.06" table:style-name="ce308">
            <text:p><text:s text:c="2"/>1</text:p>
          </table:table-cell>
          <table:table-cell office:value-type="float" office:value="159.76" table:style-name="ce31">
            <text:p><text:s/>160<text:s/></text:p>
          </table:table-cell>
          <table:table-cell office:value-type="string" table:number-columns-spanned="1" table:number-rows-spanned="16" table:style-name="ce410">
            <text:p>See table note</text:p>
          </table:table-cell>
          <table:table-cell office:value-type="float" office:value="3675.8199999999997" table:formula="of:=SUM([.E381:.J381])" table:style-name="ce309">
            <text:p><text:s text:c="2"/>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0609.939999999999" table:style-name="ce308">
            <text:p><text:s text:c="2"/>11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0609.939999999999" table:formula="of:=SUM([.E382:.J382])" table:style-name="ce309">
            <text:p><text:s text:c="2"/>11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19153.05000000005" table:style-name="ce308">
            <text:p><text:s text:c="2"/>119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19153.05000000005" table:formula="of:=SUM([.E383:.J383])" table:style-name="ce309">
            <text:p><text:s text:c="2"/>11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0">
            <text:p>Hazardous Total</text:p>
          </table:table-cell>
          <table:table-cell table:style-name="ce103"/>
          <table:table-cell office:value-type="float" office:value="2064" table:formula="of:=SUM([.E381:.E383])" table:style-name="ce310">
            <text:p><text:s text:c="2"/>2</text:p>
          </table:table-cell>
          <table:table-cell office:value-type="float" office:value="0" table:formula="of:=SUM([.F381:.F383])" table:style-name="ce310">
            <text:p><text:s text:c="2"/>0</text:p>
          </table:table-cell>
          <table:table-cell office:value-type="float" office:value="0" table:formula="of:=SUM([.G381:.G383])" table:style-name="ce310">
            <text:p><text:s text:c="2"/>0</text:p>
          </table:table-cell>
          <table:table-cell office:value-type="float" office:value="131215.05000000005" table:formula="of:=SUM([.H381:.H383])" table:style-name="ce310">
            <text:p><text:s text:c="2"/>131</text:p>
          </table:table-cell>
          <table:table-cell office:value-type="float" office:value="159.76" table:formula="of:=SUM([.I381:.I383])" table:style-name="ce310">
            <text:p><text:s text:c="2"/>0</text:p>
          </table:table-cell>
          <table:covered-table-cell/>
          <table:table-cell office:value-type="float" office:value="133438.81000000006" table:formula="of:=SUM([.K381:.K383])" table:style-name="ce311">
            <text:p><text:s text:c="2"/>13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Non-inert</text:p>
          </table:table-cell>
          <table:table-cell office:value-type="string" table:style-name="ce63">
            <text:p>Inert/C&amp;D</text:p>
          </table:table-cell>
          <table:table-cell office:value-type="float" office:value="9315.8799999999992" table:style-name="ce308">
            <text:p><text:s text:c="2"/>9</text:p>
          </table:table-cell>
          <table:table-cell office:value-type="float" office:value="71251" table:style-name="ce302">
            <text:p><text:s text:c="2"/>71</text:p>
          </table:table-cell>
          <table:table-cell office:value-type="float" office:value="588073" table:style-name="ce302">
            <text:p><text:s text:c="2"/>588</text:p>
          </table:table-cell>
          <table:table-cell office:value-type="float" office:value="436678" table:style-name="ce302">
            <text:p><text:s text:c="2"/>437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105317.8799999999" table:formula="of:=SUM([.E385:.J385])" table:style-name="ce312">
            <text:p><text:s text:c="2"/>1,105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79493.850000000006" table:style-name="ce308">
            <text:p><text:s text:c="2"/>79</text:p>
          </table:table-cell>
          <table:table-cell office:value-type="float" office:value="121492" table:style-name="ce302">
            <text:p><text:s text:c="2"/>121</text:p>
          </table:table-cell>
          <table:table-cell office:value-type="float" office:value="128737" table:style-name="ce302">
            <text:p><text:s text:c="2"/>129</text:p>
          </table:table-cell>
          <table:table-cell office:value-type="float" office:value="742894" table:style-name="ce302">
            <text:p><text:s text:c="2"/>743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072616.8500000001" table:formula="of:=SUM([.E386:.J386])" table:style-name="ce309">
            <text:p><text:s text:c="2"/>1,073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7.419999999999998" table:style-name="ce308">
            <text:p><text:s text:c="2"/>0</text:p>
          </table:table-cell>
          <table:table-cell office:value-type="float" office:value="631.37899999999991" table:style-name="ce308">
            <text:p><text:s text:c="2"/>1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658.79899999999986" table:formula="of:=SUM([.E387:.J387])" table:style-name="ce313">
            <text:p><text:s text:c="2"/>1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Non-inert Total</text:p>
          </table:table-cell>
          <table:table-cell table:style-name="ce103"/>
          <table:table-cell office:value-type="float" office:value="88809.73000000001" table:formula="of:=SUM([.E385:.E387])" table:style-name="ce310">
            <text:p><text:s text:c="2"/>89</text:p>
          </table:table-cell>
          <table:table-cell office:value-type="float" office:value="192743" table:formula="of:=SUM([.F385:.F387])" table:style-name="ce310">
            <text:p><text:s text:c="2"/>193</text:p>
          </table:table-cell>
          <table:table-cell office:value-type="float" office:value="716837.42" table:formula="of:=SUM([.G385:.G387])" table:style-name="ce310">
            <text:p><text:s text:c="2"/>717</text:p>
          </table:table-cell>
          <table:table-cell office:value-type="float" office:value="1180203.379" table:formula="of:=SUM([.H385:.H387])" table:style-name="ce310">
            <text:p><text:s text:c="2"/>1,180</text:p>
          </table:table-cell>
          <table:table-cell office:value-type="float" office:value="0" table:formula="of:=SUM([.I385:.I387])" table:style-name="ce310">
            <text:p><text:s text:c="2"/>0</text:p>
          </table:table-cell>
          <table:covered-table-cell/>
          <table:table-cell office:value-type="float" office:value="2178593.5290000001" table:formula="of:=SUM([.K385:.K387])" table:style-name="ce311">
            <text:p><text:s text:c="2"/>2,17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2">
            <text:p>Inert only</text:p>
          </table:table-cell>
          <table:table-cell office:value-type="string" table:style-name="ce63">
            <text:p>Inert/C&amp;D</text:p>
          </table:table-cell>
          <table:table-cell office:value-type="float" office:value="100550" table:style-name="ce308">
            <text:p><text:s text:c="2"/>101</text:p>
          </table:table-cell>
          <table:table-cell office:value-type="float" office:value="2982.6000000000004" table:style-name="ce308">
            <text:p><text:s text:c="2"/>3</text:p>
          </table:table-cell>
          <table:table-cell office:value-type="float" office:value="186538.23" table:style-name="ce308">
            <text:p><text:s text:c="2"/>187</text:p>
          </table:table-cell>
          <table:table-cell office:value-type="float" office:value="64350.34" table:style-name="ce308">
            <text:p><text:s text:c="2"/>64</text:p>
          </table:table-cell>
          <table:table-cell office:value-type="float" office:value="62179" table:style-name="ce308">
            <text:p><text:s text:c="2"/>62</text:p>
          </table:table-cell>
          <table:covered-table-cell/>
          <table:table-cell office:value-type="float" office:value="416600.17000000004" table:formula="of:=SUM([.E389:.J389])" table:style-name="ce312">
            <text:p><text:s text:c="2"/>41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157097" table:style-name="ce384">
            <text:p>157</text:p>
          </table:table-cell>
          <table:table-cell office:value-type="float" office:value="8903.9409999999989" table:style-name="ce308">
            <text:p><text:s text:c="2"/>9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166000.94099999999" table:formula="of:=SUM([.E390:.J390])" table:style-name="ce309">
            <text:p><text:s text:c="2"/>166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.2999999999999997E-2" table:style-name="ce31">
            <text:p><text:s/>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style-name="ce385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8">
            <text:p>Inert only Total</text:p>
          </table:table-cell>
          <table:table-cell table:style-name="ce103"/>
          <table:table-cell office:value-type="float" office:value="257647" table:formula="of:=SUM([.E389:.E391])" table:style-name="ce310">
            <text:p><text:s text:c="2"/>258</text:p>
          </table:table-cell>
          <table:table-cell office:value-type="float" office:value="11886.583999999999" table:formula="of:=SUM([.F389:.F391])" table:style-name="ce310">
            <text:p><text:s text:c="2"/>12</text:p>
          </table:table-cell>
          <table:table-cell office:value-type="float" office:value="186538.23" table:formula="of:=SUM([.G389:.G391])" table:style-name="ce310">
            <text:p><text:s text:c="2"/>187</text:p>
          </table:table-cell>
          <table:table-cell office:value-type="float" office:value="64350.34" table:formula="of:=SUM([.H389:.H391])" table:style-name="ce310">
            <text:p><text:s text:c="2"/>64</text:p>
          </table:table-cell>
          <table:table-cell office:value-type="float" office:value="62179" table:formula="of:=SUM([.I389:.I391])" table:style-name="ce310">
            <text:p><text:s text:c="2"/>62</text:p>
          </table:table-cell>
          <table:covered-table-cell/>
          <table:table-cell office:value-type="float" office:value="582601.11100000003" table:formula="of:=SUM([.K389:.K391])" table:style-name="ce311">
            <text:p><text:s text:c="2"/>58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3" table:style-name="ce411">
            <text:p>Restricted-user</text:p>
          </table:table-cell>
          <table:table-cell office:value-type="string" table:style-name="ce63">
            <text:p>Inert/C&amp;D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7214.5" table:style-name="ce308">
            <text:p><text:s text:c="2"/>57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57214.5" table:formula="of:=SUM([.E393:.J393])" table:style-name="ce312">
            <text:p><text:s text:c="2"/>5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7">
            <text:p>HIC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style-name="ce68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69">
            <text:p>Hazardous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768" table:style-name="ce384">
            <text:p>3</text:p>
          </table:table-cell>
          <table:table-cell office:value-type="float" office:value="0" table:style-name="ce31">
            <text:p><text:s/>-<text:s/></text:p>
          </table:table-cell>
          <table:covered-table-cell/>
          <table:table-cell office:value-type="float" office:value="0" table:style-name="ce91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94">
            <text:p>Restricted-user Total</text:p>
          </table:table-cell>
          <table:table-cell table:style-name="ce103"/>
          <table:table-cell office:value-type="float" office:value="0" table:formula="of:=SUM([.E393:.E395])" table:style-name="ce310">
            <text:p><text:s text:c="2"/>0</text:p>
          </table:table-cell>
          <table:table-cell office:value-type="float" office:value="0" table:formula="of:=SUM([.F393:.F395])" table:style-name="ce310">
            <text:p><text:s text:c="2"/>0</text:p>
          </table:table-cell>
          <table:table-cell office:value-type="float" office:value="0" table:formula="of:=SUM([.G393:.G395])" table:style-name="ce310">
            <text:p><text:s text:c="2"/>0</text:p>
          </table:table-cell>
          <table:table-cell office:value-type="float" office:value="59982.5" table:formula="of:=SUM([.H393:.H395])" table:style-name="ce310">
            <text:p><text:s text:c="2"/>60</text:p>
          </table:table-cell>
          <table:table-cell office:value-type="float" office:value="0" table:formula="of:=SUM([.I393:.I395])" table:style-name="ce310">
            <text:p><text:s text:c="2"/>0</text:p>
          </table:table-cell>
          <table:covered-table-cell/>
          <table:table-cell office:value-type="float" office:value="57214.5" table:formula="of:=SUM([.K393:.K395])" table:style-name="ce311">
            <text:p><text:s text:c="2"/>57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24 Total</text:p>
          </table:table-cell>
          <table:table-cell table:style-name="ce95"/>
          <table:table-cell table:style-name="ce92"/>
          <table:table-cell office:value-type="float" office:value="348520.73" table:formula="of:=+[.E396]+[.E392]+[.E388]+[.E384]" table:style-name="ce314">
            <text:p><text:s text:c="2"/>349</text:p>
          </table:table-cell>
          <table:table-cell office:value-type="float" office:value="204629.584" table:formula="of:=+[.F396]+[.F392]+[.F388]+[.F384]" table:style-name="ce314">
            <text:p><text:s text:c="2"/>205</text:p>
          </table:table-cell>
          <table:table-cell office:value-type="float" office:value="903375.65" table:formula="of:=+[.G396]+[.G392]+[.G388]+[.G384]" table:style-name="ce314">
            <text:p><text:s text:c="2"/>903</text:p>
          </table:table-cell>
          <table:table-cell office:value-type="float" office:value="1435751.2690000001" table:formula="of:=+[.H396]+[.H392]+[.H388]+[.H384]" table:style-name="ce314">
            <text:p><text:s text:c="2"/>1,436</text:p>
          </table:table-cell>
          <table:table-cell office:value-type="float" office:value="62338.76" table:formula="of:=+[.I396]+[.I392]+[.I388]+[.I384]" table:style-name="ce314">
            <text:p><text:s text:c="2"/>62</text:p>
          </table:table-cell>
          <table:table-cell table:style-name="ce315"/>
          <table:table-cell office:value-type="float" office:value="2955000" table:style-name="ce386">
            <text:p>2,955</text:p>
          </table:table-cell>
          <table:table-cell table:number-columns-repeated="16373"/>
        </table:table-row>
        <table:table-row table:number-rows-repeated="1048179" table:style-name="ro5">
          <table:table-cell table:number-columns-repeated="16384"/>
        </table:table-row>
      </table:table>
      <table:table table:name="Landfill_Capacity" table:style-name="ta2">
        <table:table-column table:style-name="co6" table:default-cell-style-name="ce50"/>
        <table:table-column table:style-name="co7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28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2" table:default-cell-style-name="ce50"/>
        <table:table-column table:style-name="co17" table:number-columns-repeated="4" table:default-cell-style-name="ce50"/>
        <table:table-column table:style-name="co18" table:default-cell-style-name="ce50"/>
        <table:table-column table:style-name="co17" table:default-cell-style-name="ce50"/>
        <table:table-column table:style-name="co15" table:number-columns-repeated="16366" table:default-cell-style-name="ce50"/>
        <table:table-row table:style-name="ro5">
          <table:table-cell table:style-name="ce10"/>
          <table:table-cell table:number-columns-repeated="16383" table:style-name="ce50"/>
        </table:table-row>
        <table:table-row table:style-name="ro14">
          <table:table-cell table:style-name="ce50"/>
          <table:table-cell office:value-type="string" table:style-name="ce105">
            <text:p>North West: Landfill capacity 2024</text:p>
          </table:table-cell>
          <table:table-cell table:style-name="ce106"/>
          <table:table-cell table:number-columns-repeated="2" table:style-name="ce107"/>
          <table:table-cell table:style-name="ce106"/>
          <table:table-cell table:style-name="ce50"/>
          <table:table-cell table:style-name="ce106"/>
          <table:table-cell table:style-name="ce108"/>
          <table:table-cell table:number-columns-repeated="16375"/>
        </table:table-row>
        <table:table-row table:style-name="ro6">
          <table:table-cell table:style-name="ce50"/>
          <table:table-cell office:value-type="string" table:style-name="ce52">
            <text:p>All figures are provided in 000s cubic metres</text:p>
          </table:table-cell>
          <table:table-cell table:number-columns-repeated="4" table:style-name="ce106"/>
          <table:table-cell table:style-name="ce50"/>
          <table:table-cell table:style-name="ce106"/>
          <table:table-cell table:style-name="ce108"/>
          <table:table-cell table:number-columns-repeated="16375"/>
        </table:table-row>
        <table:table-row table:style-name="ro5">
          <table:table-cell table:style-name="ce50"/>
          <table:table-cell table:style-name="ce109"/>
          <table:table-cell table:number-columns-repeated="16382" table:style-name="ce50"/>
        </table:table-row>
        <table:table-row table:style-name="ro8">
          <table:table-cell table:style-name="ce50"/>
          <table:table-cell office:value-type="string" table:number-columns-spanned="1" table:number-rows-spanned="2" table:style-name="ce403">
            <text:p>Landfill Type</text:p>
          </table:table-cell>
          <table:table-cell office:value-type="string" table:number-columns-spanned="5" table:number-rows-spanned="1" table:style-name="ce414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5">
            <text:p>NORTH WEST</text:p>
          </table:table-cell>
          <table:table-cell table:number-columns-repeated="16376" table:style-name="ce50"/>
        </table:table-row>
        <table:table-row table:style-name="ro9">
          <table:table-cell table:style-name="ce50"/>
          <table:covered-table-cell/>
          <table:table-cell office:value-type="string" table:style-name="ce2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covered-table-cell/>
          <table:table-cell table:number-columns-repeated="16376" table:style-name="ce50"/>
        </table:table-row>
        <table:table-row table:style-name="ro10">
          <table:table-cell table:style-name="ce50"/>
          <table:table-cell office:value-type="string" table:style-name="ce110">
            <text:p>Hazardous Merchant</text:p>
          </table:table-cell>
          <table:table-cell office:value-type="float" office:value="1329440" table:style-name="ce289">
            <text:p>1,329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410778" table:style-name="ce289">
            <text:p>1,411</text:p>
          </table:table-cell>
          <table:table-cell office:value-type="float" office:value="86216" table:style-name="ce289">
            <text:p>86</text:p>
          </table:table-cell>
          <table:table-cell office:value-type="float" office:value="2826434" table:formula="of:=SUM([.C7:.G7])" table:style-name="ce291">
            <text:p>2,826</text:p>
          </table:table-cell>
          <table:table-cell table:number-columns-repeated="16376" table:style-name="ce50"/>
        </table:table-row>
        <table:table-row table:style-name="ro10">
          <table:table-cell table:style-name="ce50"/>
          <table:table-cell office:value-type="string" table:style-name="ce33">
            <text:p>Hazardous Restricted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123">
            <text:p><text:s/>-<text:s/></text:p>
          </table:table-cell>
          <table:table-cell table:number-columns-repeated="16376" table:style-name="ce50"/>
        </table:table-row>
        <table:table-row table:style-name="ro10">
          <table:table-cell table:style-name="ce50"/>
          <table:table-cell office:value-type="string" table:style-name="ce33">
            <text:p>Non Hazardous with SNRHW cell*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488051" table:style-name="ce289">
            <text:p>1,488</text:p>
          </table:table-cell>
          <table:table-cell office:value-type="float" office:value="5618259" table:style-name="ce289">
            <text:p>5,618</text:p>
          </table:table-cell>
          <table:table-cell office:value-type="float" office:value="1564803" table:style-name="ce289">
            <text:p>1,565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8671113" table:formula="of:=SUM([.C9:.G9])" table:style-name="ce292">
            <text:p>8,671</text:p>
          </table:table-cell>
          <table:table-cell table:style-name="ce23"/>
          <table:table-cell table:number-columns-repeated="16375"/>
        </table:table-row>
        <table:table-row table:style-name="ro10">
          <table:table-cell table:style-name="ce50"/>
          <table:table-cell office:value-type="string" table:style-name="ce33">
            <text:p>Non Hazardous</text:p>
          </table:table-cell>
          <table:table-cell office:value-type="float" office:value="4290820" table:style-name="ce289">
            <text:p>4,291</text:p>
          </table:table-cell>
          <table:table-cell office:value-type="float" office:value="1125832" table:style-name="ce289">
            <text:p>1,126</text:p>
          </table:table-cell>
          <table:table-cell office:value-type="float" office:value="649037" table:style-name="ce289">
            <text:p>649</text:p>
          </table:table-cell>
          <table:table-cell office:value-type="float" office:value="3838988" table:style-name="ce289">
            <text:p>3,839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9904677" table:formula="of:=SUM([.C10:.G10])" table:style-name="ce292">
            <text:p>9,905</text:p>
          </table:table-cell>
          <table:table-cell table:number-columns-repeated="16376" table:style-name="ce50"/>
        </table:table-row>
        <table:table-row table:style-name="ro10">
          <table:table-cell table:style-name="ce50"/>
          <table:table-cell office:value-type="string" table:style-name="ce37">
            <text:p>Non Hazardous Restricted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123">
            <text:p><text:s/>-<text:s/></text:p>
          </table:table-cell>
          <table:table-cell table:number-columns-repeated="16376" table:style-name="ce50"/>
        </table:table-row>
        <table:table-row table:style-name="ro10">
          <table:table-cell table:style-name="ce50"/>
          <table:table-cell office:value-type="string" table:style-name="ce38">
            <text:p>Inert</text:p>
          </table:table-cell>
          <table:table-cell office:value-type="float" office:value="747460" table:style-name="ce289">
            <text:p>747</text:p>
          </table:table-cell>
          <table:table-cell office:value-type="float" office:value="525283" table:style-name="ce289">
            <text:p>525</text:p>
          </table:table-cell>
          <table:table-cell office:value-type="float" office:value="984472" table:style-name="ce289">
            <text:p>984</text:p>
          </table:table-cell>
          <table:table-cell office:value-type="float" office:value="2574677" table:style-name="ce289">
            <text:p>2,575</text:p>
          </table:table-cell>
          <table:table-cell office:value-type="float" office:value="187785" table:style-name="ce289">
            <text:p>188</text:p>
          </table:table-cell>
          <table:table-cell office:value-type="float" office:value="5019677" table:formula="of:=SUM([.C12:.G12])" table:style-name="ce293">
            <text:p>5,020</text:p>
          </table:table-cell>
          <table:table-cell table:number-columns-repeated="16376" table:style-name="ce50"/>
        </table:table-row>
        <table:table-row table:style-name="ro10">
          <table:table-cell table:style-name="ce50"/>
          <table:table-cell office:value-type="string" table:style-name="ce42">
            <text:p>Total</text:p>
          </table:table-cell>
          <table:table-cell office:value-type="float" office:value="6367720" table:formula="of:=SUM([.C7:.C12])" table:style-name="ce294">
            <text:p>6,368</text:p>
          </table:table-cell>
          <table:table-cell office:value-type="float" office:value="3139166" table:formula="of:=SUM([.D7:.D12])" table:style-name="ce294">
            <text:p>3,139</text:p>
          </table:table-cell>
          <table:table-cell office:value-type="float" office:value="7251768" table:formula="of:=SUM([.E7:.E12])" table:style-name="ce294">
            <text:p>7,252</text:p>
          </table:table-cell>
          <table:table-cell office:value-type="float" office:value="9389246" table:formula="of:=SUM([.F7:.F12])" table:style-name="ce294">
            <text:p>9,389</text:p>
          </table:table-cell>
          <table:table-cell office:value-type="float" office:value="274001" table:formula="of:=SUM([.G7:.G12])" table:style-name="ce294">
            <text:p>274</text:p>
          </table:table-cell>
          <table:table-cell office:value-type="float" office:value="26421901" table:formula="of:=SUM([.H7:.H12])" table:style-name="ce295">
            <text:p>26,422</text:p>
          </table:table-cell>
          <table:table-cell table:number-columns-repeated="16376" table:style-name="ce50"/>
        </table:table-row>
        <table:table-row table:style-name="ro5">
          <table:table-cell table:style-name="ce50"/>
          <table:table-cell office:value-type="string" table:style-name="ce112">
            <text:p>*Some non-hazardous sites can accept some Stable Non Reactive Hazardous Wastes (SNRHW) into a dedicated cell, but this is usually a small part of the overall capacity of the site.</text:p>
          </table:table-cell>
          <table:table-cell table:number-columns-repeated="6" table:style-name="ce50"/>
          <table:table-cell table:style-name="ce113"/>
          <table:table-cell table:number-columns-repeated="16375"/>
        </table:table-row>
        <table:table-row table:style-name="ro5">
          <table:table-cell table:style-name="ce50"/>
          <table:table-cell office:value-type="string" table:style-name="ce112">
            <text:p>The void space figure provided by the operator for this site was reduced substantially from that provided in previous years.</text:p>
          </table:table-cell>
          <table:table-cell table:number-columns-repeated="6" table:style-name="ce50"/>
          <table:table-cell table:style-name="ce113"/>
          <table:table-cell table:number-columns-repeated="16375"/>
        </table:table-row>
        <table:table-row table:style-name="ro15">
          <table:table-cell table:style-name="ce50"/>
          <table:table-cell table:style-name="ce112"/>
          <table:table-cell table:number-columns-repeated="6" table:style-name="ce50"/>
          <table:table-cell table:style-name="ce113"/>
          <table:table-cell table:number-columns-repeated="16375"/>
        </table:table-row>
        <table:table-row table:style-name="ro5">
          <table:table-cell/>
          <table:table-cell office:value-type="string" table:style-name="ce114">
            <text:p>Table Notes:</text:p>
          </table:table-cell>
          <table:table-cell table:number-columns-repeated="6" table:style-name="ce115"/>
          <table:table-cell table:style-name="ce113"/>
          <table:table-cell table:number-columns-repeated="16375"/>
        </table:table-row>
        <table:table-row table:style-name="ro5">
          <table:table-cell/>
          <table:table-cell office:value-type="string" table:style-name="ce50">
            <text:p>Data for 2021 is classified into Landfill Directive categories..</text:p>
          </table:table-cell>
          <table:table-cell table:number-columns-repeated="6" table:style-name="ce115"/>
          <table:table-cell table:style-name="ce113"/>
          <table:table-cell table:number-columns-repeated="16375"/>
        </table:table-row>
        <table:table-row table:style-name="ro5">
          <table:table-cell/>
          <table:table-cell office:value-type="string" table:style-name="ce50">
            <text:p>2021 landfill capacity data was obtained from environmental monitoring reports required by permits or directly from the operator.</text:p>
          </table:table-cell>
          <table:table-cell table:number-columns-repeated="6" table:style-name="ce50"/>
          <table:table-cell table:style-name="ce113"/>
          <table:table-cell table:number-columns-repeated="16375"/>
        </table:table-row>
        <table:table-row table:style-name="ro16">
          <table:table-cell/>
          <table:table-cell table:number-columns-spanned="7" table:number-rows-spanned="1" table:style-name="ce415"/>
          <table:covered-table-cell table:number-columns-repeated="6"/>
          <table:table-cell table:style-name="ce113"/>
          <table:table-cell table:number-columns-repeated="16375"/>
        </table:table-row>
        <table:table-row table:style-name="ro8">
          <table:table-cell/>
          <table:table-cell table:number-columns-spanned="7" table:number-rows-spanned="1" table:style-name="ce415"/>
          <table:covered-table-cell table:number-columns-repeated="6"/>
          <table:table-cell table:style-name="ce113"/>
          <table:table-cell table:number-columns-repeated="16375"/>
        </table:table-row>
        <table:table-row table:number-rows-repeated="1048555" table:style-name="ro5">
          <table:table-cell table:number-columns-repeated="16384"/>
        </table:table-row>
        <table:named-expressions>
          <table:named-range table:name="Print_Area" table:cell-range-address="Landfill_Capacity.$B$2:Landfill_Capacity.$I$22" table:base-cell-address="Landfill_Capacity.$A$1"/>
        </table:named-expressions>
      </table:table>
      <table:table table:name="Landfill_Capacity_Trends" table:style-name="ta1">
        <table:table-column table:style-name="co29" table:default-cell-style-name="ce14"/>
        <table:table-column table:style-name="co27" table:default-cell-style-name="ce14"/>
        <table:table-column table:style-name="co30" table:default-cell-style-name="ce14"/>
        <table:table-column table:style-name="co2" table:default-cell-style-name="ce14"/>
        <table:table-column table:style-name="co13" table:default-cell-style-name="ce14"/>
        <table:table-column table:style-name="co12" table:default-cell-style-name="ce14"/>
        <table:table-column table:style-name="co31" table:number-columns-repeated="2" table:default-cell-style-name="ce14"/>
        <table:table-column table:style-name="co32" table:default-cell-style-name="ce14"/>
        <table:table-column table:style-name="co33" table:default-cell-style-name="ce14"/>
        <table:table-column table:style-name="co15" table:number-columns-repeated="16374" table:default-cell-style-name="ce14"/>
        <table:table-row table:style-name="ro5">
          <table:table-cell table:style-name="ce13"/>
          <table:table-cell table:number-columns-repeated="16383" table:style-name="ce14"/>
        </table:table-row>
        <table:table-row table:style-name="ro6">
          <table:table-cell table:style-name="ce14"/>
          <table:table-cell office:value-type="string" table:style-name="ce15">
            <text:p>North West: Landfill capacity trends from 1998/99 to 2024</text:p>
          </table:table-cell>
          <table:table-cell table:number-columns-repeated="16382" table:style-name="ce14"/>
        </table:table-row>
        <table:table-row table:style-name="ro6">
          <table:table-cell table:style-name="ce14"/>
          <table:table-cell office:value-type="string" table:style-name="ce17">
            <text:p>All figures are provided in 000s cubic metres</text:p>
          </table:table-cell>
          <table:table-cell table:number-columns-repeated="16382" table:style-name="ce14"/>
        </table:table-row>
        <table:table-row table:style-name="ro5">
          <table:table-cell table:number-columns-repeated="16384"/>
        </table:table-row>
        <table:table-row table:style-name="ro5">
          <table:table-cell table:style-name="ce14"/>
          <table:table-cell office:value-type="string" table:style-name="ce116">
            <text:p><text:s/></text:p>
          </table:table-cell>
          <table:table-cell office:value-type="string" table:style-name="ce55">
            <text:p><text:s/></text:p>
          </table:table-cell>
          <table:table-cell office:value-type="string" table:number-columns-spanned="6" table:number-rows-spanned="1" table:style-name="ce404">
            <text:p>Sub Region</text:p>
          </table:table-cell>
          <table:covered-table-cell table:number-columns-repeated="5"/>
          <table:table-cell office:value-type="string" table:number-columns-spanned="1" table:number-rows-spanned="2" table:style-name="ce405">
            <text:p>NORTH WEST</text:p>
          </table:table-cell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17">
            <text:p>Year</text:p>
          </table:table-cell>
          <table:table-cell office:value-type="string" table:style-name="ce118">
            <text:p>Site Type</text:p>
          </table:table-cell>
          <table:table-cell office:value-type="string" table:style-name="ce2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table-cell office:value-type="string" table:style-name="ce60">
            <text:p>Warrington &amp; Halton</text:p>
          </table:table-cell>
          <table:covered-table-cell/>
          <table:table-cell table:number-columns-repeated="3" table:style-name="ce46"/>
          <table:table-cell table:number-columns-repeated="16371"/>
        </table:table-row>
        <table:table-row table:style-name="ro5">
          <table:table-cell table:style-name="ce14"/>
          <table:table-cell office:value-type="string" table:number-columns-spanned="1" table:number-rows-spanned="3" table:style-name="ce416">
            <text:p>1998/99</text:p>
          </table:table-cell>
          <table:table-cell office:value-type="string" table:style-name="ce119">
            <text:p>Inert</text:p>
          </table:table-cell>
          <table:table-cell office:value-type="float" office:value="779" table:style-name="ce120">
            <text:p><text:s/>779<text:s/></text:p>
          </table:table-cell>
          <table:table-cell office:value-type="float" office:value="5925" table:style-name="ce28">
            <text:p><text:s/>5,925<text:s/></text:p>
          </table:table-cell>
          <table:table-cell office:value-type="float" office:value="2163" table:style-name="ce28">
            <text:p><text:s/>2,163<text:s/></text:p>
          </table:table-cell>
          <table:table-cell office:value-type="float" office:value="3720" table:style-name="ce28">
            <text:p><text:s/>3,720<text:s/></text:p>
          </table:table-cell>
          <table:table-cell office:value-type="float" office:value="125" table:style-name="ce28">
            <text:p><text:s/>125<text:s/>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12712" table:formula="of:=SUM([.D7:.I7])" table:style-name="ce121">
            <text:p><text:s/>12,712<text:s/></text:p>
          </table:table-cell>
          <table:table-cell table:number-columns-repeated="16374" table:style-name="ce14"/>
        </table:table-row>
        <table:table-row table:style-name="ro5">
          <table:table-cell table:style-name="ce14"/>
          <table:covered-table-cell/>
          <table:table-cell office:value-type="string" table:style-name="ce122">
            <text:p>Non-Inert</text:p>
          </table:table-cell>
          <table:table-cell office:value-type="float" office:value="7907" table:style-name="ce35">
            <text:p><text:s/>7,907<text:s/></text:p>
          </table:table-cell>
          <table:table-cell office:value-type="float" office:value="8631" table:style-name="ce34">
            <text:p><text:s/>8,631<text:s/></text:p>
          </table:table-cell>
          <table:table-cell office:value-type="float" office:value="12111" table:style-name="ce34">
            <text:p><text:s/>12,111<text:s/></text:p>
          </table:table-cell>
          <table:table-cell office:value-type="float" office:value="13155" table:style-name="ce34">
            <text:p><text:s/>13,155<text:s/></text:p>
          </table:table-cell>
          <table:table-cell office:value-type="float" office:value="3757" table:style-name="ce34">
            <text:p><text:s/>3,757<text:s/></text:p>
          </table:table-cell>
          <table:table-cell office:value-type="float" office:value="18554" table:style-name="ce34">
            <text:p><text:s/>18,554<text:s/></text:p>
          </table:table-cell>
          <table:table-cell office:value-type="float" office:value="64115" table:formula="of:=SUM([.D8:.I8])" table:style-name="ce123">
            <text:p><text:s/>64,115<text:s/></text:p>
          </table:table-cell>
          <table:table-cell table:number-columns-repeated="16374" table:style-name="ce14"/>
        </table:table-row>
        <table:table-row table:style-name="ro5">
          <table:table-cell table:style-name="ce14"/>
          <table:covered-table-cell/>
          <table:table-cell office:value-type="string" table:style-name="ce122">
            <text:p>Restricted User</text:p>
          </table:table-cell>
          <table:table-cell office:value-type="float" office:value="165" table:style-name="ce35">
            <text:p><text:s/>165<text:s/></text:p>
          </table:table-cell>
          <table:table-cell office:value-type="float" office:value="387" table:style-name="ce34">
            <text:p><text:s/>387<text:s/></text:p>
          </table:table-cell>
          <table:table-cell office:value-type="float" office:value="267" table:style-name="ce34">
            <text:p><text:s/>267<text:s/></text:p>
          </table:table-cell>
          <table:table-cell office:value-type="float" office:value="686" table:style-name="ce34">
            <text:p><text:s/>686<text:s/></text:p>
          </table:table-cell>
          <table:table-cell office:value-type="float" office:value="7" table:style-name="ce34">
            <text:p><text:s/>7<text:s/></text:p>
          </table:table-cell>
          <table:table-cell office:value-type="float" office:value="3100" table:style-name="ce34">
            <text:p><text:s/>3,100<text:s/></text:p>
          </table:table-cell>
          <table:table-cell office:value-type="float" office:value="4612" table:formula="of:=SUM([.D9:.I9])" table:style-name="ce123">
            <text:p><text:s/>4,612<text:s/></text:p>
          </table:table-cell>
          <table:table-cell table:number-columns-repeated="16374" table:style-name="ce14"/>
        </table:table-row>
        <table:table-row table:style-name="ro5">
          <table:table-cell table:style-name="ce14"/>
          <table:table-cell office:value-type="string" table:style-name="ce124">
            <text:p><text:s/></text:p>
          </table:table-cell>
          <table:table-cell table:style-name="ce82"/>
          <table:table-cell office:value-type="float" office:value="8851" table:formula="of:=SUBTOTAL(9;[.D7:.D9])" table:style-name="ce44">
            <text:p><text:s/>8,851<text:s/></text:p>
          </table:table-cell>
          <table:table-cell office:value-type="float" office:value="14943" table:formula="of:=SUBTOTAL(9;[.E7:.E9])" table:style-name="ce44">
            <text:p><text:s/>14,943<text:s/></text:p>
          </table:table-cell>
          <table:table-cell office:value-type="float" office:value="14541" table:formula="of:=SUBTOTAL(9;[.F7:.F9])" table:style-name="ce44">
            <text:p><text:s/>14,541<text:s/></text:p>
          </table:table-cell>
          <table:table-cell office:value-type="float" office:value="17561" table:formula="of:=SUBTOTAL(9;[.G7:.G9])" table:style-name="ce44">
            <text:p><text:s/>17,561<text:s/></text:p>
          </table:table-cell>
          <table:table-cell office:value-type="float" office:value="3889" table:formula="of:=SUBTOTAL(9;[.H7:.H9])" table:style-name="ce44">
            <text:p><text:s/>3,889<text:s/></text:p>
          </table:table-cell>
          <table:table-cell office:value-type="float" office:value="21654" table:formula="of:=SUBTOTAL(9;[.I7:.I9])" table:style-name="ce44">
            <text:p><text:s/>21,654<text:s/></text:p>
          </table:table-cell>
          <table:table-cell office:value-type="float" office:value="81439" table:formula="of:=SUBTOTAL(9;[.J7:.J9])" table:style-name="ce125">
            <text:p><text:s/>81,439<text:s/></text:p>
          </table:table-cell>
          <table:table-cell table:number-columns-repeated="16374" table:style-name="ce14"/>
        </table:table-row>
        <table:table-row table:style-name="ro5">
          <table:table-cell table:style-name="ce14"/>
          <table:table-cell office:value-type="string" table:number-columns-spanned="1" table:number-rows-spanned="3" table:style-name="ce416">
            <text:p>2000/01</text:p>
          </table:table-cell>
          <table:table-cell office:value-type="string" table:style-name="ce122">
            <text:p>Inert</text:p>
          </table:table-cell>
          <table:table-cell office:value-type="float" office:value="290" table:style-name="ce35">
            <text:p><text:s/>290<text:s/></text:p>
          </table:table-cell>
          <table:table-cell office:value-type="float" office:value="4" table:style-name="ce34">
            <text:p><text:s/>4<text:s/></text:p>
          </table:table-cell>
          <table:table-cell office:value-type="float" office:value="1482" table:style-name="ce34">
            <text:p><text:s/>1,482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5" table:style-name="ce34">
            <text:p><text:s/>25<text:s/></text:p>
          </table:table-cell>
          <table:table-cell office:value-type="float" office:value="1900" table:style-name="ce36">
            <text:p><text:s/>1,900<text:s/></text:p>
          </table:table-cell>
          <table:table-cell office:value-type="float" office:value="3701" table:formula="of:=SUM([.D11:.I11])" table:style-name="ce123">
            <text:p><text:s/>3,701<text:s/></text:p>
          </table:table-cell>
          <table:table-cell table:number-columns-repeated="16374" table:style-name="ce14"/>
        </table:table-row>
        <table:table-row table:style-name="ro5">
          <table:table-cell table:style-name="ce14"/>
          <table:covered-table-cell/>
          <table:table-cell office:value-type="string" table:style-name="ce122">
            <text:p>Non-Inert</text:p>
          </table:table-cell>
          <table:table-cell office:value-type="float" office:value="6801" table:style-name="ce35">
            <text:p><text:s/>6,801<text:s/></text:p>
          </table:table-cell>
          <table:table-cell office:value-type="float" office:value="14261" table:style-name="ce34">
            <text:p><text:s/>14,261<text:s/></text:p>
          </table:table-cell>
          <table:table-cell office:value-type="float" office:value="10353" table:style-name="ce34">
            <text:p><text:s/>10,353<text:s/></text:p>
          </table:table-cell>
          <table:table-cell office:value-type="float" office:value="8649" table:style-name="ce34">
            <text:p><text:s/>8,649<text:s/></text:p>
          </table:table-cell>
          <table:table-cell office:value-type="float" office:value="2600" table:style-name="ce34">
            <text:p><text:s/>2,600<text:s/></text:p>
          </table:table-cell>
          <table:table-cell office:value-type="float" office:value="17765" table:style-name="ce36">
            <text:p><text:s/>17,765<text:s/></text:p>
          </table:table-cell>
          <table:table-cell office:value-type="float" office:value="60429" table:formula="of:=SUM([.D12:.I12])" table:style-name="ce123">
            <text:p><text:s/>60,429<text:s/></text:p>
          </table:table-cell>
          <table:table-cell table:number-columns-repeated="16374" table:style-name="ce14"/>
        </table:table-row>
        <table:table-row table:style-name="ro5">
          <table:table-cell table:style-name="ce14"/>
          <table:covered-table-cell/>
          <table:table-cell office:value-type="string" table:style-name="ce38">
            <text:p>Restricted User</text:p>
          </table:table-cell>
          <table:table-cell office:value-type="float" office:value="2035" table:style-name="ce39">
            <text:p><text:s/>2,035<text:s/>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562" table:style-name="ce40">
            <text:p><text:s/>562<text:s/></text:p>
          </table:table-cell>
          <table:table-cell office:value-type="float" office:value="1127" table:style-name="ce40">
            <text:p><text:s/>1,127<text:s/></text:p>
          </table:table-cell>
          <table:table-cell office:value-type="float" office:value="3" table:style-name="ce40">
            <text:p><text:s/>3<text:s/></text:p>
          </table:table-cell>
          <table:table-cell office:value-type="float" office:value="300" table:style-name="ce41">
            <text:p><text:s/>300<text:s/></text:p>
          </table:table-cell>
          <table:table-cell office:value-type="float" office:value="4027" table:formula="of:=SUM([.D13:.I13])" table:style-name="ce126">
            <text:p><text:s/>4,027<text:s/></text:p>
          </table:table-cell>
          <table:table-cell table:number-columns-repeated="16374" table:style-name="ce14"/>
        </table:table-row>
        <table:table-row table:style-name="ro5">
          <table:table-cell table:style-name="ce14"/>
          <table:table-cell office:value-type="string" table:style-name="ce124">
            <text:p><text:s/></text:p>
          </table:table-cell>
          <table:table-cell table:style-name="ce82"/>
          <table:table-cell office:value-type="float" office:value="9126" table:formula="of:=SUBTOTAL(9;[.D11:.D13])" table:style-name="ce44">
            <text:p><text:s/>9,126<text:s/></text:p>
          </table:table-cell>
          <table:table-cell office:value-type="float" office:value="14265" table:formula="of:=SUBTOTAL(9;[.E11:.E13])" table:style-name="ce44">
            <text:p><text:s/>14,265<text:s/></text:p>
          </table:table-cell>
          <table:table-cell office:value-type="float" office:value="12397" table:formula="of:=SUBTOTAL(9;[.F11:.F13])" table:style-name="ce44">
            <text:p><text:s/>12,397<text:s/></text:p>
          </table:table-cell>
          <table:table-cell office:value-type="float" office:value="9776" table:formula="of:=SUBTOTAL(9;[.G11:.G13])" table:style-name="ce44">
            <text:p><text:s/>9,776<text:s/></text:p>
          </table:table-cell>
          <table:table-cell office:value-type="float" office:value="2628" table:formula="of:=SUBTOTAL(9;[.H11:.H13])" table:style-name="ce44">
            <text:p><text:s/>2,628<text:s/></text:p>
          </table:table-cell>
          <table:table-cell office:value-type="float" office:value="19965" table:formula="of:=SUBTOTAL(9;[.I11:.I13])" table:style-name="ce127">
            <text:p><text:s/>19,965<text:s/></text:p>
          </table:table-cell>
          <table:table-cell office:value-type="float" office:value="68157" table:formula="of:=SUBTOTAL(9;[.J11:.J13])" table:style-name="ce125">
            <text:p><text:s/>68,157<text:s/></text:p>
          </table:table-cell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2004" table:number-columns-spanned="1" table:number-rows-spanned="3" table:style-name="ce416">
            <text:p>2004</text:p>
          </table:table-cell>
          <table:table-cell office:value-type="string" table:style-name="ce122">
            <text:p>Inert</text:p>
          </table:table-cell>
          <table:table-cell office:value-type="float" office:value="1090" table:style-name="ce35">
            <text:p><text:s/>1,090<text:s/></text:p>
          </table:table-cell>
          <table:table-cell office:value-type="float" office:value="8091.4750000000004" table:style-name="ce34">
            <text:p><text:s/>8,091<text:s/></text:p>
          </table:table-cell>
          <table:table-cell office:value-type="float" office:value="1451.17" table:style-name="ce34">
            <text:p><text:s/>1,451<text:s/></text:p>
          </table:table-cell>
          <table:table-cell office:value-type="float" office:value="137.16399999999999" table:style-name="ce34">
            <text:p><text:s/>137<text:s/></text:p>
          </table:table-cell>
          <table:table-cell office:value-type="float" office:value="260" table:style-name="ce34">
            <text:p><text:s/>260<text:s/></text:p>
          </table:table-cell>
          <table:table-cell office:value-type="float" office:value="800" table:style-name="ce36">
            <text:p><text:s/>800<text:s/></text:p>
          </table:table-cell>
          <table:table-cell office:value-type="float" office:value="11829.809000000001" table:formula="of:=SUM([.D15:.I15])" table:style-name="ce123">
            <text:p><text:s/>11,830<text:s/></text:p>
          </table:table-cell>
          <table:table-cell table:number-columns-repeated="16374" table:style-name="ce14"/>
        </table:table-row>
        <table:table-row table:style-name="ro5">
          <table:table-cell table:style-name="ce14"/>
          <table:covered-table-cell/>
          <table:table-cell office:value-type="string" table:style-name="ce122">
            <text:p>Non-Inert</text:p>
          </table:table-cell>
          <table:table-cell office:value-type="float" office:value="11309.401" table:style-name="ce35">
            <text:p><text:s/>11,309<text:s/></text:p>
          </table:table-cell>
          <table:table-cell office:value-type="float" office:value="4278.9079999999994" table:style-name="ce34">
            <text:p><text:s/>4,279<text:s/></text:p>
          </table:table-cell>
          <table:table-cell office:value-type="float" office:value="11871.093000000001" table:style-name="ce34">
            <text:p><text:s/>11,871<text:s/></text:p>
          </table:table-cell>
          <table:table-cell office:value-type="float" office:value="13268.805" table:style-name="ce34">
            <text:p><text:s/>13,269<text:s/></text:p>
          </table:table-cell>
          <table:table-cell office:value-type="float" office:value="4283.5509999999995" table:style-name="ce34">
            <text:p><text:s/>4,284<text:s/></text:p>
          </table:table-cell>
          <table:table-cell office:value-type="float" office:value="31179.759999999998" table:style-name="ce36">
            <text:p><text:s/>31,180<text:s/></text:p>
          </table:table-cell>
          <table:table-cell office:value-type="float" office:value="76191.517999999996" table:formula="of:=SUM([.D16:.I16])" table:style-name="ce123">
            <text:p><text:s/>76,192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20" table:style-name="ce35">
            <text:p><text:s/>20<text:s/></text:p>
          </table:table-cell>
          <table:table-cell office:value-type="float" office:value="235.86500000000001" table:style-name="ce34">
            <text:p><text:s/>236<text:s/></text:p>
          </table:table-cell>
          <table:table-cell office:value-type="float" office:value="215" table:style-name="ce34">
            <text:p><text:s/>215<text:s/></text:p>
          </table:table-cell>
          <table:table-cell office:value-type="float" office:value="311.49299999999999" table:style-name="ce34">
            <text:p><text:s/>311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782.35799999999995" table:formula="of:=SUM([.D17:.I17])" table:style-name="ce123">
            <text:p><text:s/>782<text:s/></text:p>
          </table:table-cell>
          <table:table-cell table:number-columns-repeated="16374" table:style-name="ce1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12419.401" table:formula="of:=SUBTOTAL(9;[.D15:.D17])" table:style-name="ce44">
            <text:p><text:s/>12,419<text:s/></text:p>
          </table:table-cell>
          <table:table-cell office:value-type="float" office:value="12606.248" table:formula="of:=SUBTOTAL(9;[.E15:.E17])" table:style-name="ce44">
            <text:p><text:s/>12,606<text:s/></text:p>
          </table:table-cell>
          <table:table-cell office:value-type="float" office:value="13537.263000000001" table:formula="of:=SUBTOTAL(9;[.F15:.F17])" table:style-name="ce44">
            <text:p><text:s/>13,537<text:s/></text:p>
          </table:table-cell>
          <table:table-cell office:value-type="float" office:value="13717.462000000001" table:formula="of:=SUBTOTAL(9;[.G15:.G17])" table:style-name="ce44">
            <text:p><text:s/>13,717<text:s/></text:p>
          </table:table-cell>
          <table:table-cell office:value-type="float" office:value="4543.5509999999995" table:formula="of:=SUBTOTAL(9;[.H15:.H17])" table:style-name="ce44">
            <text:p><text:s/>4,544<text:s/></text:p>
          </table:table-cell>
          <table:table-cell office:value-type="float" office:value="31979.759999999998" table:formula="of:=SUBTOTAL(9;[.I15:.I17])" table:style-name="ce44">
            <text:p><text:s/>31,980<text:s/></text:p>
          </table:table-cell>
          <table:table-cell office:value-type="float" office:value="88803.684999999983" table:formula="of:=SUBTOTAL(9;[.J15:.J17])" table:style-name="ce125">
            <text:p><text:s/>88,804<text:s/></text:p>
          </table:table-cell>
          <table:table-cell table:number-columns-repeated="16374" table:style-name="ce14"/>
        </table:table-row>
        <table:table-row table:style-name="ro5">
          <table:table-cell/>
          <table:table-cell office:value-type="float" office:value="2005" table:number-columns-spanned="1" table:number-rows-spanned="3" table:style-name="ce416">
            <text:p>2005</text:p>
          </table:table-cell>
          <table:table-cell office:value-type="string" table:style-name="ce122">
            <text:p>Inert</text:p>
          </table:table-cell>
          <table:table-cell office:value-type="float" office:value="1000" table:style-name="ce34">
            <text:p><text:s/>1,000<text:s/></text:p>
          </table:table-cell>
          <table:table-cell office:value-type="float" office:value="7807.8670000000002" table:style-name="ce34">
            <text:p><text:s/>7,808<text:s/></text:p>
          </table:table-cell>
          <table:table-cell office:value-type="float" office:value="2679.17" table:style-name="ce34">
            <text:p><text:s/>2,679<text:s/></text:p>
          </table:table-cell>
          <table:table-cell office:value-type="float" office:value="52.134" table:style-name="ce34">
            <text:p><text:s/>52<text:s/></text:p>
          </table:table-cell>
          <table:table-cell office:value-type="float" office:value="160" table:style-name="ce34">
            <text:p><text:s/>160<text:s/></text:p>
          </table:table-cell>
          <table:table-cell office:value-type="float" office:value="600" table:style-name="ce34">
            <text:p><text:s/>600<text:s/></text:p>
          </table:table-cell>
          <table:table-cell office:value-type="float" office:value="12299.171" table:formula="of:=SUM([.D19:.I19])" table:style-name="ce123">
            <text:p><text:s/>12,299<text:s/></text:p>
          </table:table-cell>
          <table:table-cell table:style-name="ce128"/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6413.2190000000001" table:style-name="ce34">
            <text:p><text:s/>6,413<text:s/></text:p>
          </table:table-cell>
          <table:table-cell office:value-type="float" office:value="6075.0339999999997" table:style-name="ce34">
            <text:p><text:s/>6,075<text:s/></text:p>
          </table:table-cell>
          <table:table-cell office:value-type="float" office:value="17799.748" table:style-name="ce34">
            <text:p><text:s/>17,800<text:s/></text:p>
          </table:table-cell>
          <table:table-cell office:value-type="float" office:value="11793.946" table:style-name="ce34">
            <text:p><text:s/>11,794<text:s/></text:p>
          </table:table-cell>
          <table:table-cell office:value-type="float" office:value="3058.7" table:style-name="ce34">
            <text:p><text:s/>3,059<text:s/></text:p>
          </table:table-cell>
          <table:table-cell office:value-type="float" office:value="29687.307000000001" table:style-name="ce34">
            <text:p><text:s/>29,687<text:s/></text:p>
          </table:table-cell>
          <table:table-cell office:value-type="float" office:value="74827.953999999998" table:formula="of:=SUM([.D20:.I20])" table:style-name="ce123">
            <text:p><text:s/>74,828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5289" table:style-name="ce34">
            <text:p><text:s/>5,289<text:s/></text:p>
          </table:table-cell>
          <table:table-cell office:value-type="float" office:value="56.426000000000002" table:style-name="ce34">
            <text:p><text:s/>56<text:s/></text:p>
          </table:table-cell>
          <table:table-cell office:value-type="float" office:value="227.35" table:style-name="ce34">
            <text:p><text:s/>227<text:s/></text:p>
          </table:table-cell>
          <table:table-cell office:value-type="float" office:value="200.32300000000001" table:style-name="ce34">
            <text:p><text:s/>200<text:s/></text:p>
          </table:table-cell>
          <table:table-cell office:value-type="string" table:style-name="ce34">
            <text:p>-</text:p>
          </table:table-cell>
          <table:table-cell office:value-type="float" office:value="530" table:style-name="ce34">
            <text:p><text:s/>530<text:s/></text:p>
          </table:table-cell>
          <table:table-cell office:value-type="float" office:value="6303.0990000000011" table:formula="of:=SUM([.D21:.I21])" table:style-name="ce123">
            <text:p><text:s/>6,303<text:s/></text:p>
          </table:table-cell>
          <table:table-cell table:number-columns-repeated="16374" table:style-name="ce1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12702.219000000001" table:formula="of:=SUBTOTAL(9;[.D19:.D21])" table:style-name="ce44">
            <text:p><text:s/>12,702<text:s/></text:p>
          </table:table-cell>
          <table:table-cell office:value-type="float" office:value="13939.326999999999" table:formula="of:=SUBTOTAL(9;[.E19:.E21])" table:style-name="ce44">
            <text:p><text:s/>13,939<text:s/></text:p>
          </table:table-cell>
          <table:table-cell office:value-type="float" office:value="20706.267999999996" table:formula="of:=SUBTOTAL(9;[.F19:.F21])" table:style-name="ce44">
            <text:p><text:s/>20,706<text:s/></text:p>
          </table:table-cell>
          <table:table-cell office:value-type="float" office:value="12046.403" table:formula="of:=SUBTOTAL(9;[.G19:.G21])" table:style-name="ce44">
            <text:p><text:s/>12,046<text:s/></text:p>
          </table:table-cell>
          <table:table-cell office:value-type="float" office:value="3218.7" table:formula="of:=SUBTOTAL(9;[.H19:.H21])" table:style-name="ce44">
            <text:p><text:s/>3,219<text:s/></text:p>
          </table:table-cell>
          <table:table-cell office:value-type="float" office:value="30817.307000000001" table:formula="of:=SUBTOTAL(9;[.I19:.I21])" table:style-name="ce129">
            <text:p><text:s/>30,817<text:s/></text:p>
          </table:table-cell>
          <table:table-cell office:value-type="float" office:value="93430.224000000002" table:formula="of:=SUBTOTAL(9;[.J19:.J21])" table:style-name="ce125">
            <text:p><text:s/>93,430<text:s/></text:p>
          </table:table-cell>
          <table:table-cell table:number-columns-repeated="16374" table:style-name="ce14"/>
        </table:table-row>
        <table:table-row table:style-name="ro5">
          <table:table-cell/>
          <table:table-cell office:value-type="float" office:value="2006" table:number-columns-spanned="1" table:number-rows-spanned="3" table:style-name="ce416">
            <text:p>2006</text:p>
          </table:table-cell>
          <table:table-cell office:value-type="string" table:style-name="ce122">
            <text:p>Inert</text:p>
          </table:table-cell>
          <table:table-cell office:value-type="float" office:value="12400" table:style-name="ce34">
            <text:p><text:s/>12,400<text:s/></text:p>
          </table:table-cell>
          <table:table-cell office:value-type="float" office:value="1371.6110000000001" table:style-name="ce34">
            <text:p><text:s/>1,372<text:s/></text:p>
          </table:table-cell>
          <table:table-cell office:value-type="float" office:value="6690.8559999999998" table:style-name="ce34">
            <text:p><text:s/>6,691<text:s/></text:p>
          </table:table-cell>
          <table:table-cell office:value-type="float" office:value="150" table:style-name="ce34">
            <text:p><text:s/>150<text:s/></text:p>
          </table:table-cell>
          <table:table-cell office:value-type="float" office:value="160" table:style-name="ce34">
            <text:p><text:s/>160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20772.467000000001" table:formula="of:=SUM([.D23:.I23])" table:style-name="ce123">
            <text:p><text:s/>20,772<text:s/></text:p>
          </table:table-cell>
          <table:table-cell table:style-name="ce130"/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29476.625" table:style-name="ce34">
            <text:p><text:s/>29,477<text:s/></text:p>
          </table:table-cell>
          <table:table-cell office:value-type="float" office:value="5126.0640000000003" table:style-name="ce34">
            <text:p><text:s/>5,126<text:s/></text:p>
          </table:table-cell>
          <table:table-cell office:value-type="float" office:value="16124.691999999999" table:formula="of:=16064.692+60" table:style-name="ce34">
            <text:p><text:s/>16,125<text:s/></text:p>
          </table:table-cell>
          <table:table-cell office:value-type="float" office:value="13205.433999999999" table:style-name="ce34">
            <text:p><text:s/>13,205<text:s/></text:p>
          </table:table-cell>
          <table:table-cell office:value-type="float" office:value="6328.9089999999997" table:style-name="ce34">
            <text:p><text:s/>6,329<text:s/></text:p>
          </table:table-cell>
          <table:covered-table-cell/>
          <table:table-cell office:value-type="float" office:value="70261.723999999987" table:formula="of:=SUM([.D24:.I24])" table:style-name="ce123">
            <text:p><text:s/>70,262<text:s/></text:p>
          </table:table-cell>
          <table:table-cell table:style-name="ce130"/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5800" table:style-name="ce34">
            <text:p><text:s/>5,800<text:s/></text:p>
          </table:table-cell>
          <table:table-cell office:value-type="float" office:value="11.506" table:style-name="ce34">
            <text:p><text:s/>12<text:s/></text:p>
          </table:table-cell>
          <table:table-cell office:value-type="float" office:value="579.75" table:style-name="ce34">
            <text:p><text:s/>580<text:s/></text:p>
          </table:table-cell>
          <table:table-cell office:value-type="float" office:value="189.75800000000001" table:style-name="ce34">
            <text:p><text:s/>190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6581.0140000000001" table:formula="of:=SUM([.D25:.I25])" table:style-name="ce123">
            <text:p><text:s/>6,581<text:s/></text:p>
          </table:table-cell>
          <table:table-cell table:style-name="ce130"/>
          <table:table-cell table:number-columns-repeated="16373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47676.625" table:formula="of:=SUBTOTAL(9;[.D23:.D25])" table:style-name="ce44">
            <text:p><text:s/>47,677<text:s/></text:p>
          </table:table-cell>
          <table:table-cell office:value-type="float" office:value="6509.1810000000005" table:formula="of:=SUBTOTAL(9;[.E23:.E25])" table:style-name="ce44">
            <text:p><text:s/>6,509<text:s/></text:p>
          </table:table-cell>
          <table:table-cell office:value-type="float" office:value="23395.297999999999" table:formula="of:=SUBTOTAL(9;[.F23:.F25])" table:style-name="ce44">
            <text:p><text:s/>23,395<text:s/></text:p>
          </table:table-cell>
          <table:table-cell office:value-type="float" office:value="13545.191999999999" table:formula="of:=SUBTOTAL(9;[.G23:.G25])" table:style-name="ce44">
            <text:p><text:s/>13,545<text:s/></text:p>
          </table:table-cell>
          <table:table-cell office:value-type="float" office:value="6488.9089999999997" table:formula="of:=SUBTOTAL(9;[.H23:.H25])" table:style-name="ce44">
            <text:p><text:s/>6,489<text:s/></text:p>
          </table:table-cell>
          <table:table-cell table:style-name="ce129"/>
          <table:table-cell office:value-type="float" office:value="97615.204999999987" table:formula="of:=SUBTOTAL(9;[.J23:.J25])" table:style-name="ce125">
            <text:p><text:s/>97,615<text:s/></text:p>
          </table:table-cell>
          <table:table-cell table:style-name="ce130"/>
          <table:table-cell table:number-columns-repeated="16373"/>
        </table:table-row>
        <table:table-row table:style-name="ro5">
          <table:table-cell/>
          <table:table-cell office:value-type="float" office:value="2007" table:number-columns-spanned="1" table:number-rows-spanned="3" table:style-name="ce416">
            <text:p>2007</text:p>
          </table:table-cell>
          <table:table-cell office:value-type="string" table:style-name="ce122">
            <text:p>Inert</text:p>
          </table:table-cell>
          <table:table-cell office:value-type="float" office:value="10245" table:style-name="ce34">
            <text:p><text:s/>10,245<text:s/></text:p>
          </table:table-cell>
          <table:table-cell office:value-type="float" office:value="851" table:style-name="ce34">
            <text:p><text:s/>851<text:s/></text:p>
          </table:table-cell>
          <table:table-cell office:value-type="float" office:value="2730" table:style-name="ce34">
            <text:p><text:s/>2,730<text:s/></text:p>
          </table:table-cell>
          <table:table-cell office:value-type="float" office:value="50" table:style-name="ce34">
            <text:p><text:s/>50<text:s/></text:p>
          </table:table-cell>
          <table:table-cell office:value-type="float" office:value="5" table:style-name="ce34">
            <text:p><text:s/>5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13881" table:formula="of:=SUM([.D27:.I27])" table:style-name="ce123">
            <text:p><text:s/>13,881<text:s/></text:p>
          </table:table-cell>
          <table:table-cell table:number-columns-repeated="16374" table:style-name="ce14"/>
        </table:table-row>
        <table:table-row table:style-name="ro8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20588.505000000001" table:style-name="ce34">
            <text:p><text:s/>20,589<text:s/></text:p>
          </table:table-cell>
          <table:table-cell office:value-type="float" office:value="3352.4090000000001" table:style-name="ce34">
            <text:p><text:s/>3,352<text:s/></text:p>
          </table:table-cell>
          <table:table-cell office:value-type="float" office:value="14970.112999999999" table:formula="of:=14910.113+60" table:style-name="ce34">
            <text:p><text:s/>14,970<text:s/></text:p>
          </table:table-cell>
          <table:table-cell office:value-type="float" office:value="13807.978999999999" table:style-name="ce34">
            <text:p><text:s/>13,808<text:s/></text:p>
          </table:table-cell>
          <table:table-cell office:value-type="float" office:value="5392.6170000000002" table:style-name="ce34">
            <text:p><text:s/>5,393<text:s/></text:p>
          </table:table-cell>
          <table:covered-table-cell/>
          <table:table-cell office:value-type="float" office:value="58111.623" table:formula="of:=SUM([.D28:.I28])" table:style-name="ce123">
            <text:p><text:s/>58,112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8260.098" table:style-name="ce34">
            <text:p><text:s/>8,260<text:s/></text:p>
          </table:table-cell>
          <table:table-cell office:value-type="float" office:value="11.48662" table:style-name="ce34">
            <text:p><text:s/>11<text:s/></text:p>
          </table:table-cell>
          <table:table-cell office:value-type="float" office:value="2044.3" table:style-name="ce34">
            <text:p><text:s/>2,044<text:s/></text:p>
          </table:table-cell>
          <table:table-cell office:value-type="float" office:value="425.3" table:style-name="ce34">
            <text:p><text:s/>425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10741.184619999998" table:formula="of:=SUM([.D29:.I29])" table:style-name="ce123">
            <text:p><text:s/>10,741<text:s/></text:p>
          </table:table-cell>
          <table:table-cell table:number-columns-repeated="16374" table:style-name="ce1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39093.603000000003" table:formula="of:=SUBTOTAL(9;[.D27:.D29])" table:style-name="ce44">
            <text:p><text:s/>39,094<text:s/></text:p>
          </table:table-cell>
          <table:table-cell office:value-type="float" office:value="4214.8956199999993" table:formula="of:=SUBTOTAL(9;[.E27:.E29])" table:style-name="ce44">
            <text:p><text:s/>4,215<text:s/></text:p>
          </table:table-cell>
          <table:table-cell office:value-type="float" office:value="19744.412999999997" table:formula="of:=SUBTOTAL(9;[.F27:.F29])" table:style-name="ce44">
            <text:p><text:s/>19,744<text:s/></text:p>
          </table:table-cell>
          <table:table-cell office:value-type="float" office:value="14283.278999999999" table:formula="of:=SUBTOTAL(9;[.G27:.G29])" table:style-name="ce44">
            <text:p><text:s/>14,283<text:s/></text:p>
          </table:table-cell>
          <table:table-cell office:value-type="float" office:value="5397.6170000000002" table:formula="of:=SUBTOTAL(9;[.H27:.H29])" table:style-name="ce44">
            <text:p><text:s/>5,398<text:s/></text:p>
          </table:table-cell>
          <table:table-cell table:style-name="ce129"/>
          <table:table-cell office:value-type="float" office:value="82733.807619999992" table:formula="of:=SUBTOTAL(9;[.J27:.J29])" table:style-name="ce125">
            <text:p><text:s/>82,734<text:s/></text:p>
          </table:table-cell>
          <table:table-cell table:number-columns-repeated="16374" table:style-name="ce14"/>
        </table:table-row>
        <table:table-row table:style-name="ro5">
          <table:table-cell/>
          <table:table-cell office:value-type="float" office:value="2008" table:number-columns-spanned="1" table:number-rows-spanned="3" table:style-name="ce416">
            <text:p>2008</text:p>
          </table:table-cell>
          <table:table-cell office:value-type="string" table:style-name="ce122">
            <text:p>Inert</text:p>
          </table:table-cell>
          <table:table-cell office:value-type="float" office:value="10080" table:style-name="ce120">
            <text:p><text:s/>10,080<text:s/></text:p>
          </table:table-cell>
          <table:table-cell office:value-type="float" office:value="1358" table:style-name="ce28">
            <text:p><text:s/>1,358<text:s/></text:p>
          </table:table-cell>
          <table:table-cell office:value-type="float" office:value="2034.7139999999999" table:style-name="ce28">
            <text:p><text:s/>2,035<text:s/></text:p>
          </table:table-cell>
          <table:table-cell office:value-type="float" office:value="0" table:style-name="ce28">
            <text:p><text:s/>-<text:s/></text:p>
          </table:table-cell>
          <table:table-cell office:value-type="float" office:value="5" table:style-name="ce28">
            <text:p><text:s/>5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13477.714" table:formula="of:=SUM([.D31:.I31])" table:style-name="ce123">
            <text:p><text:s/>13,478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8144.608" table:style-name="ce35">
            <text:p><text:s/>18,145<text:s/></text:p>
          </table:table-cell>
          <table:table-cell office:value-type="float" office:value="4621.7740000000003" table:style-name="ce34">
            <text:p><text:s/>4,622<text:s/></text:p>
          </table:table-cell>
          <table:table-cell office:value-type="float" office:value="14753.716" table:style-name="ce34">
            <text:p><text:s/>14,754<text:s/></text:p>
          </table:table-cell>
          <table:table-cell office:value-type="float" office:value="13079.984" table:style-name="ce34">
            <text:p><text:s/>13,080<text:s/></text:p>
          </table:table-cell>
          <table:table-cell office:value-type="float" office:value="6028.7" table:style-name="ce34">
            <text:p><text:s/>6,029<text:s/></text:p>
          </table:table-cell>
          <table:covered-table-cell/>
          <table:table-cell office:value-type="float" office:value="56628.781999999992" table:formula="of:=SUM([.D32:.I32])" table:style-name="ce123">
            <text:p><text:s/>56,629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2700.6309999999999" table:style-name="ce35">
            <text:p><text:s/>2,701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650" table:style-name="ce34">
            <text:p><text:s/>1,650<text:s/></text:p>
          </table:table-cell>
          <table:table-cell office:value-type="float" office:value="380" table:style-name="ce34">
            <text:p><text:s/>380<text:s/></text:p>
          </table:table-cell>
          <table:table-cell office:value-type="float" office:value="0" table:style-name="ce40">
            <text:p><text:s/>-<text:s/></text:p>
          </table:table-cell>
          <table:covered-table-cell/>
          <table:table-cell office:value-type="float" office:value="4730.6309999999994" table:formula="of:=SUM([.D33:.I33])" table:style-name="ce123">
            <text:p><text:s/>4,731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30925.239000000001" table:formula="of:=SUBTOTAL(9;[.D31:.D33])" table:style-name="ce44">
            <text:p><text:s/>30,925<text:s/></text:p>
          </table:table-cell>
          <table:table-cell office:value-type="float" office:value="5979.7740000000003" table:formula="of:=SUBTOTAL(9;[.E31:.E33])" table:style-name="ce44">
            <text:p><text:s/>5,980<text:s/></text:p>
          </table:table-cell>
          <table:table-cell office:value-type="float" office:value="18438.43" table:formula="of:=SUBTOTAL(9;[.F31:.F33])" table:style-name="ce44">
            <text:p><text:s/>18,438<text:s/></text:p>
          </table:table-cell>
          <table:table-cell office:value-type="float" office:value="13459.984" table:formula="of:=SUBTOTAL(9;[.G31:.G33])" table:style-name="ce44">
            <text:p><text:s/>13,460<text:s/></text:p>
          </table:table-cell>
          <table:table-cell office:value-type="float" office:value="6033.7" table:formula="of:=SUBTOTAL(9;[.H31:.H33])" table:style-name="ce44">
            <text:p><text:s/>6,034<text:s/></text:p>
          </table:table-cell>
          <table:table-cell table:style-name="ce129"/>
          <table:table-cell office:value-type="float" office:value="74837.126999999979" table:formula="of:=SUBTOTAL(9;[.J31:.J33])" table:style-name="ce125">
            <text:p><text:s/>74,837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09" table:number-columns-spanned="1" table:number-rows-spanned="3" table:style-name="ce416">
            <text:p>2009</text:p>
          </table:table-cell>
          <table:table-cell office:value-type="string" table:style-name="ce122">
            <text:p>Inert</text:p>
          </table:table-cell>
          <table:table-cell office:value-type="float" office:value="10000" table:style-name="ce120">
            <text:p><text:s/>10,000<text:s/></text:p>
          </table:table-cell>
          <table:table-cell office:value-type="float" office:value="6158.5990000000002" table:style-name="ce28">
            <text:p><text:s/>6,159<text:s/></text:p>
          </table:table-cell>
          <table:table-cell office:value-type="float" office:value="2391.9560000000001" table:style-name="ce28">
            <text:p><text:s/>2,392<text:s/></text:p>
          </table:table-cell>
          <table:table-cell office:value-type="float" office:value="270" table:style-name="ce28">
            <text:p><text:s/>270<text:s/></text:p>
          </table:table-cell>
          <table:table-cell office:value-type="float" office:value="5" table:style-name="ce28">
            <text:p><text:s/>5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18825.555" table:formula="of:=SUM([.D35:.I35])" table:style-name="ce123">
            <text:p><text:s/>18,82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9374.985000000001" table:style-name="ce35">
            <text:p><text:s/>19,375<text:s/></text:p>
          </table:table-cell>
          <table:table-cell office:value-type="float" office:value="5583.1009999999997" table:style-name="ce34">
            <text:p><text:s/>5,583<text:s/></text:p>
          </table:table-cell>
          <table:table-cell office:value-type="float" office:value="14569.181" table:style-name="ce34">
            <text:p><text:s/>14,569<text:s/></text:p>
          </table:table-cell>
          <table:table-cell office:value-type="float" office:value="12038.315000000001" table:style-name="ce34">
            <text:p><text:s/>12,038<text:s/></text:p>
          </table:table-cell>
          <table:table-cell office:value-type="float" office:value="4390.2209999999995" table:style-name="ce34">
            <text:p><text:s/>4,390<text:s/></text:p>
          </table:table-cell>
          <table:covered-table-cell/>
          <table:table-cell office:value-type="float" office:value="55955.803" table:formula="of:=SUM([.D36:.I36])" table:style-name="ce123">
            <text:p><text:s/>55,95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2603.4430000000002" table:style-name="ce35">
            <text:p><text:s/>2,603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750" table:style-name="ce34">
            <text:p><text:s/>750<text:s/></text:p>
          </table:table-cell>
          <table:table-cell office:value-type="float" office:value="380" table:style-name="ce34">
            <text:p><text:s/>380<text:s/></text:p>
          </table:table-cell>
          <table:table-cell office:value-type="float" office:value="0" table:style-name="ce40">
            <text:p><text:s/>-<text:s/></text:p>
          </table:table-cell>
          <table:covered-table-cell/>
          <table:table-cell office:value-type="float" office:value="3733.4430000000002" table:formula="of:=SUM([.D37:.I37])" table:style-name="ce123">
            <text:p><text:s/>3,733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31978.428" table:formula="of:=SUBTOTAL(9;[.D35:.D37])" table:style-name="ce44">
            <text:p><text:s/>31,978<text:s/></text:p>
          </table:table-cell>
          <table:table-cell office:value-type="float" office:value="11741.7" table:formula="of:=SUBTOTAL(9;[.E35:.E37])" table:style-name="ce44">
            <text:p><text:s/>11,742<text:s/></text:p>
          </table:table-cell>
          <table:table-cell office:value-type="float" office:value="17711.137000000002" table:formula="of:=SUBTOTAL(9;[.F35:.F37])" table:style-name="ce44">
            <text:p><text:s/>17,711<text:s/></text:p>
          </table:table-cell>
          <table:table-cell office:value-type="float" office:value="12688.315000000001" table:formula="of:=SUBTOTAL(9;[.G35:.G37])" table:style-name="ce44">
            <text:p><text:s/>12,688<text:s/></text:p>
          </table:table-cell>
          <table:table-cell office:value-type="float" office:value="4395.2209999999995" table:formula="of:=SUBTOTAL(9;[.H35:.H37])" table:style-name="ce44">
            <text:p><text:s/>4,395<text:s/></text:p>
          </table:table-cell>
          <table:table-cell table:style-name="ce129"/>
          <table:table-cell office:value-type="float" office:value="78514.801000000007" table:formula="of:=SUBTOTAL(9;[.J35:.J37])" table:style-name="ce125">
            <text:p><text:s/>78,515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0" table:number-columns-spanned="1" table:number-rows-spanned="3" table:style-name="ce416">
            <text:p>2010</text:p>
          </table:table-cell>
          <table:table-cell office:value-type="string" table:style-name="ce122">
            <text:p>Inert</text:p>
          </table:table-cell>
          <table:table-cell office:value-type="float" office:value="10000" table:style-name="ce120">
            <text:p><text:s/>10,000<text:s/></text:p>
          </table:table-cell>
          <table:table-cell office:value-type="float" office:value="1281.451" table:style-name="ce28">
            <text:p><text:s/>1,281<text:s/></text:p>
          </table:table-cell>
          <table:table-cell office:value-type="float" office:value="2503.2829999999999" table:style-name="ce28">
            <text:p><text:s/>2,503<text:s/></text:p>
          </table:table-cell>
          <table:table-cell office:value-type="float" office:value="244.25800000000001" table:style-name="ce28">
            <text:p><text:s/>244<text:s/></text:p>
          </table:table-cell>
          <table:table-cell office:value-type="float" office:value="0" table:style-name="ce28">
            <text:p><text:s/>-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14028.992" table:formula="of:=SUM([.D39:.I39])" table:style-name="ce123">
            <text:p><text:s/>14,02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9726.22" table:style-name="ce35">
            <text:p><text:s/>19,726<text:s/></text:p>
          </table:table-cell>
          <table:table-cell office:value-type="float" office:value="5978.2650000000003" table:style-name="ce34">
            <text:p><text:s/>5,978<text:s/></text:p>
          </table:table-cell>
          <table:table-cell office:value-type="float" office:value="13830.991" table:style-name="ce34">
            <text:p><text:s/>13,831<text:s/></text:p>
          </table:table-cell>
          <table:table-cell office:value-type="float" office:value="11158.304" table:style-name="ce34">
            <text:p><text:s/>11,158<text:s/></text:p>
          </table:table-cell>
          <table:table-cell office:value-type="float" office:value="4358.2179999999998" table:style-name="ce34">
            <text:p><text:s/>4,358<text:s/></text:p>
          </table:table-cell>
          <table:covered-table-cell/>
          <table:table-cell office:value-type="float" office:value="55051.998" table:formula="of:=SUM([.D40:.I40])" table:style-name="ce123">
            <text:p><text:s/>55,05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1815.075" table:style-name="ce35">
            <text:p><text:s/>1,815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600" table:style-name="ce34">
            <text:p><text:s/>1,600<text:s/></text:p>
          </table:table-cell>
          <table:table-cell office:value-type="float" office:value="170" table:style-name="ce34">
            <text:p><text:s/>170<text:s/></text:p>
          </table:table-cell>
          <table:table-cell office:value-type="float" office:value="0" table:style-name="ce40">
            <text:p><text:s/>-<text:s/></text:p>
          </table:table-cell>
          <table:covered-table-cell/>
          <table:table-cell office:value-type="float" office:value="3585.0749999999998" table:formula="of:=SUM([.D41:.I41])" table:style-name="ce123">
            <text:p><text:s/>3,585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31541.295000000002" table:formula="of:=SUBTOTAL(9;[.D39:.D41])" table:style-name="ce44">
            <text:p><text:s/>31,541<text:s/></text:p>
          </table:table-cell>
          <table:table-cell office:value-type="float" office:value="7259.7160000000003" table:formula="of:=SUBTOTAL(9;[.E39:.E41])" table:style-name="ce44">
            <text:p><text:s/>7,260<text:s/></text:p>
          </table:table-cell>
          <table:table-cell office:value-type="float" office:value="17934.273999999998" table:formula="of:=SUBTOTAL(9;[.F39:.F41])" table:style-name="ce44">
            <text:p><text:s/>17,934<text:s/></text:p>
          </table:table-cell>
          <table:table-cell office:value-type="float" office:value="11572.562" table:formula="of:=SUBTOTAL(9;[.G39:.G41])" table:style-name="ce44">
            <text:p><text:s/>11,573<text:s/></text:p>
          </table:table-cell>
          <table:table-cell office:value-type="float" office:value="4358.2179999999998" table:formula="of:=SUBTOTAL(9;[.H39:.H41])" table:style-name="ce44">
            <text:p><text:s/>4,358<text:s/></text:p>
          </table:table-cell>
          <table:table-cell table:style-name="ce129"/>
          <table:table-cell office:value-type="float" office:value="72666.065000000002" table:formula="of:=SUBTOTAL(9;[.J39:.J41])" table:style-name="ce125">
            <text:p><text:s/>72,666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1" table:number-columns-spanned="1" table:number-rows-spanned="3" table:style-name="ce416">
            <text:p>2011</text:p>
          </table:table-cell>
          <table:table-cell office:value-type="string" table:style-name="ce122">
            <text:p>Inert</text:p>
          </table:table-cell>
          <table:table-cell office:value-type="float" office:value="10000" table:style-name="ce120">
            <text:p><text:s/>10,000<text:s/></text:p>
          </table:table-cell>
          <table:table-cell office:value-type="float" office:value="799.68499999999995" table:style-name="ce28">
            <text:p><text:s/>800<text:s/></text:p>
          </table:table-cell>
          <table:table-cell office:value-type="float" office:value="2771.9610000000002" table:style-name="ce28">
            <text:p><text:s/>2,772<text:s/></text:p>
          </table:table-cell>
          <table:table-cell office:value-type="float" office:value="313.24099999999999" table:style-name="ce28">
            <text:p><text:s/>313<text:s/></text:p>
          </table:table-cell>
          <table:table-cell office:value-type="float" office:value="0" table:style-name="ce28">
            <text:p><text:s/>-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13884.887000000001" table:formula="of:=SUM([.D43:.I43])" table:style-name="ce123">
            <text:p><text:s/>13,88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20994.756000000001" table:style-name="ce35">
            <text:p><text:s/>20,995<text:s/></text:p>
          </table:table-cell>
          <table:table-cell office:value-type="float" office:value="6499.973" table:style-name="ce34">
            <text:p><text:s/>6,500<text:s/></text:p>
          </table:table-cell>
          <table:table-cell office:value-type="float" office:value="11824.804999999998" table:style-name="ce34">
            <text:p><text:s/>11,825<text:s/></text:p>
          </table:table-cell>
          <table:table-cell office:value-type="float" office:value="10504.878000000001" table:style-name="ce34">
            <text:p><text:s/>10,505<text:s/></text:p>
          </table:table-cell>
          <table:table-cell office:value-type="float" office:value="4230.5619999999999" table:style-name="ce34">
            <text:p><text:s/>4,231<text:s/></text:p>
          </table:table-cell>
          <table:covered-table-cell/>
          <table:table-cell office:value-type="float" office:value="54054.973999999995" table:formula="of:=SUM([.D44:.I44])" table:style-name="ce123">
            <text:p><text:s/>54,05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1866.135" table:style-name="ce35">
            <text:p><text:s/>1,866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600" table:style-name="ce34">
            <text:p><text:s/>1,600<text:s/></text:p>
          </table:table-cell>
          <table:table-cell office:value-type="float" office:value="170" table:style-name="ce34">
            <text:p><text:s/>170<text:s/></text:p>
          </table:table-cell>
          <table:table-cell office:value-type="float" office:value="0" table:style-name="ce40">
            <text:p><text:s/>-<text:s/></text:p>
          </table:table-cell>
          <table:covered-table-cell/>
          <table:table-cell office:value-type="float" office:value="3636.1350000000002" table:formula="of:=SUM([.D45:.I45])" table:style-name="ce123">
            <text:p><text:s/>3,636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32860.891000000003" table:formula="of:=SUBTOTAL(9;[.D43:.D45])" table:style-name="ce44">
            <text:p><text:s/>32,861<text:s/></text:p>
          </table:table-cell>
          <table:table-cell office:value-type="float" office:value="7299.6579999999994" table:formula="of:=SUBTOTAL(9;[.E43:.E45])" table:style-name="ce44">
            <text:p><text:s/>7,300<text:s/></text:p>
          </table:table-cell>
          <table:table-cell office:value-type="float" office:value="16196.766" table:formula="of:=SUBTOTAL(9;[.F43:.F45])" table:style-name="ce44">
            <text:p><text:s/>16,197<text:s/></text:p>
          </table:table-cell>
          <table:table-cell office:value-type="float" office:value="10988.119000000001" table:formula="of:=SUBTOTAL(9;[.G43:.G45])" table:style-name="ce44">
            <text:p><text:s/>10,988<text:s/></text:p>
          </table:table-cell>
          <table:table-cell office:value-type="float" office:value="4230.5619999999999" table:formula="of:=SUBTOTAL(9;[.H43:.H45])" table:style-name="ce44">
            <text:p><text:s/>4,231<text:s/></text:p>
          </table:table-cell>
          <table:table-cell table:style-name="ce129"/>
          <table:table-cell office:value-type="float" office:value="71575.995999999985" table:formula="of:=SUBTOTAL(9;[.J43:.J45])" table:style-name="ce125">
            <text:p><text:s/>71,576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2" table:number-columns-spanned="1" table:number-rows-spanned="3" table:style-name="ce416">
            <text:p>2012</text:p>
          </table:table-cell>
          <table:table-cell office:value-type="string" table:style-name="ce122">
            <text:p>Inert</text:p>
          </table:table-cell>
          <table:table-cell office:value-type="float" office:value="10000" table:style-name="ce120">
            <text:p><text:s/>10,000<text:s/></text:p>
          </table:table-cell>
          <table:table-cell office:value-type="float" office:value="786.22299999999996" table:style-name="ce28">
            <text:p><text:s/>786<text:s/></text:p>
          </table:table-cell>
          <table:table-cell office:value-type="float" office:value="2944.3809999999999" table:style-name="ce28">
            <text:p><text:s/>2,944<text:s/>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0" table:style-name="ce34">
            <text:p><text:s/>-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13880.603999999999" table:formula="of:=SUM([.D47:.I47])" table:style-name="ce123">
            <text:p><text:s/>13,881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8816.999000000003" table:style-name="ce35">
            <text:p><text:s/>18,817<text:s/></text:p>
          </table:table-cell>
          <table:table-cell office:value-type="float" office:value="3604.087" table:style-name="ce34">
            <text:p><text:s/>3,604<text:s/></text:p>
          </table:table-cell>
          <table:table-cell office:value-type="float" office:value="11236.194000000001" table:style-name="ce34">
            <text:p><text:s/>11,236<text:s/></text:p>
          </table:table-cell>
          <table:table-cell office:value-type="float" office:value="10058.428" table:style-name="ce34">
            <text:p><text:s/>10,058<text:s/></text:p>
          </table:table-cell>
          <table:table-cell office:value-type="float" office:value="4082.5619999999999" table:style-name="ce34">
            <text:p><text:s/>4,083<text:s/></text:p>
          </table:table-cell>
          <table:covered-table-cell/>
          <table:table-cell office:value-type="float" office:value="47798.270000000004" table:formula="of:=SUM([.D48:.I48])" table:style-name="ce123">
            <text:p><text:s/>47,79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1724.625" table:style-name="ce35">
            <text:p><text:s/>1,725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600" table:style-name="ce34">
            <text:p><text:s/>1,600<text:s/></text:p>
          </table:table-cell>
          <table:table-cell office:value-type="float" office:value="150" table:style-name="ce34">
            <text:p><text:s/>150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3474.625" table:formula="of:=SUM([.D49:.I49])" table:style-name="ce123">
            <text:p><text:s/>3,475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30541.624000000003" table:formula="of:=SUBTOTAL(9;[.D47:.D49])" table:style-name="ce44">
            <text:p><text:s/>30,542<text:s/></text:p>
          </table:table-cell>
          <table:table-cell office:value-type="float" office:value="4390.3099999999995" table:formula="of:=SUBTOTAL(9;[.E47:.E49])" table:style-name="ce44">
            <text:p><text:s/>4,390<text:s/></text:p>
          </table:table-cell>
          <table:table-cell office:value-type="float" office:value="15780.575000000001" table:formula="of:=SUBTOTAL(9;[.F47:.F49])" table:style-name="ce44">
            <text:p><text:s/>15,781<text:s/></text:p>
          </table:table-cell>
          <table:table-cell office:value-type="float" office:value="10358.428" table:formula="of:=SUBTOTAL(9;[.G47:.G49])" table:style-name="ce44">
            <text:p><text:s/>10,358<text:s/></text:p>
          </table:table-cell>
          <table:table-cell office:value-type="float" office:value="4082.5619999999999" table:formula="of:=SUBTOTAL(9;[.H47:.H49])" table:style-name="ce44">
            <text:p><text:s/>4,083<text:s/></text:p>
          </table:table-cell>
          <table:table-cell table:style-name="ce129"/>
          <table:table-cell office:value-type="float" office:value="65153.499000000003" table:formula="of:=SUBTOTAL(9;[.J47:.J49])" table:style-name="ce125">
            <text:p><text:s/>65,153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3" table:number-columns-spanned="1" table:number-rows-spanned="3" table:style-name="ce416">
            <text:p>2013</text:p>
          </table:table-cell>
          <table:table-cell office:value-type="string" table:style-name="ce122">
            <text:p>Inert</text:p>
          </table:table-cell>
          <table:table-cell office:value-type="float" office:value="10000" table:style-name="ce120">
            <text:p><text:s/>10,000<text:s/></text:p>
          </table:table-cell>
          <table:table-cell office:value-type="float" office:value="770.23900000000003" table:style-name="ce28">
            <text:p><text:s/>770<text:s/></text:p>
          </table:table-cell>
          <table:table-cell office:value-type="float" office:value="2611.2510000000002" table:style-name="ce28">
            <text:p><text:s/>2,611<text:s/></text:p>
          </table:table-cell>
          <table:table-cell office:value-type="float" office:value="1297.636" table:style-name="ce28">
            <text:p><text:s/>1,298<text:s/></text:p>
          </table:table-cell>
          <table:table-cell office:value-type="float" office:value="0" table:style-name="ce34">
            <text:p><text:s/>-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14679.126" table:formula="of:=SUM([.D51:.I51])" table:style-name="ce123">
            <text:p><text:s/>14,679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7138.175999999999" table:style-name="ce35">
            <text:p><text:s/>17,138<text:s/></text:p>
          </table:table-cell>
          <table:table-cell office:value-type="float" office:value="4474.4750000000004" table:style-name="ce34">
            <text:p><text:s/>4,474<text:s/></text:p>
          </table:table-cell>
          <table:table-cell office:value-type="float" office:value="10069.052" table:style-name="ce34">
            <text:p><text:s/>10,069<text:s/></text:p>
          </table:table-cell>
          <table:table-cell office:value-type="float" office:value="9598.1649999999991" table:style-name="ce34">
            <text:p><text:s/>9,598<text:s/></text:p>
          </table:table-cell>
          <table:table-cell office:value-type="float" office:value="3590.5330000000004" table:style-name="ce34">
            <text:p><text:s/>3,591<text:s/></text:p>
          </table:table-cell>
          <table:covered-table-cell/>
          <table:table-cell office:value-type="float" office:value="44870.400999999998" table:formula="of:=SUM([.D52:.I52])" table:style-name="ce123">
            <text:p><text:s/>44,87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1672.1110000000001" table:style-name="ce35">
            <text:p><text:s/>1,672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600" table:style-name="ce34">
            <text:p><text:s/>1,600<text:s/></text:p>
          </table:table-cell>
          <table:table-cell office:value-type="float" office:value="150" table:style-name="ce34">
            <text:p><text:s/>150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3422.1109999999999" table:formula="of:=SUM([.D53:.I53])" table:style-name="ce123">
            <text:p><text:s/>3,422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28810.287" table:formula="of:=SUBTOTAL(9;[.D51:.D53])" table:style-name="ce44">
            <text:p><text:s/>28,810<text:s/></text:p>
          </table:table-cell>
          <table:table-cell office:value-type="float" office:value="5244.7139999999999" table:formula="of:=SUBTOTAL(9;[.E51:.E53])" table:style-name="ce44">
            <text:p><text:s/>5,245<text:s/></text:p>
          </table:table-cell>
          <table:table-cell office:value-type="float" office:value="14280.303" table:formula="of:=SUBTOTAL(9;[.F51:.F53])" table:style-name="ce44">
            <text:p><text:s/>14,280<text:s/></text:p>
          </table:table-cell>
          <table:table-cell office:value-type="float" office:value="11045.800999999999" table:formula="of:=SUBTOTAL(9;[.G51:.G53])" table:style-name="ce44">
            <text:p><text:s/>11,046<text:s/></text:p>
          </table:table-cell>
          <table:table-cell office:value-type="float" office:value="3590.5330000000004" table:formula="of:=SUBTOTAL(9;[.H51:.H53])" table:style-name="ce44">
            <text:p><text:s/>3,591<text:s/></text:p>
          </table:table-cell>
          <table:table-cell table:style-name="ce129"/>
          <table:table-cell office:value-type="float" office:value="62971.637999999999" table:formula="of:=SUBTOTAL(9;[.J51:.J53])" table:style-name="ce125">
            <text:p><text:s/>62,972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4" table:number-columns-spanned="1" table:number-rows-spanned="3" table:style-name="ce416">
            <text:p>2014</text:p>
          </table:table-cell>
          <table:table-cell office:value-type="string" table:style-name="ce122">
            <text:p>Inert</text:p>
          </table:table-cell>
          <table:table-cell office:value-type="float" office:value="1400" table:style-name="ce34">
            <text:p><text:s/>1,400<text:s/></text:p>
          </table:table-cell>
          <table:table-cell office:value-type="float" office:value="769" table:style-name="ce34">
            <text:p><text:s/>769<text:s/></text:p>
          </table:table-cell>
          <table:table-cell office:value-type="float" office:value="3741.627" table:style-name="ce34">
            <text:p><text:s/>3,742<text:s/></text:p>
          </table:table-cell>
          <table:table-cell office:value-type="float" office:value="1188.636" table:style-name="ce34">
            <text:p><text:s/>1,189<text:s/></text:p>
          </table:table-cell>
          <table:table-cell office:value-type="float" office:value="1176.7619999999999" table:style-name="ce34">
            <text:p><text:s/>1,177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8276.0250000000015" table:formula="of:=SUM([.D55:.I55])" table:style-name="ce123">
            <text:p><text:s/>8,276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7050.033000000003" table:style-name="ce34">
            <text:p><text:s/>17,050<text:s/></text:p>
          </table:table-cell>
          <table:table-cell office:value-type="float" office:value="4571.6370000000006" table:style-name="ce34">
            <text:p><text:s/>4,572<text:s/></text:p>
          </table:table-cell>
          <table:table-cell office:value-type="float" office:value="9722.237000000001" table:style-name="ce34">
            <text:p><text:s/>9,722<text:s/></text:p>
          </table:table-cell>
          <table:table-cell office:value-type="float" office:value="9196.1539999999986" table:style-name="ce34">
            <text:p><text:s/>9,196<text:s/></text:p>
          </table:table-cell>
          <table:table-cell office:value-type="float" office:value="3345.4250000000002" table:style-name="ce34">
            <text:p><text:s/>3,345<text:s/></text:p>
          </table:table-cell>
          <table:covered-table-cell/>
          <table:table-cell office:value-type="float" office:value="43885.486000000004" table:formula="of:=SUM([.D56:.I56])" table:style-name="ce123">
            <text:p><text:s/>43,885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1612.1690000000001" table:style-name="ce34">
            <text:p><text:s/>1,612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600" table:style-name="ce34">
            <text:p><text:s/>1,600<text:s/></text:p>
          </table:table-cell>
          <table:table-cell office:value-type="float" office:value="150" table:style-name="ce34">
            <text:p><text:s/>150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3362.1689999999999" table:formula="of:=SUM([.D57:.I57])" table:style-name="ce123">
            <text:p><text:s/>3,362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20062.202000000005" table:formula="of:=SUBTOTAL(9;[.D55:.D57])" table:style-name="ce44">
            <text:p><text:s/>20,062<text:s/></text:p>
          </table:table-cell>
          <table:table-cell office:value-type="float" office:value="5340.6370000000006" table:formula="of:=SUBTOTAL(9;[.E55:.E57])" table:style-name="ce44">
            <text:p><text:s/>5,341<text:s/></text:p>
          </table:table-cell>
          <table:table-cell office:value-type="float" office:value="15063.864000000001" table:formula="of:=SUBTOTAL(9;[.F55:.F57])" table:style-name="ce44">
            <text:p><text:s/>15,064<text:s/></text:p>
          </table:table-cell>
          <table:table-cell office:value-type="float" office:value="10534.789999999999" table:formula="of:=SUBTOTAL(9;[.G55:.G57])" table:style-name="ce44">
            <text:p><text:s/>10,535<text:s/></text:p>
          </table:table-cell>
          <table:table-cell office:value-type="float" office:value="4522.1869999999999" table:formula="of:=SUBTOTAL(9;[.H55:.H57])" table:style-name="ce44">
            <text:p><text:s/>4,522<text:s/></text:p>
          </table:table-cell>
          <table:table-cell table:style-name="ce129"/>
          <table:table-cell office:value-type="float" office:value="55523.680000000008" table:formula="of:=SUBTOTAL(9;[.J55:.J57])" table:style-name="ce125">
            <text:p><text:s/>55,524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5" table:number-columns-spanned="1" table:number-rows-spanned="3" table:style-name="ce416">
            <text:p>2015</text:p>
          </table:table-cell>
          <table:table-cell office:value-type="string" table:style-name="ce122">
            <text:p>Inert</text:p>
          </table:table-cell>
          <table:table-cell office:value-type="float" office:value="538.86" table:style-name="ce34">
            <text:p><text:s/>539<text:s/></text:p>
          </table:table-cell>
          <table:table-cell office:value-type="float" office:value="1602.8820000000001" table:style-name="ce34">
            <text:p><text:s/>1,603<text:s/></text:p>
          </table:table-cell>
          <table:table-cell office:value-type="float" office:value="1980.653" table:style-name="ce34">
            <text:p><text:s/>1,981<text:s/></text:p>
          </table:table-cell>
          <table:table-cell office:value-type="float" office:value="1104.3009999999999" table:style-name="ce34">
            <text:p><text:s/>1,104<text:s/></text:p>
          </table:table-cell>
          <table:table-cell office:value-type="float" office:value="1065.335" table:style-name="ce34">
            <text:p><text:s/>1,065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6292.0309999999999" table:formula="of:=SUM([.D59:.I59])" table:style-name="ce123">
            <text:p><text:s/>6,292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6245.453000000001" table:style-name="ce34">
            <text:p><text:s/>16,245<text:s/></text:p>
          </table:table-cell>
          <table:table-cell office:value-type="float" office:value="3445.373" table:style-name="ce34">
            <text:p><text:s/>3,445<text:s/></text:p>
          </table:table-cell>
          <table:table-cell office:value-type="float" office:value="9366.9420000000009" table:style-name="ce34">
            <text:p><text:s/>9,367<text:s/></text:p>
          </table:table-cell>
          <table:table-cell office:value-type="float" office:value="8935.878999999999" table:style-name="ce34">
            <text:p><text:s/>8,936<text:s/></text:p>
          </table:table-cell>
          <table:table-cell office:value-type="float" office:value="3180.1610000000001" table:style-name="ce34">
            <text:p><text:s/>3,180<text:s/></text:p>
          </table:table-cell>
          <table:covered-table-cell/>
          <table:table-cell office:value-type="float" office:value="41173.808000000005" table:formula="of:=SUM([.D60:.I60])" table:style-name="ce123">
            <text:p><text:s/>41,17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1624.191" table:style-name="ce34">
            <text:p><text:s/>1,624<text:s/></text:p>
          </table:table-cell>
          <table:table-cell office:value-type="string" table:style-name="ce34">
            <text:p>-</text:p>
          </table:table-cell>
          <table:table-cell office:value-type="float" office:value="1600" table:style-name="ce34">
            <text:p><text:s/>1,600<text:s/></text:p>
          </table:table-cell>
          <table:table-cell office:value-type="float" office:value="150" table:style-name="ce34">
            <text:p><text:s/>150<text:s/></text:p>
          </table:table-cell>
          <table:table-cell office:value-type="string" table:style-name="ce34">
            <text:p>-</text:p>
          </table:table-cell>
          <table:covered-table-cell/>
          <table:table-cell office:value-type="float" office:value="3374.1909999999998" table:formula="of:=SUM([.D61:.I61])" table:style-name="ce123">
            <text:p><text:s/>3,374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18408.504000000001" table:formula="of:=SUBTOTAL(9;[.D59:.D61])" table:style-name="ce44">
            <text:p><text:s/>18,409<text:s/></text:p>
          </table:table-cell>
          <table:table-cell office:value-type="float" office:value="5048.2550000000001" table:formula="of:=SUBTOTAL(9;[.E59:.E61])" table:style-name="ce44">
            <text:p><text:s/>5,048<text:s/></text:p>
          </table:table-cell>
          <table:table-cell office:value-type="float" office:value="12947.595000000001" table:formula="of:=SUBTOTAL(9;[.F59:.F61])" table:style-name="ce44">
            <text:p><text:s/>12,948<text:s/></text:p>
          </table:table-cell>
          <table:table-cell office:value-type="float" office:value="10190.179999999998" table:formula="of:=SUBTOTAL(9;[.G59:.G61])" table:style-name="ce44">
            <text:p><text:s/>10,190<text:s/></text:p>
          </table:table-cell>
          <table:table-cell office:value-type="float" office:value="4245.4960000000001" table:formula="of:=SUBTOTAL(9;[.H59:.H61])" table:style-name="ce44">
            <text:p><text:s/>4,245<text:s/></text:p>
          </table:table-cell>
          <table:table-cell table:style-name="ce129"/>
          <table:table-cell office:value-type="float" office:value="50840.030000000006" table:formula="of:=SUBTOTAL(9;[.J59:.J61])" table:style-name="ce125">
            <text:p><text:s/>50,840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16" table:number-columns-spanned="1" table:number-rows-spanned="3" table:style-name="ce416">
            <text:p>2016</text:p>
          </table:table-cell>
          <table:table-cell office:value-type="string" table:style-name="ce122">
            <text:p>Inert</text:p>
          </table:table-cell>
          <table:table-cell office:value-type="float" office:value="1025.7" table:style-name="ce34">
            <text:p><text:s/>1,026<text:s/></text:p>
          </table:table-cell>
          <table:table-cell office:value-type="float" office:value="1045.8430000000001" table:style-name="ce34">
            <text:p><text:s/>1,046<text:s/></text:p>
          </table:table-cell>
          <table:table-cell office:value-type="float" office:value="1707.614" table:style-name="ce34">
            <text:p><text:s/>1,708<text:s/></text:p>
          </table:table-cell>
          <table:table-cell office:value-type="float" office:value="1903.643" table:style-name="ce34">
            <text:p><text:s/>1,904<text:s/></text:p>
          </table:table-cell>
          <table:table-cell office:value-type="float" office:value="997.69799999999998" table:style-name="ce34">
            <text:p><text:s/>998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6680.4980000000005" table:formula="of:=SUM([.D63:.I63])" table:style-name="ce123">
            <text:p><text:s/>6,680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5222.598999999998" table:style-name="ce34">
            <text:p><text:s/>15,223<text:s/></text:p>
          </table:table-cell>
          <table:table-cell office:value-type="float" office:value="3214.6109999999999" table:style-name="ce34">
            <text:p><text:s/>3,215<text:s/></text:p>
          </table:table-cell>
          <table:table-cell office:value-type="float" office:value="7568.0230000000001" table:style-name="ce34">
            <text:p><text:s/>7,568<text:s/></text:p>
          </table:table-cell>
          <table:table-cell office:value-type="float" office:value="11156.232999999998" table:style-name="ce34">
            <text:p><text:s/>11,156<text:s/></text:p>
          </table:table-cell>
          <table:table-cell office:value-type="float" office:value="3096.4459999999999" table:style-name="ce34">
            <text:p><text:s/>3,096<text:s/></text:p>
          </table:table-cell>
          <table:covered-table-cell/>
          <table:table-cell office:value-type="float" office:value="40257.911999999997" table:formula="of:=SUM([.D64:.I64])" table:style-name="ce123">
            <text:p><text:s/>40,258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1758.7639999999999" table:style-name="ce34">
            <text:p><text:s/>1,759<text:s/></text:p>
          </table:table-cell>
          <table:table-cell office:value-type="string" table:style-name="ce34">
            <text:p>-</text:p>
          </table:table-cell>
          <table:table-cell office:value-type="float" office:value="3800" table:style-name="ce34">
            <text:p><text:s/>3,800<text:s/></text:p>
          </table:table-cell>
          <table:table-cell office:value-type="float" office:value="150" table:style-name="ce34">
            <text:p><text:s/>150<text:s/></text:p>
          </table:table-cell>
          <table:table-cell office:value-type="string" table:style-name="ce34">
            <text:p>-</text:p>
          </table:table-cell>
          <table:covered-table-cell/>
          <table:table-cell office:value-type="float" office:value="5708.7640000000001" table:formula="of:=SUM([.D65:.I65])" table:style-name="ce123">
            <text:p><text:s/>5,709<text:s/></text:p>
          </table:table-cell>
          <table:table-cell table:number-columns-repeated="16374" table:style-name="ce14"/>
        </table:table-row>
        <table:table-row table:style-name="ro8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18007.062999999998" table:formula="of:=SUBTOTAL(9;[.D63:.D65])" table:style-name="ce44">
            <text:p><text:s/>18,007<text:s/></text:p>
          </table:table-cell>
          <table:table-cell office:value-type="float" office:value="4260.4539999999997" table:formula="of:=SUBTOTAL(9;[.E63:.E65])" table:style-name="ce44">
            <text:p><text:s/>4,260<text:s/></text:p>
          </table:table-cell>
          <table:table-cell office:value-type="float" office:value="13075.637000000001" table:formula="of:=SUBTOTAL(9;[.F63:.F65])" table:style-name="ce44">
            <text:p><text:s/>13,076<text:s/></text:p>
          </table:table-cell>
          <table:table-cell office:value-type="float" office:value="13209.875999999998" table:formula="of:=SUBTOTAL(9;[.G63:.G65])" table:style-name="ce44">
            <text:p><text:s/>13,210<text:s/></text:p>
          </table:table-cell>
          <table:table-cell office:value-type="float" office:value="4094.1439999999998" table:formula="of:=SUBTOTAL(9;[.H63:.H65])" table:style-name="ce44">
            <text:p><text:s/>4,094<text:s/></text:p>
          </table:table-cell>
          <table:table-cell table:style-name="ce129"/>
          <table:table-cell office:value-type="float" office:value="52647.173999999999" table:formula="of:=SUBTOTAL(9;[.J63:.J65])" table:style-name="ce125">
            <text:p><text:s/>52,647<text:s/></text:p>
          </table:table-cell>
          <table:table-cell table:number-columns-repeated="3" table:style-name="ce49"/>
          <table:table-cell table:number-columns-repeated="16371"/>
        </table:table-row>
        <table:table-row table:style-name="ro5">
          <table:table-cell/>
          <table:table-cell office:value-type="float" office:value="2017" table:number-columns-spanned="1" table:number-rows-spanned="3" table:style-name="ce416">
            <text:p>2017</text:p>
          </table:table-cell>
          <table:table-cell office:value-type="string" table:style-name="ce122">
            <text:p>Inert</text:p>
          </table:table-cell>
          <table:table-cell office:value-type="float" office:value="900" table:style-name="ce34">
            <text:p><text:s/>900<text:s/></text:p>
          </table:table-cell>
          <table:table-cell office:value-type="float" office:value="1045.2" table:style-name="ce34">
            <text:p><text:s/>1,045<text:s/></text:p>
          </table:table-cell>
          <table:table-cell office:value-type="float" office:value="1528.6010000000001" table:style-name="ce34">
            <text:p><text:s/>1,529<text:s/></text:p>
          </table:table-cell>
          <table:table-cell office:value-type="float" office:value="1728.2910000000002" table:style-name="ce34">
            <text:p><text:s/>1,728<text:s/></text:p>
          </table:table-cell>
          <table:table-cell office:value-type="float" office:value="625.14800000000002" table:style-name="ce34">
            <text:p><text:s/>625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5827.2400000000007" table:formula="of:=SUM([.D67:.I67])" table:style-name="ce123">
            <text:p><text:s/>5,827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7929.77" table:style-name="ce34">
            <text:p><text:s/>7,930<text:s/></text:p>
          </table:table-cell>
          <table:table-cell office:value-type="float" office:value="3223.1310000000003" table:style-name="ce34">
            <text:p><text:s/>3,223<text:s/></text:p>
          </table:table-cell>
          <table:table-cell office:value-type="float" office:value="7768.8899999999994" table:style-name="ce34">
            <text:p><text:s/>7,769<text:s/></text:p>
          </table:table-cell>
          <table:table-cell office:value-type="float" office:value="10795.637000000001" table:style-name="ce34">
            <text:p><text:s/>10,796<text:s/></text:p>
          </table:table-cell>
          <table:table-cell office:value-type="float" office:value="3062.2429999999999" table:style-name="ce34">
            <text:p><text:s/>3,062<text:s/></text:p>
          </table:table-cell>
          <table:covered-table-cell/>
          <table:table-cell office:value-type="float" office:value="32779.671000000002" table:formula="of:=SUM([.D68:.I68])" table:style-name="ce123">
            <text:p><text:s/>32,780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1911.645" table:style-name="ce34">
            <text:p><text:s/>1,912<text:s/></text:p>
          </table:table-cell>
          <table:table-cell office:value-type="string" table:style-name="ce34">
            <text:p>-</text:p>
          </table:table-cell>
          <table:table-cell office:value-type="float" office:value="3000" table:style-name="ce34">
            <text:p><text:s/>3,000<text:s/></text:p>
          </table:table-cell>
          <table:table-cell office:value-type="float" office:value="150" table:style-name="ce34">
            <text:p><text:s/>150<text:s/></text:p>
          </table:table-cell>
          <table:table-cell office:value-type="string" table:style-name="ce34">
            <text:p>-</text:p>
          </table:table-cell>
          <table:covered-table-cell/>
          <table:table-cell office:value-type="float" office:value="5061.6450000000004" table:formula="of:=SUM([.D69:.I69])" table:style-name="ce123">
            <text:p><text:s/>5,062<text:s/></text:p>
          </table:table-cell>
          <table:table-cell table:number-columns-repeated="16374" table:style-name="ce14"/>
        </table:table-row>
        <table:table-row table:style-name="ro8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10741.415000000001" table:formula="of:=SUBTOTAL(9;[.D67:.D69])" table:style-name="ce44">
            <text:p><text:s/>10,741<text:s/></text:p>
          </table:table-cell>
          <table:table-cell office:value-type="float" office:value="4268.3310000000001" table:formula="of:=SUBTOTAL(9;[.E67:.E69])" table:style-name="ce44">
            <text:p><text:s/>4,268<text:s/></text:p>
          </table:table-cell>
          <table:table-cell office:value-type="float" office:value="12297.491" table:formula="of:=SUBTOTAL(9;[.F67:.F69])" table:style-name="ce44">
            <text:p><text:s/>12,297<text:s/></text:p>
          </table:table-cell>
          <table:table-cell office:value-type="float" office:value="12673.928" table:formula="of:=SUBTOTAL(9;[.G67:.G69])" table:style-name="ce44">
            <text:p><text:s/>12,674<text:s/></text:p>
          </table:table-cell>
          <table:table-cell office:value-type="float" office:value="3687.3910000000001" table:formula="of:=SUBTOTAL(9;[.H67:.H69])" table:style-name="ce44">
            <text:p><text:s/>3,687<text:s/></text:p>
          </table:table-cell>
          <table:table-cell table:style-name="ce129"/>
          <table:table-cell office:value-type="float" office:value="43668.555999999997" table:formula="of:=SUBTOTAL(9;[.J67:.J69])" table:style-name="ce125">
            <text:p><text:s/>43,669<text:s/></text:p>
          </table:table-cell>
          <table:table-cell table:number-columns-repeated="3" table:style-name="ce49"/>
          <table:table-cell table:number-columns-repeated="16371"/>
        </table:table-row>
        <table:table-row table:style-name="ro5">
          <table:table-cell/>
          <table:table-cell office:value-type="float" office:value="2018" table:number-columns-spanned="1" table:number-rows-spanned="3" table:style-name="ce416">
            <text:p>2018</text:p>
          </table:table-cell>
          <table:table-cell office:value-type="string" table:style-name="ce122">
            <text:p>Inert</text:p>
          </table:table-cell>
          <table:table-cell office:value-type="float" office:value="780" table:style-name="ce34">
            <text:p><text:s/>780<text:s/></text:p>
          </table:table-cell>
          <table:table-cell office:value-type="float" office:value="1025.18" table:style-name="ce34">
            <text:p><text:s/>1,025<text:s/></text:p>
          </table:table-cell>
          <table:table-cell office:value-type="float" office:value="1496.672" table:style-name="ce34">
            <text:p><text:s/>1,497<text:s/></text:p>
          </table:table-cell>
          <table:table-cell office:value-type="float" office:value="770.86300000000006" table:style-name="ce34">
            <text:p><text:s/>771<text:s/></text:p>
          </table:table-cell>
          <table:table-cell office:value-type="float" office:value="617.58100000000002" table:style-name="ce34">
            <text:p><text:s/>618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4690.2960000000003" table:formula="of:=SUM([.D71:.I71])" table:style-name="ce123">
            <text:p><text:s/>4,690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7292.2" table:style-name="ce34">
            <text:p><text:s/>7,292<text:s/></text:p>
          </table:table-cell>
          <table:table-cell office:value-type="float" office:value="3105.741" table:style-name="ce34">
            <text:p><text:s/>3,106<text:s/></text:p>
          </table:table-cell>
          <table:table-cell office:value-type="float" office:value="9288.4060000000009" table:style-name="ce34">
            <text:p><text:s/>9,288<text:s/></text:p>
          </table:table-cell>
          <table:table-cell office:value-type="float" office:value="10300.460999999999" table:style-name="ce34">
            <text:p><text:s/>10,300<text:s/></text:p>
          </table:table-cell>
          <table:table-cell office:value-type="float" office:value="3062.2429999999999" table:style-name="ce34">
            <text:p><text:s/>3,062<text:s/></text:p>
          </table:table-cell>
          <table:covered-table-cell/>
          <table:table-cell office:value-type="float" office:value="33049.050999999999" table:formula="of:=SUM([.D72:.I72])" table:style-name="ce123">
            <text:p><text:s/>33,049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2057.4810000000002" table:style-name="ce34">
            <text:p><text:s/>2,057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500" table:style-name="ce34">
            <text:p><text:s/>2,500<text:s/></text:p>
          </table:table-cell>
          <table:table-cell office:value-type="float" office:value="150" table:style-name="ce34">
            <text:p><text:s/>150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4707.4809999999998" table:formula="of:=SUM([.D73:.I73])" table:style-name="ce123">
            <text:p><text:s/>4,707<text:s/></text:p>
          </table:table-cell>
          <table:table-cell table:number-columns-repeated="16374" table:style-name="ce14"/>
        </table:table-row>
        <table:table-row table:style-name="ro17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10129.681" table:formula="of:=SUBTOTAL(9;[.D71:.D73])" table:style-name="ce44">
            <text:p><text:s/>10,130<text:s/></text:p>
          </table:table-cell>
          <table:table-cell office:value-type="float" office:value="4130.9210000000003" table:formula="of:=SUBTOTAL(9;[.E71:.E73])" table:style-name="ce44">
            <text:p><text:s/>4,131<text:s/></text:p>
          </table:table-cell>
          <table:table-cell office:value-type="float" office:value="13285.078000000001" table:formula="of:=SUBTOTAL(9;[.F71:.F73])" table:style-name="ce44">
            <text:p><text:s/>13,285<text:s/></text:p>
          </table:table-cell>
          <table:table-cell office:value-type="float" office:value="11221.323999999999" table:formula="of:=SUBTOTAL(9;[.G71:.G73])" table:style-name="ce44">
            <text:p><text:s/>11,221<text:s/></text:p>
          </table:table-cell>
          <table:table-cell office:value-type="float" office:value="3679.8240000000001" table:formula="of:=SUBTOTAL(9;[.H71:.H73])" table:style-name="ce44">
            <text:p><text:s/>3,680<text:s/></text:p>
          </table:table-cell>
          <table:table-cell table:style-name="ce129"/>
          <table:table-cell office:value-type="float" office:value="42446.828000000001" table:formula="of:=SUBTOTAL(9;[.J71:.J73])" table:style-name="ce125">
            <text:p><text:s/>42,447<text:s/></text:p>
          </table:table-cell>
          <table:table-cell table:style-name="ce49"/>
          <table:table-cell table:number-columns-repeated="16373" table:style-name="ce14"/>
        </table:table-row>
        <table:table-row table:style-name="ro5">
          <table:table-cell/>
          <table:table-cell office:value-type="float" office:value="2019" table:number-columns-spanned="1" table:number-rows-spanned="3" table:style-name="ce416">
            <text:p>2019</text:p>
          </table:table-cell>
          <table:table-cell office:value-type="string" table:style-name="ce122">
            <text:p>Inert</text:p>
          </table:table-cell>
          <table:table-cell office:value-type="float" office:value="760" table:style-name="ce34">
            <text:p><text:s/>760<text:s/></text:p>
          </table:table-cell>
          <table:table-cell office:value-type="float" office:value="1051" table:style-name="ce34">
            <text:p><text:s/>1,051<text:s/></text:p>
          </table:table-cell>
          <table:table-cell office:value-type="float" office:value="1392" table:style-name="ce34">
            <text:p><text:s/>1,392<text:s/></text:p>
          </table:table-cell>
          <table:table-cell office:value-type="float" office:value="1780" table:style-name="ce34">
            <text:p><text:s/>1,780<text:s/></text:p>
          </table:table-cell>
          <table:table-cell office:value-type="float" office:value="514" table:style-name="ce34">
            <text:p><text:s/>514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5497" table:formula="of:=SUM([.D75:.I75])" table:style-name="ce123">
            <text:p><text:s/>5,497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11910" table:style-name="ce34">
            <text:p><text:s/>11,910<text:s/></text:p>
          </table:table-cell>
          <table:table-cell office:value-type="float" office:value="3071" table:style-name="ce34">
            <text:p><text:s/>3,071<text:s/></text:p>
          </table:table-cell>
          <table:table-cell office:value-type="float" office:value="5778" table:style-name="ce34">
            <text:p><text:s/>5,778<text:s/></text:p>
          </table:table-cell>
          <table:table-cell office:value-type="float" office:value="9898" table:style-name="ce34">
            <text:p><text:s/>9,898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30657" table:formula="of:=SUM([.D76:.I76])" table:style-name="ce123">
            <text:p><text:s/>30,657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50" table:style-name="ce34">
            <text:p><text:s/>150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150" table:formula="of:=SUM([.D77:.I77])" table:style-name="ce123">
            <text:p><text:s/>150<text:s/></text:p>
          </table:table-cell>
          <table:table-cell table:number-columns-repeated="16374" table:style-name="ce1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12670" table:formula="of:=SUBTOTAL(9;[.D75:.D77])" table:style-name="ce44">
            <text:p><text:s/>12,670<text:s/></text:p>
          </table:table-cell>
          <table:table-cell office:value-type="float" office:value="4122" table:formula="of:=SUBTOTAL(9;[.E75:.E77])" table:style-name="ce44">
            <text:p><text:s/>4,122<text:s/></text:p>
          </table:table-cell>
          <table:table-cell office:value-type="float" office:value="7170" table:formula="of:=SUBTOTAL(9;[.F75:.F77])" table:style-name="ce44">
            <text:p><text:s/>7,170<text:s/></text:p>
          </table:table-cell>
          <table:table-cell office:value-type="float" office:value="11828" table:formula="of:=SUBTOTAL(9;[.G75:.G77])" table:style-name="ce44">
            <text:p><text:s/>11,828<text:s/></text:p>
          </table:table-cell>
          <table:table-cell office:value-type="float" office:value="514" table:formula="of:=SUBTOTAL(9;[.H75:.H77])" table:style-name="ce44">
            <text:p><text:s/>514<text:s/></text:p>
          </table:table-cell>
          <table:table-cell table:style-name="ce129"/>
          <table:table-cell office:value-type="float" office:value="36304" table:formula="of:=SUBTOTAL(9;[.J75:.J77])" table:style-name="ce125">
            <text:p><text:s/>36,304<text:s/></text:p>
          </table:table-cell>
          <table:table-cell table:number-columns-repeated="16374" table:style-name="ce14"/>
        </table:table-row>
        <table:table-row table:style-name="ro5">
          <table:table-cell/>
          <table:table-cell office:value-type="float" office:value="2020" table:number-columns-spanned="1" table:number-rows-spanned="3" table:style-name="ce416">
            <text:p>2020</text:p>
          </table:table-cell>
          <table:table-cell office:value-type="string" table:style-name="ce122">
            <text:p>Inert</text:p>
          </table:table-cell>
          <table:table-cell office:value-type="float" office:value="809" table:style-name="ce34">
            <text:p><text:s/>809<text:s/></text:p>
          </table:table-cell>
          <table:table-cell office:value-type="float" office:value="1020" table:style-name="ce34">
            <text:p><text:s/>1,020<text:s/></text:p>
          </table:table-cell>
          <table:table-cell office:value-type="float" office:value="1191" table:style-name="ce34">
            <text:p><text:s/>1,191<text:s/></text:p>
          </table:table-cell>
          <table:table-cell office:value-type="float" office:value="1757" table:style-name="ce34">
            <text:p><text:s/>1,757<text:s/></text:p>
          </table:table-cell>
          <table:table-cell office:value-type="float" office:value="427" table:style-name="ce34">
            <text:p><text:s/>427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5204" table:formula="of:=SUM([.D79:.I79])" table:style-name="ce123">
            <text:p><text:s/>5,204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8978" table:style-name="ce34">
            <text:p><text:s/>8,978<text:s/></text:p>
          </table:table-cell>
          <table:table-cell office:value-type="float" office:value="2954" table:style-name="ce34">
            <text:p><text:s/>2,954<text:s/></text:p>
          </table:table-cell>
          <table:table-cell office:value-type="float" office:value="7849" table:style-name="ce34">
            <text:p><text:s/>7,849<text:s/></text:p>
          </table:table-cell>
          <table:table-cell office:value-type="float" office:value="9565" table:style-name="ce34">
            <text:p><text:s/>9,565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29346" table:formula="of:=SUM([.D80:.I80])" table:style-name="ce123">
            <text:p><text:s/>29,346<text:s/></text:p>
          </table:table-cell>
          <table:table-cell table:number-columns-repeated="16374" table:style-name="ce1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2263" table:style-name="ce34">
            <text:p><text:s/>2,263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650" table:style-name="ce34">
            <text:p><text:s/>2,650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4913" table:formula="of:=SUM([.D81:.I81])" table:style-name="ce123">
            <text:p><text:s/>4,913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12050" table:formula="of:=SUBTOTAL(9;[.D79:.D81])" table:style-name="ce44">
            <text:p><text:s/>12,050<text:s/></text:p>
          </table:table-cell>
          <table:table-cell office:value-type="float" office:value="3974" table:formula="of:=SUBTOTAL(9;[.E79:.E81])" table:style-name="ce44">
            <text:p><text:s/>3,974<text:s/></text:p>
          </table:table-cell>
          <table:table-cell office:value-type="float" office:value="9040" table:formula="of:=SUBTOTAL(9;[.F79:.F81])" table:style-name="ce44">
            <text:p><text:s/>9,040<text:s/></text:p>
          </table:table-cell>
          <table:table-cell office:value-type="float" office:value="13972" table:formula="of:=SUBTOTAL(9;[.G79:.G81])" table:style-name="ce44">
            <text:p><text:s/>13,972<text:s/></text:p>
          </table:table-cell>
          <table:table-cell office:value-type="float" office:value="427" table:formula="of:=SUBTOTAL(9;[.H79:.H81])" table:style-name="ce44">
            <text:p><text:s/>427<text:s/></text:p>
          </table:table-cell>
          <table:table-cell table:style-name="ce129"/>
          <table:table-cell office:value-type="float" office:value="39463" table:formula="of:=SUBTOTAL(9;[.J79:.J81])" table:style-name="ce125">
            <text:p><text:s/>39,463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1" table:number-columns-spanned="1" table:number-rows-spanned="3" table:style-name="ce416">
            <text:p>2021</text:p>
          </table:table-cell>
          <table:table-cell office:value-type="string" table:style-name="ce122">
            <text:p>Inert</text:p>
          </table:table-cell>
          <table:table-cell office:value-type="float" office:value="789" table:style-name="ce34">
            <text:p><text:s/>789<text:s/></text:p>
          </table:table-cell>
          <table:table-cell office:value-type="float" office:value="823" table:style-name="ce34">
            <text:p><text:s/>823<text:s/></text:p>
          </table:table-cell>
          <table:table-cell office:value-type="float" office:value="1151" table:style-name="ce34">
            <text:p><text:s/>1,151<text:s/></text:p>
          </table:table-cell>
          <table:table-cell office:value-type="float" office:value="2646" table:style-name="ce34">
            <text:p><text:s/>2,646<text:s/></text:p>
          </table:table-cell>
          <table:table-cell office:value-type="float" office:value="625" table:style-name="ce34">
            <text:p><text:s/>625<text:s/></text:p>
          </table:table-cell>
          <table:table-cell office:value-type="string" table:number-columns-spanned="1" table:number-rows-spanned="3" table:style-name="ce417">
            <text:p>See Table Note</text:p>
          </table:table-cell>
          <table:table-cell office:value-type="float" office:value="6034" table:formula="of:=SUM([.D83:.I83])" table:style-name="ce123">
            <text:p><text:s/>6,03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9818" table:style-name="ce34">
            <text:p><text:s/>9,818<text:s/></text:p>
          </table:table-cell>
          <table:table-cell office:value-type="float" office:value="2866" table:style-name="ce34">
            <text:p><text:s/>2,866<text:s/></text:p>
          </table:table-cell>
          <table:table-cell office:value-type="float" office:value="7367" table:style-name="ce34">
            <text:p><text:s/>7,367<text:s/></text:p>
          </table:table-cell>
          <table:table-cell office:value-type="float" office:value="10513" table:style-name="ce34">
            <text:p><text:s/>10,513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30564" table:formula="of:=SUM([.D84:.I84])" table:style-name="ce123">
            <text:p><text:s/>30,564<text:s/>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0" table:formula="of:=SUM([.D85:.I85])" table:style-name="ce123">
            <text:p><text:s/>-<text:s/>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10607" table:formula="of:=SUBTOTAL(9;[.D83:.D85])" table:style-name="ce44">
            <text:p><text:s/>10,607<text:s/></text:p>
          </table:table-cell>
          <table:table-cell office:value-type="float" office:value="3689" table:formula="of:=SUBTOTAL(9;[.E83:.E85])" table:style-name="ce44">
            <text:p><text:s/>3,689<text:s/></text:p>
          </table:table-cell>
          <table:table-cell office:value-type="float" office:value="8518" table:formula="of:=SUBTOTAL(9;[.F83:.F85])" table:style-name="ce44">
            <text:p><text:s/>8,518<text:s/></text:p>
          </table:table-cell>
          <table:table-cell office:value-type="float" office:value="13159" table:formula="of:=SUBTOTAL(9;[.G83:.G85])" table:style-name="ce44">
            <text:p><text:s/>13,159<text:s/></text:p>
          </table:table-cell>
          <table:table-cell office:value-type="float" office:value="625" table:formula="of:=SUBTOTAL(9;[.H83:.H85])" table:style-name="ce44">
            <text:p><text:s/>625<text:s/></text:p>
          </table:table-cell>
          <table:table-cell table:style-name="ce129"/>
          <table:table-cell office:value-type="float" office:value="36598" table:formula="of:=SUBTOTAL(9;[.J83:.J85])" table:style-name="ce125">
            <text:p><text:s/>36,598<text:s/>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2" table:number-columns-spanned="1" table:number-rows-spanned="3" table:style-name="ce416">
            <text:p>2022</text:p>
          </table:table-cell>
          <table:table-cell office:value-type="string" table:style-name="ce122">
            <text:p>Inert</text:p>
          </table:table-cell>
          <table:table-cell office:value-type="float" office:value="765468" table:style-name="ce289">
            <text:p>765</text:p>
          </table:table-cell>
          <table:table-cell office:value-type="float" office:value="803469" table:style-name="ce289">
            <text:p>803</text:p>
          </table:table-cell>
          <table:table-cell office:value-type="float" office:value="1106150" table:style-name="ce289">
            <text:p>1,106</text:p>
          </table:table-cell>
          <table:table-cell office:value-type="float" office:value="2632144" table:style-name="ce289">
            <text:p>2,632</text:p>
          </table:table-cell>
          <table:table-cell office:value-type="float" office:value="400000" table:style-name="ce289">
            <text:p>400</text:p>
          </table:table-cell>
          <table:table-cell office:value-type="string" table:number-columns-spanned="1" table:number-rows-spanned="3" table:style-name="ce418">
            <text:p>See Table Note</text:p>
          </table:table-cell>
          <table:table-cell office:value-type="float" office:value="5707231" table:formula="of:=SUM([.D87:.I87])" table:style-name="ce296">
            <text:p>5,707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6316156" table:style-name="ce290">
            <text:p>6,316</text:p>
          </table:table-cell>
          <table:table-cell office:value-type="float" office:value="2774798" table:style-name="ce290">
            <text:p>2,775</text:p>
          </table:table-cell>
          <table:table-cell office:value-type="float" office:value="7532803.0999999996" table:style-name="ce290">
            <text:p>7,533</text:p>
          </table:table-cell>
          <table:table-cell office:value-type="float" office:value="8677543" table:style-name="ce290">
            <text:p>8,678</text:p>
          </table:table-cell>
          <table:table-cell office:value-type="float" office:value="199579" table:style-name="ce289">
            <text:p>200</text:p>
          </table:table-cell>
          <table:covered-table-cell/>
          <table:table-cell office:value-type="float" office:value="25500879.100000001" table:formula="of:=SUM([.D88:.I88])" table:style-name="ce296">
            <text:p>25,501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covered-table-cell/>
          <table:table-cell office:value-type="float" office:value="0" table:formula="of:=SUM([.D89:.I89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7081624" table:formula="of:=SUBTOTAL(9;[.D87:.D89])" table:style-name="ce294">
            <text:p>7,082</text:p>
          </table:table-cell>
          <table:table-cell office:value-type="float" office:value="3578267" table:formula="of:=SUBTOTAL(9;[.E87:.E89])" table:style-name="ce294">
            <text:p>3,578</text:p>
          </table:table-cell>
          <table:table-cell office:value-type="float" office:value="8638953.0999999996" table:formula="of:=SUBTOTAL(9;[.F87:.F89])" table:style-name="ce294">
            <text:p>8,639</text:p>
          </table:table-cell>
          <table:table-cell office:value-type="float" office:value="11309687" table:formula="of:=SUBTOTAL(9;[.G87:.G89])" table:style-name="ce294">
            <text:p>11,310</text:p>
          </table:table-cell>
          <table:table-cell office:value-type="float" office:value="599579" table:formula="of:=SUBTOTAL(9;[.H87:.H89])" table:style-name="ce294">
            <text:p>600</text:p>
          </table:table-cell>
          <table:table-cell table:style-name="ce298"/>
          <table:table-cell office:value-type="float" office:value="31208110.100000001" table:formula="of:=SUBTOTAL(9;[.J87:.J89])" table:style-name="ce299">
            <text:p>31,208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3" table:number-columns-spanned="1" table:number-rows-spanned="3" table:style-name="ce416">
            <text:p>2023</text:p>
          </table:table-cell>
          <table:table-cell office:value-type="string" table:style-name="ce122">
            <text:p>Inert</text:p>
          </table:table-cell>
          <table:table-cell office:value-type="float" office:value="747473" table:style-name="ce289">
            <text:p>747</text:p>
          </table:table-cell>
          <table:table-cell office:value-type="float" office:value="530778" table:style-name="ce289">
            <text:p>531</text:p>
          </table:table-cell>
          <table:table-cell office:value-type="float" office:value="1018532" table:style-name="ce289">
            <text:p>1,019</text:p>
          </table:table-cell>
          <table:table-cell office:value-type="float" office:value="2613954" table:style-name="ce289">
            <text:p>2,614</text:p>
          </table:table-cell>
          <table:table-cell office:value-type="float" office:value="368090" table:style-name="ce289">
            <text:p>368</text:p>
          </table:table-cell>
          <table:table-cell office:value-type="string" table:number-columns-spanned="1" table:number-rows-spanned="3" table:style-name="ce418">
            <text:p>See Table Note</text:p>
          </table:table-cell>
          <table:table-cell office:value-type="float" office:value="5278827" table:formula="of:=SUM([.D91:.I91])" table:style-name="ce296">
            <text:p>5,279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5544030" table:style-name="ce290">
            <text:p>5,544</text:p>
          </table:table-cell>
          <table:table-cell office:value-type="float" office:value="2673717" table:style-name="ce290">
            <text:p>2,674</text:p>
          </table:table-cell>
          <table:table-cell office:value-type="float" office:value="6353879" table:style-name="ce290">
            <text:p>6,354</text:p>
          </table:table-cell>
          <table:table-cell office:value-type="float" office:value="6003017" table:style-name="ce290">
            <text:p>6,003</text:p>
          </table:table-cell>
          <table:table-cell office:value-type="float" office:value="95955" table:style-name="ce289">
            <text:p>96</text:p>
          </table:table-cell>
          <table:covered-table-cell/>
          <table:table-cell office:value-type="float" office:value="20670598" table:formula="of:=SUM([.D92:.I92])" table:style-name="ce296">
            <text:p>20,671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covered-table-cell/>
          <table:table-cell office:value-type="float" office:value="0" table:formula="of:=SUM([.D93:.I93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6291503" table:formula="of:=SUBTOTAL(9;[.D91:.D93])" table:style-name="ce294">
            <text:p>6,292</text:p>
          </table:table-cell>
          <table:table-cell office:value-type="float" office:value="3204495" table:formula="of:=SUBTOTAL(9;[.E91:.E93])" table:style-name="ce294">
            <text:p>3,204</text:p>
          </table:table-cell>
          <table:table-cell office:value-type="float" office:value="7372411" table:formula="of:=SUBTOTAL(9;[.F91:.F93])" table:style-name="ce294">
            <text:p>7,372</text:p>
          </table:table-cell>
          <table:table-cell office:value-type="float" office:value="8616971" table:formula="of:=SUBTOTAL(9;[.G91:.G93])" table:style-name="ce294">
            <text:p>8,617</text:p>
          </table:table-cell>
          <table:table-cell office:value-type="float" office:value="464045" table:formula="of:=SUBTOTAL(9;[.H91:.H93])" table:style-name="ce294">
            <text:p>464</text:p>
          </table:table-cell>
          <table:table-cell table:style-name="ce298"/>
          <table:table-cell office:value-type="float" office:value="25949425" table:formula="of:=SUBTOTAL(9;[.J91:.J93])" table:style-name="ce299">
            <text:p>25,949</text:p>
          </table:table-cell>
          <table:table-cell table:number-columns-repeated="16374"/>
        </table:table-row>
        <table:table-row table:style-name="ro5">
          <table:table-cell/>
          <table:table-cell office:value-type="float" office:value="2024" table:number-columns-spanned="1" table:number-rows-spanned="3" table:style-name="ce416">
            <text:p>2024</text:p>
          </table:table-cell>
          <table:table-cell office:value-type="string" table:style-name="ce122">
            <text:p>Inert</text:p>
          </table:table-cell>
          <table:table-cell office:value-type="float" office:value="747473" table:style-name="ce289">
            <text:p>747</text:p>
          </table:table-cell>
          <table:table-cell office:value-type="float" office:value="525283" table:style-name="ce289">
            <text:p>525</text:p>
          </table:table-cell>
          <table:table-cell office:value-type="float" office:value="984472" table:style-name="ce289">
            <text:p>984</text:p>
          </table:table-cell>
          <table:table-cell office:value-type="float" office:value="2574677" table:style-name="ce289">
            <text:p>2,575</text:p>
          </table:table-cell>
          <table:table-cell office:value-type="float" office:value="187785" table:style-name="ce289">
            <text:p>188</text:p>
          </table:table-cell>
          <table:table-cell office:value-type="string" table:number-columns-spanned="1" table:number-rows-spanned="3" table:style-name="ce418">
            <text:p>See Table Note</text:p>
          </table:table-cell>
          <table:table-cell office:value-type="float" office:value="5019690" table:formula="of:=SUM([.D95:.I95])" table:style-name="ce296">
            <text:p>5,020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Non-Inert</text:p>
          </table:table-cell>
          <table:table-cell office:value-type="float" office:value="5620260" table:style-name="ce290">
            <text:p>5,620</text:p>
          </table:table-cell>
          <table:table-cell office:value-type="float" office:value="2613883" table:style-name="ce290">
            <text:p>2,614</text:p>
          </table:table-cell>
          <table:table-cell office:value-type="float" office:value="6267296" table:style-name="ce290">
            <text:p>6,267</text:p>
          </table:table-cell>
          <table:table-cell office:value-type="float" office:value="6814569" table:style-name="ce290">
            <text:p>6,815</text:p>
          </table:table-cell>
          <table:table-cell office:value-type="float" office:value="86216" table:style-name="ce289">
            <text:p>86</text:p>
          </table:table-cell>
          <table:covered-table-cell/>
          <table:table-cell office:value-type="float" office:value="21402224" table:formula="of:=SUM([.D96:.I96])" table:style-name="ce296">
            <text:p>21,402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122">
            <text:p>Restricted User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297">
            <text:p>0</text:p>
          </table:table-cell>
          <table:covered-table-cell/>
          <table:table-cell office:value-type="float" office:value="0" table:formula="of:=SUM([.D97:.I97])" table:style-name="ce296">
            <text:p>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24">
            <text:p><text:s/></text:p>
          </table:table-cell>
          <table:table-cell table:style-name="ce82"/>
          <table:table-cell office:value-type="float" office:value="6367733" table:formula="of:=SUBTOTAL(9;[.D95:.D97])" table:style-name="ce294">
            <text:p>6,368</text:p>
          </table:table-cell>
          <table:table-cell office:value-type="float" office:value="3139166" table:formula="of:=SUBTOTAL(9;[.E95:.E97])" table:style-name="ce294">
            <text:p>3,139</text:p>
          </table:table-cell>
          <table:table-cell office:value-type="float" office:value="7251768" table:formula="of:=SUBTOTAL(9;[.F95:.F97])" table:style-name="ce294">
            <text:p>7,252</text:p>
          </table:table-cell>
          <table:table-cell office:value-type="float" office:value="9389246" table:formula="of:=SUBTOTAL(9;[.G95:.G97])" table:style-name="ce294">
            <text:p>9,389</text:p>
          </table:table-cell>
          <table:table-cell office:value-type="float" office:value="274001" table:formula="of:=SUBTOTAL(9;[.H95:.H97])" table:style-name="ce294">
            <text:p>274</text:p>
          </table:table-cell>
          <table:table-cell table:style-name="ce298"/>
          <table:table-cell office:value-type="float" office:value="26421914" table:formula="of:=SUBTOTAL(9;[.J95:.J97])" table:style-name="ce299">
            <text:p>26,422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4">
            <text:p>Non -Inert: <text:s/>Non hazardous landfill sites, non-hazardous landfill sites with a Stable Non Reactive Hazardous Waste Cell(SNHRW), merchant hazardous landfill sites</text:p>
          </table:table-cell>
          <table:table-cell table:number-columns-repeated="16382" table:style-name="ce14"/>
        </table:table-row>
        <table:table-row table:style-name="ro5">
          <table:table-cell/>
          <table:table-cell office:value-type="string" table:style-name="ce14">
            <text:p>Restricted User: <text:s/>Non-hazardous and hazardous restricted landfill sites</text:p>
          </table:table-cell>
          <table:table-cell table:number-columns-repeated="16382" table:style-name="ce14"/>
        </table:table-row>
        <table:table-row table:style-name="ro5">
          <table:table-cell/>
          <table:table-cell office:value-type="string" table:style-name="ce14">
            <text:p>In 2005 and previous years, data for Warrington &amp; Halton was reported in a separate category. <text:s/>From 2006, Halton is included in Merseyside and Warrington in Cheshire.</text:p>
          </table:table-cell>
          <table:table-cell table:number-columns-repeated="16382" table:style-name="ce14"/>
        </table:table-row>
        <table:table-row table:number-rows-repeated="1048474" table:style-name="ro5">
          <table:table-cell table:number-columns-repeated="16384"/>
        </table:table-row>
      </table:table>
      <table:table table:name="Transfer_Treatment_&amp;_MRS_Inputs" table:style-name="ta2">
        <table:table-column table:style-name="co6" table:default-cell-style-name="ce14"/>
        <table:table-column table:style-name="co34" table:default-cell-style-name="ce14"/>
        <table:table-column table:style-name="co35" table:default-cell-style-name="ce14"/>
        <table:table-column table:style-name="co36" table:number-columns-repeated="2" table:default-cell-style-name="ce14"/>
        <table:table-column table:style-name="co25" table:default-cell-style-name="ce14"/>
        <table:table-column table:style-name="co37" table:default-cell-style-name="ce14"/>
        <table:table-column table:style-name="co5" table:default-cell-style-name="ce14"/>
        <table:table-column table:style-name="co2" table:default-cell-style-name="ce14"/>
        <table:table-column table:style-name="co15" table:number-columns-repeated="8" table:default-cell-style-name="ce14"/>
        <table:table-column table:style-name="co23" table:default-cell-style-name="ce14"/>
        <table:table-column table:style-name="co15" table:number-columns-repeated="16366" table:default-cell-style-name="ce14"/>
        <table:table-row table:style-name="ro8">
          <table:table-cell table:style-name="ce13"/>
          <table:table-cell table:number-columns-repeated="16383" table:style-name="ce14"/>
        </table:table-row>
        <table:table-row table:style-name="ro6">
          <table:table-cell table:style-name="ce14"/>
          <table:table-cell office:value-type="string" table:style-name="ce15">
            <text:p>North West: Transfer, treatment and metal recycling site inputs 2024</text:p>
          </table:table-cell>
          <table:table-cell table:number-columns-repeated="16382" table:style-name="ce14"/>
        </table:table-row>
        <table:table-row table:style-name="ro6">
          <table:table-cell table:style-name="ce14"/>
          <table:table-cell office:value-type="string" table:style-name="ce17">
            <text:p>All figures are provided in 000s tonnes</text:p>
          </table:table-cell>
          <table:table-cell table:style-name="ce14"/>
          <table:table-cell table:number-columns-repeated="2" table:style-name="ce16"/>
          <table:table-cell table:number-columns-repeated="16379" table:style-name="ce14"/>
        </table:table-row>
        <table:table-row table:style-name="ro5">
          <table:table-cell table:style-name="ce14"/>
          <table:table-cell table:style-name="ce46"/>
          <table:table-cell table:number-columns-repeated="16382" table:style-name="ce14"/>
        </table:table-row>
        <table:table-row table:style-name="ro8">
          <table:table-cell table:style-name="ce14"/>
          <table:table-cell office:value-type="string" table:number-columns-spanned="1" table:number-rows-spanned="2" table:style-name="ce403">
            <text:p>Site Type</text:p>
          </table:table-cell>
          <table:table-cell office:value-type="string" table:number-columns-spanned="5" table:number-rows-spanned="1" table:style-name="ce404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5">
            <text:p>NORTH WEST</text:p>
          </table:table-cell>
          <table:table-cell table:number-columns-repeated="16376"/>
        </table:table-row>
        <table:table-row table:style-name="ro18">
          <table:table-cell table:style-name="ce131"/>
          <table:covered-table-cell/>
          <table:table-cell office:value-type="string" table:style-name="ce2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covered-table-cell/>
          <table:table-cell table:number-columns-repeated="16376" table:style-name="ce131"/>
        </table:table-row>
        <table:table-row table:style-name="ro19">
          <table:table-cell table:style-name="ce14"/>
          <table:table-cell office:value-type="string" table:style-name="ce132">
            <text:p>Hazardous waste</text:p>
          </table:table-cell>
          <table:table-cell office:value-type="float" office:value="114865.51710100003" table:style-name="ce318">
            <text:p><text:s text:c="2"/>115</text:p>
          </table:table-cell>
          <table:table-cell office:value-type="float" office:value="376452.66634900006" table:style-name="ce300">
            <text:p><text:s text:c="2"/>376</text:p>
          </table:table-cell>
          <table:table-cell office:value-type="float" office:value="324223.65709499991" table:style-name="ce300">
            <text:p><text:s text:c="2"/>324</text:p>
          </table:table-cell>
          <table:table-cell office:value-type="float" office:value="129810.13221399985" table:style-name="ce300">
            <text:p><text:s text:c="2"/>130</text:p>
          </table:table-cell>
          <table:table-cell office:value-type="float" office:value="71183.688440000114" table:style-name="ce300">
            <text:p><text:s text:c="2"/>71</text:p>
          </table:table-cell>
          <table:table-cell office:value-type="float" office:value="1016535.661199" table:formula="of:=SUM([.C7:.G7])" table:style-name="ce303">
            <text:p><text:s text:c="2"/>1,017</text:p>
          </table:table-cell>
          <table:table-cell table:number-columns-repeated="16376"/>
        </table:table-row>
        <table:table-row table:style-name="ro19">
          <table:table-cell table:style-name="ce14"/>
          <table:table-cell office:value-type="string" table:style-name="ce134">
            <text:p>HlC</text:p>
          </table:table-cell>
          <table:table-cell office:value-type="float" office:value="260516.89299999992" table:style-name="ce333">
            <text:p><text:s text:c="2"/>261</text:p>
          </table:table-cell>
          <table:table-cell office:value-type="float" office:value="274151.52935000003" table:style-name="ce300">
            <text:p><text:s text:c="2"/>274</text:p>
          </table:table-cell>
          <table:table-cell office:value-type="float" office:value="1624353.5840569988" table:style-name="ce300">
            <text:p><text:s text:c="2"/>1,624</text:p>
          </table:table-cell>
          <table:table-cell office:value-type="float" office:value="954754.42999900016" table:style-name="ce300">
            <text:p><text:s text:c="2"/>955</text:p>
          </table:table-cell>
          <table:table-cell office:value-type="float" office:value="1635212.4112949993" table:style-name="ce300">
            <text:p><text:s text:c="2"/>1,635</text:p>
          </table:table-cell>
          <table:table-cell office:value-type="float" office:value="4748988.8477009982" table:formula="of:=SUM([.C8:.G8])" table:style-name="ce303">
            <text:p><text:s text:c="2"/>4,749</text:p>
          </table:table-cell>
          <table:table-cell table:number-columns-repeated="16376"/>
        </table:table-row>
        <table:table-row table:style-name="ro19">
          <table:table-cell table:style-name="ce14"/>
          <table:table-cell office:value-type="string" table:style-name="ce135">
            <text:p>Clinical</text:p>
          </table:table-cell>
          <table:table-cell office:value-type="float" office:value="464.9436" table:style-name="ce300">
            <text:p><text:s text:c="2"/>0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314.6605999999999" table:style-name="ce300">
            <text:p><text:s text:c="2"/>1</text:p>
          </table:table-cell>
          <table:table-cell office:value-type="float" office:value="443.25649999999996" table:style-name="ce300">
            <text:p><text:s text:c="2"/>0</text:p>
          </table:table-cell>
          <table:table-cell office:value-type="float" office:value="27426.215000000018" table:style-name="ce300">
            <text:p><text:s text:c="2"/>27</text:p>
          </table:table-cell>
          <table:table-cell office:value-type="float" office:value="29649.075700000019" table:formula="of:=SUM([.C9:.G9])" table:style-name="ce303">
            <text:p><text:s text:c="2"/>30</text:p>
          </table:table-cell>
          <table:table-cell table:number-columns-repeated="16376"/>
        </table:table-row>
        <table:table-row table:style-name="ro19">
          <table:table-cell table:style-name="ce14"/>
          <table:table-cell office:value-type="string" table:style-name="ce136">
            <text:p>Civic amenity site</text:p>
          </table:table-cell>
          <table:table-cell office:value-type="float" office:value="85887.582000000009" table:style-name="ce300">
            <text:p><text:s text:c="2"/>86</text:p>
          </table:table-cell>
          <table:table-cell office:value-type="float" office:value="51210.404371000011" table:style-name="ce300">
            <text:p><text:s text:c="2"/>51</text:p>
          </table:table-cell>
          <table:table-cell office:value-type="float" office:value="172561.63" table:style-name="ce300">
            <text:p><text:s text:c="2"/>173</text:p>
          </table:table-cell>
          <table:table-cell office:value-type="float" office:value="136480.464355" table:style-name="ce300">
            <text:p><text:s text:c="2"/>136</text:p>
          </table:table-cell>
          <table:table-cell office:value-type="float" office:value="122053.01909999999" table:style-name="ce300">
            <text:p><text:s text:c="2"/>122</text:p>
          </table:table-cell>
          <table:table-cell office:value-type="float" office:value="568193.09982600005" table:formula="of:=SUM([.C10:.G10])" table:style-name="ce303">
            <text:p><text:s text:c="2"/>568</text:p>
          </table:table-cell>
          <table:table-cell table:number-columns-repeated="16376"/>
        </table:table-row>
        <table:table-row table:style-name="ro19">
          <table:table-cell table:style-name="ce14"/>
          <table:table-cell office:value-type="string" table:style-name="ce137">
            <text:p>Non Biodegradable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8" table:style-name="ce34">
            <text:p><text:s/>28<text:s/></text:p>
          </table:table-cell>
          <table:table-cell office:value-type="float" office:value="67212.849999999991" table:style-name="ce300">
            <text:p><text:s text:c="2"/>67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666.71" table:style-name="ce300">
            <text:p><text:s text:c="2"/>1</text:p>
          </table:table-cell>
          <table:table-cell office:value-type="float" office:value="67907.56" table:formula="of:=SUM([.C11:.G11])" table:style-name="ce303">
            <text:p><text:s text:c="2"/>68</text:p>
          </table:table-cell>
          <table:table-cell table:number-columns-repeated="16376"/>
        </table:table-row>
        <table:table-row table:style-name="ro19">
          <table:table-cell table:style-name="ce14"/>
          <table:table-cell office:value-type="string" table:style-name="ce42">
            <text:p>Transfer Total</text:p>
          </table:table-cell>
          <table:table-cell office:value-type="float" office:value="461734.93570099998" table:formula="of:=SUM([.C7:.C11])" table:style-name="ce305">
            <text:p><text:s text:c="2"/>462</text:p>
          </table:table-cell>
          <table:table-cell office:value-type="float" office:value="701842.60007000004" table:formula="of:=SUM([.D7:.D11])" table:style-name="ce305">
            <text:p><text:s text:c="2"/>702</text:p>
          </table:table-cell>
          <table:table-cell office:value-type="float" office:value="2189666.3817519988" table:formula="of:=SUM([.E7:.E11])" table:style-name="ce305">
            <text:p><text:s text:c="2"/>2,190</text:p>
          </table:table-cell>
          <table:table-cell office:value-type="float" office:value="1221488.2830679999" table:formula="of:=SUM([.F7:.F11])" table:style-name="ce305">
            <text:p><text:s text:c="2"/>1,221</text:p>
          </table:table-cell>
          <table:table-cell office:value-type="float" office:value="1856542.0438349994" table:formula="of:=SUM([.G7:.G11])" table:style-name="ce305">
            <text:p><text:s text:c="2"/>1,857</text:p>
          </table:table-cell>
          <table:table-cell office:value-type="float" office:value="6431274.2444259971" table:formula="of:=SUM([.H7:.H11])" table:style-name="ce317">
            <text:p><text:s text:c="2"/>6,431</text:p>
          </table:table-cell>
          <table:table-cell table:number-columns-repeated="16376"/>
        </table:table-row>
        <table:table-row table:style-name="ro19">
          <table:table-cell table:style-name="ce14"/>
          <table:table-cell office:value-type="string" table:style-name="ce138">
            <text:p>Material recovery</text:p>
          </table:table-cell>
          <table:table-cell office:value-type="float" office:value="260501.48000000004" table:style-name="ce318">
            <text:p><text:s text:c="2"/>261</text:p>
          </table:table-cell>
          <table:table-cell office:value-type="float" office:value="804852" table:style-name="ce321">
            <text:p><text:s text:c="2"/>805</text:p>
          </table:table-cell>
          <table:table-cell office:value-type="float" office:value="563319.87434999994" table:style-name="ce321">
            <text:p><text:s text:c="2"/>563</text:p>
          </table:table-cell>
          <table:table-cell office:value-type="float" office:value="656048" table:style-name="ce322">
            <text:p><text:s text:c="2"/>656</text:p>
          </table:table-cell>
          <table:table-cell office:value-type="float" office:value="104533.52299999999" table:style-name="ce323">
            <text:p><text:s text:c="2"/>105</text:p>
          </table:table-cell>
          <table:table-cell office:value-type="float" office:value="2389254.8773499997" table:formula="of:=SUM([.C13:.G13])" table:style-name="ce303">
            <text:p><text:s text:c="2"/>2,389</text:p>
          </table:table-cell>
          <table:table-cell table:number-columns-repeated="16376"/>
        </table:table-row>
        <table:table-row table:style-name="ro19">
          <table:table-cell table:style-name="ce14"/>
          <table:table-cell office:value-type="string" table:style-name="ce29">
            <text:p>Physical</text:p>
          </table:table-cell>
          <table:table-cell office:value-type="float" office:value="741346" table:style-name="ce324">
            <text:p><text:s text:c="2"/>741</text:p>
          </table:table-cell>
          <table:table-cell office:value-type="float" office:value="727445" table:style-name="ce325">
            <text:p><text:s text:c="2"/>727</text:p>
          </table:table-cell>
          <table:table-cell office:value-type="float" office:value="1942431" table:style-name="ce325">
            <text:p><text:s text:c="2"/>1,942</text:p>
          </table:table-cell>
          <table:table-cell office:value-type="float" office:value="1137742" table:style-name="ce325">
            <text:p><text:s text:c="2"/>1,138</text:p>
          </table:table-cell>
          <table:table-cell office:value-type="float" office:value="1306775" table:style-name="ce326">
            <text:p><text:s text:c="2"/>1,307</text:p>
          </table:table-cell>
          <table:table-cell office:value-type="float" office:value="5855739" table:formula="of:=SUM([.C14:.G14])" table:style-name="ce303">
            <text:p><text:s text:c="2"/>5,856</text:p>
          </table:table-cell>
          <table:table-cell table:number-columns-repeated="16376"/>
        </table:table-row>
        <table:table-row table:style-name="ro19">
          <table:table-cell table:style-name="ce14"/>
          <table:table-cell office:value-type="string" table:style-name="ce29">
            <text:p>Physico-chemical</text:p>
          </table:table-cell>
          <table:table-cell office:value-type="float" office:value="240602" table:style-name="ce327">
            <text:p><text:s text:c="2"/>241</text:p>
          </table:table-cell>
          <table:table-cell office:value-type="float" office:value="235.4" table:style-name="ce300">
            <text:p><text:s text:c="2"/>0</text:p>
          </table:table-cell>
          <table:table-cell office:value-type="float" office:value="668746.27880999993" table:style-name="ce300">
            <text:p><text:s text:c="2"/>669</text:p>
          </table:table-cell>
          <table:table-cell office:value-type="float" office:value="1021601.7100000001" table:style-name="ce300">
            <text:p><text:s text:c="2"/>1,022</text:p>
          </table:table-cell>
          <table:table-cell office:value-type="float" office:value="633904.72599999991" table:style-name="ce300">
            <text:p><text:s text:c="2"/>634</text:p>
          </table:table-cell>
          <table:table-cell office:value-type="float" office:value="2565090.1148099997" table:formula="of:=SUM([.C15:.G15])" table:style-name="ce303">
            <text:p><text:s text:c="2"/>2,565</text:p>
          </table:table-cell>
          <table:table-cell table:number-columns-repeated="16376"/>
        </table:table-row>
        <table:table-row table:style-name="ro19">
          <table:table-cell table:style-name="ce14"/>
          <table:table-cell office:value-type="string" table:style-name="ce134">
            <text:p>Chemical</text:p>
          </table:table-cell>
          <table:table-cell office:value-type="float" office:value="12451" table:style-name="ce324">
            <text:p><text:s text:c="2"/>12</text:p>
          </table:table-cell>
          <table:table-cell office:value-type="float" office:value="28893.449999999997" table:style-name="ce300">
            <text:p><text:s text:c="2"/>29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2604.397000000004" table:style-name="ce300">
            <text:p><text:s text:c="2"/>43</text:p>
          </table:table-cell>
          <table:table-cell office:value-type="float" office:value="83948.847000000009" table:formula="of:=SUM([.C16:.G16])" table:style-name="ce303">
            <text:p><text:s text:c="2"/>84</text:p>
          </table:table-cell>
          <table:table-cell table:number-columns-repeated="16376"/>
        </table:table-row>
        <table:table-row table:style-name="ro19">
          <table:table-cell/>
          <table:table-cell office:value-type="string" table:style-name="ce134">
            <text:p>Composting</text:p>
          </table:table-cell>
          <table:table-cell office:value-type="float" office:value="208258.55000000005" table:style-name="ce328">
            <text:p><text:s text:c="2"/>208</text:p>
          </table:table-cell>
          <table:table-cell office:value-type="float" office:value="154075.80999999997" table:style-name="ce300">
            <text:p><text:s text:c="2"/>154</text:p>
          </table:table-cell>
          <table:table-cell office:value-type="float" office:value="188442.64999999991" table:style-name="ce300">
            <text:p><text:s text:c="2"/>188</text:p>
          </table:table-cell>
          <table:table-cell office:value-type="float" office:value="236539.12" table:style-name="ce300">
            <text:p><text:s text:c="2"/>237</text:p>
          </table:table-cell>
          <table:table-cell office:value-type="float" office:value="82188.01999999999" table:style-name="ce300">
            <text:p><text:s text:c="2"/>82</text:p>
          </table:table-cell>
          <table:table-cell office:value-type="float" office:value="869504.14999999991" table:formula="of:=SUM([.C17:.G17])" table:style-name="ce303">
            <text:p><text:s text:c="2"/>870</text:p>
          </table:table-cell>
          <table:table-cell table:number-columns-repeated="16376" table:style-name="ce14"/>
        </table:table-row>
        <table:table-row table:style-name="ro19">
          <table:table-cell/>
          <table:table-cell office:value-type="string" table:style-name="ce139">
            <text:p>Biological</text:p>
          </table:table-cell>
          <table:table-cell office:value-type="float" office:value="476129" table:style-name="ce329">
            <text:p><text:s text:c="2"/>476</text:p>
          </table:table-cell>
          <table:table-cell office:value-type="float" office:value="220895" table:style-name="ce330">
            <text:p><text:s text:c="2"/>221</text:p>
          </table:table-cell>
          <table:table-cell office:value-type="float" office:value="3958499" table:style-name="ce300">
            <text:p><text:s text:c="2"/>3,958</text:p>
          </table:table-cell>
          <table:table-cell office:value-type="float" office:value="869925" table:style-name="ce330">
            <text:p><text:s text:c="2"/>870</text:p>
          </table:table-cell>
          <table:table-cell office:value-type="float" office:value="2710760" table:style-name="ce331">
            <text:p><text:s text:c="2"/>2,711</text:p>
          </table:table-cell>
          <table:table-cell office:value-type="float" office:value="8236208" table:formula="of:=SUM([.C18:.G18])" table:style-name="ce303">
            <text:p><text:s text:c="2"/>8,236</text:p>
          </table:table-cell>
          <table:table-cell table:number-columns-repeated="16376" table:style-name="ce14"/>
        </table:table-row>
        <table:table-row table:style-name="ro19">
          <table:table-cell/>
          <table:table-cell office:value-type="string" table:style-name="ce42">
            <text:p>Treatment Total</text:p>
          </table:table-cell>
          <table:table-cell office:value-type="float" office:value="1939288.03" table:formula="of:=SUM([.C13:.C18])" table:style-name="ce332">
            <text:p><text:s text:c="2"/>1,939</text:p>
          </table:table-cell>
          <table:table-cell office:value-type="float" office:value="1936396.66" table:formula="of:=SUM([.D13:.D18])" table:style-name="ce332">
            <text:p><text:s text:c="2"/>1,936</text:p>
          </table:table-cell>
          <table:table-cell office:value-type="float" office:value="7321438.8031600006" table:formula="of:=SUM([.E13:.E18])" table:style-name="ce332">
            <text:p><text:s text:c="2"/>7,321</text:p>
          </table:table-cell>
          <table:table-cell office:value-type="float" office:value="3921855.83" table:formula="of:=SUM([.F13:.F18])" table:style-name="ce332">
            <text:p><text:s text:c="2"/>3,922</text:p>
          </table:table-cell>
          <table:table-cell office:value-type="float" office:value="4880765.6659999993" table:formula="of:=SUM([.G13:.G18])" table:style-name="ce332">
            <text:p><text:s text:c="2"/>4,881</text:p>
          </table:table-cell>
          <table:table-cell office:value-type="float" office:value="19999744.989160001" table:formula="of:=+SUM([.C19:.G19])" table:style-name="ce317">
            <text:p><text:s text:c="2"/>20,000</text:p>
          </table:table-cell>
          <table:table-cell table:number-columns-repeated="16376" table:style-name="ce14"/>
        </table:table-row>
        <table:table-row table:style-name="ro20">
          <table:table-cell/>
          <table:table-cell office:value-type="string" table:style-name="ce141">
            <text:p>Vehicle depollution</text:p>
          </table:table-cell>
          <table:table-cell office:value-type="float" office:value="1760" table:style-name="ce318">
            <text:p><text:s text:c="2"/>2</text:p>
          </table:table-cell>
          <table:table-cell office:value-type="float" office:value="10640" table:style-name="ce300">
            <text:p><text:s text:c="2"/>11</text:p>
          </table:table-cell>
          <table:table-cell office:value-type="float" office:value="109785" table:style-name="ce300">
            <text:p><text:s text:c="2"/>110</text:p>
          </table:table-cell>
          <table:table-cell office:value-type="float" office:value="65699" table:style-name="ce300">
            <text:p><text:s text:c="2"/>66</text:p>
          </table:table-cell>
          <table:table-cell office:value-type="float" office:value="16304" table:style-name="ce300">
            <text:p><text:s text:c="2"/>16</text:p>
          </table:table-cell>
          <table:table-cell office:value-type="float" office:value="204188" table:formula="of:=SUM([.C20:.G20])" table:style-name="ce303">
            <text:p><text:s text:c="2"/>204</text:p>
          </table:table-cell>
          <table:table-cell table:number-columns-repeated="16376" table:style-name="ce14"/>
        </table:table-row>
        <table:table-row table:style-name="ro21">
          <table:table-cell/>
          <table:table-cell office:value-type="string" table:style-name="ce142">
            <text:p>Metal recycling site</text:p>
          </table:table-cell>
          <table:table-cell office:value-type="float" office:value="40784.053" table:style-name="ce319">
            <text:p><text:s text:c="2"/>41</text:p>
          </table:table-cell>
          <table:table-cell office:value-type="float" office:value="16861.382000000001" table:style-name="ce300">
            <text:p><text:s text:c="2"/>17</text:p>
          </table:table-cell>
          <table:table-cell office:value-type="float" office:value="635280.11348800012" table:style-name="ce300">
            <text:p><text:s text:c="2"/>635</text:p>
          </table:table-cell>
          <table:table-cell office:value-type="float" office:value="129236.61008200001" table:style-name="ce300">
            <text:p><text:s text:c="2"/>129</text:p>
          </table:table-cell>
          <table:table-cell office:value-type="float" office:value="2292178.1470000013" table:style-name="ce300">
            <text:p><text:s text:c="2"/>2,292</text:p>
          </table:table-cell>
          <table:table-cell office:value-type="float" office:value="3114340.3055700017" table:formula="of:=SUM([.C21:.G21])" table:style-name="ce303">
            <text:p><text:s text:c="2"/>3,114</text:p>
          </table:table-cell>
          <table:table-cell table:number-columns-repeated="16376" table:style-name="ce14"/>
        </table:table-row>
        <table:table-row table:style-name="ro21">
          <table:table-cell/>
          <table:table-cell office:value-type="string" table:style-name="ce42">
            <text:p>Metal Recycling Sector Total</text:p>
          </table:table-cell>
          <table:table-cell office:value-type="float" office:value="42544.053" table:formula="of:=SUM([.C20:.C21])" table:style-name="ce320">
            <text:p><text:s text:c="2"/>43</text:p>
          </table:table-cell>
          <table:table-cell office:value-type="float" office:value="27501.382000000001" table:formula="of:=SUM([.D20:.D21])" table:style-name="ce305">
            <text:p><text:s text:c="2"/>28</text:p>
          </table:table-cell>
          <table:table-cell office:value-type="float" office:value="745065.11348800012" table:formula="of:=SUM([.E20:.E21])" table:style-name="ce305">
            <text:p><text:s text:c="2"/>745</text:p>
          </table:table-cell>
          <table:table-cell office:value-type="float" office:value="194935.61008200003" table:formula="of:=SUM([.F20:.F21])" table:style-name="ce305">
            <text:p><text:s text:c="2"/>195</text:p>
          </table:table-cell>
          <table:table-cell office:value-type="float" office:value="2308482.1470000013" table:formula="of:=SUM([.G20:.G21])" table:style-name="ce305">
            <text:p><text:s text:c="2"/>2,308</text:p>
          </table:table-cell>
          <table:table-cell office:value-type="float" office:value="3318528.3055700017" table:formula="of:=SUM([.H20:.H21])" table:style-name="ce317">
            <text:p><text:s text:c="2"/>3,319</text:p>
          </table:table-cell>
          <table:table-cell table:number-columns-repeated="16376" table:style-name="ce14"/>
        </table:table-row>
        <table:table-row table:style-name="ro5">
          <table:table-cell/>
          <table:table-cell table:style-name="ce14"/>
          <table:table-cell table:number-columns-repeated="12" table:style-name="ce130"/>
          <table:table-cell table:number-columns-repeated="16370"/>
        </table:table-row>
        <table:table-row table:number-rows-repeated="1048553" table:style-name="ro5">
          <table:table-cell table:number-columns-repeated="16384"/>
        </table:table-row>
      </table:table>
      <table:table table:name="Transfer_Treatment_&amp;_MRS_Trends" table:style-name="ta1">
        <table:table-column table:style-name="co19" table:default-cell-style-name="ce14"/>
        <table:table-column table:style-name="co33" table:default-cell-style-name="ce14"/>
        <table:table-column table:style-name="co11" table:default-cell-style-name="ce14"/>
        <table:table-column table:style-name="co36" table:default-cell-style-name="ce14"/>
        <table:table-column table:style-name="co20" table:default-cell-style-name="ce14"/>
        <table:table-column table:style-name="co9" table:default-cell-style-name="ce14"/>
        <table:table-column table:style-name="co38" table:default-cell-style-name="ce14"/>
        <table:table-column table:style-name="co20" table:default-cell-style-name="ce14"/>
        <table:table-column table:style-name="co14" table:default-cell-style-name="ce14"/>
        <table:table-column table:style-name="co39" table:default-cell-style-name="ce14"/>
        <table:table-column table:style-name="co26" table:default-cell-style-name="ce14"/>
        <table:table-column table:style-name="co15" table:number-columns-repeated="16373" table:default-cell-style-name="ce14"/>
        <table:table-row table:style-name="ro5">
          <table:table-cell table:style-name="ce13"/>
          <table:table-cell table:number-columns-repeated="16383" table:style-name="ce14"/>
        </table:table-row>
        <table:table-row table:style-name="ro6">
          <table:table-cell table:style-name="ce14"/>
          <table:table-cell office:value-type="string" table:style-name="ce144">
            <text:p>North West: Waste deposit trends: Transfer and treatment deposits by site type, waste type and sub-region from 2000/1 to 2024</text:p>
          </table:table-cell>
          <table:table-cell table:number-columns-repeated="2" table:style-name="ce23"/>
          <table:table-cell table:number-columns-repeated="7" table:style-name="ce131"/>
          <table:table-cell table:number-columns-repeated="16373"/>
        </table:table-row>
        <table:table-row table:style-name="ro6">
          <table:table-cell table:style-name="ce14"/>
          <table:table-cell office:value-type="string" table:style-name="ce17">
            <text:p>All figures are provided in 000s tonnes</text:p>
          </table:table-cell>
          <table:table-cell table:number-columns-repeated="2" table:style-name="ce23"/>
          <table:table-cell table:number-columns-repeated="7" table:style-name="ce131"/>
          <table:table-cell table:number-columns-repeated="16373"/>
        </table:table-row>
        <table:table-row table:style-name="ro7">
          <table:table-cell table:style-name="ce14"/>
          <table:table-cell table:style-name="ce145"/>
          <table:table-cell table:number-columns-repeated="2" table:style-name="ce23"/>
          <table:table-cell table:number-columns-repeated="7" table:style-name="ce131"/>
          <table:table-cell table:number-columns-repeated="16373"/>
        </table:table-row>
        <table:table-row table:style-name="ro5">
          <table:table-cell table:style-name="ce14"/>
          <table:table-cell office:value-type="string" table:style-name="ce54">
            <text:p><text:s/></text:p>
          </table:table-cell>
          <table:table-cell office:value-type="string" table:style-name="ce146">
            <text:p><text:s/></text:p>
          </table:table-cell>
          <table:table-cell table:style-name="ce147"/>
          <table:table-cell office:value-type="string" table:number-columns-spanned="6" table:number-rows-spanned="1" table:style-name="ce422">
            <text:p>Sub Region</text:p>
          </table:table-cell>
          <table:covered-table-cell table:number-columns-repeated="5"/>
          <table:table-cell office:value-type="string" table:style-name="ce56">
            <text:p><text:s/></text:p>
          </table:table-cell>
          <table:table-cell table:number-columns-repeated="16373"/>
        </table:table-row>
        <table:table-row table:style-name="ro3">
          <table:table-cell table:style-name="ce14"/>
          <table:table-cell office:value-type="string" table:style-name="ce57">
            <text:p>Year</text:p>
          </table:table-cell>
          <table:table-cell office:value-type="string" table:style-name="ce148">
            <text:p>Site Type</text:p>
          </table:table-cell>
          <table:table-cell table:style-name="ce149"/>
          <table:table-cell office:value-type="string" table:style-name="ce2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table-cell office:value-type="string" table:style-name="ce60">
            <text:p>Warrington &amp; Halton</text:p>
          </table:table-cell>
          <table:table-cell office:value-type="string" table:style-name="ce61">
            <text:p>NORTH WEST</text:p>
          </table:table-cell>
          <table:table-cell table:number-columns-repeated="16373"/>
        </table:table-row>
        <table:table-row table:style-name="ro5">
          <table:table-cell table:style-name="ce14"/>
          <table:table-cell office:value-type="string" table:number-columns-spanned="1" table:number-rows-spanned="11" table:style-name="ce416">
            <text:p>2000/1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0">
            <text:p>Transfer</text:p>
          </table:table-cell>
          <table:table-cell office:value-type="float" office:value="172" table:style-name="ce35">
            <text:p><text:s/>172<text:s/></text:p>
          </table:table-cell>
          <table:table-cell office:value-type="float" office:value="204.7" table:style-name="ce34">
            <text:p><text:s/>205<text:s/></text:p>
          </table:table-cell>
          <table:table-cell office:value-type="float" office:value="1641" table:style-name="ce34">
            <text:p><text:s/>1,641<text:s/></text:p>
          </table:table-cell>
          <table:table-cell office:value-type="float" office:value="600" table:style-name="ce34">
            <text:p><text:s/>600<text:s/></text:p>
          </table:table-cell>
          <table:table-cell office:value-type="float" office:value="4181.01" table:style-name="ce34">
            <text:p><text:s/>4,181<text:s/></text:p>
          </table:table-cell>
          <table:table-cell office:value-type="float" office:value="194.8" table:style-name="ce36">
            <text:p><text:s/>195<text:s/></text:p>
          </table:table-cell>
          <table:table-cell office:value-type="float" office:value="6993.51" table:formula="of:=SUM([.E7:.J7])" table:style-name="ce123">
            <text:p><text:s/>6,994<text:s/></text:p>
          </table:table-cell>
          <table:table-cell table:number-columns-repeated="16373"/>
        </table:table-row>
        <table:table-row table:style-name="ro5">
          <table:table-cell table:style-name="ce14"/>
          <table:covered-table-cell/>
          <table:covered-table-cell/>
          <table:table-cell office:value-type="string" table:style-name="ce150">
            <text:p>Civic amenity</text:p>
          </table:table-cell>
          <table:table-cell office:value-type="float" office:value="94" table:style-name="ce35">
            <text:p><text:s/>94<text:s/></text:p>
          </table:table-cell>
          <table:table-cell office:value-type="float" office:value="45" table:style-name="ce34">
            <text:p><text:s/>45<text:s/></text:p>
          </table:table-cell>
          <table:table-cell office:value-type="float" office:value="218" table:style-name="ce34">
            <text:p><text:s/>218<text:s/></text:p>
          </table:table-cell>
          <table:table-cell office:value-type="float" office:value="190" table:style-name="ce34">
            <text:p><text:s/>190<text:s/></text:p>
          </table:table-cell>
          <table:table-cell office:value-type="float" office:value="100.8" table:style-name="ce34">
            <text:p><text:s/>101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647.79999999999995" table:formula="of:=SUM([.E8:.J8])" table:style-name="ce123">
            <text:p><text:s/>648<text:s/></text:p>
          </table:table-cell>
          <table:table-cell table:number-columns-repeated="16373"/>
        </table:table-row>
        <table:table-row table:style-name="ro5">
          <table:table-cell table:style-name="ce14"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266" table:formula="of:=SUBTOTAL(9;[.E7:.E8])" table:style-name="ce152">
            <text:p><text:s/>266<text:s/></text:p>
          </table:table-cell>
          <table:table-cell office:value-type="float" office:value="249.7" table:formula="of:=SUBTOTAL(9;[.F7:.F8])" table:style-name="ce153">
            <text:p><text:s/>250<text:s/></text:p>
          </table:table-cell>
          <table:table-cell office:value-type="float" office:value="1859" table:formula="of:=SUBTOTAL(9;[.G7:.G8])" table:style-name="ce153">
            <text:p><text:s/>1,859<text:s/></text:p>
          </table:table-cell>
          <table:table-cell office:value-type="float" office:value="790" table:formula="of:=SUBTOTAL(9;[.H7:.H8])" table:style-name="ce153">
            <text:p><text:s/>790<text:s/></text:p>
          </table:table-cell>
          <table:table-cell office:value-type="float" office:value="4281.8100000000004" table:formula="of:=SUBTOTAL(9;[.I7:.I8])" table:style-name="ce153">
            <text:p><text:s/>4,282<text:s/></text:p>
          </table:table-cell>
          <table:table-cell office:value-type="float" office:value="194.8" table:formula="of:=SUBTOTAL(9;[.J7:.J8])" table:style-name="ce154">
            <text:p><text:s/>195<text:s/></text:p>
          </table:table-cell>
          <table:table-cell office:value-type="float" office:value="7641.31" table:formula="of:=SUBTOTAL(9;[.K7:.K8])" table:style-name="ce155">
            <text:p><text:s/>7,641<text:s/></text:p>
          </table:table-cell>
          <table:table-cell table:number-columns-repeated="16373"/>
        </table:table-row>
        <table:table-row table:style-name="ro5">
          <table:table-cell table:style-name="ce14"/>
          <table:covered-table-cell/>
          <table:table-cell office:value-type="string" table:number-columns-spanned="1" table:number-rows-spanned="5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4.5999999999999996" table:style-name="ce35">
            <text:p><text:s/>5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4.436999999999999" table:style-name="ce34">
            <text:p><text:s/>14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4.53" table:style-name="ce34">
            <text:p><text:s/>15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3.567" table:formula="of:=SUM([.E10:.J10])" table:style-name="ce123">
            <text:p><text:s/>34<text:s/></text:p>
          </table:table-cell>
          <table:table-cell table:number-columns-repeated="16373"/>
        </table:table-row>
        <table:table-row table:style-name="ro5">
          <table:table-cell table:style-name="ce14"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46" table:style-name="ce34">
            <text:p><text:s/>46<text:s/></text:p>
          </table:table-cell>
          <table:table-cell office:value-type="float" office:value="531" table:style-name="ce34">
            <text:p><text:s/>531<text:s/></text:p>
          </table:table-cell>
          <table:table-cell office:value-type="float" office:value="8" table:style-name="ce34">
            <text:p><text:s/>8<text:s/></text:p>
          </table:table-cell>
          <table:table-cell office:value-type="float" office:value="50" table:style-name="ce34">
            <text:p><text:s/>50<text:s/></text:p>
          </table:table-cell>
          <table:table-cell office:value-type="float" office:value="18" table:style-name="ce36">
            <text:p><text:s/>18<text:s/></text:p>
          </table:table-cell>
          <table:table-cell office:value-type="float" office:value="653" table:formula="of:=SUM([.E11:.J11])" table:style-name="ce123">
            <text:p><text:s/>653<text:s/></text:p>
          </table:table-cell>
          <table:table-cell table:number-columns-repeated="16373"/>
        </table:table-row>
        <table:table-row table:style-name="ro5">
          <table:table-cell table:style-name="ce14"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formula="of:=SUM([.E12:.J12])" table:style-name="ce123">
            <text:p><text:s/>-<text:s/></text:p>
          </table:table-cell>
          <table:table-cell table:number-columns-repeated="16373"/>
        </table:table-row>
        <table:table-row table:style-name="ro5">
          <table:table-cell table:style-name="ce14"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0" table:style-name="ce35">
            <text:p><text:s/>10<text:s/></text:p>
          </table:table-cell>
          <table:table-cell office:value-type="float" office:value="2" table:style-name="ce34">
            <text:p><text:s/>2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" table:style-name="ce34">
            <text:p><text:s/>1<text:s/></text:p>
          </table:table-cell>
          <table:table-cell office:value-type="float" office:value="4" table:style-name="ce34">
            <text:p><text:s/>4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7" table:formula="of:=SUM([.E13:.J13])" table:style-name="ce123">
            <text:p><text:s/>17<text:s/></text:p>
          </table:table-cell>
          <table:table-cell table:number-columns-repeated="16373"/>
        </table:table-row>
        <table:table-row table:style-name="ro5">
          <table:table-cell table:style-name="ce14"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57" table:style-name="ce35">
            <text:p><text:s/>57<text:s/></text:p>
          </table:table-cell>
          <table:table-cell office:value-type="float" office:value="41" table:style-name="ce34">
            <text:p><text:s/>41<text:s/></text:p>
          </table:table-cell>
          <table:table-cell office:value-type="float" office:value="289" table:style-name="ce34">
            <text:p><text:s/>289<text:s/></text:p>
          </table:table-cell>
          <table:table-cell office:value-type="float" office:value="11" table:style-name="ce34">
            <text:p><text:s/>11<text:s/></text:p>
          </table:table-cell>
          <table:table-cell office:value-type="float" office:value="5" table:style-name="ce34">
            <text:p><text:s/>5<text:s/></text:p>
          </table:table-cell>
          <table:table-cell office:value-type="float" office:value="65" table:style-name="ce36">
            <text:p><text:s/>65<text:s/></text:p>
          </table:table-cell>
          <table:table-cell office:value-type="float" office:value="468" table:formula="of:=SUM([.E14:.J14])" table:style-name="ce123">
            <text:p><text:s/>468<text:s/></text:p>
          </table:table-cell>
          <table:table-cell table:number-columns-repeated="16373"/>
        </table:table-row>
        <table:table-row table:style-name="ro5">
          <table:table-cell table:style-name="ce14"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71.599999999999994" table:formula="of:=SUBTOTAL(9;[.E10:.E14])" table:style-name="ce152">
            <text:p><text:s/>72<text:s/></text:p>
          </table:table-cell>
          <table:table-cell office:value-type="float" office:value="89" table:formula="of:=SUBTOTAL(9;[.F10:.F14])" table:style-name="ce153">
            <text:p><text:s/>89<text:s/></text:p>
          </table:table-cell>
          <table:table-cell office:value-type="float" office:value="834.43700000000001" table:formula="of:=SUBTOTAL(9;[.G10:.G14])" table:style-name="ce153">
            <text:p><text:s/>834<text:s/></text:p>
          </table:table-cell>
          <table:table-cell office:value-type="float" office:value="20" table:formula="of:=SUBTOTAL(9;[.H10:.H14])" table:style-name="ce153">
            <text:p><text:s/>20<text:s/></text:p>
          </table:table-cell>
          <table:table-cell office:value-type="float" office:value="73.53" table:formula="of:=SUBTOTAL(9;[.I10:.I14])" table:style-name="ce153">
            <text:p><text:s/>74<text:s/></text:p>
          </table:table-cell>
          <table:table-cell office:value-type="float" office:value="83" table:formula="of:=SUBTOTAL(9;[.J10:.J14])" table:style-name="ce154">
            <text:p><text:s/>83<text:s/></text:p>
          </table:table-cell>
          <table:table-cell office:value-type="float" office:value="1171.567" table:formula="of:=SUBTOTAL(9;[.K10:.K14])" table:style-name="ce155">
            <text:p><text:s/>1,172<text:s/></text:p>
          </table:table-cell>
          <table:table-cell table:number-columns-repeated="16373"/>
        </table:table-row>
        <table:table-row table:style-name="ro5">
          <table:table-cell table:style-name="ce14"/>
          <table:covered-table-cell/>
          <table:table-cell office:value-type="string" table:style-name="ce156">
            <text:p>MRS</text:p>
          </table:table-cell>
          <table:table-cell office:value-type="string" table:style-name="ce150">
            <text:p>Metal recycling</text:p>
          </table:table-cell>
          <table:table-cell office:value-type="float" office:value="25" table:style-name="ce35">
            <text:p><text:s/>25<text:s/></text:p>
          </table:table-cell>
          <table:table-cell office:value-type="float" office:value="33" table:style-name="ce34">
            <text:p><text:s/>33<text:s/></text:p>
          </table:table-cell>
          <table:table-cell office:value-type="float" office:value="201" table:style-name="ce34">
            <text:p><text:s/>201<text:s/></text:p>
          </table:table-cell>
          <table:table-cell office:value-type="float" office:value="196" table:style-name="ce34">
            <text:p><text:s/>196<text:s/></text:p>
          </table:table-cell>
          <table:table-cell office:value-type="float" office:value="501" table:style-name="ce34">
            <text:p><text:s/>501<text:s/></text:p>
          </table:table-cell>
          <table:table-cell office:value-type="float" office:value="13" table:style-name="ce36">
            <text:p><text:s/>13<text:s/></text:p>
          </table:table-cell>
          <table:table-cell office:value-type="float" office:value="969" table:formula="of:=SUM([.E16:.J16])" table:style-name="ce123">
            <text:p><text:s/>9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MRS Total</text:p>
          </table:table-cell>
          <table:table-cell table:style-name="ce151"/>
          <table:table-cell office:value-type="float" office:value="25" table:formula="of:=SUBTOTAL(9;[.E16:.E16])" table:style-name="ce152">
            <text:p><text:s/>25<text:s/></text:p>
          </table:table-cell>
          <table:table-cell office:value-type="float" office:value="33" table:formula="of:=SUBTOTAL(9;[.F16:.F16])" table:style-name="ce153">
            <text:p><text:s/>33<text:s/></text:p>
          </table:table-cell>
          <table:table-cell office:value-type="float" office:value="201" table:formula="of:=SUBTOTAL(9;[.G16:.G16])" table:style-name="ce153">
            <text:p><text:s/>201<text:s/></text:p>
          </table:table-cell>
          <table:table-cell office:value-type="float" office:value="196" table:formula="of:=SUBTOTAL(9;[.H16:.H16])" table:style-name="ce153">
            <text:p><text:s/>196<text:s/></text:p>
          </table:table-cell>
          <table:table-cell office:value-type="float" office:value="501" table:formula="of:=SUBTOTAL(9;[.I16:.I16])" table:style-name="ce153">
            <text:p><text:s/>501<text:s/></text:p>
          </table:table-cell>
          <table:table-cell office:value-type="float" office:value="13" table:formula="of:=SUBTOTAL(9;[.J16:.J16])" table:style-name="ce154">
            <text:p><text:s/>13<text:s/></text:p>
          </table:table-cell>
          <table:table-cell office:value-type="float" office:value="969" table:formula="of:=SUBTOTAL(9;[.K16:.K16])" table:style-name="ce155">
            <text:p><text:s/>969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24">
            <text:p>2000/1 Total</text:p>
          </table:table-cell>
          <table:table-cell table:number-columns-repeated="2" table:style-name="ce82"/>
          <table:table-cell office:value-type="float" office:value="362.6" table:formula="of:=SUBTOTAL(9;[.E7:.E16])" table:style-name="ce143">
            <text:p><text:s/>363<text:s/></text:p>
          </table:table-cell>
          <table:table-cell office:value-type="float" office:value="371.7" table:formula="of:=SUBTOTAL(9;[.F7:.F16])" table:style-name="ce44">
            <text:p><text:s/>372<text:s/></text:p>
          </table:table-cell>
          <table:table-cell office:value-type="float" office:value="2894.4369999999999" table:formula="of:=SUBTOTAL(9;[.G7:.G16])" table:style-name="ce44">
            <text:p><text:s/>2,894<text:s/></text:p>
          </table:table-cell>
          <table:table-cell office:value-type="float" office:value="1006" table:formula="of:=SUBTOTAL(9;[.H7:.H16])" table:style-name="ce44">
            <text:p><text:s/>1,006<text:s/></text:p>
          </table:table-cell>
          <table:table-cell office:value-type="float" office:value="4856.34" table:formula="of:=SUBTOTAL(9;[.I7:.I16])" table:style-name="ce44">
            <text:p><text:s/>4,856<text:s/></text:p>
          </table:table-cell>
          <table:table-cell office:value-type="float" office:value="290.8" table:formula="of:=SUBTOTAL(9;[.J7:.J16])" table:style-name="ce127">
            <text:p><text:s/>291<text:s/></text:p>
          </table:table-cell>
          <table:table-cell office:value-type="float" office:value="9781.8770000000004" table:formula="of:=SUBTOTAL(9;[.K7:.K16])" table:style-name="ce125">
            <text:p><text:s/>9,78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1" table:style-name="ce416">
            <text:p>2002/3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0">
            <text:p>Transfer</text:p>
          </table:table-cell>
          <table:table-cell office:value-type="float" office:value="432.90733557107109" table:style-name="ce35">
            <text:p><text:s/>433<text:s/></text:p>
          </table:table-cell>
          <table:table-cell office:value-type="float" office:value="237.24951896547026" table:style-name="ce34">
            <text:p><text:s/>237<text:s/></text:p>
          </table:table-cell>
          <table:table-cell office:value-type="float" office:value="2403.4589636380169" table:style-name="ce34">
            <text:p><text:s/>2,403<text:s/></text:p>
          </table:table-cell>
          <table:table-cell office:value-type="float" office:value="1079.82061620175" table:style-name="ce34">
            <text:p><text:s/>1,080<text:s/></text:p>
          </table:table-cell>
          <table:table-cell office:value-type="float" office:value="1640.2192301823386" table:style-name="ce34">
            <text:p><text:s/>1,640<text:s/></text:p>
          </table:table-cell>
          <table:table-cell office:value-type="float" office:value="235.72728330063822" table:style-name="ce36">
            <text:p><text:s/>236<text:s/></text:p>
          </table:table-cell>
          <table:table-cell office:value-type="float" office:value="6029.3829478592852" table:formula="of:=SUM([.E19:.J19])" table:style-name="ce123">
            <text:p><text:s/>6,02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ivic amenity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74.338999999999999" table:style-name="ce34">
            <text:p><text:s/>74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74.338999999999999" table:formula="of:=SUM([.E20:.J20])" table:style-name="ce123">
            <text:p><text:s/>7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432.90733557107109" table:formula="of:=SUBTOTAL(9;[.E19:.E20])" table:style-name="ce152">
            <text:p><text:s/>433<text:s/></text:p>
          </table:table-cell>
          <table:table-cell office:value-type="float" office:value="311.58851896547026" table:formula="of:=SUBTOTAL(9;[.F19:.F20])" table:style-name="ce153">
            <text:p><text:s/>312<text:s/></text:p>
          </table:table-cell>
          <table:table-cell office:value-type="float" office:value="2403.4589636380169" table:formula="of:=SUBTOTAL(9;[.G19:.G20])" table:style-name="ce153">
            <text:p><text:s/>2,403<text:s/></text:p>
          </table:table-cell>
          <table:table-cell office:value-type="float" office:value="1079.82061620175" table:formula="of:=SUBTOTAL(9;[.H19:.H20])" table:style-name="ce153">
            <text:p><text:s/>1,080<text:s/></text:p>
          </table:table-cell>
          <table:table-cell office:value-type="float" office:value="1640.2192301823386" table:formula="of:=SUBTOTAL(9;[.I19:.I20])" table:style-name="ce153">
            <text:p><text:s/>1,640<text:s/></text:p>
          </table:table-cell>
          <table:table-cell office:value-type="float" office:value="235.72728330063822" table:formula="of:=SUBTOTAL(9;[.J19:.J20])" table:style-name="ce154">
            <text:p><text:s/>236<text:s/></text:p>
          </table:table-cell>
          <table:table-cell office:value-type="float" office:value="6103.7219478592851" table:formula="of:=SUBTOTAL(9;[.K19:.K20])" table:style-name="ce155">
            <text:p><text:s/>6,1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5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0.126000000000001" table:style-name="ce35">
            <text:p><text:s/>10<text:s/></text:p>
          </table:table-cell>
          <table:table-cell office:value-type="float" office:value="1.36" table:style-name="ce34">
            <text:p><text:s/>1<text:s/></text:p>
          </table:table-cell>
          <table:table-cell office:value-type="float" office:value="45.793999999999997" table:style-name="ce34">
            <text:p><text:s/>46<text:s/></text:p>
          </table:table-cell>
          <table:table-cell office:value-type="float" office:value="87.36" table:style-name="ce34">
            <text:p><text:s/>87<text:s/></text:p>
          </table:table-cell>
          <table:table-cell office:value-type="float" office:value="24.928000000000001" table:style-name="ce34">
            <text:p><text:s/>25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69.56799999999998" table:formula="of:=SUM([.E22:.J22])" table:style-name="ce123">
            <text:p><text:s/>1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8.3020000000000014" table:style-name="ce35">
            <text:p><text:s/>8<text:s/></text:p>
          </table:table-cell>
          <table:table-cell office:value-type="float" office:value="102.60599999999999" table:style-name="ce34">
            <text:p><text:s/>103<text:s/></text:p>
          </table:table-cell>
          <table:table-cell office:value-type="float" office:value="666.73700000000008" table:style-name="ce34">
            <text:p><text:s/>667<text:s/></text:p>
          </table:table-cell>
          <table:table-cell office:value-type="float" office:value="61.834000000000003" table:style-name="ce34">
            <text:p><text:s/>62<text:s/></text:p>
          </table:table-cell>
          <table:table-cell office:value-type="float" office:value="268.37200000000001" table:style-name="ce34">
            <text:p><text:s/>268<text:s/></text:p>
          </table:table-cell>
          <table:table-cell office:value-type="float" office:value="62.391000000000005" table:style-name="ce36">
            <text:p><text:s/>62<text:s/></text:p>
          </table:table-cell>
          <table:table-cell office:value-type="float" office:value="1170.2420000000002" table:formula="of:=SUM([.E23:.J23])" table:style-name="ce123">
            <text:p><text:s/>1,1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" table:formula="of:=SUM([.E24:.J24])" table:style-name="ce12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3.843" table:style-name="ce35">
            <text:p><text:s/>14<text:s/></text:p>
          </table:table-cell>
          <table:table-cell office:value-type="float" office:value="2.0859999999999999" table:style-name="ce34">
            <text:p><text:s/>2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4.085000000000001" table:style-name="ce34">
            <text:p><text:s/>24<text:s/></text:p>
          </table:table-cell>
          <table:table-cell office:value-type="float" office:value="7.0419999999999998" table:style-name="ce34">
            <text:p><text:s/>7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47.056000000000004" table:formula="of:=SUM([.E25:.J25])" table:style-name="ce123">
            <text:p><text:s/>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15.664999999999999" table:style-name="ce35">
            <text:p><text:s/>16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344.20800000000003" table:style-name="ce34">
            <text:p><text:s/>344<text:s/></text:p>
          </table:table-cell>
          <table:table-cell office:value-type="float" office:value="22.411000000000001" table:style-name="ce34">
            <text:p><text:s/>22<text:s/></text:p>
          </table:table-cell>
          <table:table-cell office:value-type="float" office:value="36.069000000000003" table:style-name="ce34">
            <text:p><text:s/>36<text:s/></text:p>
          </table:table-cell>
          <table:table-cell office:value-type="float" office:value="71.125" table:style-name="ce36">
            <text:p><text:s/>71<text:s/></text:p>
          </table:table-cell>
          <table:table-cell office:value-type="float" office:value="489.47800000000007" table:formula="of:=SUM([.E26:.J26])" table:style-name="ce123">
            <text:p><text:s/>4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47.936" table:formula="of:=SUBTOTAL(9;[.E22:.E26])" table:style-name="ce152">
            <text:p><text:s/>48<text:s/></text:p>
          </table:table-cell>
          <table:table-cell office:value-type="float" office:value="106.05199999999999" table:formula="of:=SUBTOTAL(9;[.F22:.F26])" table:style-name="ce153">
            <text:p><text:s/>106<text:s/></text:p>
          </table:table-cell>
          <table:table-cell office:value-type="float" office:value="1056.739" table:formula="of:=SUBTOTAL(9;[.G22:.G26])" table:style-name="ce153">
            <text:p><text:s/>1,057<text:s/></text:p>
          </table:table-cell>
          <table:table-cell office:value-type="float" office:value="195.69000000000003" table:formula="of:=SUBTOTAL(9;[.H22:.H26])" table:style-name="ce153">
            <text:p><text:s/>196<text:s/></text:p>
          </table:table-cell>
          <table:table-cell office:value-type="float" office:value="336.411" table:formula="of:=SUBTOTAL(9;[.I22:.I26])" table:style-name="ce153">
            <text:p><text:s/>336<text:s/></text:p>
          </table:table-cell>
          <table:table-cell office:value-type="float" office:value="133.51600000000002" table:formula="of:=SUBTOTAL(9;[.J22:.J26])" table:style-name="ce154">
            <text:p><text:s/>134<text:s/></text:p>
          </table:table-cell>
          <table:table-cell office:value-type="float" office:value="1876.3440000000003" table:formula="of:=SUBTOTAL(9;[.K22:.K26])" table:style-name="ce155">
            <text:p><text:s/>1,87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411">
            <text:p>MRS</text:p>
          </table:table-cell>
          <table:covered-table-cell/>
          <table:table-cell office:value-type="float" office:value="19.26715999031067" table:style-name="ce35">
            <text:p><text:s/>19<text:s/></text:p>
          </table:table-cell>
          <table:table-cell office:value-type="float" office:value="46.422223604202273" table:style-name="ce34">
            <text:p><text:s/>46<text:s/></text:p>
          </table:table-cell>
          <table:table-cell office:value-type="float" office:value="463.29120823383334" table:style-name="ce34">
            <text:p><text:s/>463<text:s/></text:p>
          </table:table-cell>
          <table:table-cell office:value-type="float" office:value="119.87823828107118" table:style-name="ce34">
            <text:p><text:s/>120<text:s/></text:p>
          </table:table-cell>
          <table:table-cell office:value-type="float" office:value="670.50676439094548" table:style-name="ce34">
            <text:p><text:s/>671<text:s/></text:p>
          </table:table-cell>
          <table:table-cell office:value-type="float" office:value="22.321000000238421" table:style-name="ce36">
            <text:p><text:s/>22<text:s/></text:p>
          </table:table-cell>
          <table:table-cell office:value-type="float" office:value="1341.6865945006014" table:formula="of:=SUM([.E28:.J28])" table:style-name="ce123">
            <text:p><text:s/>1,3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57"/>
          <table:table-cell office:value-type="float" office:value="19.26715999031067" table:formula="of:=SUBTOTAL(9;[.E28:.E28])" table:style-name="ce120">
            <text:p><text:s/>19<text:s/></text:p>
          </table:table-cell>
          <table:table-cell office:value-type="float" office:value="46.422223604202273" table:formula="of:=SUBTOTAL(9;[.F28:.F28])" table:style-name="ce28">
            <text:p><text:s/>46<text:s/></text:p>
          </table:table-cell>
          <table:table-cell office:value-type="float" office:value="463.29120823383334" table:formula="of:=SUBTOTAL(9;[.G28:.G28])" table:style-name="ce28">
            <text:p><text:s/>463<text:s/></text:p>
          </table:table-cell>
          <table:table-cell office:value-type="float" office:value="119.87823828107118" table:formula="of:=SUBTOTAL(9;[.H28:.H28])" table:style-name="ce28">
            <text:p><text:s/>120<text:s/></text:p>
          </table:table-cell>
          <table:table-cell office:value-type="float" office:value="670.50676439094548" table:formula="of:=SUBTOTAL(9;[.I28:.I28])" table:style-name="ce28">
            <text:p><text:s/>671<text:s/></text:p>
          </table:table-cell>
          <table:table-cell office:value-type="float" office:value="22.321000000238421" table:formula="of:=SUBTOTAL(9;[.J28:.J28])" table:style-name="ce133">
            <text:p><text:s/>22<text:s/></text:p>
          </table:table-cell>
          <table:table-cell office:value-type="float" office:value="1341.6865945006014" table:formula="of:=SUBTOTAL(9;[.K28:.K28])" table:style-name="ce121">
            <text:p><text:s/>1,34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124">
            <text:p>2002/3 Total</text:p>
          </table:table-cell>
          <table:table-cell table:number-columns-repeated="2" table:style-name="ce82"/>
          <table:table-cell office:value-type="float" office:value="500.11049556138181" table:formula="of:=SUBTOTAL(9;[.E19:.E28])" table:style-name="ce143">
            <text:p><text:s/>500<text:s/></text:p>
          </table:table-cell>
          <table:table-cell office:value-type="float" office:value="464.06274256967254" table:formula="of:=SUBTOTAL(9;[.F19:.F28])" table:style-name="ce44">
            <text:p><text:s/>464<text:s/></text:p>
          </table:table-cell>
          <table:table-cell office:value-type="float" office:value="3923.4891718718504" table:formula="of:=SUBTOTAL(9;[.G19:.G28])" table:style-name="ce44">
            <text:p><text:s/>3,923<text:s/></text:p>
          </table:table-cell>
          <table:table-cell office:value-type="float" office:value="1395.3888544828212" table:formula="of:=SUBTOTAL(9;[.H19:.H28])" table:style-name="ce44">
            <text:p><text:s/>1,395<text:s/></text:p>
          </table:table-cell>
          <table:table-cell office:value-type="float" office:value="2647.136994573284" table:formula="of:=SUBTOTAL(9;[.I19:.I28])" table:style-name="ce44">
            <text:p><text:s/>2,647<text:s/></text:p>
          </table:table-cell>
          <table:table-cell office:value-type="float" office:value="391.56428330087664" table:formula="of:=SUBTOTAL(9;[.J19:.J28])" table:style-name="ce127">
            <text:p><text:s/>392<text:s/></text:p>
          </table:table-cell>
          <table:table-cell office:value-type="float" office:value="9321.7525423598872" table:formula="of:=SUBTOTAL(9;[.K19:.K28])" table:style-name="ce125">
            <text:p><text:s/>9,32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number-columns-spanned="1" table:number-rows-spanned="13" table:style-name="ce408">
            <text:p>2004/5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0">
            <text:p>Transfer</text:p>
          </table:table-cell>
          <table:table-cell office:value-type="float" office:value="448.25140698504447" table:style-name="ce35">
            <text:p><text:s/>448<text:s/></text:p>
          </table:table-cell>
          <table:table-cell office:value-type="float" office:value="1047.4464738223312" table:style-name="ce34">
            <text:p><text:s/>1,047<text:s/></text:p>
          </table:table-cell>
          <table:table-cell office:value-type="float" office:value="2692.9166643133613" table:style-name="ce34">
            <text:p><text:s/>2,693<text:s/></text:p>
          </table:table-cell>
          <table:table-cell office:value-type="float" office:value="1064.1321222040513" table:style-name="ce34">
            <text:p><text:s/>1,064<text:s/></text:p>
          </table:table-cell>
          <table:table-cell office:value-type="float" office:value="1848.0333971352327" table:style-name="ce34">
            <text:p><text:s/>1,848<text:s/></text:p>
          </table:table-cell>
          <table:table-cell office:value-type="float" office:value="214.24900372329728" table:style-name="ce36">
            <text:p><text:s/>214<text:s/></text:p>
          </table:table-cell>
          <table:table-cell office:value-type="float" office:value="7315.0290681833185" table:formula="of:=SUM([.E31:.J31])" table:style-name="ce123">
            <text:p><text:s/>7,3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ivic amenity</text:p>
          </table:table-cell>
          <table:table-cell office:value-type="float" office:value="11.486680039405824" table:style-name="ce35">
            <text:p><text:s/>11<text:s/></text:p>
          </table:table-cell>
          <table:table-cell office:value-type="float" office:value="89.112229880005117" table:style-name="ce34">
            <text:p><text:s/>89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00.59890991941094" table:formula="of:=SUM([.E32:.J32])" table:style-name="ce123">
            <text:p><text:s/>1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459.73808702445029" table:formula="of:=SUBTOTAL(9;[.E31:.E32])" table:style-name="ce152">
            <text:p><text:s/>460<text:s/></text:p>
          </table:table-cell>
          <table:table-cell office:value-type="float" office:value="1136.5587037023363" table:formula="of:=SUBTOTAL(9;[.F31:.F32])" table:style-name="ce153">
            <text:p><text:s/>1,137<text:s/></text:p>
          </table:table-cell>
          <table:table-cell office:value-type="float" office:value="2692.9166643133613" table:formula="of:=SUBTOTAL(9;[.G31:.G32])" table:style-name="ce153">
            <text:p><text:s/>2,693<text:s/></text:p>
          </table:table-cell>
          <table:table-cell office:value-type="float" office:value="1064.1321222040513" table:formula="of:=SUBTOTAL(9;[.H31:.H32])" table:style-name="ce153">
            <text:p><text:s/>1,064<text:s/></text:p>
          </table:table-cell>
          <table:table-cell office:value-type="float" office:value="1848.0333971352327" table:formula="of:=SUBTOTAL(9;[.I31:.I32])" table:style-name="ce153">
            <text:p><text:s/>1,848<text:s/></text:p>
          </table:table-cell>
          <table:table-cell office:value-type="float" office:value="214.24900372329728" table:formula="of:=SUBTOTAL(9;[.J31:.J32])" table:style-name="ce154">
            <text:p><text:s/>214<text:s/></text:p>
          </table:table-cell>
          <table:table-cell office:value-type="float" office:value="7415.6279781027297" table:formula="of:=SUBTOTAL(9;[.K31:.K32])" table:style-name="ce155">
            <text:p><text:s/>7,4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3.1257699565887451" table:style-name="ce35">
            <text:p><text:s/>3<text:s/></text:p>
          </table:table-cell>
          <table:table-cell office:value-type="float" office:value="2.1951299743652344" table:style-name="ce34">
            <text:p><text:s/>2<text:s/></text:p>
          </table:table-cell>
          <table:table-cell office:value-type="float" office:value="142.86733086995781" table:style-name="ce34">
            <text:p><text:s/>143<text:s/></text:p>
          </table:table-cell>
          <table:table-cell office:value-type="float" office:value="74.691780090630061" table:style-name="ce34">
            <text:p><text:s/>75<text:s/></text:p>
          </table:table-cell>
          <table:table-cell office:value-type="float" office:value="65.343448324378585" table:style-name="ce34">
            <text:p><text:s/>65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288.22345921592046" table:formula="of:=SUM([.E34:.J34])" table:style-name="ce123">
            <text:p><text:s/>28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0.96131571115110992" table:style-name="ce35">
            <text:p><text:s/>1<text:s/></text:p>
          </table:table-cell>
          <table:table-cell office:value-type="float" office:value="104.64412756786496" table:style-name="ce34">
            <text:p><text:s/>105<text:s/></text:p>
          </table:table-cell>
          <table:table-cell office:value-type="float" office:value="438.69586046415941" table:style-name="ce34">
            <text:p><text:s/>439<text:s/></text:p>
          </table:table-cell>
          <table:table-cell office:value-type="float" office:value="1.5269138779640197" table:style-name="ce34">
            <text:p><text:s/>2<text:s/></text:p>
          </table:table-cell>
          <table:table-cell office:value-type="float" office:value="237.99570000004766" table:style-name="ce34">
            <text:p><text:s/>238<text:s/></text:p>
          </table:table-cell>
          <table:table-cell office:value-type="float" office:value="53.064000000000007" table:style-name="ce36">
            <text:p><text:s/>53<text:s/></text:p>
          </table:table-cell>
          <table:table-cell office:value-type="float" office:value="836.88791762118717" table:formula="of:=SUM([.E35:.J35])" table:style-name="ce123">
            <text:p><text:s/>8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50.896192659139636" table:style-name="ce35">
            <text:p><text:s/>51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47.44833034229279" table:style-name="ce34">
            <text:p><text:s/>147<text:s/></text:p>
          </table:table-cell>
          <table:table-cell office:value-type="float" office:value="51.857664240539073" table:style-name="ce34">
            <text:p><text:s/>52<text:s/></text:p>
          </table:table-cell>
          <table:table-cell office:value-type="float" office:value="141.57315017986298" table:style-name="ce34">
            <text:p><text:s/>142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391.77533742183448" table:formula="of:=SUM([.E36:.J36])" table:style-name="ce123">
            <text:p><text:s/>3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.8731500005722046" table:style-name="ce34">
            <text:p><text:s/>1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0.8731500005722046" table:formula="of:=SUM([.E37:.J37])" table:style-name="ce123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319.85037178814412" table:style-name="ce35">
            <text:p><text:s/>320<text:s/></text:p>
          </table:table-cell>
          <table:table-cell office:value-type="float" office:value="12.011189965248107" table:style-name="ce34">
            <text:p><text:s/>12<text:s/></text:p>
          </table:table-cell>
          <table:table-cell office:value-type="float" office:value="1.9658999862670898" table:style-name="ce34">
            <text:p><text:s/>2<text:s/></text:p>
          </table:table-cell>
          <table:table-cell office:value-type="float" office:value="29.865320000648499" table:style-name="ce34">
            <text:p><text:s/>30<text:s/></text:p>
          </table:table-cell>
          <table:table-cell office:value-type="float" office:value="1.2264325103759766" table:style-name="ce34">
            <text:p><text:s/>1<text:s/></text:p>
          </table:table-cell>
          <table:table-cell office:value-type="float" office:value="8.2593400878906245" table:style-name="ce36">
            <text:p><text:s/>8<text:s/></text:p>
          </table:table-cell>
          <table:table-cell office:value-type="float" office:value="373.17855433857443" table:formula="of:=SUM([.E38:.J38])" table:style-name="ce123">
            <text:p><text:s/>3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19.896149963378907" table:style-name="ce35">
            <text:p><text:s/>20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355.21333994293212" table:style-name="ce34">
            <text:p><text:s/>355<text:s/></text:p>
          </table:table-cell>
          <table:table-cell office:value-type="float" office:value="40.746748809814456" table:style-name="ce34">
            <text:p><text:s/>41<text:s/></text:p>
          </table:table-cell>
          <table:table-cell office:value-type="float" office:value="14.328029605865478" table:style-name="ce34">
            <text:p><text:s/>14<text:s/></text:p>
          </table:table-cell>
          <table:table-cell office:value-type="float" office:value="269.51900000000001" table:style-name="ce36">
            <text:p><text:s/>270<text:s/></text:p>
          </table:table-cell>
          <table:table-cell office:value-type="float" office:value="699.70326832199089" table:formula="of:=SUM([.E39:.J39])" table:style-name="ce123">
            <text:p><text:s/>70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394.72980007840249" table:formula="of:=SUBTOTAL(9;[.E34:.E39])" table:style-name="ce152">
            <text:p><text:s/>395<text:s/></text:p>
          </table:table-cell>
          <table:table-cell office:value-type="float" office:value="118.85044750747829" table:formula="of:=SUBTOTAL(9;[.F34:.F39])" table:style-name="ce153">
            <text:p><text:s/>119<text:s/></text:p>
          </table:table-cell>
          <table:table-cell office:value-type="float" office:value="1086.1907616056092" table:formula="of:=SUBTOTAL(9;[.G34:.G39])" table:style-name="ce153">
            <text:p><text:s/>1,086<text:s/></text:p>
          </table:table-cell>
          <table:table-cell office:value-type="float" office:value="198.68842701959611" table:formula="of:=SUBTOTAL(9;[.H34:.H39])" table:style-name="ce153">
            <text:p><text:s/>199<text:s/></text:p>
          </table:table-cell>
          <table:table-cell office:value-type="float" office:value="461.33991062110283" table:formula="of:=SUBTOTAL(9;[.I34:.I39])" table:style-name="ce153">
            <text:p><text:s/>461<text:s/></text:p>
          </table:table-cell>
          <table:table-cell office:value-type="float" office:value="330.84234008789065" table:formula="of:=SUBTOTAL(9;[.J34:.J39])" table:style-name="ce154">
            <text:p><text:s/>331<text:s/></text:p>
          </table:table-cell>
          <table:table-cell office:value-type="float" office:value="2590.6416869200793" table:formula="of:=SUBTOTAL(9;[.K34:.K39])" table:style-name="ce155">
            <text:p><text:s/>2,59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ismantler</text:p>
          </table:table-cell>
          <table:table-cell office:value-type="float" office:value="0.38763799762725831" table:style-name="ce35">
            <text:p><text:s/>0<text:s/></text:p>
          </table:table-cell>
          <table:table-cell office:value-type="float" office:value="7.129871011656185" table:style-name="ce34">
            <text:p><text:s/>7<text:s/></text:p>
          </table:table-cell>
          <table:table-cell office:value-type="float" office:value="25.320621967180166" table:style-name="ce34">
            <text:p><text:s/>25<text:s/></text:p>
          </table:table-cell>
          <table:table-cell office:value-type="float" office:value="13.137592758491635" table:style-name="ce34">
            <text:p><text:s/>13<text:s/></text:p>
          </table:table-cell>
          <table:table-cell office:value-type="float" office:value="12.559534094175323" table:style-name="ce34">
            <text:p><text:s/>13<text:s/></text:p>
          </table:table-cell>
          <table:table-cell office:value-type="float" office:value="6.24" table:style-name="ce36">
            <text:p><text:s/>6<text:s/></text:p>
          </table:table-cell>
          <table:table-cell office:value-type="float" office:value="64.775257829130567" table:formula="of:=SUM([.E41:.J41])" table:style-name="ce123">
            <text:p><text:s/>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26.147949996948242" table:style-name="ce35">
            <text:p><text:s/>26<text:s/></text:p>
          </table:table-cell>
          <table:table-cell office:value-type="float" office:value="61.214526901245115" table:style-name="ce34">
            <text:p><text:s/>61<text:s/></text:p>
          </table:table-cell>
          <table:table-cell office:value-type="float" office:value="556.40665992593756" table:style-name="ce34">
            <text:p><text:s/>556<text:s/></text:p>
          </table:table-cell>
          <table:table-cell office:value-type="float" office:value="92.100606375306853" table:style-name="ce34">
            <text:p><text:s/>92<text:s/></text:p>
          </table:table-cell>
          <table:table-cell office:value-type="float" office:value="858.7693006439805" table:style-name="ce34">
            <text:p><text:s/>859<text:s/></text:p>
          </table:table-cell>
          <table:table-cell office:value-type="float" office:value="14.918320007324219" table:style-name="ce36">
            <text:p><text:s/>15<text:s/></text:p>
          </table:table-cell>
          <table:table-cell office:value-type="float" office:value="1609.5573638507424" table:formula="of:=SUM([.E42:.J42])" table:style-name="ce123">
            <text:p><text:s/>1,6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57"/>
          <table:table-cell office:value-type="float" office:value="26.535587994575501" table:formula="of:=SUBTOTAL(9;[.E41:.E42])" table:style-name="ce120">
            <text:p><text:s/>27<text:s/></text:p>
          </table:table-cell>
          <table:table-cell office:value-type="float" office:value="68.3443979129013" table:formula="of:=SUBTOTAL(9;[.F41:.F42])" table:style-name="ce28">
            <text:p><text:s/>68<text:s/></text:p>
          </table:table-cell>
          <table:table-cell office:value-type="float" office:value="581.72728189311772" table:formula="of:=SUBTOTAL(9;[.G41:.G42])" table:style-name="ce28">
            <text:p><text:s/>582<text:s/></text:p>
          </table:table-cell>
          <table:table-cell office:value-type="float" office:value="105.23819913379849" table:formula="of:=SUBTOTAL(9;[.H41:.H42])" table:style-name="ce28">
            <text:p><text:s/>105<text:s/></text:p>
          </table:table-cell>
          <table:table-cell office:value-type="float" office:value="871.32883473815582" table:formula="of:=SUBTOTAL(9;[.I41:.I42])" table:style-name="ce28">
            <text:p><text:s/>871<text:s/></text:p>
          </table:table-cell>
          <table:table-cell office:value-type="float" office:value="21.158320007324221" table:formula="of:=SUBTOTAL(9;[.J41:.J42])" table:style-name="ce133">
            <text:p><text:s/>21<text:s/></text:p>
          </table:table-cell>
          <table:table-cell office:value-type="float" office:value="1674.332621679873" table:formula="of:=SUBTOTAL(9;[.K41:.K42])" table:style-name="ce121">
            <text:p><text:s/>1,67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4/5 Total</text:p>
          </table:table-cell>
          <table:table-cell table:number-columns-repeated="2" table:style-name="ce82"/>
          <table:table-cell office:value-type="float" office:value="881.00347509742824" table:formula="of:=SUBTOTAL(9;[.E31:.E42])" table:style-name="ce143">
            <text:p><text:s/>881<text:s/></text:p>
          </table:table-cell>
          <table:table-cell office:value-type="float" office:value="1323.7535491227159" table:formula="of:=SUBTOTAL(9;[.F31:.F42])" table:style-name="ce44">
            <text:p><text:s/>1,324<text:s/></text:p>
          </table:table-cell>
          <table:table-cell office:value-type="float" office:value="4360.8347078120878" table:formula="of:=SUBTOTAL(9;[.G31:.G42])" table:style-name="ce44">
            <text:p><text:s/>4,361<text:s/></text:p>
          </table:table-cell>
          <table:table-cell office:value-type="float" office:value="1368.0587483574461" table:formula="of:=SUBTOTAL(9;[.H31:.H42])" table:style-name="ce44">
            <text:p><text:s/>1,368<text:s/></text:p>
          </table:table-cell>
          <table:table-cell office:value-type="float" office:value="3180.7021424944915" table:formula="of:=SUBTOTAL(9;[.I31:.I42])" table:style-name="ce44">
            <text:p><text:s/>3,181<text:s/></text:p>
          </table:table-cell>
          <table:table-cell office:value-type="float" office:value="566.2496638185122" table:formula="of:=SUBTOTAL(9;[.J31:.J42])" table:style-name="ce127">
            <text:p><text:s/>566<text:s/></text:p>
          </table:table-cell>
          <table:table-cell office:value-type="float" office:value="11680.602286702682" table:formula="of:=SUBTOTAL(9;[.K31:.K42])" table:style-name="ce125">
            <text:p><text:s/>11,68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5" table:number-columns-spanned="1" table:number-rows-spanned="13" table:style-name="ce408">
            <text:p>2005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0">
            <text:p>Transfer</text:p>
          </table:table-cell>
          <table:table-cell office:value-type="float" office:value="518.79004284345399" table:style-name="ce35">
            <text:p><text:s/>519<text:s/></text:p>
          </table:table-cell>
          <table:table-cell office:value-type="float" office:value="406.45809052573298" table:style-name="ce34">
            <text:p><text:s/>406<text:s/></text:p>
          </table:table-cell>
          <table:table-cell office:value-type="float" office:value="2720.8010398061801" table:style-name="ce34">
            <text:p><text:s/>2,721<text:s/></text:p>
          </table:table-cell>
          <table:table-cell office:value-type="float" office:value="1123.0301757936199" table:style-name="ce34">
            <text:p><text:s/>1,123<text:s/></text:p>
          </table:table-cell>
          <table:table-cell office:value-type="float" office:value="1802.2360042975999" table:style-name="ce34">
            <text:p><text:s/>1,802<text:s/></text:p>
          </table:table-cell>
          <table:table-cell office:value-type="float" office:value="173.07626535079601" table:style-name="ce36">
            <text:p><text:s/>173<text:s/></text:p>
          </table:table-cell>
          <table:table-cell office:value-type="float" office:value="6744.3916186173838" table:formula="of:=SUM([.E45:.J45])" table:style-name="ce123">
            <text:p><text:s/>6,74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ivic amenity</text:p>
          </table:table-cell>
          <table:table-cell office:value-type="float" office:value="2.8716700098514498" table:style-name="ce35">
            <text:p><text:s/>3<text:s/></text:p>
          </table:table-cell>
          <table:table-cell office:value-type="float" office:value="99.2874174542427" table:style-name="ce34">
            <text:p><text:s/>99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102.15908746409416" table:formula="of:=SUM([.E46:.J46])" table:style-name="ce123">
            <text:p><text:s/>1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521.6617128533054" table:formula="of:=SUBTOTAL(9;[.E45:.E46])" table:style-name="ce152">
            <text:p><text:s/>522<text:s/></text:p>
          </table:table-cell>
          <table:table-cell office:value-type="float" office:value="505.74550797997568" table:formula="of:=SUBTOTAL(9;[.F45:.F46])" table:style-name="ce153">
            <text:p><text:s/>506<text:s/></text:p>
          </table:table-cell>
          <table:table-cell office:value-type="float" office:value="2720.8010398061801" table:formula="of:=SUBTOTAL(9;[.G45:.G46])" table:style-name="ce153">
            <text:p><text:s/>2,721<text:s/></text:p>
          </table:table-cell>
          <table:table-cell office:value-type="float" office:value="1123.0301757936199" table:formula="of:=SUBTOTAL(9;[.H45:.H46])" table:style-name="ce153">
            <text:p><text:s/>1,123<text:s/></text:p>
          </table:table-cell>
          <table:table-cell office:value-type="float" office:value="1802.2360042975999" table:formula="of:=SUBTOTAL(9;[.I45:.I46])" table:style-name="ce153">
            <text:p><text:s/>1,802<text:s/></text:p>
          </table:table-cell>
          <table:table-cell office:value-type="float" office:value="173.07626535079601" table:formula="of:=SUBTOTAL(9;[.J45:.J46])" table:style-name="ce154">
            <text:p><text:s/>173<text:s/></text:p>
          </table:table-cell>
          <table:table-cell office:value-type="float" office:value="6846.550706081478" table:formula="of:=SUBTOTAL(9;[.K45:.K46])" table:style-name="ce155">
            <text:p><text:s/>6,8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1.7276521053314" table:style-name="ce35">
            <text:p><text:s/>12<text:s/></text:p>
          </table:table-cell>
          <table:table-cell office:value-type="float" office:value="2.4540000000000002" table:style-name="ce34">
            <text:p><text:s/>2<text:s/></text:p>
          </table:table-cell>
          <table:table-cell office:value-type="float" office:value="392.89630333358002" table:style-name="ce34">
            <text:p><text:s/>393<text:s/></text:p>
          </table:table-cell>
          <table:table-cell office:value-type="float" office:value="120.78429459035399" table:style-name="ce34">
            <text:p><text:s/>121<text:s/></text:p>
          </table:table-cell>
          <table:table-cell office:value-type="float" office:value="25.8472951698303" table:style-name="ce34">
            <text:p><text:s/>26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553.70954519909571" table:formula="of:=SUM([.E48:.J48])" table:style-name="ce123">
            <text:p><text:s/>5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0.45882499009370797" table:style-name="ce35">
            <text:p><text:s/>0<text:s/></text:p>
          </table:table-cell>
          <table:table-cell office:value-type="float" office:value="84.671650420824605" table:style-name="ce34">
            <text:p><text:s/>85<text:s/></text:p>
          </table:table-cell>
          <table:table-cell office:value-type="float" office:value="418.10923062145002" table:style-name="ce34">
            <text:p><text:s/>418<text:s/></text:p>
          </table:table-cell>
          <table:table-cell office:value-type="float" office:value="1.4675462951660101" table:style-name="ce34">
            <text:p><text:s/>1<text:s/></text:p>
          </table:table-cell>
          <table:table-cell office:value-type="float" office:value="289.80328491330101" table:style-name="ce34">
            <text:p><text:s/>290<text:s/></text:p>
          </table:table-cell>
          <table:table-cell office:value-type="float" office:value="75.383388793945301" table:style-name="ce36">
            <text:p><text:s/>75<text:s/></text:p>
          </table:table-cell>
          <table:table-cell office:value-type="float" office:value="869.89392603478063" table:formula="of:=SUM([.E49:.J49])" table:style-name="ce123">
            <text:p><text:s/>8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599.83217999410601" table:style-name="ce35">
            <text:p><text:s/>600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61.706429278135" table:style-name="ce34">
            <text:p><text:s/>162<text:s/></text:p>
          </table:table-cell>
          <table:table-cell office:value-type="float" office:value="42.824710009463097" table:style-name="ce34">
            <text:p><text:s/>43<text:s/></text:p>
          </table:table-cell>
          <table:table-cell office:value-type="float" office:value="94.562946084976204" table:style-name="ce34">
            <text:p><text:s/>95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898.92626536668035" table:formula="of:=SUM([.E50:.J50])" table:style-name="ce123">
            <text:p><text:s/>89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.0059999999999998" table:style-name="ce34">
            <text:p><text:s/>2<text:s/></text:p>
          </table:table-cell>
          <table:table-cell office:value-type="float" office:value="0" table:style-name="ce36">
            <text:p><text:s/>-<text:s/></text:p>
          </table:table-cell>
          <table:table-cell office:value-type="float" office:value="2.0059999999999998" table:formula="of:=SUM([.E51:.J51])" table:style-name="ce123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56.407600483954397" table:style-name="ce35">
            <text:p><text:s/>56<text:s/></text:p>
          </table:table-cell>
          <table:table-cell office:value-type="float" office:value="15.803890159606899" table:style-name="ce34">
            <text:p><text:s/>16<text:s/></text:p>
          </table:table-cell>
          <table:table-cell office:value-type="float" office:value="3.9114592504501302" table:style-name="ce34">
            <text:p><text:s/>4<text:s/></text:p>
          </table:table-cell>
          <table:table-cell office:value-type="float" office:value="32.4585767509937" table:style-name="ce34">
            <text:p><text:s/>32<text:s/></text:p>
          </table:table-cell>
          <table:table-cell office:value-type="float" office:value="43.990869888305603" table:style-name="ce34">
            <text:p><text:s/>44<text:s/></text:p>
          </table:table-cell>
          <table:table-cell office:value-type="float" office:value="11.693" table:style-name="ce36">
            <text:p><text:s/>12<text:s/></text:p>
          </table:table-cell>
          <table:table-cell office:value-type="float" office:value="164.26539653331074" table:formula="of:=SUM([.E52:.J52])" table:style-name="ce123">
            <text:p><text:s/>1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11.792720092773401" table:style-name="ce35">
            <text:p><text:s/>12<text:s/></text:p>
          </table:table-cell>
          <table:table-cell office:value-type="float" office:value="11.4554400634765" table:style-name="ce34">
            <text:p><text:s/>11<text:s/></text:p>
          </table:table-cell>
          <table:table-cell office:value-type="float" office:value="305.71220510292102" table:style-name="ce34">
            <text:p><text:s/>306<text:s/></text:p>
          </table:table-cell>
          <table:table-cell office:value-type="float" office:value="40.023833072662299" table:style-name="ce34">
            <text:p><text:s/>40<text:s/></text:p>
          </table:table-cell>
          <table:table-cell office:value-type="float" office:value="3.4266899294853199" table:style-name="ce34">
            <text:p><text:s/>3<text:s/></text:p>
          </table:table-cell>
          <table:table-cell office:value-type="float" office:value="243.41813525247599" table:style-name="ce36">
            <text:p><text:s/>243<text:s/></text:p>
          </table:table-cell>
          <table:table-cell office:value-type="float" office:value="615.82902351379448" table:formula="of:=SUM([.E53:.J53])" table:style-name="ce123">
            <text:p><text:s/>6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680.21897766625887" table:formula="of:=SUBTOTAL(9;[.E48:.E53])" table:style-name="ce152">
            <text:p><text:s/>680<text:s/></text:p>
          </table:table-cell>
          <table:table-cell office:value-type="float" office:value="114.38498064390799" table:formula="of:=SUBTOTAL(9;[.F48:.F53])" table:style-name="ce153">
            <text:p><text:s/>114<text:s/></text:p>
          </table:table-cell>
          <table:table-cell office:value-type="float" office:value="1282.3356275865362" table:formula="of:=SUBTOTAL(9;[.G48:.G53])" table:style-name="ce153">
            <text:p><text:s/>1,282<text:s/></text:p>
          </table:table-cell>
          <table:table-cell office:value-type="float" office:value="237.55896071863913" table:formula="of:=SUBTOTAL(9;[.H48:.H53])" table:style-name="ce153">
            <text:p><text:s/>238<text:s/></text:p>
          </table:table-cell>
          <table:table-cell office:value-type="float" office:value="459.63708598589841" table:formula="of:=SUBTOTAL(9;[.I48:.I53])" table:style-name="ce153">
            <text:p><text:s/>460<text:s/></text:p>
          </table:table-cell>
          <table:table-cell office:value-type="float" office:value="330.4945240464213" table:formula="of:=SUBTOTAL(9;[.J48:.J53])" table:style-name="ce154">
            <text:p><text:s/>330<text:s/></text:p>
          </table:table-cell>
          <table:table-cell office:value-type="float" office:value="3104.6301566476623" table:formula="of:=SUBTOTAL(9;[.K48:.K53])" table:style-name="ce155">
            <text:p><text:s/>3,1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ismantler</text:p>
          </table:table-cell>
          <table:table-cell office:value-type="float" office:value="0.32764999973773901" table:style-name="ce35">
            <text:p><text:s/>0<text:s/></text:p>
          </table:table-cell>
          <table:table-cell office:value-type="float" office:value="6.3958805924749198" table:style-name="ce34">
            <text:p><text:s/>6<text:s/></text:p>
          </table:table-cell>
          <table:table-cell office:value-type="float" office:value="58.442462705174897" table:style-name="ce34">
            <text:p><text:s/>58<text:s/></text:p>
          </table:table-cell>
          <table:table-cell office:value-type="float" office:value="32.722722693316598" table:style-name="ce34">
            <text:p><text:s/>33<text:s/></text:p>
          </table:table-cell>
          <table:table-cell office:value-type="float" office:value="16.7669454456171" table:style-name="ce34">
            <text:p><text:s/>17<text:s/></text:p>
          </table:table-cell>
          <table:table-cell office:value-type="float" office:value="6.7230219802856404" table:style-name="ce36">
            <text:p><text:s/>7<text:s/></text:p>
          </table:table-cell>
          <table:table-cell office:value-type="float" office:value="121.37868341660689" table:formula="of:=SUM([.E55:.J55])" table:style-name="ce123">
            <text:p><text:s/>1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18.725805850028902" table:style-name="ce35">
            <text:p><text:s/>19<text:s/></text:p>
          </table:table-cell>
          <table:table-cell office:value-type="float" office:value="59.336730566620801" table:style-name="ce34">
            <text:p><text:s/>59<text:s/></text:p>
          </table:table-cell>
          <table:table-cell office:value-type="float" office:value="482.07780616950998" table:style-name="ce34">
            <text:p><text:s/>482<text:s/></text:p>
          </table:table-cell>
          <table:table-cell office:value-type="float" office:value="94.704085280120395" table:style-name="ce34">
            <text:p><text:s/>95<text:s/></text:p>
          </table:table-cell>
          <table:table-cell office:value-type="float" office:value="821.97186218758497" table:style-name="ce34">
            <text:p><text:s/>822<text:s/></text:p>
          </table:table-cell>
          <table:table-cell office:value-type="float" office:value="23.43075" table:style-name="ce36">
            <text:p><text:s/>23<text:s/></text:p>
          </table:table-cell>
          <table:table-cell office:value-type="float" office:value="1500.247040053865" table:formula="of:=SUM([.E56:.J56])" table:style-name="ce123">
            <text:p><text:s/>1,50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57"/>
          <table:table-cell office:value-type="float" office:value="19.053455849766642" table:formula="of:=SUBTOTAL(9;[.E55:.E56])" table:style-name="ce28">
            <text:p><text:s/>19<text:s/></text:p>
          </table:table-cell>
          <table:table-cell office:value-type="float" office:value="65.732611159095725" table:formula="of:=SUBTOTAL(9;[.F55:.F56])" table:style-name="ce28">
            <text:p><text:s/>66<text:s/></text:p>
          </table:table-cell>
          <table:table-cell office:value-type="float" office:value="540.52026887468492" table:formula="of:=SUBTOTAL(9;[.G55:.G56])" table:style-name="ce28">
            <text:p><text:s/>541<text:s/></text:p>
          </table:table-cell>
          <table:table-cell office:value-type="float" office:value="127.42680797343699" table:formula="of:=SUBTOTAL(9;[.H55:.H56])" table:style-name="ce28">
            <text:p><text:s/>127<text:s/></text:p>
          </table:table-cell>
          <table:table-cell office:value-type="float" office:value="838.7388076332021" table:formula="of:=SUBTOTAL(9;[.I55:.I56])" table:style-name="ce28">
            <text:p><text:s/>839<text:s/></text:p>
          </table:table-cell>
          <table:table-cell office:value-type="float" office:value="30.15377198028564" table:formula="of:=SUBTOTAL(9;[.J55:.J56])" table:style-name="ce28">
            <text:p><text:s/>30<text:s/></text:p>
          </table:table-cell>
          <table:table-cell office:value-type="float" office:value="1621.6257234704719" table:formula="of:=SUBTOTAL(9;[.K55:.K56])" table:style-name="ce133">
            <text:p><text:s/>1,62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5 Total</text:p>
          </table:table-cell>
          <table:table-cell table:number-columns-repeated="2" table:style-name="ce82"/>
          <table:table-cell office:value-type="float" office:value="1220.9341463693308" table:formula="of:=SUBTOTAL(9;[.E45:.E56])" table:style-name="ce44">
            <text:p><text:s/>1,221<text:s/></text:p>
          </table:table-cell>
          <table:table-cell office:value-type="float" office:value="685.86309978297936" table:formula="of:=SUBTOTAL(9;[.F45:.F56])" table:style-name="ce44">
            <text:p><text:s/>686<text:s/></text:p>
          </table:table-cell>
          <table:table-cell office:value-type="float" office:value="4543.6569362674009" table:formula="of:=SUBTOTAL(9;[.G45:.G56])" table:style-name="ce44">
            <text:p><text:s/>4,544<text:s/></text:p>
          </table:table-cell>
          <table:table-cell office:value-type="float" office:value="1488.0159444856959" table:formula="of:=SUBTOTAL(9;[.H45:.H56])" table:style-name="ce44">
            <text:p><text:s/>1,488<text:s/></text:p>
          </table:table-cell>
          <table:table-cell office:value-type="float" office:value="3100.6118979167004" table:formula="of:=SUBTOTAL(9;[.I45:.I56])" table:style-name="ce158">
            <text:p><text:s/>3,101<text:s/></text:p>
          </table:table-cell>
          <table:table-cell office:value-type="float" office:value="533.72456137750294" table:formula="of:=SUBTOTAL(9;[.J45:.J56])" table:style-name="ce158">
            <text:p><text:s/>534<text:s/></text:p>
          </table:table-cell>
          <table:table-cell office:value-type="float" office:value="11572.806586199611" table:formula="of:=SUBTOTAL(9;[.K45:.K56])" table:style-name="ce125">
            <text:p><text:s/>11,573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6" table:number-columns-spanned="1" table:number-rows-spanned="13" table:style-name="ce408">
            <text:p>2006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0">
            <text:p>Transfer</text:p>
          </table:table-cell>
          <table:table-cell office:value-type="float" office:value="707.35779689060905" table:style-name="ce159">
            <text:p><text:s/>707<text:s/></text:p>
          </table:table-cell>
          <table:table-cell office:value-type="float" office:value="362.05385381408036" table:style-name="ce34">
            <text:p><text:s/>362<text:s/></text:p>
          </table:table-cell>
          <table:table-cell office:value-type="float" office:value="2361.7364948614404" table:style-name="ce34">
            <text:p><text:s/>2,362<text:s/></text:p>
          </table:table-cell>
          <table:table-cell office:value-type="float" office:value="914.55212371288781" table:style-name="ce34">
            <text:p><text:s/>915<text:s/></text:p>
          </table:table-cell>
          <table:table-cell office:value-type="float" office:value="1820.9472362814699" table:style-name="ce160">
            <text:p><text:s/>1,821<text:s/></text:p>
          </table:table-cell>
          <table:table-cell office:value-type="string" table:number-columns-spanned="1" table:number-rows-spanned="13" table:style-name="ce423">
            <text:p>See Table Note</text:p>
          </table:table-cell>
          <table:table-cell office:value-type="float" office:value="6166.6475055604878" table:formula="of:=SUM([.E59:.J59])" table:style-name="ce123">
            <text:p><text:s/>6,1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ivic amenity</text:p>
          </table:table-cell>
          <table:table-cell office:value-type="float" office:value="16.784149918079301" table:style-name="ce161">
            <text:p><text:s/>17<text:s/></text:p>
          </table:table-cell>
          <table:table-cell office:value-type="float" office:value="98.305107026656628" table:style-name="ce34">
            <text:p><text:s/>98<text:s/></text:p>
          </table:table-cell>
          <table:table-cell office:value-type="float" office:value="155.60251973423641" table:style-name="ce34">
            <text:p><text:s/>156<text:s/></text:p>
          </table:table-cell>
          <table:table-cell office:value-type="float" office:value="176.64184802915156" table:style-name="ce34">
            <text:p><text:s/>177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447.33362470812392" table:formula="of:=SUM([.E60:.J60])" table:style-name="ce123">
            <text:p><text:s/>4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724.14194680868832" table:formula="of:=SUBTOTAL(9;[.E59:.E60])" table:style-name="ce152">
            <text:p><text:s/>724<text:s/></text:p>
          </table:table-cell>
          <table:table-cell office:value-type="float" office:value="460.35896084073698" table:formula="of:=SUBTOTAL(9;[.F59:.F60])" table:style-name="ce153">
            <text:p><text:s/>460<text:s/></text:p>
          </table:table-cell>
          <table:table-cell office:value-type="float" office:value="2517.3390145956769" table:formula="of:=SUBTOTAL(9;[.G59:.G60])" table:style-name="ce153">
            <text:p><text:s/>2,517<text:s/></text:p>
          </table:table-cell>
          <table:table-cell office:value-type="float" office:value="1091.1939717420394" table:formula="of:=SUBTOTAL(9;[.H59:.H60])" table:style-name="ce153">
            <text:p><text:s/>1,091<text:s/></text:p>
          </table:table-cell>
          <table:table-cell office:value-type="float" office:value="1820.9472362814699" table:formula="of:=SUBTOTAL(9;[.I59:.I60])" table:style-name="ce153">
            <text:p><text:s/>1,821<text:s/></text:p>
          </table:table-cell>
          <table:covered-table-cell/>
          <table:table-cell office:value-type="float" office:value="6613.9811302686112" table:style-name="ce154">
            <text:p><text:s/>6,61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0.221018966376782" table:style-name="ce35">
            <text:p><text:s/>10<text:s/></text:p>
          </table:table-cell>
          <table:table-cell office:value-type="float" office:value="2.2214157104492189" table:style-name="ce34">
            <text:p><text:s/>2<text:s/></text:p>
          </table:table-cell>
          <table:table-cell office:value-type="float" office:value="197.86258882424235" table:style-name="ce34">
            <text:p><text:s/>198<text:s/></text:p>
          </table:table-cell>
          <table:table-cell office:value-type="float" office:value="186.36706928935274" table:style-name="ce34">
            <text:p><text:s/>186<text:s/></text:p>
          </table:table-cell>
          <table:table-cell office:value-type="float" office:value="26.407301208496094" table:style-name="ce34">
            <text:p><text:s/>26<text:s/></text:p>
          </table:table-cell>
          <table:covered-table-cell/>
          <table:table-cell office:value-type="float" office:value="423.07939399891717" table:formula="of:=SUM([.E62:.J62])" table:style-name="ce123">
            <text:p><text:s/>4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0.20432997798919678" table:style-name="ce35">
            <text:p><text:s/>0<text:s/></text:p>
          </table:table-cell>
          <table:table-cell office:value-type="float" office:value="131.73176786177629" table:style-name="ce34">
            <text:p><text:s/>132<text:s/></text:p>
          </table:table-cell>
          <table:table-cell office:value-type="float" office:value="439.86712131171299" table:style-name="ce34">
            <text:p><text:s/>440<text:s/></text:p>
          </table:table-cell>
          <table:table-cell office:value-type="float" office:value="2.1875548019409181" table:style-name="ce34">
            <text:p><text:s/>2<text:s/></text:p>
          </table:table-cell>
          <table:table-cell office:value-type="float" office:value="317.76768387413" table:style-name="ce162">
            <text:p><text:s/>318<text:s/></text:p>
          </table:table-cell>
          <table:covered-table-cell/>
          <table:table-cell office:value-type="float" office:value="891.75845782754936" table:formula="of:=SUM([.E63:.J63])" table:style-name="ce123">
            <text:p><text:s/>8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921.7575205078125" table:style-name="ce35">
            <text:p><text:s/>922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00.49140974807739" table:style-name="ce34">
            <text:p><text:s/>200<text:s/></text:p>
          </table:table-cell>
          <table:table-cell office:value-type="float" office:value="25.516999999999999" table:style-name="ce34">
            <text:p><text:s/>26<text:s/></text:p>
          </table:table-cell>
          <table:table-cell office:value-type="float" office:value="76.560346872329717" table:style-name="ce34">
            <text:p><text:s/>77<text:s/></text:p>
          </table:table-cell>
          <table:covered-table-cell/>
          <table:table-cell office:value-type="float" office:value="1224.3262771282198" table:formula="of:=SUM([.E64:.J64])" table:style-name="ce123">
            <text:p><text:s/>1,2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.1920910034179688" table:style-name="ce34">
            <text:p><text:s/>1<text:s/></text:p>
          </table:table-cell>
          <table:covered-table-cell/>
          <table:table-cell office:value-type="float" office:value="1.1920910034179688" table:formula="of:=SUM([.E65:.J65])" table:style-name="ce123">
            <text:p><text:s/>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44.570839882314203" table:style-name="ce35">
            <text:p><text:s/>45<text:s/></text:p>
          </table:table-cell>
          <table:table-cell office:value-type="float" office:value="21.79202149963379" table:style-name="ce34">
            <text:p><text:s/>22<text:s/></text:p>
          </table:table-cell>
          <table:table-cell office:value-type="float" office:value="3.5230000000000001" table:style-name="ce34">
            <text:p><text:s/>4<text:s/></text:p>
          </table:table-cell>
          <table:table-cell office:value-type="float" office:value="30.952629968643187" table:style-name="ce34">
            <text:p><text:s/>31<text:s/></text:p>
          </table:table-cell>
          <table:table-cell office:value-type="float" office:value="85.908380098342903" table:style-name="ce162">
            <text:p><text:s/>86<text:s/></text:p>
          </table:table-cell>
          <table:covered-table-cell/>
          <table:table-cell office:value-type="float" office:value="186.74687144893409" table:formula="of:=SUM([.E66:.J66])" table:style-name="ce123">
            <text:p><text:s/>18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409.58449856406497" table:style-name="ce161">
            <text:p><text:s/>410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04.79389186096191" table:style-name="ce34">
            <text:p><text:s/>205<text:s/></text:p>
          </table:table-cell>
          <table:table-cell office:value-type="float" office:value="90.320716529846194" table:style-name="ce34">
            <text:p><text:s/>90<text:s/></text:p>
          </table:table-cell>
          <table:table-cell office:value-type="float" office:value="0.23399000167846601" table:style-name="ce163">
            <text:p><text:s/>0<text:s/></text:p>
          </table:table-cell>
          <table:covered-table-cell/>
          <table:table-cell office:value-type="float" office:value="704.93309695655148" table:formula="of:=SUM([.E67:.J67])" table:style-name="ce123">
            <text:p><text:s/>7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1386.3382078985576" table:formula="of:=SUBTOTAL(9;[.E62:.E67])" table:style-name="ce152">
            <text:p><text:s/>1,386<text:s/></text:p>
          </table:table-cell>
          <table:table-cell office:value-type="float" office:value="155.74520507185929" table:formula="of:=SUBTOTAL(9;[.F62:.F67])" table:style-name="ce153">
            <text:p><text:s/>156<text:s/></text:p>
          </table:table-cell>
          <table:table-cell office:value-type="float" office:value="1046.5380117449947" table:formula="of:=SUBTOTAL(9;[.G62:.G67])" table:style-name="ce153">
            <text:p><text:s/>1,047<text:s/></text:p>
          </table:table-cell>
          <table:table-cell office:value-type="float" office:value="335.34497058978303" table:formula="of:=SUBTOTAL(9;[.H62:.H67])" table:style-name="ce153">
            <text:p><text:s/>335<text:s/></text:p>
          </table:table-cell>
          <table:table-cell office:value-type="float" office:value="508.06979305839513" table:formula="of:=SUBTOTAL(9;[.I62:.I67])" table:style-name="ce34">
            <text:p><text:s/>508<text:s/></text:p>
          </table:table-cell>
          <table:covered-table-cell/>
          <table:table-cell office:value-type="float" office:value="3432.0361883635896" table:style-name="ce154">
            <text:p><text:s/>3,4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ismantler</text:p>
          </table:table-cell>
          <table:table-cell office:value-type="float" office:value="2.5406123795509301" table:style-name="ce159">
            <text:p><text:s/>3<text:s/></text:p>
          </table:table-cell>
          <table:table-cell office:value-type="float" office:value="7.0491696703061457" table:style-name="ce34">
            <text:p><text:s/>7<text:s/></text:p>
          </table:table-cell>
          <table:table-cell office:value-type="float" office:value="78.261367107727338" table:style-name="ce34">
            <text:p><text:s/>78<text:s/></text:p>
          </table:table-cell>
          <table:table-cell office:value-type="float" office:value="36.024459436098581" table:style-name="ce34">
            <text:p><text:s/>36<text:s/></text:p>
          </table:table-cell>
          <table:table-cell office:value-type="float" office:value="25.368536578372101" table:style-name="ce160">
            <text:p><text:s/>25<text:s/></text:p>
          </table:table-cell>
          <table:covered-table-cell/>
          <table:table-cell office:value-type="float" office:value="149.24414517205508" table:formula="of:=SUM([.E69:.J69])" table:style-name="ce123">
            <text:p><text:s/>1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26.995318370819" table:style-name="ce161">
            <text:p><text:s/>27<text:s/></text:p>
          </table:table-cell>
          <table:table-cell office:value-type="float" office:value="41.96683901453018" table:style-name="ce34">
            <text:p><text:s/>42<text:s/></text:p>
          </table:table-cell>
          <table:table-cell office:value-type="float" office:value="524.23839753341679" table:style-name="ce34">
            <text:p><text:s/>524<text:s/></text:p>
          </table:table-cell>
          <table:table-cell office:value-type="float" office:value="134.49323872947693" table:style-name="ce34">
            <text:p><text:s/>134<text:s/></text:p>
          </table:table-cell>
          <table:table-cell office:value-type="float" office:value="1056.99738420362" table:style-name="ce163">
            <text:p><text:s/>1,057<text:s/></text:p>
          </table:table-cell>
          <table:covered-table-cell/>
          <table:table-cell office:value-type="float" office:value="1784.6911778518629" table:formula="of:=SUM([.E70:.J70])" table:style-name="ce123">
            <text:p><text:s/>1,7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57"/>
          <table:table-cell office:value-type="float" office:value="29.535930750369928" table:formula="of:=SUBTOTAL(9;[.E69:.E70])" table:style-name="ce28">
            <text:p><text:s/>30<text:s/></text:p>
          </table:table-cell>
          <table:table-cell office:value-type="float" office:value="49.016008684836322" table:formula="of:=SUBTOTAL(9;[.F69:.F70])" table:style-name="ce28">
            <text:p><text:s/>49<text:s/></text:p>
          </table:table-cell>
          <table:table-cell office:value-type="float" office:value="602.49976464114411" table:formula="of:=SUBTOTAL(9;[.G69:.G70])" table:style-name="ce28">
            <text:p><text:s/>602<text:s/></text:p>
          </table:table-cell>
          <table:table-cell office:value-type="float" office:value="170.5176981655755" table:formula="of:=SUBTOTAL(9;[.H69:.H70])" table:style-name="ce28">
            <text:p><text:s/>171<text:s/></text:p>
          </table:table-cell>
          <table:table-cell office:value-type="float" office:value="1082.3659207819921" table:formula="of:=SUBTOTAL(9;[.I69:.I70])" table:style-name="ce34">
            <text:p><text:s/>1,082<text:s/></text:p>
          </table:table-cell>
          <table:covered-table-cell/>
          <table:table-cell office:value-type="float" office:value="1933.9353230239219" table:style-name="ce133">
            <text:p><text:s/>1,93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6 Total</text:p>
          </table:table-cell>
          <table:table-cell table:number-columns-repeated="2" table:style-name="ce82"/>
          <table:table-cell office:value-type="float" office:value="2140.0160854576161" table:formula="of:=SUBTOTAL(9;[.E59:.E70])" table:style-name="ce44">
            <text:p><text:s/>2,140<text:s/></text:p>
          </table:table-cell>
          <table:table-cell office:value-type="float" office:value="665.12017459743254" table:formula="of:=SUBTOTAL(9;[.F59:.F70])" table:style-name="ce44">
            <text:p><text:s/>665<text:s/></text:p>
          </table:table-cell>
          <table:table-cell office:value-type="float" office:value="4166.3767909818162" table:formula="of:=SUBTOTAL(9;[.G59:.G70])" table:style-name="ce44">
            <text:p><text:s/>4,166<text:s/></text:p>
          </table:table-cell>
          <table:table-cell office:value-type="float" office:value="1597.0566404973977" table:formula="of:=SUBTOTAL(9;[.H59:.H70])" table:style-name="ce44">
            <text:p><text:s/>1,597<text:s/></text:p>
          </table:table-cell>
          <table:table-cell office:value-type="float" office:value="3411.3829501218579" table:formula="of:=SUBTOTAL(9;[.I59:.I70])" table:style-name="ce44">
            <text:p><text:s/>3,411<text:s/></text:p>
          </table:table-cell>
          <table:table-cell table:style-name="ce164"/>
          <table:table-cell office:value-type="float" office:value="11979.952641656122" table:style-name="ce125">
            <text:p><text:s/>11,98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7" table:number-columns-spanned="1" table:number-rows-spanned="13" table:style-name="ce408">
            <text:p>2007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65">
            <text:p>Transfer</text:p>
          </table:table-cell>
          <table:table-cell office:value-type="float" office:value="911.02892850881904" table:style-name="ce34">
            <text:p><text:s/>911<text:s/></text:p>
          </table:table-cell>
          <table:table-cell office:value-type="float" office:value="506.45917325157666" table:style-name="ce34">
            <text:p><text:s/>506<text:s/></text:p>
          </table:table-cell>
          <table:table-cell office:value-type="float" office:value="2653.5714869763028" table:style-name="ce34">
            <text:p><text:s/>2,654<text:s/></text:p>
          </table:table-cell>
          <table:table-cell office:value-type="float" office:value="1037.1169258989719" table:style-name="ce34">
            <text:p><text:s/>1,037<text:s/></text:p>
          </table:table-cell>
          <table:table-cell office:value-type="float" office:value="2161.8938937524126" table:style-name="ce34">
            <text:p><text:s/>2,162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7270.0704083880828" table:formula="of:=SUM([.E73:.J73])" table:style-name="ce123">
            <text:p><text:s/>7,2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66">
            <text:p>Civic amenity</text:p>
          </table:table-cell>
          <table:table-cell office:value-type="float" office:value="29.598360389947892" table:style-name="ce34">
            <text:p><text:s/>30<text:s/></text:p>
          </table:table-cell>
          <table:table-cell office:value-type="float" office:value="6.8487500384449955" table:style-name="ce34">
            <text:p><text:s/>7<text:s/></text:p>
          </table:table-cell>
          <table:table-cell office:value-type="float" office:value="191.1073761913851" table:style-name="ce34">
            <text:p><text:s/>191<text:s/></text:p>
          </table:table-cell>
          <table:table-cell office:value-type="float" office:value="188.20727176851594" table:style-name="ce34">
            <text:p><text:s/>188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415.76175838829397" table:formula="of:=SUM([.E74:.J74])" table:style-name="ce123">
            <text:p><text:s/>4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940.62728889876689" table:formula="of:=SUM([.E73:.E74])" table:style-name="ce152">
            <text:p><text:s/>941<text:s/></text:p>
          </table:table-cell>
          <table:table-cell office:value-type="float" office:value="513.30792329002168" table:formula="of:=SUM([.F73:.F74])" table:style-name="ce153">
            <text:p><text:s/>513<text:s/></text:p>
          </table:table-cell>
          <table:table-cell office:value-type="float" office:value="2844.6788631676877" table:formula="of:=SUM([.G73:.G74])" table:style-name="ce153">
            <text:p><text:s/>2,845<text:s/></text:p>
          </table:table-cell>
          <table:table-cell office:value-type="float" office:value="1225.3241976674879" table:formula="of:=SUM([.H73:.H74])" table:style-name="ce153">
            <text:p><text:s/>1,225<text:s/></text:p>
          </table:table-cell>
          <table:table-cell office:value-type="float" office:value="2161.8938937524126" table:formula="of:=SUM([.I73:.I74])" table:style-name="ce154">
            <text:p><text:s/>2,162<text:s/></text:p>
          </table:table-cell>
          <table:covered-table-cell/>
          <table:table-cell office:value-type="float" office:value="7685.8321667763767" table:formula="of:=SUM([.K73:.K74])" table:style-name="ce154">
            <text:p><text:s/>7,68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5.55287202167511" table:style-name="ce35">
            <text:p><text:s/>16<text:s/></text:p>
          </table:table-cell>
          <table:table-cell office:value-type="float" office:value="28.370785751342773" table:style-name="ce34">
            <text:p><text:s/>28<text:s/></text:p>
          </table:table-cell>
          <table:table-cell office:value-type="float" office:value="203.53870484960777" table:style-name="ce34">
            <text:p><text:s/>204<text:s/></text:p>
          </table:table-cell>
          <table:table-cell office:value-type="float" office:value="231.71385182325542" table:style-name="ce34">
            <text:p><text:s/>232<text:s/></text:p>
          </table:table-cell>
          <table:table-cell office:value-type="float" office:value="29.007883026123046" table:style-name="ce34">
            <text:p><text:s/>29<text:s/></text:p>
          </table:table-cell>
          <table:covered-table-cell/>
          <table:table-cell office:value-type="float" office:value="508.18409747200417" table:formula="of:=SUM([.E76:.J76])" table:style-name="ce123">
            <text:p><text:s/>50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0.19396999835968018" table:style-name="ce35">
            <text:p><text:s/>0<text:s/></text:p>
          </table:table-cell>
          <table:table-cell office:value-type="float" office:value="12.18509992502816" table:style-name="ce34">
            <text:p><text:s/>12<text:s/></text:p>
          </table:table-cell>
          <table:table-cell office:value-type="float" office:value="464.78854315476866" table:style-name="ce34">
            <text:p><text:s/>465<text:s/></text:p>
          </table:table-cell>
          <table:table-cell office:value-type="float" office:value="5.9241999998092654" table:style-name="ce34">
            <text:p><text:s/>6<text:s/></text:p>
          </table:table-cell>
          <table:table-cell office:value-type="float" office:value="261.58402405449749" table:style-name="ce34">
            <text:p><text:s/>262<text:s/></text:p>
          </table:table-cell>
          <table:covered-table-cell/>
          <table:table-cell office:value-type="float" office:value="744.67583713246324" table:formula="of:=SUM([.E77:.J77])" table:style-name="ce123">
            <text:p><text:s/>7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359.94301806640624" table:style-name="ce35">
            <text:p><text:s/>360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77.24067157067824" table:style-name="ce34">
            <text:p><text:s/>177<text:s/></text:p>
          </table:table-cell>
          <table:table-cell office:value-type="float" office:value="36.200526330694558" table:style-name="ce34">
            <text:p><text:s/>36<text:s/></text:p>
          </table:table-cell>
          <table:table-cell office:value-type="float" office:value="91.988059038086504" table:style-name="ce34">
            <text:p><text:s/>92<text:s/></text:p>
          </table:table-cell>
          <table:covered-table-cell/>
          <table:table-cell office:value-type="float" office:value="665.3722750058655" table:formula="of:=SUM([.E78:.J78])" table:style-name="ce123">
            <text:p><text:s/>6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.1238799800872803" table:style-name="ce34">
            <text:p><text:s/>2<text:s/></text:p>
          </table:table-cell>
          <table:covered-table-cell/>
          <table:table-cell office:value-type="float" office:value="2.1238799800872803" table:formula="of:=SUM([.E79:.J79])" table:style-name="ce123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56.524469996690748" table:style-name="ce35">
            <text:p><text:s/>57<text:s/></text:p>
          </table:table-cell>
          <table:table-cell office:value-type="float" office:value="33.980101451873779" table:style-name="ce34">
            <text:p><text:s/>34<text:s/></text:p>
          </table:table-cell>
          <table:table-cell office:value-type="float" office:value="3.7240000000000002" table:style-name="ce34">
            <text:p><text:s/>4<text:s/></text:p>
          </table:table-cell>
          <table:table-cell office:value-type="float" office:value="35.638240015029908" table:style-name="ce34">
            <text:p><text:s/>36<text:s/></text:p>
          </table:table-cell>
          <table:table-cell office:value-type="float" office:value="133.07836585879326" table:style-name="ce34">
            <text:p><text:s/>133<text:s/></text:p>
          </table:table-cell>
          <table:covered-table-cell/>
          <table:table-cell office:value-type="float" office:value="262.94517732238774" table:formula="of:=SUM([.E80:.J80])" table:style-name="ce123">
            <text:p><text:s/>2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325.5876037054062" table:style-name="ce35">
            <text:p><text:s/>326<text:s/></text:p>
          </table:table-cell>
          <table:table-cell office:value-type="float" office:value="81.718331298828119" table:style-name="ce34">
            <text:p><text:s/>82<text:s/></text:p>
          </table:table-cell>
          <table:table-cell office:value-type="float" office:value="404.79693565654753" table:style-name="ce34">
            <text:p><text:s/>405<text:s/></text:p>
          </table:table-cell>
          <table:table-cell office:value-type="float" office:value="93.093141190528868" table:style-name="ce34">
            <text:p><text:s/>93<text:s/></text:p>
          </table:table-cell>
          <table:table-cell office:value-type="float" office:value="0.38227999114990235" table:style-name="ce34">
            <text:p><text:s/>0<text:s/></text:p>
          </table:table-cell>
          <table:covered-table-cell/>
          <table:table-cell office:value-type="float" office:value="905.57829184246054" table:formula="of:=SUM([.E81:.J81])" table:style-name="ce123">
            <text:p><text:s/>9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757.80193378853801" table:formula="of:=SUM([.E76:.E81])" table:style-name="ce152">
            <text:p><text:s/>758<text:s/></text:p>
          </table:table-cell>
          <table:table-cell office:value-type="float" office:value="156.25431842707283" table:formula="of:=SUM([.F76:.F81])" table:style-name="ce153">
            <text:p><text:s/>156<text:s/></text:p>
          </table:table-cell>
          <table:table-cell office:value-type="float" office:value="1254.0888552316023" table:formula="of:=SUM([.G76:.G81])" table:style-name="ce153">
            <text:p><text:s/>1,254<text:s/></text:p>
          </table:table-cell>
          <table:table-cell office:value-type="float" office:value="402.56995935931803" table:formula="of:=SUM([.H76:.H81])" table:style-name="ce153">
            <text:p><text:s/>403<text:s/></text:p>
          </table:table-cell>
          <table:table-cell office:value-type="float" office:value="518.16449194873746" table:formula="of:=SUM([.I76:.I81])" table:style-name="ce154">
            <text:p><text:s/>518<text:s/></text:p>
          </table:table-cell>
          <table:covered-table-cell/>
          <table:table-cell office:value-type="float" office:value="3088.8795587552686" table:formula="of:=SUM([.K76:.K81])" table:style-name="ce154">
            <text:p><text:s/>3,0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ismantler</text:p>
          </table:table-cell>
          <table:table-cell office:value-type="float" office:value="0.6069966007173061" table:style-name="ce35">
            <text:p><text:s/>1<text:s/></text:p>
          </table:table-cell>
          <table:table-cell office:value-type="float" office:value="7.2261494565606119" table:style-name="ce34">
            <text:p><text:s/>7<text:s/></text:p>
          </table:table-cell>
          <table:table-cell office:value-type="float" office:value="30.796959657870232" table:style-name="ce34">
            <text:p><text:s/>31<text:s/></text:p>
          </table:table-cell>
          <table:table-cell office:value-type="float" office:value="43.781099400192502" table:style-name="ce34">
            <text:p><text:s/>44<text:s/></text:p>
          </table:table-cell>
          <table:table-cell office:value-type="float" office:value="24.705035119846464" table:style-name="ce34">
            <text:p><text:s/>25<text:s/></text:p>
          </table:table-cell>
          <table:covered-table-cell/>
          <table:table-cell office:value-type="float" office:value="107.11624023518712" table:formula="of:=SUM([.E83:.J83])" table:style-name="ce123">
            <text:p><text:s/>1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25.994" table:style-name="ce35">
            <text:p><text:s/>26<text:s/></text:p>
          </table:table-cell>
          <table:table-cell office:value-type="float" office:value="53.838837424695491" table:style-name="ce34">
            <text:p><text:s/>54<text:s/></text:p>
          </table:table-cell>
          <table:table-cell office:value-type="float" office:value="237.11281053207907" table:style-name="ce34">
            <text:p><text:s/>237<text:s/></text:p>
          </table:table-cell>
          <table:table-cell office:value-type="float" office:value="138.12864173984528" table:style-name="ce34">
            <text:p><text:s/>138<text:s/></text:p>
          </table:table-cell>
          <table:table-cell office:value-type="float" office:value="928.70431101289296" table:style-name="ce34">
            <text:p><text:s/>929<text:s/></text:p>
          </table:table-cell>
          <table:covered-table-cell/>
          <table:table-cell office:value-type="float" office:value="1383.7786007095128" table:formula="of:=SUM([.E84:.J84])" table:style-name="ce123">
            <text:p><text:s/>1,3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26.600996600717306" table:formula="of:=SUM([.E83:.E84])" table:style-name="ce153">
            <text:p><text:s/>27<text:s/></text:p>
          </table:table-cell>
          <table:table-cell office:value-type="float" office:value="61.064986881256104" table:formula="of:=SUM([.F83:.F84])" table:style-name="ce153">
            <text:p><text:s/>61<text:s/></text:p>
          </table:table-cell>
          <table:table-cell office:value-type="float" office:value="267.90977018994931" table:formula="of:=SUM([.G83:.G84])" table:style-name="ce153">
            <text:p><text:s/>268<text:s/></text:p>
          </table:table-cell>
          <table:table-cell office:value-type="float" office:value="181.9097411400378" table:formula="of:=SUM([.H83:.H84])" table:style-name="ce153">
            <text:p><text:s/>182<text:s/></text:p>
          </table:table-cell>
          <table:table-cell office:value-type="float" office:value="953.40934613273942" table:formula="of:=SUM([.I83:.I84])" table:style-name="ce153">
            <text:p><text:s/>953<text:s/></text:p>
          </table:table-cell>
          <table:covered-table-cell/>
          <table:table-cell office:value-type="float" office:value="1490.8948409447" table:formula="of:=SUM([.K83:.K84])" table:style-name="ce155">
            <text:p><text:s/>1,491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7 Total</text:p>
          </table:table-cell>
          <table:table-cell table:number-columns-repeated="2" table:style-name="ce82"/>
          <table:table-cell office:value-type="float" office:value="1725.0302192880222" table:formula="of:=+[.E85]+[.E82]+[.E75]" table:style-name="ce168">
            <text:p><text:s/>1,725<text:s/></text:p>
          </table:table-cell>
          <table:table-cell office:value-type="float" office:value="730.6272285983506" table:formula="of:=+[.F85]+[.F82]+[.F75]" table:style-name="ce168">
            <text:p><text:s/>731<text:s/></text:p>
          </table:table-cell>
          <table:table-cell office:value-type="float" office:value="4366.6774885892391" table:formula="of:=+[.G85]+[.G82]+[.G75]" table:style-name="ce168">
            <text:p><text:s/>4,367<text:s/></text:p>
          </table:table-cell>
          <table:table-cell office:value-type="float" office:value="1809.8038981668437" table:formula="of:=+[.H85]+[.H82]+[.H75]" table:style-name="ce168">
            <text:p><text:s/>1,810<text:s/></text:p>
          </table:table-cell>
          <table:table-cell office:value-type="float" office:value="3633.4677318338895" table:formula="of:=+[.I85]+[.I82]+[.I75]" table:style-name="ce168">
            <text:p><text:s/>3,633<text:s/></text:p>
          </table:table-cell>
          <table:table-cell table:style-name="ce169"/>
          <table:table-cell office:value-type="float" office:value="12265.606566476345" table:formula="of:=+[.K85]+[.K82]+[.K75]" table:style-name="ce125">
            <text:p><text:s/>12,266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8" table:number-columns-spanned="1" table:number-rows-spanned="13" table:style-name="ce408">
            <text:p>2008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65">
            <text:p>Transfer</text:p>
          </table:table-cell>
          <table:table-cell office:value-type="float" office:value="846.88875556594678" table:style-name="ce34">
            <text:p><text:s/>847<text:s/></text:p>
          </table:table-cell>
          <table:table-cell office:value-type="float" office:value="507.22245553671257" table:style-name="ce34">
            <text:p><text:s/>507<text:s/></text:p>
          </table:table-cell>
          <table:table-cell office:value-type="float" office:value="2207.2661806962924" table:style-name="ce34">
            <text:p><text:s/>2,207<text:s/></text:p>
          </table:table-cell>
          <table:table-cell office:value-type="float" office:value="1043.9280982892565" table:style-name="ce34">
            <text:p><text:s/>1,044<text:s/></text:p>
          </table:table-cell>
          <table:table-cell office:value-type="float" office:value="1934.8831587658194" table:style-name="ce34">
            <text:p><text:s/>1,935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6540.1886488540285" table:formula="of:=SUM([.E87:.J87])" table:style-name="ce123">
            <text:p><text:s/>6,5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66">
            <text:p>Civic amenity</text:p>
          </table:table-cell>
          <table:table-cell office:value-type="float" office:value="30.647699834374716" table:style-name="ce34">
            <text:p><text:s/>31<text:s/></text:p>
          </table:table-cell>
          <table:table-cell office:value-type="float" office:value="14.491361970610802" table:style-name="ce34">
            <text:p><text:s/>14<text:s/></text:p>
          </table:table-cell>
          <table:table-cell office:value-type="float" office:value="190.22665886476361" table:style-name="ce34">
            <text:p><text:s/>190<text:s/></text:p>
          </table:table-cell>
          <table:table-cell office:value-type="float" office:value="260.9326022483279" table:style-name="ce34">
            <text:p><text:s/>261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496.29832291807702" table:formula="of:=SUM([.E88:.J88])" table:style-name="ce123">
            <text:p><text:s/>4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877.53645540032153" table:formula="of:=SUM([.E87:.E88])" table:style-name="ce152">
            <text:p><text:s/>878<text:s/></text:p>
          </table:table-cell>
          <table:table-cell office:value-type="float" office:value="521.71381750732337" table:formula="of:=SUM([.F87:.F88])" table:style-name="ce153">
            <text:p><text:s/>522<text:s/></text:p>
          </table:table-cell>
          <table:table-cell office:value-type="float" office:value="2397.4928395610559" table:formula="of:=SUM([.G87:.G88])" table:style-name="ce153">
            <text:p><text:s/>2,397<text:s/></text:p>
          </table:table-cell>
          <table:table-cell office:value-type="float" office:value="1304.8607005375843" table:formula="of:=SUM([.H87:.H88])" table:style-name="ce153">
            <text:p><text:s/>1,305<text:s/></text:p>
          </table:table-cell>
          <table:table-cell office:value-type="float" office:value="1934.8831587658194" table:formula="of:=SUM([.I87:.I88])" table:style-name="ce154">
            <text:p><text:s/>1,935<text:s/></text:p>
          </table:table-cell>
          <table:covered-table-cell/>
          <table:table-cell office:value-type="float" office:value="7036.4869717721058" table:formula="of:=SUM([.K87:.K88])" table:style-name="ce154">
            <text:p><text:s/>7,0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2.162036003232004" table:style-name="ce35">
            <text:p><text:s/>12<text:s/></text:p>
          </table:table-cell>
          <table:table-cell office:value-type="float" office:value="29.682379874229433" table:style-name="ce34">
            <text:p><text:s/>30<text:s/></text:p>
          </table:table-cell>
          <table:table-cell office:value-type="float" office:value="359.78052853518614" table:style-name="ce34">
            <text:p><text:s/>360<text:s/></text:p>
          </table:table-cell>
          <table:table-cell office:value-type="float" office:value="203.77025134647826" table:style-name="ce34">
            <text:p><text:s/>204<text:s/></text:p>
          </table:table-cell>
          <table:table-cell office:value-type="float" office:value="21.2131260009557" table:style-name="ce34">
            <text:p><text:s/>21<text:s/></text:p>
          </table:table-cell>
          <table:covered-table-cell/>
          <table:table-cell office:value-type="float" office:value="626.60832176008159" table:formula="of:=SUM([.E90:.J90])" table:style-name="ce123">
            <text:p><text:s/>6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0.32898301382176581" table:style-name="ce35">
            <text:p><text:s/>0<text:s/></text:p>
          </table:table-cell>
          <table:table-cell office:value-type="float" office:value="9.3539548259811713" table:style-name="ce34">
            <text:p><text:s/>9<text:s/></text:p>
          </table:table-cell>
          <table:table-cell office:value-type="float" office:value="464.01813707336976" table:style-name="ce34">
            <text:p><text:s/>464<text:s/></text:p>
          </table:table-cell>
          <table:table-cell office:value-type="float" office:value="17.267400810707592" table:style-name="ce34">
            <text:p><text:s/>17<text:s/></text:p>
          </table:table-cell>
          <table:table-cell office:value-type="float" office:value="268.53479880160091" table:style-name="ce34">
            <text:p><text:s/>269<text:s/></text:p>
          </table:table-cell>
          <table:covered-table-cell/>
          <table:table-cell office:value-type="float" office:value="759.50327452548117" table:formula="of:=SUM([.E91:.J91])" table:style-name="ce123">
            <text:p><text:s/>76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10.04326229218673" table:style-name="ce35">
            <text:p><text:s/>10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60.28714600335809" table:style-name="ce34">
            <text:p><text:s/>160<text:s/></text:p>
          </table:table-cell>
          <table:table-cell office:value-type="float" office:value="43.237049772488504" table:style-name="ce34">
            <text:p><text:s/>43<text:s/></text:p>
          </table:table-cell>
          <table:table-cell office:value-type="float" office:value="43.783938975515667" table:style-name="ce34">
            <text:p><text:s/>44<text:s/></text:p>
          </table:table-cell>
          <table:covered-table-cell/>
          <table:table-cell office:value-type="float" office:value="257.35139704354901" table:formula="of:=SUM([.E92:.J92])" table:style-name="ce123">
            <text:p><text:s/>25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covered-table-cell/>
          <table:table-cell office:value-type="float" office:value="0" table:formula="of:=SUM([.E93:.J93])" table:style-name="ce123">
            <text:p><text:s/>-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77.90009217071534" table:style-name="ce35">
            <text:p><text:s/>78<text:s/></text:p>
          </table:table-cell>
          <table:table-cell office:value-type="float" office:value="31.639835777282713" table:style-name="ce34">
            <text:p><text:s/>32<text:s/></text:p>
          </table:table-cell>
          <table:table-cell office:value-type="float" office:value="3.5729810037612917" table:style-name="ce34">
            <text:p><text:s/>4<text:s/></text:p>
          </table:table-cell>
          <table:table-cell office:value-type="float" office:value="52.99174006462097" table:style-name="ce34">
            <text:p><text:s/>53<text:s/></text:p>
          </table:table-cell>
          <table:table-cell office:value-type="float" office:value="128.352534781456" table:style-name="ce34">
            <text:p><text:s/>128<text:s/></text:p>
          </table:table-cell>
          <table:covered-table-cell/>
          <table:table-cell office:value-type="float" office:value="294.45718379783631" table:formula="of:=SUM([.E94:.J94])" table:style-name="ce123">
            <text:p><text:s/>2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216.60634873294828" table:style-name="ce35">
            <text:p><text:s/>217<text:s/></text:p>
          </table:table-cell>
          <table:table-cell office:value-type="float" office:value="87.413290283203125" table:style-name="ce34">
            <text:p><text:s/>87<text:s/></text:p>
          </table:table-cell>
          <table:table-cell office:value-type="float" office:value="856.21660775375381" table:style-name="ce34">
            <text:p><text:s/>856<text:s/></text:p>
          </table:table-cell>
          <table:table-cell office:value-type="float" office:value="143.88572200012209" table:style-name="ce34">
            <text:p><text:s/>144<text:s/></text:p>
          </table:table-cell>
          <table:table-cell office:value-type="float" office:value="1.3662152152061462" table:style-name="ce34">
            <text:p><text:s/>1<text:s/></text:p>
          </table:table-cell>
          <table:covered-table-cell/>
          <table:table-cell office:value-type="float" office:value="1305.4881839852335" table:formula="of:=SUM([.E95:.J95])" table:style-name="ce123">
            <text:p><text:s/>1,30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317.04072221290414" table:formula="of:=SUM([.E90:.E95])" table:style-name="ce152">
            <text:p><text:s/>317<text:s/></text:p>
          </table:table-cell>
          <table:table-cell office:value-type="float" office:value="158.08946076069645" table:formula="of:=SUM([.F90:.F95])" table:style-name="ce153">
            <text:p><text:s/>158<text:s/></text:p>
          </table:table-cell>
          <table:table-cell office:value-type="float" office:value="1843.8754003694289" table:formula="of:=SUM([.G90:.G95])" table:style-name="ce153">
            <text:p><text:s/>1,844<text:s/></text:p>
          </table:table-cell>
          <table:table-cell office:value-type="float" office:value="461.15216399441738" table:formula="of:=SUM([.H90:.H95])" table:style-name="ce153">
            <text:p><text:s/>461<text:s/></text:p>
          </table:table-cell>
          <table:table-cell office:value-type="float" office:value="463.25061377473446" table:formula="of:=SUM([.I90:.I95])" table:style-name="ce154">
            <text:p><text:s/>463<text:s/></text:p>
          </table:table-cell>
          <table:covered-table-cell/>
          <table:table-cell office:value-type="float" office:value="3243.4083611121814" table:formula="of:=SUM([.K90:.K95])" table:style-name="ce154">
            <text:p><text:s/>3,2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ismantler</text:p>
          </table:table-cell>
          <table:table-cell office:value-type="float" office:value="5.0831098632812495" table:style-name="ce35">
            <text:p><text:s/>5<text:s/></text:p>
          </table:table-cell>
          <table:table-cell office:value-type="float" office:value="6.4646787229741456" table:style-name="ce34">
            <text:p><text:s/>6<text:s/></text:p>
          </table:table-cell>
          <table:table-cell office:value-type="float" office:value="23.06742093245499" table:style-name="ce34">
            <text:p><text:s/>23<text:s/></text:p>
          </table:table-cell>
          <table:table-cell office:value-type="float" office:value="42.031051859830399" table:style-name="ce34">
            <text:p><text:s/>42<text:s/></text:p>
          </table:table-cell>
          <table:table-cell office:value-type="float" office:value="6.008298027038574" table:style-name="ce34">
            <text:p><text:s/>6<text:s/></text:p>
          </table:table-cell>
          <table:covered-table-cell/>
          <table:table-cell office:value-type="float" office:value="82.654559405579363" table:formula="of:=SUM([.E97:.J97])" table:style-name="ce123">
            <text:p><text:s/>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20.474165010869505" table:style-name="ce35">
            <text:p><text:s/>20<text:s/></text:p>
          </table:table-cell>
          <table:table-cell office:value-type="float" office:value="37.081633916378017" table:style-name="ce34">
            <text:p><text:s/>37<text:s/></text:p>
          </table:table-cell>
          <table:table-cell office:value-type="float" office:value="635.25753972167888" table:style-name="ce34">
            <text:p><text:s/>635<text:s/></text:p>
          </table:table-cell>
          <table:table-cell office:value-type="float" office:value="154.0905664062202" table:style-name="ce34">
            <text:p><text:s/>154<text:s/></text:p>
          </table:table-cell>
          <table:table-cell office:value-type="float" office:value="1154.3795348434448" table:style-name="ce34">
            <text:p><text:s/>1,154<text:s/></text:p>
          </table:table-cell>
          <table:covered-table-cell/>
          <table:table-cell office:value-type="float" office:value="2001.2834398985915" table:formula="of:=SUM([.E98:.J98])" table:style-name="ce123">
            <text:p><text:s/>2,0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25.557274874150757" table:formula="of:=SUM([.E97:.E98])" table:style-name="ce153">
            <text:p><text:s/>26<text:s/></text:p>
          </table:table-cell>
          <table:table-cell office:value-type="float" office:value="43.546312639352166" table:formula="of:=SUM([.F97:.F98])" table:style-name="ce153">
            <text:p><text:s/>44<text:s/></text:p>
          </table:table-cell>
          <table:table-cell office:value-type="float" office:value="658.32496065413386" table:formula="of:=SUM([.G97:.G98])" table:style-name="ce153">
            <text:p><text:s/>658<text:s/></text:p>
          </table:table-cell>
          <table:table-cell office:value-type="float" office:value="196.1216182660506" table:formula="of:=SUM([.H97:.H98])" table:style-name="ce153">
            <text:p><text:s/>196<text:s/></text:p>
          </table:table-cell>
          <table:table-cell office:value-type="float" office:value="1160.3878328704834" table:formula="of:=SUM([.I97:.I98])" table:style-name="ce153">
            <text:p><text:s/>1,160<text:s/></text:p>
          </table:table-cell>
          <table:covered-table-cell/>
          <table:table-cell office:value-type="float" office:value="2083.9379993041707" table:formula="of:=SUM([.K97:.K98])" table:style-name="ce155">
            <text:p><text:s/>2,084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8 Total</text:p>
          </table:table-cell>
          <table:table-cell table:number-columns-repeated="2" table:style-name="ce82"/>
          <table:table-cell office:value-type="float" office:value="1220.1344524873764" table:formula="of:=+[.E99]+[.E96]+[.E89]" table:style-name="ce168">
            <text:p><text:s/>1,220<text:s/></text:p>
          </table:table-cell>
          <table:table-cell office:value-type="float" office:value="723.34959090737198" table:formula="of:=+[.F99]+[.F96]+[.F89]" table:style-name="ce168">
            <text:p><text:s/>723<text:s/></text:p>
          </table:table-cell>
          <table:table-cell office:value-type="float" office:value="4899.6932005846193" table:formula="of:=+[.G99]+[.G96]+[.G89]" table:style-name="ce168">
            <text:p><text:s/>4,900<text:s/></text:p>
          </table:table-cell>
          <table:table-cell office:value-type="float" office:value="1962.1344827980524" table:formula="of:=+[.H99]+[.H96]+[.H89]" table:style-name="ce168">
            <text:p><text:s/>1,962<text:s/></text:p>
          </table:table-cell>
          <table:table-cell office:value-type="float" office:value="3558.5216054110369" table:formula="of:=+[.I99]+[.I96]+[.I89]" table:style-name="ce168">
            <text:p><text:s/>3,559<text:s/></text:p>
          </table:table-cell>
          <table:table-cell table:style-name="ce169"/>
          <table:table-cell office:value-type="float" office:value="12363.833332188457" table:formula="of:=+[.K99]+[.K96]+[.K89]" table:style-name="ce125">
            <text:p><text:s/>12,36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09" table:number-columns-spanned="1" table:number-rows-spanned="13" table:style-name="ce408">
            <text:p>2009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65">
            <text:p>Transfer</text:p>
          </table:table-cell>
          <table:table-cell office:value-type="float" office:value="615.7023999999999" table:style-name="ce34">
            <text:p><text:s/>616<text:s/></text:p>
          </table:table-cell>
          <table:table-cell office:value-type="float" office:value="348.58594000000005" table:style-name="ce34">
            <text:p><text:s/>349<text:s/></text:p>
          </table:table-cell>
          <table:table-cell office:value-type="float" office:value="1863.7069399999991" table:style-name="ce34">
            <text:p><text:s/>1,864<text:s/></text:p>
          </table:table-cell>
          <table:table-cell office:value-type="float" office:value="929.90337000000022" table:style-name="ce34">
            <text:p><text:s/>930<text:s/></text:p>
          </table:table-cell>
          <table:table-cell office:value-type="float" office:value="1648.2829999999997" table:style-name="ce34">
            <text:p><text:s/>1,648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406.1816499999986" table:formula="of:=SUM([.E101:.J101])" table:style-name="ce123">
            <text:p><text:s/>5,4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66">
            <text:p>Civic amenity</text:p>
          </table:table-cell>
          <table:table-cell office:value-type="float" office:value="70.639809999999997" table:style-name="ce34">
            <text:p><text:s/>71<text:s/></text:p>
          </table:table-cell>
          <table:table-cell office:value-type="float" office:value="50.738880000000002" table:style-name="ce34">
            <text:p><text:s/>51<text:s/></text:p>
          </table:table-cell>
          <table:table-cell office:value-type="float" office:value="266.00019999999995" table:style-name="ce34">
            <text:p><text:s/>266<text:s/></text:p>
          </table:table-cell>
          <table:table-cell office:value-type="float" office:value="236.36735000000004" table:style-name="ce34">
            <text:p><text:s/>236<text:s/></text:p>
          </table:table-cell>
          <table:table-cell office:value-type="float" office:value="63.484600000000015" table:style-name="ce34">
            <text:p><text:s/>63<text:s/></text:p>
          </table:table-cell>
          <table:covered-table-cell/>
          <table:table-cell office:value-type="float" office:value="687.23083999999994" table:formula="of:=SUM([.E102:.J102])" table:style-name="ce123">
            <text:p><text:s/>68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686.34220999999991" table:formula="of:=SUM([.E101:.E102])" table:style-name="ce152">
            <text:p><text:s/>686<text:s/></text:p>
          </table:table-cell>
          <table:table-cell office:value-type="float" office:value="399.32482000000005" table:formula="of:=SUM([.F101:.F102])" table:style-name="ce153">
            <text:p><text:s/>399<text:s/></text:p>
          </table:table-cell>
          <table:table-cell office:value-type="float" office:value="2129.7071399999991" table:formula="of:=SUM([.G101:.G102])" table:style-name="ce153">
            <text:p><text:s/>2,130<text:s/></text:p>
          </table:table-cell>
          <table:table-cell office:value-type="float" office:value="1166.2707200000002" table:formula="of:=SUM([.H101:.H102])" table:style-name="ce153">
            <text:p><text:s/>1,166<text:s/></text:p>
          </table:table-cell>
          <table:table-cell office:value-type="float" office:value="1711.7675999999997" table:formula="of:=SUM([.I101:.I102])" table:style-name="ce154">
            <text:p><text:s/>1,712<text:s/></text:p>
          </table:table-cell>
          <table:covered-table-cell/>
          <table:table-cell office:value-type="float" office:value="6093.4124899999988" table:formula="of:=SUM([.K101:.K102])" table:style-name="ce154">
            <text:p><text:s/>6,0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19.14912000000001" table:style-name="ce35">
            <text:p><text:s/>119<text:s/></text:p>
          </table:table-cell>
          <table:table-cell office:value-type="float" office:value="6.2910199999999987" table:style-name="ce34">
            <text:p><text:s/>6<text:s/></text:p>
          </table:table-cell>
          <table:table-cell office:value-type="float" office:value="333.91029999999967" table:style-name="ce34">
            <text:p><text:s/>334<text:s/></text:p>
          </table:table-cell>
          <table:table-cell office:value-type="float" office:value="181.84710000000001" table:style-name="ce34">
            <text:p><text:s/>182<text:s/></text:p>
          </table:table-cell>
          <table:table-cell office:value-type="float" office:value="61.560719999999996" table:style-name="ce34">
            <text:p><text:s/>62<text:s/></text:p>
          </table:table-cell>
          <table:covered-table-cell/>
          <table:table-cell office:value-type="float" office:value="702.75825999999961" table:formula="of:=SUM([.E104:.J104])" table:style-name="ce123">
            <text:p><text:s/>7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14.433250000000001" table:style-name="ce35">
            <text:p><text:s/>14<text:s/></text:p>
          </table:table-cell>
          <table:table-cell office:value-type="float" office:value="116.96367000000002" table:style-name="ce34">
            <text:p><text:s/>117<text:s/></text:p>
          </table:table-cell>
          <table:table-cell office:value-type="float" office:value="462.49040999999994" table:style-name="ce34">
            <text:p><text:s/>462<text:s/></text:p>
          </table:table-cell>
          <table:table-cell office:value-type="float" office:value="22.059880000000003" table:style-name="ce34">
            <text:p><text:s/>22<text:s/></text:p>
          </table:table-cell>
          <table:table-cell office:value-type="float" office:value="248.78458000000003" table:style-name="ce34">
            <text:p><text:s/>249<text:s/></text:p>
          </table:table-cell>
          <table:covered-table-cell/>
          <table:table-cell office:value-type="float" office:value="864.73179000000005" table:formula="of:=SUM([.E105:.J105])" table:style-name="ce123">
            <text:p><text:s/>8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25.67239" table:style-name="ce35">
            <text:p><text:s/>26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95.98908000000003" table:style-name="ce34">
            <text:p><text:s/>196<text:s/></text:p>
          </table:table-cell>
          <table:table-cell office:value-type="float" office:value="32.732240000000012" table:style-name="ce34">
            <text:p><text:s/>33<text:s/></text:p>
          </table:table-cell>
          <table:table-cell office:value-type="float" office:value="99.560930000000027" table:style-name="ce34">
            <text:p><text:s/>100<text:s/></text:p>
          </table:table-cell>
          <table:covered-table-cell/>
          <table:table-cell office:value-type="float" office:value="353.9546400000001" table:formula="of:=SUM([.E106:.J106])" table:style-name="ce123">
            <text:p><text:s/>35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.3948499999999999" table:style-name="ce34">
            <text:p><text:s/>2<text:s/></text:p>
          </table:table-cell>
          <table:covered-table-cell/>
          <table:table-cell office:value-type="float" office:value="2.3948499999999999" table:formula="of:=SUM([.E107:.J107])" table:style-name="ce123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78.408910000000006" table:style-name="ce35">
            <text:p><text:s/>78<text:s/></text:p>
          </table:table-cell>
          <table:table-cell office:value-type="float" office:value="26.805620000000001" table:style-name="ce34">
            <text:p><text:s/>27<text:s/></text:p>
          </table:table-cell>
          <table:table-cell office:value-type="float" office:value="3.3012600000000001" table:style-name="ce34">
            <text:p><text:s/>3<text:s/></text:p>
          </table:table-cell>
          <table:table-cell office:value-type="float" office:value="65.464090000000013" table:style-name="ce34">
            <text:p><text:s/>65<text:s/></text:p>
          </table:table-cell>
          <table:table-cell office:value-type="float" office:value="123.30306" table:style-name="ce34">
            <text:p><text:s/>123<text:s/></text:p>
          </table:table-cell>
          <table:covered-table-cell/>
          <table:table-cell office:value-type="float" office:value="297.28294000000005" table:formula="of:=SUM([.E108:.J108])" table:style-name="ce123">
            <text:p><text:s/>2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214.69222999999997" table:style-name="ce35">
            <text:p><text:s/>215<text:s/></text:p>
          </table:table-cell>
          <table:table-cell office:value-type="float" office:value="100.12712000000001" table:style-name="ce34">
            <text:p><text:s/>100<text:s/></text:p>
          </table:table-cell>
          <table:table-cell office:value-type="float" office:value="973.13814999999988" table:style-name="ce34">
            <text:p><text:s/>973<text:s/></text:p>
          </table:table-cell>
          <table:table-cell office:value-type="float" office:value="186.79340000000002" table:style-name="ce34">
            <text:p><text:s/>187<text:s/></text:p>
          </table:table-cell>
          <table:table-cell office:value-type="float" office:value="4.1158999999999999" table:style-name="ce34">
            <text:p><text:s/>4<text:s/></text:p>
          </table:table-cell>
          <table:covered-table-cell/>
          <table:table-cell office:value-type="float" office:value="1478.8668" table:formula="of:=SUM([.E109:.J109])" table:style-name="ce123">
            <text:p><text:s/>1,47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452.35590000000002" table:formula="of:=SUM([.E104:.E109])" table:style-name="ce152">
            <text:p><text:s/>452<text:s/></text:p>
          </table:table-cell>
          <table:table-cell office:value-type="float" office:value="250.18743000000001" table:formula="of:=SUM([.F104:.F109])" table:style-name="ce153">
            <text:p><text:s/>250<text:s/></text:p>
          </table:table-cell>
          <table:table-cell office:value-type="float" office:value="1968.8291999999997" table:formula="of:=SUM([.G104:.G109])" table:style-name="ce153">
            <text:p><text:s/>1,969<text:s/></text:p>
          </table:table-cell>
          <table:table-cell office:value-type="float" office:value="488.89671000000004" table:formula="of:=SUM([.H104:.H109])" table:style-name="ce153">
            <text:p><text:s/>489<text:s/></text:p>
          </table:table-cell>
          <table:table-cell office:value-type="float" office:value="539.72004000000004" table:formula="of:=SUM([.I104:.I109])" table:style-name="ce154">
            <text:p><text:s/>540<text:s/></text:p>
          </table:table-cell>
          <table:covered-table-cell/>
          <table:table-cell office:value-type="float" office:value="3699.9892799999998" table:formula="of:=SUM([.K104:.K109])" table:style-name="ce154">
            <text:p><text:s/>3,70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ismantler</text:p>
          </table:table-cell>
          <table:table-cell office:value-type="float" office:value="10.83248" table:style-name="ce35">
            <text:p><text:s/>11<text:s/></text:p>
          </table:table-cell>
          <table:table-cell office:value-type="float" office:value="6.8416099999999993" table:style-name="ce34">
            <text:p><text:s/>7<text:s/></text:p>
          </table:table-cell>
          <table:table-cell office:value-type="float" office:value="32.03434" table:style-name="ce34">
            <text:p><text:s/>32<text:s/></text:p>
          </table:table-cell>
          <table:table-cell office:value-type="float" office:value="49.408809999999995" table:style-name="ce34">
            <text:p><text:s/>49<text:s/></text:p>
          </table:table-cell>
          <table:table-cell office:value-type="float" office:value="16.484889999999996" table:style-name="ce34">
            <text:p><text:s/>16<text:s/></text:p>
          </table:table-cell>
          <table:covered-table-cell/>
          <table:table-cell office:value-type="float" office:value="115.60212999999999" table:formula="of:=SUM([.E111:.J111])" table:style-name="ce123">
            <text:p><text:s/>1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87.526520000000005" table:style-name="ce35">
            <text:p><text:s/>88<text:s/></text:p>
          </table:table-cell>
          <table:table-cell office:value-type="float" office:value="38.879440000000002" table:style-name="ce34">
            <text:p><text:s/>39<text:s/></text:p>
          </table:table-cell>
          <table:table-cell office:value-type="float" office:value="424.11941999999999" table:style-name="ce34">
            <text:p><text:s/>424<text:s/></text:p>
          </table:table-cell>
          <table:table-cell office:value-type="float" office:value="108.03819" table:style-name="ce34">
            <text:p><text:s/>108<text:s/></text:p>
          </table:table-cell>
          <table:table-cell office:value-type="float" office:value="1791.7433199999998" table:style-name="ce34">
            <text:p><text:s/>1,792<text:s/></text:p>
          </table:table-cell>
          <table:covered-table-cell/>
          <table:table-cell office:value-type="float" office:value="2450.3068899999998" table:formula="of:=SUM([.E112:.J112])" table:style-name="ce123">
            <text:p><text:s/>2,45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98.359000000000009" table:formula="of:=SUM([.E111:.E112])" table:style-name="ce153">
            <text:p><text:s/>98<text:s/></text:p>
          </table:table-cell>
          <table:table-cell office:value-type="float" office:value="45.721050000000005" table:formula="of:=SUM([.F111:.F112])" table:style-name="ce153">
            <text:p><text:s/>46<text:s/></text:p>
          </table:table-cell>
          <table:table-cell office:value-type="float" office:value="456.15375999999998" table:formula="of:=SUM([.G111:.G112])" table:style-name="ce153">
            <text:p><text:s/>456<text:s/></text:p>
          </table:table-cell>
          <table:table-cell office:value-type="float" office:value="157.447" table:formula="of:=SUM([.H111:.H112])" table:style-name="ce153">
            <text:p><text:s/>157<text:s/></text:p>
          </table:table-cell>
          <table:table-cell office:value-type="float" office:value="1808.2282099999998" table:formula="of:=SUM([.I111:.I112])" table:style-name="ce153">
            <text:p><text:s/>1,808<text:s/></text:p>
          </table:table-cell>
          <table:covered-table-cell/>
          <table:table-cell office:value-type="float" office:value="2565.9090200000001" table:formula="of:=SUM([.K111:.K112])" table:style-name="ce155">
            <text:p><text:s/>2,56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09 Total</text:p>
          </table:table-cell>
          <table:table-cell table:number-columns-repeated="2" table:style-name="ce82"/>
          <table:table-cell office:value-type="float" office:value="1237.05711" table:formula="of:=+[.E113]+[.E110]+[.E103]" table:style-name="ce168">
            <text:p><text:s/>1,237<text:s/></text:p>
          </table:table-cell>
          <table:table-cell office:value-type="float" office:value="695.2333000000001" table:formula="of:=+[.F113]+[.F110]+[.F103]" table:style-name="ce168">
            <text:p><text:s/>695<text:s/></text:p>
          </table:table-cell>
          <table:table-cell office:value-type="float" office:value="4554.6900999999989" table:formula="of:=+[.G113]+[.G110]+[.G103]" table:style-name="ce168">
            <text:p><text:s/>4,555<text:s/></text:p>
          </table:table-cell>
          <table:table-cell office:value-type="float" office:value="1812.6144300000003" table:formula="of:=+[.H113]+[.H110]+[.H103]" table:style-name="ce168">
            <text:p><text:s/>1,813<text:s/></text:p>
          </table:table-cell>
          <table:table-cell office:value-type="float" office:value="4059.7158499999996" table:formula="of:=+[.I113]+[.I110]+[.I103]" table:style-name="ce168">
            <text:p><text:s/>4,060<text:s/></text:p>
          </table:table-cell>
          <table:table-cell table:style-name="ce169"/>
          <table:table-cell office:value-type="float" office:value="12359.31079" table:formula="of:=+[.K113]+[.K110]+[.K103]" table:style-name="ce125">
            <text:p><text:s/>12,35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0" table:number-columns-spanned="1" table:number-rows-spanned="13" table:style-name="ce408">
            <text:p>2010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65">
            <text:p>Transfer</text:p>
          </table:table-cell>
          <table:table-cell office:value-type="float" office:value="420.92685799999998" table:style-name="ce34">
            <text:p><text:s/>421<text:s/></text:p>
          </table:table-cell>
          <table:table-cell office:value-type="float" office:value="338.34036199999986" table:style-name="ce34">
            <text:p><text:s/>338<text:s/></text:p>
          </table:table-cell>
          <table:table-cell office:value-type="float" office:value="1839.3031400000007" table:style-name="ce34">
            <text:p><text:s/>1,839<text:s/></text:p>
          </table:table-cell>
          <table:table-cell office:value-type="float" office:value="903.36671000000001" table:style-name="ce34">
            <text:p><text:s/>903<text:s/></text:p>
          </table:table-cell>
          <table:table-cell office:value-type="float" office:value="1594.8436549999988" table:style-name="ce34">
            <text:p><text:s/>1,595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096.7807249999996" table:formula="of:=SUM([.E115:.J115])" table:style-name="ce123">
            <text:p><text:s/>5,09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66">
            <text:p>Civic amenity</text:p>
          </table:table-cell>
          <table:table-cell office:value-type="float" office:value="70.279138999999986" table:style-name="ce34">
            <text:p><text:s/>70<text:s/></text:p>
          </table:table-cell>
          <table:table-cell office:value-type="float" office:value="51.658705999999974" table:style-name="ce34">
            <text:p><text:s/>52<text:s/></text:p>
          </table:table-cell>
          <table:table-cell office:value-type="float" office:value="399.15095000000048" table:style-name="ce34">
            <text:p><text:s/>399<text:s/></text:p>
          </table:table-cell>
          <table:table-cell office:value-type="float" office:value="157.57962900000012" table:style-name="ce34">
            <text:p><text:s/>158<text:s/></text:p>
          </table:table-cell>
          <table:table-cell office:value-type="float" office:value="44.532880000000006" table:style-name="ce34">
            <text:p><text:s/>45<text:s/></text:p>
          </table:table-cell>
          <table:covered-table-cell/>
          <table:table-cell office:value-type="float" office:value="723.20130400000062" table:formula="of:=SUM([.E116:.J116])" table:style-name="ce123">
            <text:p><text:s/>7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491.20599699999997" table:formula="of:=SUM([.E115:.E116])" table:style-name="ce152">
            <text:p><text:s/>491<text:s/></text:p>
          </table:table-cell>
          <table:table-cell office:value-type="float" office:value="389.99906799999985" table:formula="of:=SUM([.F115:.F116])" table:style-name="ce153">
            <text:p><text:s/>390<text:s/></text:p>
          </table:table-cell>
          <table:table-cell office:value-type="float" office:value="2238.4540900000011" table:formula="of:=SUM([.G115:.G116])" table:style-name="ce153">
            <text:p><text:s/>2,238<text:s/></text:p>
          </table:table-cell>
          <table:table-cell office:value-type="float" office:value="1060.9463390000001" table:formula="of:=SUM([.H115:.H116])" table:style-name="ce153">
            <text:p><text:s/>1,061<text:s/></text:p>
          </table:table-cell>
          <table:table-cell office:value-type="float" office:value="1639.3765349999987" table:formula="of:=SUM([.I115:.I116])" table:style-name="ce154">
            <text:p><text:s/>1,639<text:s/></text:p>
          </table:table-cell>
          <table:covered-table-cell/>
          <table:table-cell office:value-type="float" office:value="5819.9820290000007" table:formula="of:=SUM([.K115:.K116])" table:style-name="ce154">
            <text:p><text:s/>5,8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46.15821" table:style-name="ce35">
            <text:p><text:s/>146<text:s/></text:p>
          </table:table-cell>
          <table:table-cell office:value-type="float" office:value="26.695236000000001" table:style-name="ce34">
            <text:p><text:s/>27<text:s/></text:p>
          </table:table-cell>
          <table:table-cell office:value-type="float" office:value="499.53891199999987" table:style-name="ce34">
            <text:p><text:s/>500<text:s/></text:p>
          </table:table-cell>
          <table:table-cell office:value-type="float" office:value="185.52794800000004" table:style-name="ce34">
            <text:p><text:s/>186<text:s/></text:p>
          </table:table-cell>
          <table:table-cell office:value-type="float" office:value="57.847910999999996" table:style-name="ce34">
            <text:p><text:s/>58<text:s/></text:p>
          </table:table-cell>
          <table:covered-table-cell/>
          <table:table-cell office:value-type="float" office:value="915.76821699999982" table:formula="of:=SUM([.E118:.J118])" table:style-name="ce123">
            <text:p><text:s/>91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286.09906099999995" table:style-name="ce35">
            <text:p><text:s/>286<text:s/></text:p>
          </table:table-cell>
          <table:table-cell office:value-type="float" office:value="159.90623299999999" table:style-name="ce34">
            <text:p><text:s/>160<text:s/></text:p>
          </table:table-cell>
          <table:table-cell office:value-type="float" office:value="375.51627500000001" table:style-name="ce34">
            <text:p><text:s/>376<text:s/></text:p>
          </table:table-cell>
          <table:table-cell office:value-type="float" office:value="110.26936300000003" table:style-name="ce34">
            <text:p><text:s/>110<text:s/></text:p>
          </table:table-cell>
          <table:table-cell office:value-type="float" office:value="272.48943600000007" table:style-name="ce34">
            <text:p><text:s/>272<text:s/></text:p>
          </table:table-cell>
          <table:covered-table-cell/>
          <table:table-cell office:value-type="float" office:value="1204.2803680000002" table:formula="of:=SUM([.E119:.J119])" table:style-name="ce123">
            <text:p><text:s/>1,2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54.493819000000002" table:style-name="ce35">
            <text:p><text:s/>54<text:s/></text:p>
          </table:table-cell>
          <table:table-cell office:value-type="float" office:value="38.7973" table:style-name="ce34">
            <text:p><text:s/>39<text:s/></text:p>
          </table:table-cell>
          <table:table-cell office:value-type="float" office:value="84.265603000000027" table:style-name="ce34">
            <text:p><text:s/>84<text:s/></text:p>
          </table:table-cell>
          <table:table-cell office:value-type="float" office:value="1.4398599999999999" table:style-name="ce34">
            <text:p><text:s/>1<text:s/></text:p>
          </table:table-cell>
          <table:table-cell office:value-type="float" office:value="105.43871099999994" table:style-name="ce34">
            <text:p><text:s/>105<text:s/></text:p>
          </table:table-cell>
          <table:covered-table-cell/>
          <table:table-cell office:value-type="float" office:value="284.435293" table:formula="of:=SUM([.E120:.J120])" table:style-name="ce123">
            <text:p><text:s/>28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.6387099999999997" table:style-name="ce34">
            <text:p><text:s/>2<text:s/></text:p>
          </table:table-cell>
          <table:covered-table-cell/>
          <table:table-cell office:value-type="float" office:value="1.6387099999999997" table:formula="of:=SUM([.E121:.J121])" table:style-name="ce123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72.839560000000006" table:style-name="ce35">
            <text:p><text:s/>73<text:s/></text:p>
          </table:table-cell>
          <table:table-cell office:value-type="float" office:value="31.255808999999999" table:style-name="ce34">
            <text:p><text:s/>31<text:s/></text:p>
          </table:table-cell>
          <table:table-cell office:value-type="float" office:value="2.7803990000000001" table:style-name="ce34">
            <text:p><text:s/>3<text:s/></text:p>
          </table:table-cell>
          <table:table-cell office:value-type="float" office:value="78.367740000000012" table:style-name="ce34">
            <text:p><text:s/>78<text:s/></text:p>
          </table:table-cell>
          <table:table-cell office:value-type="float" office:value="122.47561400000004" table:style-name="ce34">
            <text:p><text:s/>122<text:s/></text:p>
          </table:table-cell>
          <table:covered-table-cell/>
          <table:table-cell office:value-type="float" office:value="307.71912200000008" table:formula="of:=SUM([.E122:.J122])" table:style-name="ce123">
            <text:p><text:s/>30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305.69669600000003" table:style-name="ce35">
            <text:p><text:s/>306<text:s/></text:p>
          </table:table-cell>
          <table:table-cell office:value-type="float" office:value="121.22334500000001" table:style-name="ce34">
            <text:p><text:s/>121<text:s/></text:p>
          </table:table-cell>
          <table:table-cell office:value-type="float" office:value="1630.1236149999997" table:style-name="ce34">
            <text:p><text:s/>1,630<text:s/></text:p>
          </table:table-cell>
          <table:table-cell office:value-type="float" office:value="450.54089600000003" table:style-name="ce34">
            <text:p><text:s/>451<text:s/></text:p>
          </table:table-cell>
          <table:table-cell office:value-type="float" office:value="1.30033" table:style-name="ce34">
            <text:p><text:s/>1<text:s/></text:p>
          </table:table-cell>
          <table:covered-table-cell/>
          <table:table-cell office:value-type="float" office:value="2508.8848819999998" table:formula="of:=SUM([.E123:.J123])" table:style-name="ce123">
            <text:p><text:s/>2,5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865.28734600000007" table:formula="of:=SUM([.E118:.E123])" table:style-name="ce152">
            <text:p><text:s/>865<text:s/></text:p>
          </table:table-cell>
          <table:table-cell office:value-type="float" office:value="377.87792300000001" table:formula="of:=SUM([.F118:.F123])" table:style-name="ce153">
            <text:p><text:s/>378<text:s/></text:p>
          </table:table-cell>
          <table:table-cell office:value-type="float" office:value="2592.2248039999995" table:formula="of:=SUM([.G118:.G123])" table:style-name="ce153">
            <text:p><text:s/>2,592<text:s/></text:p>
          </table:table-cell>
          <table:table-cell office:value-type="float" office:value="826.1458070000001" table:formula="of:=SUM([.H118:.H123])" table:style-name="ce153">
            <text:p><text:s/>826<text:s/></text:p>
          </table:table-cell>
          <table:table-cell office:value-type="float" office:value="561.19071200000008" table:formula="of:=SUM([.I118:.I123])" table:style-name="ce154">
            <text:p><text:s/>561<text:s/></text:p>
          </table:table-cell>
          <table:covered-table-cell/>
          <table:table-cell office:value-type="float" office:value="5222.726592" table:formula="of:=SUM([.K118:.K123])" table:style-name="ce154">
            <text:p><text:s/>5,2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7.2521590000000007" table:style-name="ce35">
            <text:p><text:s/>7<text:s/></text:p>
          </table:table-cell>
          <table:table-cell office:value-type="float" office:value="6.1393420000000001" table:style-name="ce34">
            <text:p><text:s/>6<text:s/></text:p>
          </table:table-cell>
          <table:table-cell office:value-type="float" office:value="108.157357" table:style-name="ce34">
            <text:p><text:s/>108<text:s/></text:p>
          </table:table-cell>
          <table:table-cell office:value-type="float" office:value="53.821285000000032" table:style-name="ce34">
            <text:p><text:s/>54<text:s/></text:p>
          </table:table-cell>
          <table:table-cell office:value-type="float" office:value="551.8923450000002" table:style-name="ce34">
            <text:p><text:s/>552<text:s/></text:p>
          </table:table-cell>
          <table:covered-table-cell/>
          <table:table-cell office:value-type="float" office:value="727.2624880000003" table:formula="of:=SUM([.E125:.J125])" table:style-name="ce123">
            <text:p><text:s/>7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66.144110999999995" table:style-name="ce35">
            <text:p><text:s/>66<text:s/></text:p>
          </table:table-cell>
          <table:table-cell office:value-type="float" office:value="49.202904999999994" table:style-name="ce34">
            <text:p><text:s/>49<text:s/></text:p>
          </table:table-cell>
          <table:table-cell office:value-type="float" office:value="549.01696400000003" table:style-name="ce34">
            <text:p><text:s/>549<text:s/></text:p>
          </table:table-cell>
          <table:table-cell office:value-type="float" office:value="118.50865899999998" table:style-name="ce34">
            <text:p><text:s/>119<text:s/></text:p>
          </table:table-cell>
          <table:table-cell office:value-type="float" office:value="1287.583646" table:style-name="ce34">
            <text:p><text:s/>1,288<text:s/></text:p>
          </table:table-cell>
          <table:covered-table-cell/>
          <table:table-cell office:value-type="float" office:value="2070.4562850000002" table:formula="of:=SUM([.E126:.J126])" table:style-name="ce123">
            <text:p><text:s/>2,0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73.396270000000001" table:formula="of:=SUM([.E125:.E126])" table:style-name="ce153">
            <text:p><text:s/>73<text:s/></text:p>
          </table:table-cell>
          <table:table-cell office:value-type="float" office:value="55.342246999999993" table:formula="of:=SUM([.F125:.F126])" table:style-name="ce153">
            <text:p><text:s/>55<text:s/></text:p>
          </table:table-cell>
          <table:table-cell office:value-type="float" office:value="657.17432100000008" table:formula="of:=SUM([.G125:.G126])" table:style-name="ce153">
            <text:p><text:s/>657<text:s/></text:p>
          </table:table-cell>
          <table:table-cell office:value-type="float" office:value="172.32994400000001" table:formula="of:=SUM([.H125:.H126])" table:style-name="ce153">
            <text:p><text:s/>172<text:s/></text:p>
          </table:table-cell>
          <table:table-cell office:value-type="float" office:value="1839.4759910000002" table:formula="of:=SUM([.I125:.I126])" table:style-name="ce153">
            <text:p><text:s/>1,839<text:s/></text:p>
          </table:table-cell>
          <table:covered-table-cell/>
          <table:table-cell office:value-type="float" office:value="2797.7187730000005" table:formula="of:=SUM([.K125:.K126])" table:style-name="ce155">
            <text:p><text:s/>2,798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0 Total</text:p>
          </table:table-cell>
          <table:table-cell table:number-columns-repeated="2" table:style-name="ce82"/>
          <table:table-cell office:value-type="float" office:value="1429.8896130000001" table:formula="of:=+[.E127]+[.E124]+[.E117]" table:style-name="ce168">
            <text:p><text:s/>1,430<text:s/></text:p>
          </table:table-cell>
          <table:table-cell office:value-type="float" office:value="823.2192379999999" table:formula="of:=+[.F127]+[.F124]+[.F117]" table:style-name="ce168">
            <text:p><text:s/>823<text:s/></text:p>
          </table:table-cell>
          <table:table-cell office:value-type="float" office:value="5487.853215000001" table:formula="of:=+[.G127]+[.G124]+[.G117]" table:style-name="ce168">
            <text:p><text:s/>5,488<text:s/></text:p>
          </table:table-cell>
          <table:table-cell office:value-type="float" office:value="2059.42209" table:formula="of:=+[.H127]+[.H124]+[.H117]" table:style-name="ce168">
            <text:p><text:s/>2,059<text:s/></text:p>
          </table:table-cell>
          <table:table-cell office:value-type="float" office:value="4040.0432379999993" table:formula="of:=+[.I127]+[.I124]+[.I117]" table:style-name="ce168">
            <text:p><text:s/>4,040<text:s/></text:p>
          </table:table-cell>
          <table:table-cell table:style-name="ce169"/>
          <table:table-cell office:value-type="float" office:value="13840.427394000002" table:formula="of:=+[.K127]+[.K124]+[.K117]" table:style-name="ce125">
            <text:p><text:s/>13,840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1" table:number-columns-spanned="1" table:number-rows-spanned="13" table:style-name="ce408">
            <text:p>2011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65">
            <text:p>Transfer</text:p>
          </table:table-cell>
          <table:table-cell office:value-type="float" office:value="444.37411100000003" table:style-name="ce34">
            <text:p><text:s/>444<text:s/></text:p>
          </table:table-cell>
          <table:table-cell office:value-type="float" office:value="291.81228199999998" table:style-name="ce34">
            <text:p><text:s/>292<text:s/></text:p>
          </table:table-cell>
          <table:table-cell office:value-type="float" office:value="1664.1579850000001" table:style-name="ce34">
            <text:p><text:s/>1,664<text:s/></text:p>
          </table:table-cell>
          <table:table-cell office:value-type="float" office:value="723.95916799999998" table:style-name="ce34">
            <text:p><text:s/>724<text:s/></text:p>
          </table:table-cell>
          <table:table-cell office:value-type="float" office:value="1499.8797909999998" table:style-name="ce34">
            <text:p><text:s/>1,500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4624.1833369999995" table:formula="of:=SUM([.E129:.J129])" table:style-name="ce123">
            <text:p><text:s/>4,6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66">
            <text:p>Civic amenity</text:p>
          </table:table-cell>
          <table:table-cell office:value-type="float" office:value="81.753502000000026" table:style-name="ce34">
            <text:p><text:s/>82<text:s/></text:p>
          </table:table-cell>
          <table:table-cell office:value-type="float" office:value="52.106673999999998" table:style-name="ce34">
            <text:p><text:s/>52<text:s/></text:p>
          </table:table-cell>
          <table:table-cell office:value-type="float" office:value="485.1769920000005" table:style-name="ce34">
            <text:p><text:s/>485<text:s/></text:p>
          </table:table-cell>
          <table:table-cell office:value-type="float" office:value="156.24014400000007" table:style-name="ce34">
            <text:p><text:s/>156<text:s/></text:p>
          </table:table-cell>
          <table:table-cell office:value-type="float" office:value="49.48997" table:style-name="ce34">
            <text:p><text:s/>49<text:s/></text:p>
          </table:table-cell>
          <table:covered-table-cell/>
          <table:table-cell office:value-type="float" office:value="824.76728200000059" table:formula="of:=SUM([.E130:.J130])" table:style-name="ce123">
            <text:p><text:s/>82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526.12761300000011" table:formula="of:=SUM([.E129:.E130])" table:style-name="ce152">
            <text:p><text:s/>526<text:s/></text:p>
          </table:table-cell>
          <table:table-cell office:value-type="float" office:value="343.91895599999998" table:formula="of:=SUM([.F129:.F130])" table:style-name="ce153">
            <text:p><text:s/>344<text:s/></text:p>
          </table:table-cell>
          <table:table-cell office:value-type="float" office:value="2149.3349770000004" table:formula="of:=SUM([.G129:.G130])" table:style-name="ce153">
            <text:p><text:s/>2,149<text:s/></text:p>
          </table:table-cell>
          <table:table-cell office:value-type="float" office:value="880.19931200000008" table:formula="of:=SUM([.H129:.H130])" table:style-name="ce153">
            <text:p><text:s/>880<text:s/></text:p>
          </table:table-cell>
          <table:table-cell office:value-type="float" office:value="1549.3697609999999" table:formula="of:=SUM([.I129:.I130])" table:style-name="ce154">
            <text:p><text:s/>1,549<text:s/></text:p>
          </table:table-cell>
          <table:covered-table-cell/>
          <table:table-cell office:value-type="float" office:value="5448.9506190000002" table:formula="of:=SUM([.K129:.K130])" table:style-name="ce154">
            <text:p><text:s/>5,4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23.56958" table:style-name="ce35">
            <text:p><text:s/>124<text:s/></text:p>
          </table:table-cell>
          <table:table-cell office:value-type="float" office:value="8.6550239999999992" table:style-name="ce34">
            <text:p><text:s/>9<text:s/></text:p>
          </table:table-cell>
          <table:table-cell office:value-type="float" office:value="589.63953800000024" table:style-name="ce34">
            <text:p><text:s/>590<text:s/></text:p>
          </table:table-cell>
          <table:table-cell office:value-type="float" office:value="233.65077299999993" table:style-name="ce34">
            <text:p><text:s/>234<text:s/></text:p>
          </table:table-cell>
          <table:table-cell office:value-type="float" office:value="74.342332999999996" table:style-name="ce34">
            <text:p><text:s/>74<text:s/></text:p>
          </table:table-cell>
          <table:covered-table-cell/>
          <table:table-cell office:value-type="float" office:value="1029.8572480000003" table:formula="of:=SUM([.E132:.J132])" table:style-name="ce123">
            <text:p><text:s/>1,03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343.32586399999997" table:style-name="ce35">
            <text:p><text:s/>343<text:s/></text:p>
          </table:table-cell>
          <table:table-cell office:value-type="float" office:value="201.80638299999998" table:style-name="ce34">
            <text:p><text:s/>202<text:s/></text:p>
          </table:table-cell>
          <table:table-cell office:value-type="float" office:value="593.52137100000016" table:style-name="ce34">
            <text:p><text:s/>594<text:s/></text:p>
          </table:table-cell>
          <table:table-cell office:value-type="float" office:value="200.2600340000003" table:style-name="ce34">
            <text:p><text:s/>200<text:s/></text:p>
          </table:table-cell>
          <table:table-cell office:value-type="float" office:value="309.91628300000002" table:style-name="ce34">
            <text:p><text:s/>310<text:s/></text:p>
          </table:table-cell>
          <table:covered-table-cell/>
          <table:table-cell office:value-type="float" office:value="1648.8299350000007" table:formula="of:=SUM([.E133:.J133])" table:style-name="ce123">
            <text:p><text:s/>1,6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44.904372999999993" table:style-name="ce35">
            <text:p><text:s/>45<text:s/></text:p>
          </table:table-cell>
          <table:table-cell office:value-type="float" office:value="17.0244" table:style-name="ce34">
            <text:p><text:s/>17<text:s/></text:p>
          </table:table-cell>
          <table:table-cell office:value-type="float" office:value="149.47676900000002" table:style-name="ce34">
            <text:p><text:s/>149<text:s/></text:p>
          </table:table-cell>
          <table:table-cell office:value-type="float" office:value="351.63460000000003" table:style-name="ce34">
            <text:p><text:s/>352<text:s/></text:p>
          </table:table-cell>
          <table:table-cell office:value-type="float" office:value="118.66969899999998" table:style-name="ce34">
            <text:p><text:s/>119<text:s/></text:p>
          </table:table-cell>
          <table:covered-table-cell/>
          <table:table-cell office:value-type="float" office:value="681.7098410000001" table:formula="of:=SUM([.E134:.J134])" table:style-name="ce123">
            <text:p><text:s/>6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.5100730000000002" table:style-name="ce34">
            <text:p><text:s/>3<text:s/></text:p>
          </table:table-cell>
          <table:covered-table-cell/>
          <table:table-cell office:value-type="float" office:value="2.5100730000000002" table:formula="of:=SUM([.E135:.J135])" table:style-name="ce123">
            <text:p><text:s/>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92.533349999999999" table:style-name="ce35">
            <text:p><text:s/>93<text:s/></text:p>
          </table:table-cell>
          <table:table-cell office:value-type="float" office:value="35.469616000000002" table:style-name="ce34">
            <text:p><text:s/>35<text:s/></text:p>
          </table:table-cell>
          <table:table-cell office:value-type="float" office:value="2.447705" table:style-name="ce34">
            <text:p><text:s/>2<text:s/></text:p>
          </table:table-cell>
          <table:table-cell office:value-type="float" office:value="77.212159999999997" table:style-name="ce34">
            <text:p><text:s/>77<text:s/></text:p>
          </table:table-cell>
          <table:table-cell office:value-type="float" office:value="136.893293" table:style-name="ce34">
            <text:p><text:s/>137<text:s/></text:p>
          </table:table-cell>
          <table:covered-table-cell/>
          <table:table-cell office:value-type="float" office:value="344.55612400000007" table:formula="of:=SUM([.E136:.J136])" table:style-name="ce123">
            <text:p><text:s/>3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196.34510799999998" table:style-name="ce35">
            <text:p><text:s/>196<text:s/></text:p>
          </table:table-cell>
          <table:table-cell office:value-type="float" office:value="126.077352" table:style-name="ce34">
            <text:p><text:s/>126<text:s/></text:p>
          </table:table-cell>
          <table:table-cell office:value-type="float" office:value="1223.2498879999998" table:style-name="ce34">
            <text:p><text:s/>1,223<text:s/></text:p>
          </table:table-cell>
          <table:table-cell office:value-type="float" office:value="466.20454899999993" table:style-name="ce34">
            <text:p><text:s/>466<text:s/></text:p>
          </table:table-cell>
          <table:table-cell office:value-type="float" office:value="2.8607819999999999" table:style-name="ce34">
            <text:p><text:s/>3<text:s/></text:p>
          </table:table-cell>
          <table:covered-table-cell/>
          <table:table-cell office:value-type="float" office:value="2014.7376789999996" table:formula="of:=SUM([.E137:.J137])" table:style-name="ce123">
            <text:p><text:s/>2,0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800.67827499999999" table:formula="of:=SUM([.E132:.E137])" table:style-name="ce152">
            <text:p><text:s/>801<text:s/></text:p>
          </table:table-cell>
          <table:table-cell office:value-type="float" office:value="389.03277500000002" table:formula="of:=SUM([.F132:.F137])" table:style-name="ce153">
            <text:p><text:s/>389<text:s/></text:p>
          </table:table-cell>
          <table:table-cell office:value-type="float" office:value="2558.3352710000004" table:formula="of:=SUM([.G132:.G137])" table:style-name="ce153">
            <text:p><text:s/>2,558<text:s/></text:p>
          </table:table-cell>
          <table:table-cell office:value-type="float" office:value="1328.9621160000002" table:formula="of:=SUM([.H132:.H137])" table:style-name="ce153">
            <text:p><text:s/>1,329<text:s/></text:p>
          </table:table-cell>
          <table:table-cell office:value-type="float" office:value="645.19246299999998" table:formula="of:=SUM([.I132:.I137])" table:style-name="ce154">
            <text:p><text:s/>645<text:s/></text:p>
          </table:table-cell>
          <table:covered-table-cell/>
          <table:table-cell office:value-type="float" office:value="5722.2009000000007" table:formula="of:=SUM([.K132:.K137])" table:style-name="ce154">
            <text:p><text:s/>5,7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5.4335190000000004" table:style-name="ce35">
            <text:p><text:s/>5<text:s/></text:p>
          </table:table-cell>
          <table:table-cell office:value-type="float" office:value="6.2763660000000003" table:style-name="ce34">
            <text:p><text:s/>6<text:s/></text:p>
          </table:table-cell>
          <table:table-cell office:value-type="float" office:value="57.233706999999995" table:style-name="ce34">
            <text:p><text:s/>57<text:s/></text:p>
          </table:table-cell>
          <table:table-cell office:value-type="float" office:value="92.662115000000014" table:style-name="ce34">
            <text:p><text:s/>93<text:s/></text:p>
          </table:table-cell>
          <table:table-cell office:value-type="float" office:value="20.457857999999998" table:style-name="ce34">
            <text:p><text:s/>20<text:s/></text:p>
          </table:table-cell>
          <table:covered-table-cell/>
          <table:table-cell office:value-type="float" office:value="182.06356499999998" table:formula="of:=SUM([.E139:.J139])" table:style-name="ce123">
            <text:p><text:s/>1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82.391504999999995" table:style-name="ce35">
            <text:p><text:s/>82<text:s/></text:p>
          </table:table-cell>
          <table:table-cell office:value-type="float" office:value="41.688646000000013" table:style-name="ce34">
            <text:p><text:s/>42<text:s/></text:p>
          </table:table-cell>
          <table:table-cell office:value-type="float" office:value="648.77791799999989" table:style-name="ce34">
            <text:p><text:s/>649<text:s/></text:p>
          </table:table-cell>
          <table:table-cell office:value-type="float" office:value="118.50778400000002" table:style-name="ce34">
            <text:p><text:s/>119<text:s/></text:p>
          </table:table-cell>
          <table:table-cell office:value-type="float" office:value="1726.9504209999998" table:style-name="ce34">
            <text:p><text:s/>1,727<text:s/></text:p>
          </table:table-cell>
          <table:covered-table-cell/>
          <table:table-cell office:value-type="float" office:value="2618.3162739999998" table:formula="of:=SUM([.E140:.J140])" table:style-name="ce123">
            <text:p><text:s/>2,6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87.825023999999999" table:formula="of:=SUM([.E139:.E140])" table:style-name="ce153">
            <text:p><text:s/>88<text:s/></text:p>
          </table:table-cell>
          <table:table-cell office:value-type="float" office:value="47.965012000000016" table:formula="of:=SUM([.F139:.F140])" table:style-name="ce153">
            <text:p><text:s/>48<text:s/></text:p>
          </table:table-cell>
          <table:table-cell office:value-type="float" office:value="706.01162499999987" table:formula="of:=SUM([.G139:.G140])" table:style-name="ce153">
            <text:p><text:s/>706<text:s/></text:p>
          </table:table-cell>
          <table:table-cell office:value-type="float" office:value="211.16989900000004" table:formula="of:=SUM([.H139:.H140])" table:style-name="ce153">
            <text:p><text:s/>211<text:s/></text:p>
          </table:table-cell>
          <table:table-cell office:value-type="float" office:value="1747.4082789999998" table:formula="of:=SUM([.I139:.I140])" table:style-name="ce153">
            <text:p><text:s/>1,747<text:s/></text:p>
          </table:table-cell>
          <table:covered-table-cell/>
          <table:table-cell office:value-type="float" office:value="2800.3798389999997" table:formula="of:=SUM([.K139:.K140])" table:style-name="ce155">
            <text:p><text:s/>2,80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1 Total</text:p>
          </table:table-cell>
          <table:table-cell table:number-columns-repeated="2" table:style-name="ce82"/>
          <table:table-cell office:value-type="float" office:value="1414.6309120000001" table:formula="of:=+[.E141]+[.E138]+[.E131]" table:style-name="ce170">
            <text:p><text:s/>1,415<text:s/></text:p>
          </table:table-cell>
          <table:table-cell office:value-type="float" office:value="780.916743" table:formula="of:=+[.F141]+[.F138]+[.F131]" table:style-name="ce170">
            <text:p><text:s/>781<text:s/></text:p>
          </table:table-cell>
          <table:table-cell office:value-type="float" office:value="5413.6818730000005" table:formula="of:=+[.G141]+[.G138]+[.G131]" table:style-name="ce170">
            <text:p><text:s/>5,414<text:s/></text:p>
          </table:table-cell>
          <table:table-cell office:value-type="float" office:value="2420.3313270000003" table:formula="of:=+[.H141]+[.H138]+[.H131]" table:style-name="ce170">
            <text:p><text:s/>2,420<text:s/></text:p>
          </table:table-cell>
          <table:table-cell office:value-type="float" office:value="3941.9705029999996" table:formula="of:=+[.I141]+[.I138]+[.I131]" table:style-name="ce170">
            <text:p><text:s/>3,942<text:s/></text:p>
          </table:table-cell>
          <table:table-cell table:style-name="ce169"/>
          <table:table-cell office:value-type="float" office:value="13971.531358" table:formula="of:=+[.K141]+[.K138]+[.K131]" table:style-name="ce125">
            <text:p><text:s/>13,97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2" table:number-columns-spanned="1" table:number-rows-spanned="13" table:style-name="ce408">
            <text:p>2012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377.97073499999976" table:style-name="ce120">
            <text:p><text:s/>378<text:s/></text:p>
          </table:table-cell>
          <table:table-cell office:value-type="float" office:value="301.37456899999984" table:style-name="ce28">
            <text:p><text:s/>301<text:s/></text:p>
          </table:table-cell>
          <table:table-cell office:value-type="float" office:value="1685.7900170000009" table:style-name="ce28">
            <text:p><text:s/>1,686<text:s/></text:p>
          </table:table-cell>
          <table:table-cell office:value-type="float" office:value="821.52274799999975" table:style-name="ce28">
            <text:p><text:s/>822<text:s/></text:p>
          </table:table-cell>
          <table:table-cell office:value-type="float" office:value="1316.1234560000005" table:style-name="ce133">
            <text:p><text:s/>1,316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4502.7815250000012" table:formula="of:=SUM([.E143:.J143])" table:style-name="ce123">
            <text:p><text:s/>4,5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76.000087999999991" table:style-name="ce39">
            <text:p><text:s/>76<text:s/></text:p>
          </table:table-cell>
          <table:table-cell office:value-type="float" office:value="49.920563000000008" table:style-name="ce40">
            <text:p><text:s/>50<text:s/></text:p>
          </table:table-cell>
          <table:table-cell office:value-type="float" office:value="486.06774000000007" table:style-name="ce40">
            <text:p><text:s/>486<text:s/></text:p>
          </table:table-cell>
          <table:table-cell office:value-type="float" office:value="137.78299700000005" table:style-name="ce40">
            <text:p><text:s/>138<text:s/></text:p>
          </table:table-cell>
          <table:table-cell office:value-type="float" office:value="53.547880000000013" table:style-name="ce41">
            <text:p><text:s/>54<text:s/></text:p>
          </table:table-cell>
          <table:covered-table-cell/>
          <table:table-cell office:value-type="float" office:value="803.31926800000008" table:formula="of:=SUM([.E144:.J144])" table:style-name="ce123">
            <text:p><text:s/>8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453.97082299999977" table:formula="of:=SUM([.E143:.E144])" table:style-name="ce39">
            <text:p><text:s/>454<text:s/></text:p>
          </table:table-cell>
          <table:table-cell office:value-type="float" office:value="351.29513199999985" table:formula="of:=SUM([.F143:.F144])" table:style-name="ce40">
            <text:p><text:s/>351<text:s/></text:p>
          </table:table-cell>
          <table:table-cell office:value-type="float" office:value="2171.8577570000011" table:formula="of:=SUM([.G143:.G144])" table:style-name="ce40">
            <text:p><text:s/>2,172<text:s/></text:p>
          </table:table-cell>
          <table:table-cell office:value-type="float" office:value="959.30574499999977" table:formula="of:=SUM([.H143:.H144])" table:style-name="ce40">
            <text:p><text:s/>959<text:s/></text:p>
          </table:table-cell>
          <table:table-cell office:value-type="float" office:value="1369.6713360000006" table:formula="of:=SUM([.I143:.I144])" table:style-name="ce41">
            <text:p><text:s/>1,370<text:s/></text:p>
          </table:table-cell>
          <table:covered-table-cell/>
          <table:table-cell office:value-type="float" office:value="5306.1007930000014" table:formula="of:=SUM([.K143:.K144])" table:style-name="ce154">
            <text:p><text:s/>5,3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98.74332999999999" table:style-name="ce120">
            <text:p><text:s/>199<text:s/></text:p>
          </table:table-cell>
          <table:table-cell office:value-type="string" table:style-name="ce28">
            <text:p>-</text:p>
          </table:table-cell>
          <table:table-cell office:value-type="float" office:value="557.78505099999984" table:style-name="ce28">
            <text:p><text:s/>558<text:s/></text:p>
          </table:table-cell>
          <table:table-cell office:value-type="float" office:value="242.16620600000002" table:style-name="ce28">
            <text:p><text:s/>242<text:s/></text:p>
          </table:table-cell>
          <table:table-cell office:value-type="float" office:value="128.237673" table:style-name="ce28">
            <text:p><text:s/>128<text:s/></text:p>
          </table:table-cell>
          <table:covered-table-cell/>
          <table:table-cell office:value-type="float" office:value="1126.9322599999998" table:formula="of:=SUM([.E146:.J146])" table:style-name="ce123">
            <text:p><text:s/>1,1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404.25996199999997" table:style-name="ce35">
            <text:p><text:s/>404<text:s/></text:p>
          </table:table-cell>
          <table:table-cell office:value-type="float" office:value="494.85360000000009" table:style-name="ce34">
            <text:p><text:s/>495<text:s/></text:p>
          </table:table-cell>
          <table:table-cell office:value-type="float" office:value="694.05614300000161" table:style-name="ce34">
            <text:p><text:s/>694<text:s/></text:p>
          </table:table-cell>
          <table:table-cell office:value-type="float" office:value="254.79023199999995" table:style-name="ce34">
            <text:p><text:s/>255<text:s/></text:p>
          </table:table-cell>
          <table:table-cell office:value-type="float" office:value="350.249415" table:style-name="ce34">
            <text:p><text:s/>350<text:s/></text:p>
          </table:table-cell>
          <table:covered-table-cell/>
          <table:table-cell office:value-type="float" office:value="2198.2093520000017" table:formula="of:=SUM([.E147:.J147])" table:style-name="ce123">
            <text:p><text:s/>2,19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15.116700999999999" table:style-name="ce35">
            <text:p><text:s/>15<text:s/></text:p>
          </table:table-cell>
          <table:table-cell office:value-type="float" office:value="6.0629" table:style-name="ce34">
            <text:p><text:s/>6<text:s/></text:p>
          </table:table-cell>
          <table:table-cell office:value-type="float" office:value="164.52979300000004" table:style-name="ce34">
            <text:p><text:s/>165<text:s/></text:p>
          </table:table-cell>
          <table:table-cell office:value-type="float" office:value="474.83793300000013" table:style-name="ce34">
            <text:p><text:s/>475<text:s/></text:p>
          </table:table-cell>
          <table:table-cell office:value-type="float" office:value="131.23194500000005" table:style-name="ce34">
            <text:p><text:s/>131<text:s/></text:p>
          </table:table-cell>
          <table:covered-table-cell/>
          <table:table-cell office:value-type="float" office:value="791.77927200000022" table:formula="of:=SUM([.E148:.J148])" table:style-name="ce123">
            <text:p><text:s/>7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.5786600000000002" table:style-name="ce34">
            <text:p><text:s/>3<text:s/></text:p>
          </table:table-cell>
          <table:covered-table-cell/>
          <table:table-cell office:value-type="float" office:value="2.5786600000000002" table:formula="of:=SUM([.E149:.J149])" table:style-name="ce123">
            <text:p><text:s/>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30.40421000000001" table:style-name="ce35">
            <text:p><text:s/>130<text:s/></text:p>
          </table:table-cell>
          <table:table-cell office:value-type="float" office:value="57.678359999999998" table:style-name="ce34">
            <text:p><text:s/>58<text:s/></text:p>
          </table:table-cell>
          <table:table-cell office:value-type="float" office:value="55.478938999999997" table:style-name="ce34">
            <text:p><text:s/>55<text:s/></text:p>
          </table:table-cell>
          <table:table-cell office:value-type="float" office:value="32.539920000000002" table:style-name="ce34">
            <text:p><text:s/>33<text:s/></text:p>
          </table:table-cell>
          <table:table-cell office:value-type="float" office:value="120.342206" table:style-name="ce34">
            <text:p><text:s/>120<text:s/></text:p>
          </table:table-cell>
          <table:covered-table-cell/>
          <table:table-cell office:value-type="float" office:value="396.44363499999997" table:formula="of:=SUM([.E150:.J150])" table:style-name="ce123">
            <text:p><text:s/>3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182.48369799999998" table:style-name="ce35">
            <text:p><text:s/>182<text:s/></text:p>
          </table:table-cell>
          <table:table-cell office:value-type="float" office:value="142.243987" table:style-name="ce34">
            <text:p><text:s/>142<text:s/></text:p>
          </table:table-cell>
          <table:table-cell office:value-type="float" office:value="1583.086879" table:style-name="ce34">
            <text:p><text:s/>1,583<text:s/></text:p>
          </table:table-cell>
          <table:table-cell office:value-type="float" office:value="632.71930100000009" table:style-name="ce34">
            <text:p><text:s/>633<text:s/></text:p>
          </table:table-cell>
          <table:table-cell office:value-type="float" office:value="6.6809600000000007" table:style-name="ce34">
            <text:p><text:s/>7<text:s/></text:p>
          </table:table-cell>
          <table:covered-table-cell/>
          <table:table-cell office:value-type="float" office:value="2547.214825" table:formula="of:=SUM([.E151:.J151])" table:style-name="ce123">
            <text:p><text:s/>2,5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931.00790100000006" table:formula="of:=SUM([.E146:.E151])" table:style-name="ce152">
            <text:p><text:s/>931<text:s/></text:p>
          </table:table-cell>
          <table:table-cell office:value-type="float" office:value="700.83884700000021" table:formula="of:=SUM([.F146:.F151])" table:style-name="ce153">
            <text:p><text:s/>701<text:s/></text:p>
          </table:table-cell>
          <table:table-cell office:value-type="float" office:value="3054.9368050000016" table:formula="of:=SUM([.G146:.G151])" table:style-name="ce153">
            <text:p><text:s/>3,055<text:s/></text:p>
          </table:table-cell>
          <table:table-cell office:value-type="float" office:value="1637.0535920000002" table:formula="of:=SUM([.H146:.H151])" table:style-name="ce153">
            <text:p><text:s/>1,637<text:s/></text:p>
          </table:table-cell>
          <table:table-cell office:value-type="float" office:value="739.32085900000015" table:formula="of:=SUM([.I146:.I151])" table:style-name="ce154">
            <text:p><text:s/>739<text:s/></text:p>
          </table:table-cell>
          <table:covered-table-cell/>
          <table:table-cell office:value-type="float" office:value="7063.1580040000008" table:formula="of:=SUM([.K146:.K151])" table:style-name="ce154">
            <text:p><text:s/>7,06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5.4134099999999998" table:style-name="ce120">
            <text:p><text:s/>5<text:s/></text:p>
          </table:table-cell>
          <table:table-cell office:value-type="float" office:value="7.0601000000000012" table:style-name="ce28">
            <text:p><text:s/>7<text:s/></text:p>
          </table:table-cell>
          <table:table-cell office:value-type="float" office:value="35.560910000000007" table:style-name="ce28">
            <text:p><text:s/>36<text:s/></text:p>
          </table:table-cell>
          <table:table-cell office:value-type="float" office:value="43.401743000000003" table:style-name="ce28">
            <text:p><text:s/>43<text:s/></text:p>
          </table:table-cell>
          <table:table-cell office:value-type="float" office:value="18.040451000000004" table:style-name="ce28">
            <text:p><text:s/>18<text:s/></text:p>
          </table:table-cell>
          <table:covered-table-cell/>
          <table:table-cell office:value-type="float" office:value="109.47661400000003" table:formula="of:=SUM([.E153:.J153])" table:style-name="ce123">
            <text:p><text:s/>1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54.730471000000001" table:style-name="ce35">
            <text:p><text:s/>55<text:s/></text:p>
          </table:table-cell>
          <table:table-cell office:value-type="float" office:value="39.597981999999995" table:style-name="ce34">
            <text:p><text:s/>40<text:s/></text:p>
          </table:table-cell>
          <table:table-cell office:value-type="float" office:value="519.04669799999988" table:style-name="ce34">
            <text:p><text:s/>519<text:s/></text:p>
          </table:table-cell>
          <table:table-cell office:value-type="float" office:value="103.70493300000001" table:style-name="ce34">
            <text:p><text:s/>104<text:s/></text:p>
          </table:table-cell>
          <table:table-cell office:value-type="float" office:value="1665.3259860000001" table:style-name="ce34">
            <text:p><text:s/>1,665<text:s/></text:p>
          </table:table-cell>
          <table:covered-table-cell/>
          <table:table-cell office:value-type="float" office:value="2382.40607" table:formula="of:=SUM([.E154:.J154])" table:style-name="ce123">
            <text:p><text:s/>2,3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60.143881" table:formula="of:=SUM([.E153:.E154])" table:style-name="ce153">
            <text:p><text:s/>60<text:s/></text:p>
          </table:table-cell>
          <table:table-cell office:value-type="float" office:value="46.658081999999993" table:formula="of:=SUM([.F153:.F154])" table:style-name="ce153">
            <text:p><text:s/>47<text:s/></text:p>
          </table:table-cell>
          <table:table-cell office:value-type="float" office:value="554.60760799999991" table:formula="of:=SUM([.G153:.G154])" table:style-name="ce153">
            <text:p><text:s/>555<text:s/></text:p>
          </table:table-cell>
          <table:table-cell office:value-type="float" office:value="147.10667600000002" table:formula="of:=SUM([.H153:.H154])" table:style-name="ce153">
            <text:p><text:s/>147<text:s/></text:p>
          </table:table-cell>
          <table:table-cell office:value-type="float" office:value="1683.3664370000001" table:formula="of:=SUM([.I153:.I154])" table:style-name="ce153">
            <text:p><text:s/>1,683<text:s/></text:p>
          </table:table-cell>
          <table:covered-table-cell/>
          <table:table-cell office:value-type="float" office:value="2491.8826840000002" table:formula="of:=SUM([.K153:.K154])" table:style-name="ce155">
            <text:p><text:s/>2,49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2 Total</text:p>
          </table:table-cell>
          <table:table-cell table:number-columns-repeated="2" table:style-name="ce82"/>
          <table:table-cell office:value-type="float" office:value="1445.1226049999998" table:formula="of:=+[.E155]+[.E152]+[.E145]" table:style-name="ce168">
            <text:p><text:s/>1,445<text:s/></text:p>
          </table:table-cell>
          <table:table-cell office:value-type="float" office:value="1098.7920610000001" table:formula="of:=+[.F155]+[.F152]+[.F145]" table:style-name="ce168">
            <text:p><text:s/>1,099<text:s/></text:p>
          </table:table-cell>
          <table:table-cell office:value-type="float" office:value="5781.402170000003" table:formula="of:=+[.G155]+[.G152]+[.G145]" table:style-name="ce168">
            <text:p><text:s/>5,781<text:s/></text:p>
          </table:table-cell>
          <table:table-cell office:value-type="float" office:value="2743.4660130000002" table:formula="of:=+[.H155]+[.H152]+[.H145]" table:style-name="ce168">
            <text:p><text:s/>2,743<text:s/></text:p>
          </table:table-cell>
          <table:table-cell office:value-type="float" office:value="3792.3586320000004" table:formula="of:=+[.I155]+[.I152]+[.I145]" table:style-name="ce168">
            <text:p><text:s/>3,792<text:s/></text:p>
          </table:table-cell>
          <table:table-cell table:style-name="ce169"/>
          <table:table-cell office:value-type="float" office:value="14861.141481000002" table:formula="of:=+[.K155]+[.K152]+[.K145]" table:style-name="ce125">
            <text:p><text:s/>14,86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3" table:number-columns-spanned="1" table:number-rows-spanned="13" table:style-name="ce408">
            <text:p>2013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368.57578899999999" table:style-name="ce120">
            <text:p><text:s/>369<text:s/></text:p>
          </table:table-cell>
          <table:table-cell office:value-type="float" office:value="286.18717399999991" table:style-name="ce28">
            <text:p><text:s/>286<text:s/></text:p>
          </table:table-cell>
          <table:table-cell office:value-type="float" office:value="1897.9246519999995" table:style-name="ce28">
            <text:p><text:s/>1,898<text:s/></text:p>
          </table:table-cell>
          <table:table-cell office:value-type="float" office:value="798.0333169999999" table:style-name="ce28">
            <text:p><text:s/>798<text:s/></text:p>
          </table:table-cell>
          <table:table-cell office:value-type="float" office:value="1317.964894" table:style-name="ce133">
            <text:p><text:s/>1,318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4668.685825999999" table:formula="of:=SUM([.E157:.J157])" table:style-name="ce123">
            <text:p><text:s/>4,6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76.531920000000071" table:style-name="ce39">
            <text:p><text:s/>77<text:s/></text:p>
          </table:table-cell>
          <table:table-cell office:value-type="float" office:value="50.707517999999993" table:style-name="ce40">
            <text:p><text:s/>51<text:s/></text:p>
          </table:table-cell>
          <table:table-cell office:value-type="float" office:value="474.17850800000014" table:style-name="ce40">
            <text:p><text:s/>474<text:s/></text:p>
          </table:table-cell>
          <table:table-cell office:value-type="float" office:value="139.71793699999981" table:style-name="ce40">
            <text:p><text:s/>140<text:s/></text:p>
          </table:table-cell>
          <table:table-cell office:value-type="float" office:value="54.411891000000004" table:style-name="ce41">
            <text:p><text:s/>54<text:s/></text:p>
          </table:table-cell>
          <table:covered-table-cell/>
          <table:table-cell office:value-type="float" office:value="795.547774" table:formula="of:=SUM([.E158:.J158])" table:style-name="ce123">
            <text:p><text:s/>79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445.10770900000006" table:formula="of:=SUM([.E157:.E158])" table:style-name="ce39">
            <text:p><text:s/>445<text:s/></text:p>
          </table:table-cell>
          <table:table-cell office:value-type="float" office:value="336.89469199999991" table:formula="of:=SUM([.F157:.F158])" table:style-name="ce40">
            <text:p><text:s/>337<text:s/></text:p>
          </table:table-cell>
          <table:table-cell office:value-type="float" office:value="2372.1031599999997" table:formula="of:=SUM([.G157:.G158])" table:style-name="ce40">
            <text:p><text:s/>2,372<text:s/></text:p>
          </table:table-cell>
          <table:table-cell office:value-type="float" office:value="937.75125399999968" table:formula="of:=SUM([.H157:.H158])" table:style-name="ce40">
            <text:p><text:s/>938<text:s/></text:p>
          </table:table-cell>
          <table:table-cell office:value-type="float" office:value="1372.3767849999999" table:formula="of:=SUM([.I157:.I158])" table:style-name="ce41">
            <text:p><text:s/>1,372<text:s/></text:p>
          </table:table-cell>
          <table:covered-table-cell/>
          <table:table-cell office:value-type="float" office:value="5464.2335999999987" table:formula="of:=SUM([.K157:.K158])" table:style-name="ce154">
            <text:p><text:s/>5,4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99.342489" table:style-name="ce120">
            <text:p><text:s/>199<text:s/></text:p>
          </table:table-cell>
          <table:table-cell office:value-type="float" office:value="0.74156" table:style-name="ce28">
            <text:p><text:s/>1<text:s/></text:p>
          </table:table-cell>
          <table:table-cell office:value-type="float" office:value="461.12430199999983" table:style-name="ce28">
            <text:p><text:s/>461<text:s/></text:p>
          </table:table-cell>
          <table:table-cell office:value-type="float" office:value="276.28085799999997" table:style-name="ce28">
            <text:p><text:s/>276<text:s/></text:p>
          </table:table-cell>
          <table:table-cell office:value-type="float" office:value="133.69714499999995" table:style-name="ce133">
            <text:p><text:s/>134<text:s/></text:p>
          </table:table-cell>
          <table:covered-table-cell/>
          <table:table-cell office:value-type="float" office:value="1071.1863539999997" table:formula="of:=SUM([.E160:.J160])" table:style-name="ce123">
            <text:p><text:s/>1,0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404.31688300000008" table:style-name="ce35">
            <text:p><text:s/>404<text:s/></text:p>
          </table:table-cell>
          <table:table-cell office:value-type="float" office:value="648.15474999999958" table:style-name="ce34">
            <text:p><text:s/>648<text:s/></text:p>
          </table:table-cell>
          <table:table-cell office:value-type="float" office:value="981.69422999999995" table:style-name="ce34">
            <text:p><text:s/>982<text:s/></text:p>
          </table:table-cell>
          <table:table-cell office:value-type="float" office:value="344.43627799999996" table:style-name="ce34">
            <text:p><text:s/>344<text:s/></text:p>
          </table:table-cell>
          <table:table-cell office:value-type="float" office:value="590.14829299999985" table:style-name="ce36">
            <text:p><text:s/>590<text:s/></text:p>
          </table:table-cell>
          <table:covered-table-cell/>
          <table:table-cell office:value-type="float" office:value="2968.7504339999996" table:formula="of:=SUM([.E161:.J161])" table:style-name="ce123">
            <text:p><text:s/>2,96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10.651890999999999" table:style-name="ce35">
            <text:p><text:s/>11<text:s/></text:p>
          </table:table-cell>
          <table:table-cell office:value-type="float" office:value="5.2590000000000003" table:style-name="ce34">
            <text:p><text:s/>5<text:s/></text:p>
          </table:table-cell>
          <table:table-cell office:value-type="float" office:value="265.29216000000002" table:style-name="ce34">
            <text:p><text:s/>265<text:s/></text:p>
          </table:table-cell>
          <table:table-cell office:value-type="float" office:value="431.83137599999998" table:style-name="ce34">
            <text:p><text:s/>432<text:s/></text:p>
          </table:table-cell>
          <table:table-cell office:value-type="float" office:value="151.29483099999999" table:style-name="ce36">
            <text:p><text:s/>151<text:s/></text:p>
          </table:table-cell>
          <table:covered-table-cell/>
          <table:table-cell office:value-type="float" office:value="864.32925799999998" table:formula="of:=SUM([.E162:.J162])" table:style-name="ce123">
            <text:p><text:s/>86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.4842249999999999" table:style-name="ce36">
            <text:p><text:s/>2<text:s/></text:p>
          </table:table-cell>
          <table:covered-table-cell/>
          <table:table-cell office:value-type="float" office:value="2.4842249999999999" table:formula="of:=SUM([.E163:.J163])" table:style-name="ce123">
            <text:p><text:s/>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16.6" table:style-name="ce35">
            <text:p><text:s/>117<text:s/></text:p>
          </table:table-cell>
          <table:table-cell office:value-type="float" office:value="68.401012000000009" table:style-name="ce34">
            <text:p><text:s/>68<text:s/></text:p>
          </table:table-cell>
          <table:table-cell office:value-type="float" office:value="79.163329000000004" table:style-name="ce34">
            <text:p><text:s/>79<text:s/></text:p>
          </table:table-cell>
          <table:table-cell office:value-type="float" office:value="59.348088999999995" table:style-name="ce34">
            <text:p><text:s/>59<text:s/></text:p>
          </table:table-cell>
          <table:table-cell office:value-type="float" office:value="131.18839300000002" table:style-name="ce36">
            <text:p><text:s/>131<text:s/></text:p>
          </table:table-cell>
          <table:covered-table-cell/>
          <table:table-cell office:value-type="float" office:value="454.70082300000007" table:formula="of:=SUM([.E164:.J164])" table:style-name="ce123">
            <text:p><text:s/>4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155.49099700000002" table:style-name="ce39">
            <text:p><text:s/>155<text:s/></text:p>
          </table:table-cell>
          <table:table-cell office:value-type="float" office:value="95.197341000000009" table:style-name="ce40">
            <text:p><text:s/>95<text:s/></text:p>
          </table:table-cell>
          <table:table-cell office:value-type="float" office:value="1435.1665879999998" table:style-name="ce40">
            <text:p><text:s/>1,435<text:s/></text:p>
          </table:table-cell>
          <table:table-cell office:value-type="float" office:value="452.36199199999987" table:style-name="ce40">
            <text:p><text:s/>452<text:s/></text:p>
          </table:table-cell>
          <table:table-cell office:value-type="float" office:value="3.2046899999999998" table:style-name="ce41">
            <text:p><text:s/>3<text:s/></text:p>
          </table:table-cell>
          <table:covered-table-cell/>
          <table:table-cell office:value-type="float" office:value="2141.4216080000001" table:formula="of:=SUM([.E165:.J165])" table:style-name="ce123">
            <text:p><text:s/>2,14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886.40226000000007" table:formula="of:=SUM([.E160:.E165])" table:style-name="ce152">
            <text:p><text:s/>886<text:s/></text:p>
          </table:table-cell>
          <table:table-cell office:value-type="float" office:value="817.75366299999973" table:formula="of:=SUM([.F160:.F165])" table:style-name="ce153">
            <text:p><text:s/>818<text:s/></text:p>
          </table:table-cell>
          <table:table-cell office:value-type="float" office:value="3222.4406089999993" table:formula="of:=SUM([.G160:.G165])" table:style-name="ce153">
            <text:p><text:s/>3,222<text:s/></text:p>
          </table:table-cell>
          <table:table-cell office:value-type="float" office:value="1564.2585929999998" table:formula="of:=SUM([.H160:.H165])" table:style-name="ce153">
            <text:p><text:s/>1,564<text:s/></text:p>
          </table:table-cell>
          <table:table-cell office:value-type="float" office:value="1012.0175769999998" table:formula="of:=SUM([.I160:.I165])" table:style-name="ce154">
            <text:p><text:s/>1,012<text:s/></text:p>
          </table:table-cell>
          <table:covered-table-cell/>
          <table:table-cell office:value-type="float" office:value="7502.8727019999988" table:formula="of:=SUM([.K160:.K165])" table:style-name="ce154">
            <text:p><text:s/>7,5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10.850486" table:style-name="ce120">
            <text:p><text:s/>11<text:s/></text:p>
          </table:table-cell>
          <table:table-cell office:value-type="float" office:value="9.5523429999999987" table:style-name="ce34">
            <text:p><text:s/>10<text:s/></text:p>
          </table:table-cell>
          <table:table-cell office:value-type="float" office:value="77.411341000000036" table:style-name="ce34">
            <text:p><text:s/>77<text:s/></text:p>
          </table:table-cell>
          <table:table-cell office:value-type="float" office:value="42.240945000000004" table:style-name="ce34">
            <text:p><text:s/>42<text:s/></text:p>
          </table:table-cell>
          <table:table-cell office:value-type="float" office:value="18.271788000000004" table:style-name="ce34">
            <text:p><text:s/>18<text:s/></text:p>
          </table:table-cell>
          <table:covered-table-cell/>
          <table:table-cell office:value-type="float" office:value="158.32690300000004" table:formula="of:=SUM([.E167:.J167])" table:style-name="ce123">
            <text:p><text:s/>15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4.8240259999999999" table:style-name="ce39">
            <text:p><text:s/>5<text:s/></text:p>
          </table:table-cell>
          <table:table-cell office:value-type="float" office:value="34.098875" table:style-name="ce34">
            <text:p><text:s/>34<text:s/></text:p>
          </table:table-cell>
          <table:table-cell office:value-type="float" office:value="552.02769899999998" table:style-name="ce34">
            <text:p><text:s/>552<text:s/></text:p>
          </table:table-cell>
          <table:table-cell office:value-type="float" office:value="92.791860999999983" table:style-name="ce34">
            <text:p><text:s/>93<text:s/></text:p>
          </table:table-cell>
          <table:table-cell office:value-type="float" office:value="1340.1631780000002" table:style-name="ce34">
            <text:p><text:s/>1,340<text:s/></text:p>
          </table:table-cell>
          <table:covered-table-cell/>
          <table:table-cell office:value-type="float" office:value="2023.9056390000003" table:formula="of:=SUM([.E168:.J168])" table:style-name="ce123">
            <text:p><text:s/>2,02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15.674512" table:formula="of:=SUM([.E167:.E168])" table:style-name="ce153">
            <text:p><text:s/>16<text:s/></text:p>
          </table:table-cell>
          <table:table-cell office:value-type="float" office:value="43.651218" table:formula="of:=SUM([.F167:.F168])" table:style-name="ce153">
            <text:p><text:s/>44<text:s/></text:p>
          </table:table-cell>
          <table:table-cell office:value-type="float" office:value="629.43903999999998" table:formula="of:=SUM([.G167:.G168])" table:style-name="ce153">
            <text:p><text:s/>629<text:s/></text:p>
          </table:table-cell>
          <table:table-cell office:value-type="float" office:value="135.03280599999999" table:formula="of:=SUM([.H167:.H168])" table:style-name="ce153">
            <text:p><text:s/>135<text:s/></text:p>
          </table:table-cell>
          <table:table-cell office:value-type="float" office:value="1358.4349660000003" table:formula="of:=SUM([.I167:.I168])" table:style-name="ce153">
            <text:p><text:s/>1,358<text:s/></text:p>
          </table:table-cell>
          <table:covered-table-cell/>
          <table:table-cell office:value-type="float" office:value="2182.2325420000002" table:formula="of:=SUM([.K167:.K168])" table:style-name="ce155">
            <text:p><text:s/>2,18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3 Total</text:p>
          </table:table-cell>
          <table:table-cell table:number-columns-repeated="2" table:style-name="ce82"/>
          <table:table-cell office:value-type="float" office:value="1347.1844810000002" table:formula="of:=+[.E169]+[.E166]+[.E159]" table:style-name="ce168">
            <text:p><text:s/>1,347<text:s/></text:p>
          </table:table-cell>
          <table:table-cell office:value-type="float" office:value="1198.2995729999996" table:formula="of:=+[.F169]+[.F166]+[.F159]" table:style-name="ce168">
            <text:p><text:s/>1,198<text:s/></text:p>
          </table:table-cell>
          <table:table-cell office:value-type="float" office:value="6223.9828089999992" table:formula="of:=+[.G169]+[.G166]+[.G159]" table:style-name="ce168">
            <text:p><text:s/>6,224<text:s/></text:p>
          </table:table-cell>
          <table:table-cell office:value-type="float" office:value="2637.0426529999995" table:formula="of:=+[.H169]+[.H166]+[.H159]" table:style-name="ce168">
            <text:p><text:s/>2,637<text:s/></text:p>
          </table:table-cell>
          <table:table-cell office:value-type="float" office:value="3742.8293280000003" table:formula="of:=+[.I169]+[.I166]+[.I159]" table:style-name="ce168">
            <text:p><text:s/>3,743<text:s/></text:p>
          </table:table-cell>
          <table:table-cell table:style-name="ce169"/>
          <table:table-cell office:value-type="float" office:value="15149.338843999998" table:formula="of:=+[.K169]+[.K166]+[.K159]" table:style-name="ce125">
            <text:p><text:s/>15,149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4" table:number-columns-spanned="1" table:number-rows-spanned="13" table:style-name="ce408">
            <text:p>2014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417.63940599999978" table:style-name="ce120">
            <text:p><text:s/>418<text:s/></text:p>
          </table:table-cell>
          <table:table-cell office:value-type="float" office:value="275.28445199999999" table:style-name="ce28">
            <text:p><text:s/>275<text:s/></text:p>
          </table:table-cell>
          <table:table-cell office:value-type="float" office:value="1975.3465069999991" table:style-name="ce28">
            <text:p><text:s/>1,975<text:s/></text:p>
          </table:table-cell>
          <table:table-cell office:value-type="float" office:value="1085.3328159999999" table:style-name="ce28">
            <text:p><text:s/>1,085<text:s/></text:p>
          </table:table-cell>
          <table:table-cell office:value-type="float" office:value="1352.8185999999998" table:style-name="ce133">
            <text:p><text:s/>1,353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106.4217809999982" table:formula="of:=SUM([.E171:.J171])" table:style-name="ce123">
            <text:p><text:s/>5,1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89.823692000000008" table:style-name="ce39">
            <text:p><text:s/>90<text:s/></text:p>
          </table:table-cell>
          <table:table-cell office:value-type="float" office:value="46.776855000000019" table:style-name="ce40">
            <text:p><text:s/>47<text:s/></text:p>
          </table:table-cell>
          <table:table-cell office:value-type="float" office:value="637.63720499999999" table:style-name="ce40">
            <text:p><text:s/>638<text:s/></text:p>
          </table:table-cell>
          <table:table-cell office:value-type="float" office:value="166.76536699999997" table:style-name="ce40">
            <text:p><text:s/>167<text:s/></text:p>
          </table:table-cell>
          <table:table-cell office:value-type="float" office:value="59.905012000000006" table:style-name="ce41">
            <text:p><text:s/>60<text:s/></text:p>
          </table:table-cell>
          <table:covered-table-cell/>
          <table:table-cell office:value-type="float" office:value="1000.908131" table:formula="of:=SUM([.E172:.J172])" table:style-name="ce123">
            <text:p><text:s/>1,00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507.46309799999977" table:formula="of:=SUM([.E171:.E172])" table:style-name="ce39">
            <text:p><text:s/>507<text:s/></text:p>
          </table:table-cell>
          <table:table-cell office:value-type="float" office:value="322.061307" table:formula="of:=SUM([.F171:.F172])" table:style-name="ce40">
            <text:p><text:s/>322<text:s/></text:p>
          </table:table-cell>
          <table:table-cell office:value-type="float" office:value="2612.9837119999993" table:formula="of:=SUM([.G171:.G172])" table:style-name="ce40">
            <text:p><text:s/>2,613<text:s/></text:p>
          </table:table-cell>
          <table:table-cell office:value-type="float" office:value="1252.0981829999998" table:formula="of:=SUM([.H171:.H172])" table:style-name="ce40">
            <text:p><text:s/>1,252<text:s/></text:p>
          </table:table-cell>
          <table:table-cell office:value-type="float" office:value="1412.7236119999998" table:formula="of:=SUM([.I171:.I172])" table:style-name="ce41">
            <text:p><text:s/>1,413<text:s/></text:p>
          </table:table-cell>
          <table:covered-table-cell/>
          <table:table-cell office:value-type="float" office:value="6107.3299119999983" table:formula="of:=SUM([.K171:.K172])" table:style-name="ce154">
            <text:p><text:s/>6,1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207.34241299999999" table:style-name="ce120">
            <text:p><text:s/>207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681.42221800000016" table:style-name="ce28">
            <text:p><text:s/>681<text:s/></text:p>
          </table:table-cell>
          <table:table-cell office:value-type="float" office:value="307.56729799999988" table:style-name="ce28">
            <text:p><text:s/>308<text:s/></text:p>
          </table:table-cell>
          <table:table-cell office:value-type="float" office:value="151.33121399999999" table:style-name="ce133">
            <text:p><text:s/>151<text:s/></text:p>
          </table:table-cell>
          <table:covered-table-cell/>
          <table:table-cell office:value-type="float" office:value="1347.663143" table:formula="of:=SUM([.E174:.J174])" table:style-name="ce123">
            <text:p><text:s/>1,34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550.02083700000003" table:style-name="ce35">
            <text:p><text:s/>550<text:s/></text:p>
          </table:table-cell>
          <table:table-cell office:value-type="float" office:value="746.34254500000054" table:style-name="ce34">
            <text:p><text:s/>746<text:s/></text:p>
          </table:table-cell>
          <table:table-cell office:value-type="float" office:value="1150.5989900000011" table:style-name="ce34">
            <text:p><text:s/>1,151<text:s/></text:p>
          </table:table-cell>
          <table:table-cell office:value-type="float" office:value="642.88898899999992" table:style-name="ce34">
            <text:p><text:s/>643<text:s/></text:p>
          </table:table-cell>
          <table:table-cell office:value-type="float" office:value="502.07471400000009" table:style-name="ce36">
            <text:p><text:s/>502<text:s/></text:p>
          </table:table-cell>
          <table:covered-table-cell/>
          <table:table-cell office:value-type="float" office:value="3591.9260750000021" table:formula="of:=SUM([.E175:.J175])" table:style-name="ce123">
            <text:p><text:s/>3,5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11.929362999999999" table:style-name="ce35">
            <text:p><text:s/>12<text:s/></text:p>
          </table:table-cell>
          <table:table-cell office:value-type="float" office:value="5.5449999999999999" table:style-name="ce34">
            <text:p><text:s/>6<text:s/></text:p>
          </table:table-cell>
          <table:table-cell office:value-type="float" office:value="197.59509600000004" table:style-name="ce34">
            <text:p><text:s/>198<text:s/></text:p>
          </table:table-cell>
          <table:table-cell office:value-type="float" office:value="429.18137800000005" table:style-name="ce34">
            <text:p><text:s/>429<text:s/></text:p>
          </table:table-cell>
          <table:table-cell office:value-type="float" office:value="192.45513299999985" table:style-name="ce36">
            <text:p><text:s/>192<text:s/></text:p>
          </table:table-cell>
          <table:covered-table-cell/>
          <table:table-cell office:value-type="float" office:value="836.70596999999987" table:formula="of:=SUM([.E176:.J176])" table:style-name="ce123">
            <text:p><text:s/>8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9.4108779999999985" table:style-name="ce36">
            <text:p><text:s/>9<text:s/></text:p>
          </table:table-cell>
          <table:covered-table-cell/>
          <table:table-cell office:value-type="float" office:value="9.4108779999999985" table:formula="of:=SUM([.E177:.J177])" table:style-name="ce123">
            <text:p><text:s/>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30.83444999999998" table:style-name="ce35">
            <text:p><text:s/>131<text:s/></text:p>
          </table:table-cell>
          <table:table-cell office:value-type="float" office:value="84.501846000000015" table:style-name="ce34">
            <text:p><text:s/>85<text:s/></text:p>
          </table:table-cell>
          <table:table-cell office:value-type="float" office:value="104.508099" table:style-name="ce34">
            <text:p><text:s/>105<text:s/></text:p>
          </table:table-cell>
          <table:table-cell office:value-type="float" office:value="203.68037999999999" table:style-name="ce34">
            <text:p><text:s/>204<text:s/></text:p>
          </table:table-cell>
          <table:table-cell office:value-type="float" office:value="49.539344" table:style-name="ce36">
            <text:p><text:s/>50<text:s/></text:p>
          </table:table-cell>
          <table:covered-table-cell/>
          <table:table-cell office:value-type="float" office:value="573.06411900000001" table:formula="of:=SUM([.E178:.J178])" table:style-name="ce123">
            <text:p><text:s/>57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343.07526599999994" table:style-name="ce39">
            <text:p><text:s/>343<text:s/></text:p>
          </table:table-cell>
          <table:table-cell office:value-type="float" office:value="122.544909" table:style-name="ce40">
            <text:p><text:s/>123<text:s/></text:p>
          </table:table-cell>
          <table:table-cell office:value-type="float" office:value="1732.4060509999999" table:style-name="ce40">
            <text:p><text:s/>1,732<text:s/></text:p>
          </table:table-cell>
          <table:table-cell office:value-type="float" office:value="534.49660099999994" table:style-name="ce40">
            <text:p><text:s/>534<text:s/></text:p>
          </table:table-cell>
          <table:table-cell office:value-type="float" office:value="286.61804000000001" table:style-name="ce41">
            <text:p><text:s/>287<text:s/></text:p>
          </table:table-cell>
          <table:covered-table-cell/>
          <table:table-cell office:value-type="float" office:value="3019.1408669999996" table:formula="of:=SUM([.E179:.J179])" table:style-name="ce123">
            <text:p><text:s/>3,01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1243.2023289999997" table:formula="of:=SUM([.E174:.E179])" table:style-name="ce152">
            <text:p><text:s/>1,243<text:s/></text:p>
          </table:table-cell>
          <table:table-cell office:value-type="float" office:value="958.93430000000046" table:formula="of:=SUM([.F174:.F179])" table:style-name="ce153">
            <text:p><text:s/>959<text:s/></text:p>
          </table:table-cell>
          <table:table-cell office:value-type="float" office:value="3866.5304540000011" table:formula="of:=SUM([.G174:.G179])" table:style-name="ce153">
            <text:p><text:s/>3,867<text:s/></text:p>
          </table:table-cell>
          <table:table-cell office:value-type="float" office:value="2117.8146459999998" table:formula="of:=SUM([.H174:.H179])" table:style-name="ce153">
            <text:p><text:s/>2,118<text:s/></text:p>
          </table:table-cell>
          <table:table-cell office:value-type="float" office:value="1191.4293230000001" table:formula="of:=SUM([.I174:.I179])" table:style-name="ce154">
            <text:p><text:s/>1,191<text:s/></text:p>
          </table:table-cell>
          <table:covered-table-cell/>
          <table:table-cell office:value-type="float" office:value="9377.9110520000013" table:formula="of:=SUM([.K174:.K179])" table:style-name="ce154">
            <text:p><text:s/>9,37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11.788868000000001" table:style-name="ce120">
            <text:p><text:s/>12<text:s/></text:p>
          </table:table-cell>
          <table:table-cell office:value-type="float" office:value="8.8867590000000014" table:style-name="ce34">
            <text:p><text:s/>9<text:s/></text:p>
          </table:table-cell>
          <table:table-cell office:value-type="float" office:value="88.678216000000063" table:style-name="ce34">
            <text:p><text:s/>89<text:s/></text:p>
          </table:table-cell>
          <table:table-cell office:value-type="float" office:value="50.818622000000012" table:style-name="ce34">
            <text:p><text:s/>51<text:s/></text:p>
          </table:table-cell>
          <table:table-cell office:value-type="float" office:value="16.498514999999998" table:style-name="ce34">
            <text:p><text:s/>16<text:s/></text:p>
          </table:table-cell>
          <table:covered-table-cell/>
          <table:table-cell office:value-type="float" office:value="176.67098000000007" table:formula="of:=SUM([.E181:.J181])" table:style-name="ce123">
            <text:p><text:s/>1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38.280616000000002" table:style-name="ce39">
            <text:p><text:s/>38<text:s/></text:p>
          </table:table-cell>
          <table:table-cell office:value-type="float" office:value="30.540748000000004" table:style-name="ce34">
            <text:p><text:s/>31<text:s/></text:p>
          </table:table-cell>
          <table:table-cell office:value-type="float" office:value="541.50487800000008" table:style-name="ce34">
            <text:p><text:s/>542<text:s/></text:p>
          </table:table-cell>
          <table:table-cell office:value-type="float" office:value="119.64968499999999" table:style-name="ce34">
            <text:p><text:s/>120<text:s/></text:p>
          </table:table-cell>
          <table:table-cell office:value-type="float" office:value="1478.9570499999998" table:style-name="ce34">
            <text:p><text:s/>1,479<text:s/></text:p>
          </table:table-cell>
          <table:covered-table-cell/>
          <table:table-cell office:value-type="float" office:value="2208.9329769999999" table:formula="of:=SUM([.E182:.J182])" table:style-name="ce123">
            <text:p><text:s/>2,20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50.069484000000003" table:formula="of:=SUM([.E181:.E182])" table:style-name="ce153">
            <text:p><text:s/>50<text:s/></text:p>
          </table:table-cell>
          <table:table-cell office:value-type="float" office:value="39.427507000000006" table:formula="of:=SUM([.F181:.F182])" table:style-name="ce153">
            <text:p><text:s/>39<text:s/></text:p>
          </table:table-cell>
          <table:table-cell office:value-type="float" office:value="630.1830940000001" table:formula="of:=SUM([.G181:.G182])" table:style-name="ce153">
            <text:p><text:s/>630<text:s/></text:p>
          </table:table-cell>
          <table:table-cell office:value-type="float" office:value="170.46830700000001" table:formula="of:=SUM([.H181:.H182])" table:style-name="ce153">
            <text:p><text:s/>170<text:s/></text:p>
          </table:table-cell>
          <table:table-cell office:value-type="float" office:value="1495.4555649999998" table:formula="of:=SUM([.I181:.I182])" table:style-name="ce153">
            <text:p><text:s/>1,495<text:s/></text:p>
          </table:table-cell>
          <table:covered-table-cell/>
          <table:table-cell office:value-type="float" office:value="2385.6039569999998" table:formula="of:=SUM([.K181:.K182])" table:style-name="ce155">
            <text:p><text:s/>2,386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4 Total</text:p>
          </table:table-cell>
          <table:table-cell table:number-columns-repeated="2" table:style-name="ce82"/>
          <table:table-cell office:value-type="float" office:value="1800.7349109999996" table:formula="of:=+[.E183]+[.E180]+[.E173]" table:style-name="ce168">
            <text:p><text:s/>1,801<text:s/></text:p>
          </table:table-cell>
          <table:table-cell office:value-type="float" office:value="1320.4231140000004" table:formula="of:=+[.F183]+[.F180]+[.F173]" table:style-name="ce168">
            <text:p><text:s/>1,320<text:s/></text:p>
          </table:table-cell>
          <table:table-cell office:value-type="float" office:value="7109.6972600000008" table:formula="of:=+[.G183]+[.G180]+[.G173]" table:style-name="ce168">
            <text:p><text:s/>7,110<text:s/></text:p>
          </table:table-cell>
          <table:table-cell office:value-type="float" office:value="3540.381136" table:formula="of:=+[.H183]+[.H180]+[.H173]" table:style-name="ce168">
            <text:p><text:s/>3,540<text:s/></text:p>
          </table:table-cell>
          <table:table-cell office:value-type="float" office:value="4099.6084999999994" table:formula="of:=+[.I183]+[.I180]+[.I173]" table:style-name="ce168">
            <text:p><text:s/>4,100<text:s/></text:p>
          </table:table-cell>
          <table:table-cell table:style-name="ce169"/>
          <table:table-cell office:value-type="float" office:value="17870.844921" table:formula="of:=+[.K183]+[.K180]+[.K173]" table:style-name="ce125">
            <text:p><text:s/>17,871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5" table:number-columns-spanned="1" table:number-rows-spanned="13" table:style-name="ce408">
            <text:p>2015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552.09794399999987" table:style-name="ce120">
            <text:p><text:s/>552<text:s/></text:p>
          </table:table-cell>
          <table:table-cell office:value-type="float" office:value="249.13475499999998" table:style-name="ce28">
            <text:p><text:s/>249<text:s/></text:p>
          </table:table-cell>
          <table:table-cell office:value-type="float" office:value="1769.4060119999999" table:style-name="ce28">
            <text:p><text:s/>1,769<text:s/></text:p>
          </table:table-cell>
          <table:table-cell office:value-type="float" office:value="983.82396199999948" table:style-name="ce28">
            <text:p><text:s/>984<text:s/></text:p>
          </table:table-cell>
          <table:table-cell office:value-type="float" office:value="1287.4420699999998" table:style-name="ce133">
            <text:p><text:s/>1,287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4841.9047429999991" table:formula="of:=SUM([.E185:.J185])" table:style-name="ce123">
            <text:p><text:s/>4,8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89.823692000000008" table:style-name="ce39">
            <text:p><text:s/>90<text:s/></text:p>
          </table:table-cell>
          <table:table-cell office:value-type="float" office:value="48.497695999999998" table:style-name="ce40">
            <text:p><text:s/>48<text:s/></text:p>
          </table:table-cell>
          <table:table-cell office:value-type="float" office:value="479" table:style-name="ce40">
            <text:p><text:s/>479<text:s/></text:p>
          </table:table-cell>
          <table:table-cell office:value-type="float" office:value="129" table:style-name="ce40">
            <text:p><text:s/>129<text:s/></text:p>
          </table:table-cell>
          <table:table-cell office:value-type="float" office:value="62" table:style-name="ce41">
            <text:p><text:s/>62<text:s/></text:p>
          </table:table-cell>
          <table:covered-table-cell/>
          <table:table-cell office:value-type="float" office:value="808.32138800000007" table:formula="of:=SUM([.E186:.J186])" table:style-name="ce123">
            <text:p><text:s/>80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641.92163599999992" table:formula="of:=SUM([.E185:.E186])" table:style-name="ce39">
            <text:p><text:s/>642<text:s/></text:p>
          </table:table-cell>
          <table:table-cell office:value-type="float" office:value="297.632451" table:formula="of:=SUM([.F185:.F186])" table:style-name="ce40">
            <text:p><text:s/>298<text:s/></text:p>
          </table:table-cell>
          <table:table-cell office:value-type="float" office:value="2248.4060119999999" table:formula="of:=SUM([.G185:.G186])" table:style-name="ce40">
            <text:p><text:s/>2,248<text:s/></text:p>
          </table:table-cell>
          <table:table-cell office:value-type="float" office:value="1112.8239619999995" table:formula="of:=SUM([.H185:.H186])" table:style-name="ce40">
            <text:p><text:s/>1,113<text:s/></text:p>
          </table:table-cell>
          <table:table-cell office:value-type="float" office:value="1349.4420699999998" table:formula="of:=SUM([.I185:.I186])" table:style-name="ce41">
            <text:p><text:s/>1,349<text:s/></text:p>
          </table:table-cell>
          <table:covered-table-cell/>
          <table:table-cell office:value-type="float" office:value="5650.2261309999994" table:formula="of:=SUM([.K185:.K186])" table:style-name="ce154">
            <text:p><text:s/>5,65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55.366964" table:style-name="ce120">
            <text:p><text:s/>155<text:s/></text:p>
          </table:table-cell>
          <table:table-cell office:value-type="float" office:value="52.900089999999999" table:style-name="ce34">
            <text:p><text:s/>53<text:s/></text:p>
          </table:table-cell>
          <table:table-cell office:value-type="float" office:value="697.68406400000038" table:style-name="ce28">
            <text:p><text:s/>698<text:s/></text:p>
          </table:table-cell>
          <table:table-cell office:value-type="float" office:value="549.71273499999995" table:style-name="ce28">
            <text:p><text:s/>550<text:s/></text:p>
          </table:table-cell>
          <table:table-cell office:value-type="float" office:value="151.76359899999997" table:style-name="ce133">
            <text:p><text:s/>152<text:s/></text:p>
          </table:table-cell>
          <table:covered-table-cell/>
          <table:table-cell office:value-type="float" office:value="1607.4274520000004" table:formula="of:=SUM([.E188:.J188])" table:style-name="ce123">
            <text:p><text:s/>1,6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701.0766799999999" table:style-name="ce35">
            <text:p><text:s/>701<text:s/></text:p>
          </table:table-cell>
          <table:table-cell office:value-type="float" office:value="787.90337700000009" table:style-name="ce34">
            <text:p><text:s/>788<text:s/></text:p>
          </table:table-cell>
          <table:table-cell office:value-type="float" office:value="1076.2598349999998" table:style-name="ce34">
            <text:p><text:s/>1,076<text:s/></text:p>
          </table:table-cell>
          <table:table-cell office:value-type="float" office:value="685.38317400000028" table:style-name="ce34">
            <text:p><text:s/>685<text:s/></text:p>
          </table:table-cell>
          <table:table-cell office:value-type="float" office:value="551.23405999999989" table:style-name="ce36">
            <text:p><text:s/>551<text:s/></text:p>
          </table:table-cell>
          <table:covered-table-cell/>
          <table:table-cell office:value-type="float" office:value="3801.8571259999999" table:formula="of:=SUM([.E189:.J189])" table:style-name="ce123">
            <text:p><text:s/>3,8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12.198473999999997" table:style-name="ce35">
            <text:p><text:s/>12<text:s/></text:p>
          </table:table-cell>
          <table:table-cell office:value-type="float" office:value="14.394" table:style-name="ce34">
            <text:p><text:s/>14<text:s/></text:p>
          </table:table-cell>
          <table:table-cell office:value-type="float" office:value="175.83075100000002" table:style-name="ce34">
            <text:p><text:s/>176<text:s/></text:p>
          </table:table-cell>
          <table:table-cell office:value-type="float" office:value="22.176075999999998" table:style-name="ce34">
            <text:p><text:s/>22<text:s/></text:p>
          </table:table-cell>
          <table:table-cell office:value-type="float" office:value="302.37785600000012" table:style-name="ce36">
            <text:p><text:s/>302<text:s/></text:p>
          </table:table-cell>
          <table:covered-table-cell/>
          <table:table-cell office:value-type="float" office:value="526.97715700000015" table:formula="of:=SUM([.E190:.J190])" table:style-name="ce123">
            <text:p><text:s/>5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2.615984000000003" table:style-name="ce36">
            <text:p><text:s/>13<text:s/></text:p>
          </table:table-cell>
          <table:covered-table-cell/>
          <table:table-cell office:value-type="float" office:value="12.615984000000003" table:formula="of:=SUM([.E191:.J191])" table:style-name="ce123">
            <text:p><text:s/>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30.19293899999997" table:style-name="ce35">
            <text:p><text:s/>130<text:s/></text:p>
          </table:table-cell>
          <table:table-cell office:value-type="float" office:value="103.317437" table:style-name="ce34">
            <text:p><text:s/>103<text:s/></text:p>
          </table:table-cell>
          <table:table-cell office:value-type="float" office:value="104.24879" table:style-name="ce34">
            <text:p><text:s/>104<text:s/></text:p>
          </table:table-cell>
          <table:table-cell office:value-type="float" office:value="202.47485" table:style-name="ce34">
            <text:p><text:s/>202<text:s/></text:p>
          </table:table-cell>
          <table:table-cell office:value-type="float" office:value="54.43399800000001" table:style-name="ce36">
            <text:p><text:s/>54<text:s/></text:p>
          </table:table-cell>
          <table:covered-table-cell/>
          <table:table-cell office:value-type="float" office:value="594.66801399999986" table:formula="of:=SUM([.E192:.J192])" table:style-name="ce123">
            <text:p><text:s/>5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732.45324000000016" table:style-name="ce39">
            <text:p><text:s/>732<text:s/></text:p>
          </table:table-cell>
          <table:table-cell office:value-type="float" office:value="211.16693000000001" table:style-name="ce40">
            <text:p><text:s/>211<text:s/></text:p>
          </table:table-cell>
          <table:table-cell office:value-type="float" office:value="2960.0354219999995" table:style-name="ce40">
            <text:p><text:s/>2,960<text:s/></text:p>
          </table:table-cell>
          <table:table-cell office:value-type="float" office:value="880.2337409999999" table:style-name="ce40">
            <text:p><text:s/>880<text:s/></text:p>
          </table:table-cell>
          <table:table-cell office:value-type="float" office:value="882.24210100000005" table:style-name="ce41">
            <text:p><text:s/>882<text:s/></text:p>
          </table:table-cell>
          <table:covered-table-cell/>
          <table:table-cell office:value-type="float" office:value="5666.131433999999" table:formula="of:=SUM([.E193:.J193])" table:style-name="ce123">
            <text:p><text:s/>5,6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1731.2882970000001" table:formula="of:=SUM([.E188:.E193])" table:style-name="ce152">
            <text:p><text:s/>1,731<text:s/></text:p>
          </table:table-cell>
          <table:table-cell office:value-type="float" office:value="1169.6818340000002" table:formula="of:=SUM([.F188:.F193])" table:style-name="ce153">
            <text:p><text:s/>1,170<text:s/></text:p>
          </table:table-cell>
          <table:table-cell office:value-type="float" office:value="5014.0588619999999" table:formula="of:=SUM([.G188:.G193])" table:style-name="ce153">
            <text:p><text:s/>5,014<text:s/></text:p>
          </table:table-cell>
          <table:table-cell office:value-type="float" office:value="2339.9805759999999" table:formula="of:=SUM([.H188:.H193])" table:style-name="ce153">
            <text:p><text:s/>2,340<text:s/></text:p>
          </table:table-cell>
          <table:table-cell office:value-type="float" office:value="1954.667598" table:formula="of:=SUM([.I188:.I193])" table:style-name="ce154">
            <text:p><text:s/>1,955<text:s/></text:p>
          </table:table-cell>
          <table:covered-table-cell/>
          <table:table-cell office:value-type="float" office:value="12209.677167" table:formula="of:=SUM([.K188:.K193])" table:style-name="ce154">
            <text:p><text:s/>12,21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12.615569999999998" table:style-name="ce120">
            <text:p><text:s/>13<text:s/></text:p>
          </table:table-cell>
          <table:table-cell office:value-type="float" office:value="8.886921000000001" table:style-name="ce34">
            <text:p><text:s/>9<text:s/></text:p>
          </table:table-cell>
          <table:table-cell office:value-type="float" office:value="97.94305700000001" table:style-name="ce34">
            <text:p><text:s/>98<text:s/></text:p>
          </table:table-cell>
          <table:table-cell office:value-type="float" office:value="50.875971999999997" table:style-name="ce34">
            <text:p><text:s/>51<text:s/></text:p>
          </table:table-cell>
          <table:table-cell office:value-type="float" office:value="11.232790000000001" table:style-name="ce34">
            <text:p><text:s/>11<text:s/></text:p>
          </table:table-cell>
          <table:covered-table-cell/>
          <table:table-cell office:value-type="float" office:value="181.55430999999999" table:formula="of:=SUM([.E195:.J195])" table:style-name="ce123">
            <text:p><text:s/>18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57.338345999999987" table:style-name="ce39">
            <text:p><text:s/>57<text:s/></text:p>
          </table:table-cell>
          <table:table-cell office:value-type="float" office:value="27.722861999999999" table:style-name="ce34">
            <text:p><text:s/>28<text:s/></text:p>
          </table:table-cell>
          <table:table-cell office:value-type="float" office:value="465.8347269999997" table:style-name="ce34">
            <text:p><text:s/>466<text:s/></text:p>
          </table:table-cell>
          <table:table-cell office:value-type="float" office:value="113.83394100000008" table:style-name="ce34">
            <text:p><text:s/>114<text:s/></text:p>
          </table:table-cell>
          <table:table-cell office:value-type="float" office:value="1300.7589469999996" table:style-name="ce34">
            <text:p><text:s/>1,301<text:s/></text:p>
          </table:table-cell>
          <table:covered-table-cell/>
          <table:table-cell office:value-type="float" office:value="1965.4888229999992" table:formula="of:=SUM([.E196:.J196])" table:style-name="ce123">
            <text:p><text:s/>1,96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69.953915999999992" table:formula="of:=SUM([.E195:.E196])" table:style-name="ce153">
            <text:p><text:s/>70<text:s/></text:p>
          </table:table-cell>
          <table:table-cell office:value-type="float" office:value="36.609783" table:formula="of:=SUM([.F195:.F196])" table:style-name="ce153">
            <text:p><text:s/>37<text:s/></text:p>
          </table:table-cell>
          <table:table-cell office:value-type="float" office:value="563.77778399999966" table:formula="of:=SUM([.G195:.G196])" table:style-name="ce153">
            <text:p><text:s/>564<text:s/></text:p>
          </table:table-cell>
          <table:table-cell office:value-type="float" office:value="164.70991300000009" table:formula="of:=SUM([.H195:.H196])" table:style-name="ce153">
            <text:p><text:s/>165<text:s/></text:p>
          </table:table-cell>
          <table:table-cell office:value-type="float" office:value="1311.9917369999996" table:formula="of:=SUM([.I195:.I196])" table:style-name="ce153">
            <text:p><text:s/>1,312<text:s/></text:p>
          </table:table-cell>
          <table:covered-table-cell/>
          <table:table-cell office:value-type="float" office:value="2147.0431329999992" table:formula="of:=SUM([.K195:.K196])" table:style-name="ce155">
            <text:p><text:s/>2,147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5 Total</text:p>
          </table:table-cell>
          <table:table-cell table:number-columns-repeated="2" table:style-name="ce82"/>
          <table:table-cell office:value-type="float" office:value="2443.163849" table:formula="of:=+[.E197]+[.E194]+[.E187]" table:style-name="ce168">
            <text:p><text:s/>2,443<text:s/></text:p>
          </table:table-cell>
          <table:table-cell office:value-type="float" office:value="1503.9240680000003" table:formula="of:=+[.F197]+[.F194]+[.F187]" table:style-name="ce168">
            <text:p><text:s/>1,504<text:s/></text:p>
          </table:table-cell>
          <table:table-cell office:value-type="float" office:value="7826.2426579999992" table:formula="of:=+[.G197]+[.G194]+[.G187]" table:style-name="ce168">
            <text:p><text:s/>7,826<text:s/></text:p>
          </table:table-cell>
          <table:table-cell office:value-type="float" office:value="3617.5144509999996" table:formula="of:=+[.H197]+[.H194]+[.H187]" table:style-name="ce168">
            <text:p><text:s/>3,618<text:s/></text:p>
          </table:table-cell>
          <table:table-cell office:value-type="float" office:value="4616.1014049999994" table:formula="of:=+[.I197]+[.I194]+[.I187]" table:style-name="ce168">
            <text:p><text:s/>4,616<text:s/></text:p>
          </table:table-cell>
          <table:table-cell table:style-name="ce169"/>
          <table:table-cell office:value-type="float" office:value="20006.946430999997" table:formula="of:=+[.K197]+[.K194]+[.K187]" table:style-name="ce125">
            <text:p><text:s/>20,00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6" table:number-columns-spanned="1" table:number-rows-spanned="13" table:style-name="ce408">
            <text:p>2016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555.75063100000011" table:style-name="ce120">
            <text:p><text:s/>556<text:s/></text:p>
          </table:table-cell>
          <table:table-cell office:value-type="float" office:value="260.8119529999999" table:style-name="ce28">
            <text:p><text:s/>261<text:s/></text:p>
          </table:table-cell>
          <table:table-cell office:value-type="float" office:value="1700.9877559999982" table:style-name="ce28">
            <text:p><text:s/>1,701<text:s/></text:p>
          </table:table-cell>
          <table:table-cell office:value-type="float" office:value="1149.2607680000001" table:style-name="ce28">
            <text:p><text:s/>1,149<text:s/></text:p>
          </table:table-cell>
          <table:table-cell office:value-type="float" office:value="1523.6359800000014" table:style-name="ce133">
            <text:p><text:s/>1,524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190.447087999999" table:formula="of:=SUM([.E199:.J199])" table:style-name="ce123">
            <text:p><text:s/>5,19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94.225842000000014" table:style-name="ce39">
            <text:p><text:s/>94<text:s/></text:p>
          </table:table-cell>
          <table:table-cell office:value-type="float" office:value="53.004055000000037" table:style-name="ce40">
            <text:p><text:s/>53<text:s/></text:p>
          </table:table-cell>
          <table:table-cell office:value-type="float" office:value="486.92812300000014" table:style-name="ce40">
            <text:p><text:s/>487<text:s/></text:p>
          </table:table-cell>
          <table:table-cell office:value-type="float" office:value="117.27670200000007" table:style-name="ce40">
            <text:p><text:s/>117<text:s/></text:p>
          </table:table-cell>
          <table:table-cell office:value-type="float" office:value="94.764140000000012" table:style-name="ce41">
            <text:p><text:s/>95<text:s/></text:p>
          </table:table-cell>
          <table:covered-table-cell/>
          <table:table-cell office:value-type="float" office:value="846.1988620000003" table:formula="of:=SUM([.E200:.J200])" table:style-name="ce123">
            <text:p><text:s/>8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649.97647300000017" table:formula="of:=SUM([.E199:.E200])" table:style-name="ce39">
            <text:p><text:s/>650<text:s/></text:p>
          </table:table-cell>
          <table:table-cell office:value-type="float" office:value="313.81600799999995" table:formula="of:=SUM([.F199:.F200])" table:style-name="ce40">
            <text:p><text:s/>314<text:s/></text:p>
          </table:table-cell>
          <table:table-cell office:value-type="float" office:value="2187.9158789999983" table:formula="of:=SUM([.G199:.G200])" table:style-name="ce40">
            <text:p><text:s/>2,188<text:s/></text:p>
          </table:table-cell>
          <table:table-cell office:value-type="float" office:value="1266.5374700000002" table:formula="of:=SUM([.H199:.H200])" table:style-name="ce40">
            <text:p><text:s/>1,267<text:s/></text:p>
          </table:table-cell>
          <table:table-cell office:value-type="float" office:value="1618.4001200000014" table:formula="of:=SUM([.I199:.I200])" table:style-name="ce41">
            <text:p><text:s/>1,618<text:s/></text:p>
          </table:table-cell>
          <table:covered-table-cell/>
          <table:table-cell office:value-type="float" office:value="6036.6459499999992" table:formula="of:=SUM([.K199:.K200])" table:style-name="ce154">
            <text:p><text:s/>6,03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215.52401299999997" table:style-name="ce120">
            <text:p><text:s/>216<text:s/></text:p>
          </table:table-cell>
          <table:table-cell office:value-type="float" office:value="72.788069999999991" table:style-name="ce34">
            <text:p><text:s/>73<text:s/></text:p>
          </table:table-cell>
          <table:table-cell office:value-type="float" office:value="847.08569099999931" table:style-name="ce28">
            <text:p><text:s/>847<text:s/></text:p>
          </table:table-cell>
          <table:table-cell office:value-type="float" office:value="429.03329600000001" table:style-name="ce28">
            <text:p><text:s/>429<text:s/></text:p>
          </table:table-cell>
          <table:table-cell office:value-type="float" office:value="306.4788769999999" table:style-name="ce133">
            <text:p><text:s/>306<text:s/></text:p>
          </table:table-cell>
          <table:covered-table-cell/>
          <table:table-cell office:value-type="float" office:value="1870.9099469999992" table:formula="of:=SUM([.E202:.J202])" table:style-name="ce123">
            <text:p><text:s/>1,8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894.93833000000029" table:style-name="ce35">
            <text:p><text:s/>895<text:s/></text:p>
          </table:table-cell>
          <table:table-cell office:value-type="float" office:value="830.15938100000085" table:style-name="ce34">
            <text:p><text:s/>830<text:s/></text:p>
          </table:table-cell>
          <table:table-cell office:value-type="float" office:value="1322.1508839999983" table:style-name="ce34">
            <text:p><text:s/>1,322<text:s/></text:p>
          </table:table-cell>
          <table:table-cell office:value-type="float" office:value="930.47672599999828" table:style-name="ce34">
            <text:p><text:s/>930<text:s/></text:p>
          </table:table-cell>
          <table:table-cell office:value-type="float" office:value="640.76168000000075" table:style-name="ce36">
            <text:p><text:s/>641<text:s/></text:p>
          </table:table-cell>
          <table:covered-table-cell/>
          <table:table-cell office:value-type="float" office:value="4618.4870009999986" table:formula="of:=SUM([.E203:.J203])" table:style-name="ce123">
            <text:p><text:s/>4,6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9.6147329999999958" table:style-name="ce35">
            <text:p><text:s/>10<text:s/></text:p>
          </table:table-cell>
          <table:table-cell office:value-type="float" office:value="10.997" table:style-name="ce34">
            <text:p><text:s/>11<text:s/></text:p>
          </table:table-cell>
          <table:table-cell office:value-type="float" office:value="342.96429299999818" table:style-name="ce34">
            <text:p><text:s/>343<text:s/></text:p>
          </table:table-cell>
          <table:table-cell office:value-type="float" office:value="402.49338599999999" table:style-name="ce34">
            <text:p><text:s/>402<text:s/></text:p>
          </table:table-cell>
          <table:table-cell office:value-type="float" office:value="310.96688700000112" table:style-name="ce36">
            <text:p><text:s/>311<text:s/></text:p>
          </table:table-cell>
          <table:covered-table-cell/>
          <table:table-cell office:value-type="float" office:value="1077.0362989999994" table:formula="of:=SUM([.E204:.J204])" table:style-name="ce123">
            <text:p><text:s/>1,0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27.426950999999992" table:style-name="ce36">
            <text:p><text:s/>27<text:s/></text:p>
          </table:table-cell>
          <table:covered-table-cell/>
          <table:table-cell office:value-type="float" office:value="27.426950999999992" table:formula="of:=SUM([.E205:.J205])" table:style-name="ce123">
            <text:p><text:s/>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40.65129999999999" table:style-name="ce35">
            <text:p><text:s/>141<text:s/></text:p>
          </table:table-cell>
          <table:table-cell office:value-type="float" office:value="112.082683" table:style-name="ce34">
            <text:p><text:s/>112<text:s/></text:p>
          </table:table-cell>
          <table:table-cell office:value-type="float" office:value="101.60027000000001" table:style-name="ce34">
            <text:p><text:s/>102<text:s/></text:p>
          </table:table-cell>
          <table:table-cell office:value-type="float" office:value="269.32623999999998" table:style-name="ce34">
            <text:p><text:s/>269<text:s/></text:p>
          </table:table-cell>
          <table:table-cell office:value-type="float" office:value="69.677904999999996" table:style-name="ce36">
            <text:p><text:s/>70<text:s/></text:p>
          </table:table-cell>
          <table:covered-table-cell/>
          <table:table-cell office:value-type="float" office:value="693.33839799999998" table:formula="of:=SUM([.E206:.J206])" table:style-name="ce123">
            <text:p><text:s/>69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842.33463600000005" table:style-name="ce39">
            <text:p><text:s/>842<text:s/></text:p>
          </table:table-cell>
          <table:table-cell office:value-type="float" office:value="197.25839999999999" table:style-name="ce40">
            <text:p><text:s/>197<text:s/></text:p>
          </table:table-cell>
          <table:table-cell office:value-type="float" office:value="3081.0430459999998" table:style-name="ce40">
            <text:p><text:s/>3,081<text:s/></text:p>
          </table:table-cell>
          <table:table-cell office:value-type="float" office:value="753.02491600000008" table:style-name="ce40">
            <text:p><text:s/>753<text:s/></text:p>
          </table:table-cell>
          <table:table-cell office:value-type="float" office:value="2621.6878000000002" table:style-name="ce41">
            <text:p><text:s/>2,622<text:s/></text:p>
          </table:table-cell>
          <table:covered-table-cell/>
          <table:table-cell office:value-type="float" office:value="7495.3487980000009" table:formula="of:=SUM([.E207:.J207])" table:style-name="ce123">
            <text:p><text:s/>7,49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2103.0630120000001" table:formula="of:=SUM([.E202:.E207])" table:style-name="ce152">
            <text:p><text:s/>2,103<text:s/></text:p>
          </table:table-cell>
          <table:table-cell office:value-type="float" office:value="1223.2855340000008" table:formula="of:=SUM([.F202:.F207])" table:style-name="ce153">
            <text:p><text:s/>1,223<text:s/></text:p>
          </table:table-cell>
          <table:table-cell office:value-type="float" office:value="5694.8441839999959" table:formula="of:=SUM([.G202:.G207])" table:style-name="ce153">
            <text:p><text:s/>5,695<text:s/></text:p>
          </table:table-cell>
          <table:table-cell office:value-type="float" office:value="2784.3545639999984" table:formula="of:=SUM([.H202:.H207])" table:style-name="ce153">
            <text:p><text:s/>2,784<text:s/></text:p>
          </table:table-cell>
          <table:table-cell office:value-type="float" office:value="3977.000100000002" table:formula="of:=SUM([.I202:.I207])" table:style-name="ce154">
            <text:p><text:s/>3,977<text:s/></text:p>
          </table:table-cell>
          <table:covered-table-cell/>
          <table:table-cell office:value-type="float" office:value="15782.547393999999" table:formula="of:=SUM([.K202:.K207])" table:style-name="ce154">
            <text:p><text:s/>15,7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10.103708000000001" table:style-name="ce120">
            <text:p><text:s/>10<text:s/></text:p>
          </table:table-cell>
          <table:table-cell office:value-type="float" office:value="34.114953999999997" table:style-name="ce34">
            <text:p><text:s/>34<text:s/></text:p>
          </table:table-cell>
          <table:table-cell office:value-type="float" office:value="119.12275900000004" table:style-name="ce34">
            <text:p><text:s/>119<text:s/></text:p>
          </table:table-cell>
          <table:table-cell office:value-type="float" office:value="53.416267999999995" table:style-name="ce34">
            <text:p><text:s/>53<text:s/></text:p>
          </table:table-cell>
          <table:table-cell office:value-type="float" office:value="15.334625000000004" table:style-name="ce34">
            <text:p><text:s/>15<text:s/></text:p>
          </table:table-cell>
          <table:covered-table-cell/>
          <table:table-cell office:value-type="float" office:value="232.09231400000004" table:formula="of:=SUM([.E209:.J209])" table:style-name="ce123">
            <text:p><text:s/>2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46.186478999999991" table:style-name="ce39">
            <text:p><text:s/>46<text:s/></text:p>
          </table:table-cell>
          <table:table-cell office:value-type="float" office:value="10.360740000000002" table:style-name="ce34">
            <text:p><text:s/>10<text:s/></text:p>
          </table:table-cell>
          <table:table-cell office:value-type="float" office:value="452.02483299999977" table:style-name="ce34">
            <text:p><text:s/>452<text:s/></text:p>
          </table:table-cell>
          <table:table-cell office:value-type="float" office:value="139.01972100000006" table:style-name="ce34">
            <text:p><text:s/>139<text:s/></text:p>
          </table:table-cell>
          <table:table-cell office:value-type="float" office:value="1488.5861819999986" table:style-name="ce34">
            <text:p><text:s/>1,489<text:s/></text:p>
          </table:table-cell>
          <table:covered-table-cell/>
          <table:table-cell office:value-type="float" office:value="2136.1779549999983" table:formula="of:=SUM([.E210:.J210])" table:style-name="ce123">
            <text:p><text:s/>2,13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56.290186999999989" table:formula="of:=SUM([.E209:.E210])" table:style-name="ce153">
            <text:p><text:s/>56<text:s/></text:p>
          </table:table-cell>
          <table:table-cell office:value-type="float" office:value="44.475693999999997" table:formula="of:=SUM([.F209:.F210])" table:style-name="ce153">
            <text:p><text:s/>44<text:s/></text:p>
          </table:table-cell>
          <table:table-cell office:value-type="float" office:value="571.1475919999998" table:formula="of:=SUM([.G209:.G210])" table:style-name="ce153">
            <text:p><text:s/>571<text:s/></text:p>
          </table:table-cell>
          <table:table-cell office:value-type="float" office:value="192.43598900000006" table:formula="of:=SUM([.H209:.H210])" table:style-name="ce153">
            <text:p><text:s/>192<text:s/></text:p>
          </table:table-cell>
          <table:table-cell office:value-type="float" office:value="1503.9208069999986" table:formula="of:=SUM([.I209:.I210])" table:style-name="ce153">
            <text:p><text:s/>1,504<text:s/></text:p>
          </table:table-cell>
          <table:covered-table-cell/>
          <table:table-cell office:value-type="float" office:value="2368.2702689999983" table:formula="of:=SUM([.K209:.K210])" table:style-name="ce155">
            <text:p><text:s/>2,368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6 Total</text:p>
          </table:table-cell>
          <table:table-cell table:number-columns-repeated="2" table:style-name="ce82"/>
          <table:table-cell office:value-type="float" office:value="2809.3296720000003" table:formula="of:=+[.E211]+[.E208]+[.E201]" table:style-name="ce168">
            <text:p><text:s/>2,809<text:s/></text:p>
          </table:table-cell>
          <table:table-cell office:value-type="float" office:value="1581.5772360000008" table:formula="of:=+[.F211]+[.F208]+[.F201]" table:style-name="ce168">
            <text:p><text:s/>1,582<text:s/></text:p>
          </table:table-cell>
          <table:table-cell office:value-type="float" office:value="8453.9076549999936" table:formula="of:=+[.G211]+[.G208]+[.G201]" table:style-name="ce168">
            <text:p><text:s/>8,454<text:s/></text:p>
          </table:table-cell>
          <table:table-cell office:value-type="float" office:value="4243.3280229999982" table:formula="of:=+[.H211]+[.H208]+[.H201]" table:style-name="ce168">
            <text:p><text:s/>4,243<text:s/></text:p>
          </table:table-cell>
          <table:table-cell office:value-type="float" office:value="7099.3210270000018" table:formula="of:=+[.I211]+[.I208]+[.I201]" table:style-name="ce168">
            <text:p><text:s/>7,099<text:s/></text:p>
          </table:table-cell>
          <table:table-cell table:style-name="ce169"/>
          <table:table-cell office:value-type="float" office:value="24187.463612999996" table:formula="of:=+[.K211]+[.K208]+[.K201]" table:style-name="ce125">
            <text:p><text:s/>24,18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7" table:number-columns-spanned="1" table:number-rows-spanned="13" table:style-name="ce408">
            <text:p>2017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603.91642599999977" table:style-name="ce120">
            <text:p><text:s/>604<text:s/></text:p>
          </table:table-cell>
          <table:table-cell office:value-type="float" office:value="304.60143100000016" table:style-name="ce28">
            <text:p><text:s/>305<text:s/></text:p>
          </table:table-cell>
          <table:table-cell office:value-type="float" office:value="1895.8635629999999" table:style-name="ce28">
            <text:p><text:s/>1,896<text:s/></text:p>
          </table:table-cell>
          <table:table-cell office:value-type="float" office:value="1152.6865440000017" table:style-name="ce28">
            <text:p><text:s/>1,153<text:s/></text:p>
          </table:table-cell>
          <table:table-cell office:value-type="float" office:value="1431.7680839999989" table:style-name="ce133">
            <text:p><text:s/>1,432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388.836048000001" table:formula="of:=SUM([.E213:.J213])" table:style-name="ce123">
            <text:p><text:s/>5,38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89.612436000000045" table:style-name="ce39">
            <text:p><text:s/>90<text:s/></text:p>
          </table:table-cell>
          <table:table-cell office:value-type="float" office:value="52.835774999999998" table:style-name="ce40">
            <text:p><text:s/>53<text:s/></text:p>
          </table:table-cell>
          <table:table-cell office:value-type="float" office:value="369.90035999999998" table:style-name="ce40">
            <text:p><text:s/>370<text:s/></text:p>
          </table:table-cell>
          <table:table-cell office:value-type="float" office:value="110.42378800000006" table:style-name="ce40">
            <text:p><text:s/>110<text:s/></text:p>
          </table:table-cell>
          <table:table-cell office:value-type="float" office:value="90.778903000000028" table:style-name="ce41">
            <text:p><text:s/>91<text:s/></text:p>
          </table:table-cell>
          <table:covered-table-cell/>
          <table:table-cell office:value-type="float" office:value="713.55126200000007" table:formula="of:=SUM([.E214:.J214])" table:style-name="ce123">
            <text:p><text:s/>71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693.52886199999978" table:formula="of:=SUM([.E213:.E214])" table:style-name="ce39">
            <text:p><text:s/>694<text:s/></text:p>
          </table:table-cell>
          <table:table-cell office:value-type="float" office:value="357.43720600000017" table:formula="of:=SUM([.F213:.F214])" table:style-name="ce40">
            <text:p><text:s/>357<text:s/></text:p>
          </table:table-cell>
          <table:table-cell office:value-type="float" office:value="2265.763923" table:formula="of:=SUM([.G213:.G214])" table:style-name="ce40">
            <text:p><text:s/>2,266<text:s/></text:p>
          </table:table-cell>
          <table:table-cell office:value-type="float" office:value="1263.1103320000018" table:formula="of:=SUM([.H213:.H214])" table:style-name="ce40">
            <text:p><text:s/>1,263<text:s/></text:p>
          </table:table-cell>
          <table:table-cell office:value-type="float" office:value="1522.546986999999" table:formula="of:=SUM([.I213:.I214])" table:style-name="ce41">
            <text:p><text:s/>1,523<text:s/></text:p>
          </table:table-cell>
          <table:covered-table-cell/>
          <table:table-cell office:value-type="float" office:value="6102.387310000001" table:formula="of:=SUM([.K213:.K214])" table:style-name="ce154">
            <text:p><text:s/>6,1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91.08164999999994" table:style-name="ce120">
            <text:p><text:s/>191<text:s/></text:p>
          </table:table-cell>
          <table:table-cell office:value-type="float" office:value="110.24701999999999" table:style-name="ce34">
            <text:p><text:s/>110<text:s/></text:p>
          </table:table-cell>
          <table:table-cell office:value-type="float" office:value="513.00690200000111" table:style-name="ce28">
            <text:p><text:s/>513<text:s/></text:p>
          </table:table-cell>
          <table:table-cell office:value-type="float" office:value="459.95508399999994" table:style-name="ce28">
            <text:p><text:s/>460<text:s/></text:p>
          </table:table-cell>
          <table:table-cell office:value-type="float" office:value="167.78155100000032" table:style-name="ce133">
            <text:p><text:s/>168<text:s/></text:p>
          </table:table-cell>
          <table:covered-table-cell/>
          <table:table-cell office:value-type="float" office:value="1442.0722070000013" table:formula="of:=SUM([.E216:.J216])" table:style-name="ce123">
            <text:p><text:s/>1,4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727.01509900000019" table:style-name="ce35">
            <text:p><text:s/>727<text:s/></text:p>
          </table:table-cell>
          <table:table-cell office:value-type="float" office:value="827.04549200000008" table:style-name="ce34">
            <text:p><text:s/>827<text:s/></text:p>
          </table:table-cell>
          <table:table-cell office:value-type="float" office:value="1547.6558200000047" table:style-name="ce34">
            <text:p><text:s/>1,548<text:s/></text:p>
          </table:table-cell>
          <table:table-cell office:value-type="float" office:value="833.54297699999347" table:style-name="ce34">
            <text:p><text:s/>834<text:s/></text:p>
          </table:table-cell>
          <table:table-cell office:value-type="float" office:value="984.18792899999812" table:style-name="ce36">
            <text:p><text:s/>984<text:s/></text:p>
          </table:table-cell>
          <table:covered-table-cell/>
          <table:table-cell office:value-type="float" office:value="4919.4473169999965" table:formula="of:=SUM([.E217:.J217])" table:style-name="ce123">
            <text:p><text:s/>4,91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47.03818100000003" table:style-name="ce35">
            <text:p><text:s/>47<text:s/></text:p>
          </table:table-cell>
          <table:table-cell office:value-type="float" office:value="5.8942800000000002" table:style-name="ce34">
            <text:p><text:s/>6<text:s/></text:p>
          </table:table-cell>
          <table:table-cell office:value-type="float" office:value="720.01802999999961" table:style-name="ce34">
            <text:p><text:s/>720<text:s/></text:p>
          </table:table-cell>
          <table:table-cell office:value-type="float" office:value="478.08611999999994" table:style-name="ce34">
            <text:p><text:s/>478<text:s/></text:p>
          </table:table-cell>
          <table:table-cell office:value-type="float" office:value="554.86879300000214" table:style-name="ce36">
            <text:p><text:s/>555<text:s/></text:p>
          </table:table-cell>
          <table:covered-table-cell/>
          <table:table-cell office:value-type="float" office:value="1805.9054040000017" table:formula="of:=SUM([.E218:.J218])" table:style-name="ce123">
            <text:p><text:s/>1,806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14.260400000000004" table:style-name="ce35">
            <text:p><text:s/>14<text:s/></text:p>
          </table:table-cell>
          <table:table-cell office:value-type="float" office:value="24.01248" table:style-name="ce34">
            <text:p><text:s/>24<text:s/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94.354052000000067" table:style-name="ce36">
            <text:p><text:s/>94<text:s/></text:p>
          </table:table-cell>
          <table:covered-table-cell/>
          <table:table-cell office:value-type="float" office:value="132.62693200000007" table:formula="of:=SUM([.E219:.J219])" table:style-name="ce123">
            <text:p><text:s/>1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71.18209000000002" table:style-name="ce35">
            <text:p><text:s/>171<text:s/></text:p>
          </table:table-cell>
          <table:table-cell office:value-type="float" office:value="120.78342899999994" table:style-name="ce34">
            <text:p><text:s/>121<text:s/></text:p>
          </table:table-cell>
          <table:table-cell office:value-type="float" office:value="108.48642000000002" table:style-name="ce34">
            <text:p><text:s/>108<text:s/></text:p>
          </table:table-cell>
          <table:table-cell office:value-type="float" office:value="202.52440100000004" table:style-name="ce34">
            <text:p><text:s/>203<text:s/></text:p>
          </table:table-cell>
          <table:table-cell office:value-type="float" office:value="117.69917599999999" table:style-name="ce36">
            <text:p><text:s/>118<text:s/></text:p>
          </table:table-cell>
          <table:covered-table-cell/>
          <table:table-cell office:value-type="float" office:value="720.67551600000002" table:formula="of:=SUM([.E220:.J220])" table:style-name="ce123">
            <text:p><text:s/>72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633.68438900000001" table:style-name="ce39">
            <text:p><text:s/>634<text:s/></text:p>
          </table:table-cell>
          <table:table-cell office:value-type="float" office:value="213.91241999999997" table:style-name="ce40">
            <text:p><text:s/>214<text:s/></text:p>
          </table:table-cell>
          <table:table-cell office:value-type="float" office:value="3701.9692009999994" table:style-name="ce40">
            <text:p><text:s/>3,702<text:s/></text:p>
          </table:table-cell>
          <table:table-cell office:value-type="float" office:value="840.92757400000028" table:style-name="ce40">
            <text:p><text:s/>841<text:s/></text:p>
          </table:table-cell>
          <table:table-cell office:value-type="float" office:value="2055.977535999999" table:style-name="ce41">
            <text:p><text:s/>2,056<text:s/></text:p>
          </table:table-cell>
          <table:covered-table-cell/>
          <table:table-cell office:value-type="float" office:value="7446.4711199999983" table:formula="of:=SUM([.E221:.J221])" table:style-name="ce123">
            <text:p><text:s/>7,44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1784.2618090000001" table:formula="of:=SUM([.E216:.E221])" table:style-name="ce152">
            <text:p><text:s/>1,784<text:s/></text:p>
          </table:table-cell>
          <table:table-cell office:value-type="float" office:value="1301.8951209999998" table:formula="of:=SUM([.F216:.F221])" table:style-name="ce153">
            <text:p><text:s/>1,302<text:s/></text:p>
          </table:table-cell>
          <table:table-cell office:value-type="float" office:value="6591.1363730000048" table:formula="of:=SUM([.G216:.G221])" table:style-name="ce153">
            <text:p><text:s/>6,591<text:s/></text:p>
          </table:table-cell>
          <table:table-cell office:value-type="float" office:value="2815.0361559999938" table:formula="of:=SUM([.H216:.H221])" table:style-name="ce153">
            <text:p><text:s/>2,815<text:s/></text:p>
          </table:table-cell>
          <table:table-cell office:value-type="float" office:value="3974.8690369999995" table:formula="of:=SUM([.I216:.I221])" table:style-name="ce154">
            <text:p><text:s/>3,975<text:s/></text:p>
          </table:table-cell>
          <table:covered-table-cell/>
          <table:table-cell office:value-type="float" office:value="16467.198495999997" table:formula="of:=SUM([.K216:.K221])" table:style-name="ce154">
            <text:p><text:s/>16,46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7.087099999999996" table:style-name="ce120">
            <text:p><text:s/>7<text:s/></text:p>
          </table:table-cell>
          <table:table-cell office:value-type="float" office:value="46.756920999999991" table:style-name="ce34">
            <text:p><text:s/>47<text:s/></text:p>
          </table:table-cell>
          <table:table-cell office:value-type="float" office:value="125.19051299999995" table:style-name="ce34">
            <text:p><text:s/>125<text:s/></text:p>
          </table:table-cell>
          <table:table-cell office:value-type="float" office:value="63.554187999999975" table:style-name="ce34">
            <text:p><text:s/>64<text:s/></text:p>
          </table:table-cell>
          <table:table-cell office:value-type="float" office:value="16.287723000000003" table:style-name="ce34">
            <text:p><text:s/>16<text:s/></text:p>
          </table:table-cell>
          <table:covered-table-cell/>
          <table:table-cell office:value-type="float" office:value="258.87644499999993" table:formula="of:=SUM([.E223:.J223])" table:style-name="ce123">
            <text:p><text:s/>25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45.025587999999992" table:style-name="ce39">
            <text:p><text:s/>45<text:s/></text:p>
          </table:table-cell>
          <table:table-cell office:value-type="float" office:value="13.825124999999996" table:style-name="ce34">
            <text:p><text:s/>14<text:s/></text:p>
          </table:table-cell>
          <table:table-cell office:value-type="float" office:value="594.55783400000087" table:style-name="ce34">
            <text:p><text:s/>595<text:s/></text:p>
          </table:table-cell>
          <table:table-cell office:value-type="float" office:value="172.86836700000001" table:style-name="ce34">
            <text:p><text:s/>173<text:s/></text:p>
          </table:table-cell>
          <table:table-cell office:value-type="float" office:value="2117.2068069999987" table:style-name="ce34">
            <text:p><text:s/>2,117<text:s/></text:p>
          </table:table-cell>
          <table:covered-table-cell/>
          <table:table-cell office:value-type="float" office:value="2943.4837209999996" table:formula="of:=SUM([.E224:.J224])" table:style-name="ce123">
            <text:p><text:s/>2,94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52.112687999999991" table:formula="of:=SUM([.E223:.E224])" table:style-name="ce153">
            <text:p><text:s/>52<text:s/></text:p>
          </table:table-cell>
          <table:table-cell office:value-type="float" office:value="60.582045999999991" table:formula="of:=SUM([.F223:.F224])" table:style-name="ce153">
            <text:p><text:s/>61<text:s/></text:p>
          </table:table-cell>
          <table:table-cell office:value-type="float" office:value="719.74834700000088" table:formula="of:=SUM([.G223:.G224])" table:style-name="ce153">
            <text:p><text:s/>720<text:s/></text:p>
          </table:table-cell>
          <table:table-cell office:value-type="float" office:value="236.42255499999999" table:formula="of:=SUM([.H223:.H224])" table:style-name="ce153">
            <text:p><text:s/>236<text:s/></text:p>
          </table:table-cell>
          <table:table-cell office:value-type="float" office:value="2133.4945299999986" table:formula="of:=SUM([.I223:.I224])" table:style-name="ce153">
            <text:p><text:s/>2,133<text:s/></text:p>
          </table:table-cell>
          <table:covered-table-cell/>
          <table:table-cell office:value-type="float" office:value="3202.3601659999995" table:formula="of:=SUM([.K223:.K224])" table:style-name="ce155">
            <text:p><text:s/>3,20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7 Total</text:p>
          </table:table-cell>
          <table:table-cell table:number-columns-repeated="2" table:style-name="ce82"/>
          <table:table-cell office:value-type="float" office:value="2529.9033589999999" table:formula="of:=+[.E225]+[.E222]+[.E215]" table:style-name="ce168">
            <text:p><text:s/>2,530<text:s/></text:p>
          </table:table-cell>
          <table:table-cell office:value-type="float" office:value="1719.9143730000001" table:formula="of:=+[.F225]+[.F222]+[.F215]" table:style-name="ce168">
            <text:p><text:s/>1,720<text:s/></text:p>
          </table:table-cell>
          <table:table-cell office:value-type="float" office:value="9576.6486430000059" table:formula="of:=+[.G225]+[.G222]+[.G215]" table:style-name="ce168">
            <text:p><text:s/>9,577<text:s/></text:p>
          </table:table-cell>
          <table:table-cell office:value-type="float" office:value="4314.5690429999959" table:formula="of:=+[.H225]+[.H222]+[.H215]" table:style-name="ce168">
            <text:p><text:s/>4,315<text:s/></text:p>
          </table:table-cell>
          <table:table-cell office:value-type="float" office:value="7630.9105539999973" table:formula="of:=+[.I225]+[.I222]+[.I215]" table:style-name="ce168">
            <text:p><text:s/>7,631<text:s/></text:p>
          </table:table-cell>
          <table:table-cell table:style-name="ce169"/>
          <table:table-cell office:value-type="float" office:value="25771.945971999998" table:formula="of:=+[.K225]+[.K222]+[.K215]" table:style-name="ce125">
            <text:p><text:s/>25,77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8" table:number-columns-spanned="1" table:number-rows-spanned="13" table:style-name="ce408">
            <text:p>2018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583" table:style-name="ce120">
            <text:p><text:s/>583<text:s/></text:p>
          </table:table-cell>
          <table:table-cell office:value-type="float" office:value="337" table:style-name="ce28">
            <text:p><text:s/>337<text:s/></text:p>
          </table:table-cell>
          <table:table-cell office:value-type="float" office:value="2046" table:style-name="ce28">
            <text:p><text:s/>2,046<text:s/></text:p>
          </table:table-cell>
          <table:table-cell office:value-type="float" office:value="1176" table:style-name="ce28">
            <text:p><text:s/>1,176<text:s/></text:p>
          </table:table-cell>
          <table:table-cell office:value-type="float" office:value="1516" table:style-name="ce133">
            <text:p><text:s/>1,516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658" table:formula="of:=SUM([.E227:.J227])" table:style-name="ce123">
            <text:p><text:s/>5,65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77.765000000000001" table:style-name="ce39">
            <text:p><text:s/>78<text:s/></text:p>
          </table:table-cell>
          <table:table-cell office:value-type="float" office:value="52.393000000000001" table:style-name="ce34">
            <text:p><text:s/>52<text:s/></text:p>
          </table:table-cell>
          <table:table-cell office:value-type="float" office:value="359.291" table:style-name="ce34">
            <text:p><text:s/>359<text:s/></text:p>
          </table:table-cell>
          <table:table-cell office:value-type="float" office:value="116.89400000000001" table:style-name="ce34">
            <text:p><text:s/>117<text:s/></text:p>
          </table:table-cell>
          <table:table-cell office:value-type="float" office:value="125.566" table:style-name="ce41">
            <text:p><text:s/>126<text:s/></text:p>
          </table:table-cell>
          <table:covered-table-cell/>
          <table:table-cell office:value-type="float" office:value="731.90900000000011" table:formula="of:=SUM([.E228:.J228])" table:style-name="ce123">
            <text:p><text:s/>7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660.76499999999999" table:formula="of:=SUM([.E227:.E228])" table:style-name="ce152">
            <text:p><text:s/>661<text:s/></text:p>
          </table:table-cell>
          <table:table-cell office:value-type="float" office:value="389.39300000000003" table:formula="of:=SUM([.F227:.F228])" table:style-name="ce153">
            <text:p><text:s/>389<text:s/></text:p>
          </table:table-cell>
          <table:table-cell office:value-type="float" office:value="2405.2910000000002" table:formula="of:=SUM([.G227:.G228])" table:style-name="ce153">
            <text:p><text:s/>2,405<text:s/></text:p>
          </table:table-cell>
          <table:table-cell office:value-type="float" office:value="1292.894" table:formula="of:=SUM([.H227:.H228])" table:style-name="ce153">
            <text:p><text:s/>1,293<text:s/></text:p>
          </table:table-cell>
          <table:table-cell office:value-type="float" office:value="1641.566" table:formula="of:=SUM([.I227:.I228])" table:style-name="ce154">
            <text:p><text:s/>1,642<text:s/></text:p>
          </table:table-cell>
          <table:covered-table-cell/>
          <table:table-cell office:value-type="float" office:value="6389.9089999999997" table:formula="of:=SUM([.K227:.K228])" table:style-name="ce154">
            <text:p><text:s/>6,39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58.518" table:style-name="ce120">
            <text:p><text:s/>159<text:s/></text:p>
          </table:table-cell>
          <table:table-cell office:value-type="float" office:value="87.114000000000004" table:style-name="ce28">
            <text:p><text:s/>87<text:s/></text:p>
          </table:table-cell>
          <table:table-cell office:value-type="float" office:value="489.44799999999998" table:style-name="ce28">
            <text:p><text:s/>489<text:s/></text:p>
          </table:table-cell>
          <table:table-cell office:value-type="float" office:value="551.17700000000002" table:style-name="ce28">
            <text:p><text:s/>551<text:s/></text:p>
          </table:table-cell>
          <table:table-cell office:value-type="float" office:value="163.81399999999999" table:style-name="ce133">
            <text:p><text:s/>164<text:s/></text:p>
          </table:table-cell>
          <table:covered-table-cell/>
          <table:table-cell office:value-type="float" office:value="1450.0710000000001" table:formula="of:=SUM([.E230:.J230])" table:style-name="ce123">
            <text:p><text:s/>1,45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764.27200000000005" table:style-name="ce35">
            <text:p><text:s/>764<text:s/></text:p>
          </table:table-cell>
          <table:table-cell office:value-type="float" office:value="801.13199999999995" table:style-name="ce34">
            <text:p><text:s/>801<text:s/></text:p>
          </table:table-cell>
          <table:table-cell office:value-type="float" office:value="1466.027" table:style-name="ce34">
            <text:p><text:s/>1,466<text:s/></text:p>
          </table:table-cell>
          <table:table-cell office:value-type="float" office:value="816.19500000000005" table:style-name="ce34">
            <text:p><text:s/>816<text:s/></text:p>
          </table:table-cell>
          <table:table-cell office:value-type="float" office:value="1159.492" table:style-name="ce36">
            <text:p><text:s/>1,159<text:s/></text:p>
          </table:table-cell>
          <table:covered-table-cell/>
          <table:table-cell office:value-type="float" office:value="5007.1180000000004" table:formula="of:=SUM([.E231:.J231])" table:style-name="ce123">
            <text:p><text:s/>5,00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137" table:style-name="ce35">
            <text:p><text:s/>137<text:s/></text:p>
          </table:table-cell>
          <table:table-cell office:value-type="float" office:value="9.01" table:style-name="ce34">
            <text:p><text:s/>9<text:s/></text:p>
          </table:table-cell>
          <table:table-cell office:value-type="float" office:value="638.495" table:style-name="ce34">
            <text:p><text:s/>638<text:s/></text:p>
          </table:table-cell>
          <table:table-cell office:value-type="float" office:value="648.49300000000005" table:style-name="ce34">
            <text:p><text:s/>648<text:s/></text:p>
          </table:table-cell>
          <table:table-cell office:value-type="float" office:value="738.404" table:style-name="ce36">
            <text:p><text:s/>738<text:s/></text:p>
          </table:table-cell>
          <table:covered-table-cell/>
          <table:table-cell office:value-type="float" office:value="2171.402" table:formula="of:=SUM([.E232:.J232])" table:style-name="ce123">
            <text:p><text:s/>2,17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26.745999999999999" table:style-name="ce35">
            <text:p><text:s/>27<text:s/></text:p>
          </table:table-cell>
          <table:table-cell office:value-type="float" office:value="20.923999999999999" table:style-name="ce34">
            <text:p><text:s/>21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94.197000000000003" table:style-name="ce36">
            <text:p><text:s/>94<text:s/></text:p>
          </table:table-cell>
          <table:covered-table-cell/>
          <table:table-cell office:value-type="float" office:value="141.86700000000002" table:formula="of:=SUM([.E233:.J233])" table:style-name="ce123">
            <text:p><text:s/>14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44.024" table:style-name="ce35">
            <text:p><text:s/>144<text:s/></text:p>
          </table:table-cell>
          <table:table-cell office:value-type="float" office:value="104.934" table:style-name="ce34">
            <text:p><text:s/>105<text:s/></text:p>
          </table:table-cell>
          <table:table-cell office:value-type="float" office:value="120.2" table:style-name="ce34">
            <text:p><text:s/>120<text:s/></text:p>
          </table:table-cell>
          <table:table-cell office:value-type="float" office:value="181.66300000000001" table:style-name="ce34">
            <text:p><text:s/>182<text:s/></text:p>
          </table:table-cell>
          <table:table-cell office:value-type="float" office:value="96.563000000000002" table:style-name="ce36">
            <text:p><text:s/>97<text:s/></text:p>
          </table:table-cell>
          <table:covered-table-cell/>
          <table:table-cell office:value-type="float" office:value="647.38400000000001" table:formula="of:=SUM([.E234:.J234])" table:style-name="ce123">
            <text:p><text:s/>6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653.154" table:style-name="ce39">
            <text:p><text:s/>653<text:s/></text:p>
          </table:table-cell>
          <table:table-cell office:value-type="float" office:value="251.97300000000001" table:style-name="ce40">
            <text:p><text:s/>252<text:s/></text:p>
          </table:table-cell>
          <table:table-cell office:value-type="float" office:value="4192.0559999999996" table:style-name="ce40">
            <text:p><text:s/>4,192<text:s/></text:p>
          </table:table-cell>
          <table:table-cell office:value-type="float" office:value="768.62" table:style-name="ce40">
            <text:p><text:s/>769<text:s/></text:p>
          </table:table-cell>
          <table:table-cell office:value-type="float" office:value="1736.546" table:style-name="ce41">
            <text:p><text:s/>1,737<text:s/></text:p>
          </table:table-cell>
          <table:covered-table-cell/>
          <table:table-cell office:value-type="float" office:value="7602.3489999999993" table:formula="of:=SUM([.E235:.J235])" table:style-name="ce123">
            <text:p><text:s/>7,60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1883.7139999999999" table:formula="of:=SUM([.E230:.E235])" table:style-name="ce152">
            <text:p><text:s/>1,884<text:s/></text:p>
          </table:table-cell>
          <table:table-cell office:value-type="float" office:value="1275.087" table:formula="of:=SUM([.F230:.F235])" table:style-name="ce153">
            <text:p><text:s/>1,275<text:s/></text:p>
          </table:table-cell>
          <table:table-cell office:value-type="float" office:value="6906.2259999999987" table:formula="of:=SUM([.G230:.G235])" table:style-name="ce153">
            <text:p><text:s/>6,906<text:s/></text:p>
          </table:table-cell>
          <table:table-cell office:value-type="float" office:value="2966.1480000000001" table:formula="of:=SUM([.H230:.H235])" table:style-name="ce153">
            <text:p><text:s/>2,966<text:s/></text:p>
          </table:table-cell>
          <table:table-cell office:value-type="float" office:value="3989.0160000000005" table:formula="of:=SUM([.I230:.I235])" table:style-name="ce154">
            <text:p><text:s/>3,989<text:s/></text:p>
          </table:table-cell>
          <table:covered-table-cell/>
          <table:table-cell office:value-type="float" office:value="17020.190999999999" table:formula="of:=SUM([.K230:.K235])" table:style-name="ce154">
            <text:p><text:s/>17,02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7.26" table:style-name="ce120">
            <text:p><text:s/>7<text:s/></text:p>
          </table:table-cell>
          <table:table-cell office:value-type="float" office:value="33.54" table:style-name="ce34">
            <text:p><text:s/>34<text:s/></text:p>
          </table:table-cell>
          <table:table-cell office:value-type="float" office:value="143.19" table:style-name="ce34">
            <text:p><text:s/>143<text:s/></text:p>
          </table:table-cell>
          <table:table-cell office:value-type="float" office:value="50.36" table:style-name="ce34">
            <text:p><text:s/>50<text:s/></text:p>
          </table:table-cell>
          <table:table-cell office:value-type="float" office:value="14.5" table:style-name="ce34">
            <text:p><text:s/>15<text:s/></text:p>
          </table:table-cell>
          <table:covered-table-cell/>
          <table:table-cell office:value-type="float" office:value="248.85000000000002" table:formula="of:=SUM([.E237:.J237])" table:style-name="ce123">
            <text:p><text:s/>2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37.051000000000002" table:style-name="ce39">
            <text:p><text:s/>37<text:s/></text:p>
          </table:table-cell>
          <table:table-cell office:value-type="float" office:value="12.519" table:style-name="ce34">
            <text:p><text:s/>13<text:s/></text:p>
          </table:table-cell>
          <table:table-cell office:value-type="float" office:value="625.66200000000003" table:style-name="ce34">
            <text:p><text:s/>626<text:s/></text:p>
          </table:table-cell>
          <table:table-cell office:value-type="float" office:value="192.36" table:style-name="ce34">
            <text:p><text:s/>192<text:s/></text:p>
          </table:table-cell>
          <table:table-cell office:value-type="float" office:value="2135.87" table:style-name="ce34">
            <text:p><text:s/>2,136<text:s/></text:p>
          </table:table-cell>
          <table:covered-table-cell/>
          <table:table-cell office:value-type="float" office:value="3003.462" table:formula="of:=SUM([.E238:.J238])" table:style-name="ce123">
            <text:p><text:s/>3,00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44.311" table:formula="of:=SUM([.E237:.E238])" table:style-name="ce153">
            <text:p><text:s/>44<text:s/></text:p>
          </table:table-cell>
          <table:table-cell office:value-type="float" office:value="46.058999999999997" table:formula="of:=SUM([.F237:.F238])" table:style-name="ce153">
            <text:p><text:s/>46<text:s/></text:p>
          </table:table-cell>
          <table:table-cell office:value-type="float" office:value="768.85200000000009" table:formula="of:=SUM([.G237:.G238])" table:style-name="ce153">
            <text:p><text:s/>769<text:s/></text:p>
          </table:table-cell>
          <table:table-cell office:value-type="float" office:value="242.72000000000003" table:formula="of:=SUM([.H237:.H238])" table:style-name="ce153">
            <text:p><text:s/>243<text:s/></text:p>
          </table:table-cell>
          <table:table-cell office:value-type="float" office:value="2150.37" table:formula="of:=SUM([.I237:.I238])" table:style-name="ce153">
            <text:p><text:s/>2,150<text:s/></text:p>
          </table:table-cell>
          <table:covered-table-cell/>
          <table:table-cell office:value-type="float" office:value="3252.3119999999999" table:formula="of:=SUM([.K237:.K238])" table:style-name="ce155">
            <text:p><text:s/>3,25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8 Total</text:p>
          </table:table-cell>
          <table:table-cell table:number-columns-repeated="2" table:style-name="ce82"/>
          <table:table-cell office:value-type="float" office:value="2588.79" table:formula="of:=+[.E239]+[.E236]+[.E229]" table:style-name="ce168">
            <text:p><text:s/>2,589<text:s/></text:p>
          </table:table-cell>
          <table:table-cell office:value-type="float" office:value="1710.539" table:formula="of:=+[.F239]+[.F236]+[.F229]" table:style-name="ce168">
            <text:p><text:s/>1,711<text:s/></text:p>
          </table:table-cell>
          <table:table-cell office:value-type="float" office:value="10080.368999999999" table:formula="of:=+[.G239]+[.G236]+[.G229]" table:style-name="ce168">
            <text:p><text:s/>10,080<text:s/></text:p>
          </table:table-cell>
          <table:table-cell office:value-type="float" office:value="4501.7620000000006" table:formula="of:=+[.H239]+[.H236]+[.H229]" table:style-name="ce168">
            <text:p><text:s/>4,502<text:s/></text:p>
          </table:table-cell>
          <table:table-cell office:value-type="float" office:value="7780.9520000000002" table:formula="of:=+[.I239]+[.I236]+[.I229]" table:style-name="ce168">
            <text:p><text:s/>7,781<text:s/></text:p>
          </table:table-cell>
          <table:table-cell table:style-name="ce169"/>
          <table:table-cell office:value-type="float" office:value="26662.411999999997" table:formula="of:=+[.K239]+[.K236]+[.K229]" table:style-name="ce125">
            <text:p><text:s/>26,66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19" table:number-columns-spanned="1" table:number-rows-spanned="13" table:style-name="ce408">
            <text:p>2019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345" table:style-name="ce120">
            <text:p><text:s/>345<text:s/></text:p>
          </table:table-cell>
          <table:table-cell office:value-type="float" office:value="343" table:style-name="ce28">
            <text:p><text:s/>343<text:s/></text:p>
          </table:table-cell>
          <table:table-cell office:value-type="float" office:value="1998" table:style-name="ce28">
            <text:p><text:s/>1,998<text:s/></text:p>
          </table:table-cell>
          <table:table-cell office:value-type="float" office:value="1073" table:style-name="ce28">
            <text:p><text:s/>1,073<text:s/></text:p>
          </table:table-cell>
          <table:table-cell office:value-type="float" office:value="1741" table:style-name="ce133">
            <text:p><text:s/>1,741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500" table:formula="of:=SUM([.E241:.J241])" table:style-name="ce123">
            <text:p><text:s/>5,500<text:s/></text:p>
          </table:table-cell>
          <table:table-cell table:number-columns-repeated="16373"/>
        </table:table-row>
        <table:table-row table:style-name="ro8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78" table:style-name="ce35">
            <text:p><text:s/>78<text:s/></text:p>
          </table:table-cell>
          <table:table-cell office:value-type="float" office:value="52" table:style-name="ce34">
            <text:p><text:s/>52<text:s/></text:p>
          </table:table-cell>
          <table:table-cell office:value-type="float" office:value="303" table:style-name="ce34">
            <text:p><text:s/>303<text:s/></text:p>
          </table:table-cell>
          <table:table-cell office:value-type="float" office:value="123" table:style-name="ce34">
            <text:p><text:s/>123<text:s/></text:p>
          </table:table-cell>
          <table:table-cell office:value-type="float" office:value="129" table:style-name="ce36">
            <text:p><text:s/>129<text:s/></text:p>
          </table:table-cell>
          <table:covered-table-cell/>
          <table:table-cell office:value-type="float" office:value="685" table:formula="of:=SUM([.E242:.J242])" table:style-name="ce123">
            <text:p><text:s/>6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423" table:formula="of:=SUM([.E241:.E242])" table:style-name="ce152">
            <text:p><text:s/>423<text:s/></text:p>
          </table:table-cell>
          <table:table-cell office:value-type="float" office:value="395" table:formula="of:=SUM([.F241:.F242])" table:style-name="ce153">
            <text:p><text:s/>395<text:s/></text:p>
          </table:table-cell>
          <table:table-cell office:value-type="float" office:value="2301" table:formula="of:=SUM([.G241:.G242])" table:style-name="ce153">
            <text:p><text:s/>2,301<text:s/></text:p>
          </table:table-cell>
          <table:table-cell office:value-type="float" office:value="1196" table:formula="of:=SUM([.H241:.H242])" table:style-name="ce153">
            <text:p><text:s/>1,196<text:s/></text:p>
          </table:table-cell>
          <table:table-cell office:value-type="float" office:value="1870" table:formula="of:=SUM([.I241:.I242])" table:style-name="ce154">
            <text:p><text:s/>1,870<text:s/></text:p>
          </table:table-cell>
          <table:covered-table-cell/>
          <table:table-cell office:value-type="float" office:value="6185" table:formula="of:=SUM([.K241:.K242])" table:style-name="ce154">
            <text:p><text:s/>6,185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150" table:style-name="ce120">
            <text:p><text:s/>150<text:s/></text:p>
          </table:table-cell>
          <table:table-cell office:value-type="float" office:value="86" table:style-name="ce28">
            <text:p><text:s/>86<text:s/></text:p>
          </table:table-cell>
          <table:table-cell office:value-type="float" office:value="632" table:style-name="ce28">
            <text:p><text:s/>632<text:s/></text:p>
          </table:table-cell>
          <table:table-cell office:value-type="float" office:value="593" table:style-name="ce28">
            <text:p><text:s/>593<text:s/></text:p>
          </table:table-cell>
          <table:table-cell office:value-type="float" office:value="151" table:style-name="ce133">
            <text:p><text:s/>151<text:s/></text:p>
          </table:table-cell>
          <table:covered-table-cell/>
          <table:table-cell office:value-type="float" office:value="1612" table:formula="of:=SUM([.E244:.J244])" table:style-name="ce123">
            <text:p><text:s/>1,61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765" table:style-name="ce35">
            <text:p><text:s/>765<text:s/></text:p>
          </table:table-cell>
          <table:table-cell office:value-type="float" office:value="807" table:style-name="ce34">
            <text:p><text:s/>807<text:s/></text:p>
          </table:table-cell>
          <table:table-cell office:value-type="float" office:value="1783" table:style-name="ce34">
            <text:p><text:s/>1,783<text:s/></text:p>
          </table:table-cell>
          <table:table-cell office:value-type="float" office:value="868" table:style-name="ce34">
            <text:p><text:s/>868<text:s/></text:p>
          </table:table-cell>
          <table:table-cell office:value-type="float" office:value="1251" table:style-name="ce36">
            <text:p><text:s/>1,251<text:s/></text:p>
          </table:table-cell>
          <table:covered-table-cell/>
          <table:table-cell office:value-type="float" office:value="5474" table:formula="of:=SUM([.E245:.J245])" table:style-name="ce123">
            <text:p><text:s/>5,47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187" table:style-name="ce35">
            <text:p><text:s/>187<text:s/></text:p>
          </table:table-cell>
          <table:table-cell office:value-type="float" office:value="1" table:style-name="ce34">
            <text:p><text:s/>1<text:s/></text:p>
          </table:table-cell>
          <table:table-cell office:value-type="float" office:value="427" table:style-name="ce34">
            <text:p><text:s/>427<text:s/></text:p>
          </table:table-cell>
          <table:table-cell office:value-type="float" office:value="649" table:style-name="ce34">
            <text:p><text:s/>649<text:s/></text:p>
          </table:table-cell>
          <table:table-cell office:value-type="float" office:value="608" table:style-name="ce36">
            <text:p><text:s/>608<text:s/></text:p>
          </table:table-cell>
          <table:covered-table-cell/>
          <table:table-cell office:value-type="float" office:value="1872" table:formula="of:=SUM([.E246:.J246])" table:style-name="ce123">
            <text:p><text:s/>1,87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32" table:style-name="ce35">
            <text:p><text:s/>32<text:s/></text:p>
          </table:table-cell>
          <table:table-cell office:value-type="float" office:value="30" table:style-name="ce34">
            <text:p><text:s/>30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97" table:style-name="ce36">
            <text:p><text:s/>97<text:s/></text:p>
          </table:table-cell>
          <table:covered-table-cell/>
          <table:table-cell office:value-type="float" office:value="159" table:formula="of:=SUM([.E247:.J247])" table:style-name="ce123">
            <text:p><text:s/>159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71" table:style-name="ce35">
            <text:p><text:s/>171<text:s/></text:p>
          </table:table-cell>
          <table:table-cell office:value-type="float" office:value="111" table:style-name="ce34">
            <text:p><text:s/>111<text:s/></text:p>
          </table:table-cell>
          <table:table-cell office:value-type="float" office:value="136" table:style-name="ce34">
            <text:p><text:s/>136<text:s/></text:p>
          </table:table-cell>
          <table:table-cell office:value-type="float" office:value="187" table:style-name="ce34">
            <text:p><text:s/>187<text:s/></text:p>
          </table:table-cell>
          <table:table-cell office:value-type="float" office:value="108" table:style-name="ce36">
            <text:p><text:s/>108<text:s/></text:p>
          </table:table-cell>
          <table:covered-table-cell/>
          <table:table-cell office:value-type="float" office:value="713" table:formula="of:=SUM([.E248:.J248])" table:style-name="ce123">
            <text:p><text:s/>7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575" table:style-name="ce39">
            <text:p><text:s/>575<text:s/></text:p>
          </table:table-cell>
          <table:table-cell office:value-type="float" office:value="126" table:style-name="ce40">
            <text:p><text:s/>126<text:s/></text:p>
          </table:table-cell>
          <table:table-cell office:value-type="float" office:value="4232" table:style-name="ce40">
            <text:p><text:s/>4,232<text:s/></text:p>
          </table:table-cell>
          <table:table-cell office:value-type="float" office:value="793" table:style-name="ce40">
            <text:p><text:s/>793<text:s/></text:p>
          </table:table-cell>
          <table:table-cell office:value-type="float" office:value="1957" table:style-name="ce41">
            <text:p><text:s/>1,957<text:s/></text:p>
          </table:table-cell>
          <table:covered-table-cell/>
          <table:table-cell office:value-type="float" office:value="7683" table:formula="of:=SUM([.E249:.J249])" table:style-name="ce123">
            <text:p><text:s/>7,6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1880" table:formula="of:=SUM([.E244:.E249])" table:style-name="ce152">
            <text:p><text:s/>1,880<text:s/></text:p>
          </table:table-cell>
          <table:table-cell office:value-type="float" office:value="1161" table:formula="of:=SUM([.F244:.F249])" table:style-name="ce153">
            <text:p><text:s/>1,161<text:s/></text:p>
          </table:table-cell>
          <table:table-cell office:value-type="float" office:value="7210" table:formula="of:=SUM([.G244:.G249])" table:style-name="ce153">
            <text:p><text:s/>7,210<text:s/></text:p>
          </table:table-cell>
          <table:table-cell office:value-type="float" office:value="3090" table:formula="of:=SUM([.H244:.H249])" table:style-name="ce153">
            <text:p><text:s/>3,090<text:s/></text:p>
          </table:table-cell>
          <table:table-cell office:value-type="float" office:value="4172" table:formula="of:=SUM([.I244:.I249])" table:style-name="ce154">
            <text:p><text:s/>4,172<text:s/></text:p>
          </table:table-cell>
          <table:covered-table-cell/>
          <table:table-cell office:value-type="float" office:value="17513" table:formula="of:=SUM([.K244:.K249])" table:style-name="ce154">
            <text:p><text:s/>17,51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6" table:style-name="ce120">
            <text:p><text:s/>6<text:s/></text:p>
          </table:table-cell>
          <table:table-cell office:value-type="float" office:value="33" table:style-name="ce34">
            <text:p><text:s/>33<text:s/></text:p>
          </table:table-cell>
          <table:table-cell office:value-type="float" office:value="121" table:style-name="ce34">
            <text:p><text:s/>121<text:s/></text:p>
          </table:table-cell>
          <table:table-cell office:value-type="float" office:value="50" table:style-name="ce34">
            <text:p><text:s/>50<text:s/></text:p>
          </table:table-cell>
          <table:table-cell office:value-type="float" office:value="18" table:style-name="ce34">
            <text:p><text:s/>18<text:s/></text:p>
          </table:table-cell>
          <table:covered-table-cell/>
          <table:table-cell office:value-type="float" office:value="228" table:formula="of:=SUM([.E251:.J251])" table:style-name="ce123">
            <text:p><text:s/>22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44" table:style-name="ce39">
            <text:p><text:s/>44<text:s/></text:p>
          </table:table-cell>
          <table:table-cell office:value-type="float" office:value="17" table:style-name="ce34">
            <text:p><text:s/>17<text:s/></text:p>
          </table:table-cell>
          <table:table-cell office:value-type="float" office:value="588" table:style-name="ce34">
            <text:p><text:s/>588<text:s/></text:p>
          </table:table-cell>
          <table:table-cell office:value-type="float" office:value="193" table:style-name="ce34">
            <text:p><text:s/>193<text:s/></text:p>
          </table:table-cell>
          <table:table-cell office:value-type="float" office:value="1690" table:style-name="ce34">
            <text:p><text:s/>1,690<text:s/></text:p>
          </table:table-cell>
          <table:covered-table-cell/>
          <table:table-cell office:value-type="float" office:value="2532" table:formula="of:=SUM([.E252:.J252])" table:style-name="ce123">
            <text:p><text:s/>2,53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50" table:formula="of:=SUM([.E251:.E252])" table:style-name="ce153">
            <text:p><text:s/>50<text:s/></text:p>
          </table:table-cell>
          <table:table-cell office:value-type="float" office:value="50" table:formula="of:=SUM([.F251:.F252])" table:style-name="ce153">
            <text:p><text:s/>50<text:s/></text:p>
          </table:table-cell>
          <table:table-cell office:value-type="float" office:value="709" table:formula="of:=SUM([.G251:.G252])" table:style-name="ce153">
            <text:p><text:s/>709<text:s/></text:p>
          </table:table-cell>
          <table:table-cell office:value-type="float" office:value="243" table:formula="of:=SUM([.H251:.H252])" table:style-name="ce153">
            <text:p><text:s/>243<text:s/></text:p>
          </table:table-cell>
          <table:table-cell office:value-type="float" office:value="1708" table:formula="of:=SUM([.I251:.I252])" table:style-name="ce153">
            <text:p><text:s/>1,708<text:s/></text:p>
          </table:table-cell>
          <table:covered-table-cell/>
          <table:table-cell office:value-type="float" office:value="2760" table:formula="of:=SUM([.K251:.K252])" table:style-name="ce155">
            <text:p><text:s/>2,760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19 Total</text:p>
          </table:table-cell>
          <table:table-cell table:number-columns-repeated="2" table:style-name="ce82"/>
          <table:table-cell office:value-type="float" office:value="2353" table:formula="of:=+[.E253]+[.E250]+[.E243]" table:style-name="ce168">
            <text:p><text:s/>2,353<text:s/></text:p>
          </table:table-cell>
          <table:table-cell office:value-type="float" office:value="1606" table:formula="of:=+[.F253]+[.F250]+[.F243]" table:style-name="ce168">
            <text:p><text:s/>1,606<text:s/></text:p>
          </table:table-cell>
          <table:table-cell office:value-type="float" office:value="10220" table:formula="of:=+[.G253]+[.G250]+[.G243]" table:style-name="ce168">
            <text:p><text:s/>10,220<text:s/></text:p>
          </table:table-cell>
          <table:table-cell office:value-type="float" office:value="4529" table:formula="of:=+[.H253]+[.H250]+[.H243]" table:style-name="ce168">
            <text:p><text:s/>4,529<text:s/></text:p>
          </table:table-cell>
          <table:table-cell office:value-type="float" office:value="7750" table:formula="of:=+[.I253]+[.I250]+[.I243]" table:style-name="ce168">
            <text:p><text:s/>7,750<text:s/></text:p>
          </table:table-cell>
          <table:table-cell table:style-name="ce169"/>
          <table:table-cell office:value-type="float" office:value="26458" table:formula="of:=+[.K253]+[.K250]+[.K243]" table:style-name="ce125">
            <text:p><text:s/>26,458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0" table:number-columns-spanned="1" table:number-rows-spanned="13" table:style-name="ce408">
            <text:p>2020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291" table:style-name="ce120">
            <text:p><text:s/>291<text:s/></text:p>
          </table:table-cell>
          <table:table-cell office:value-type="float" office:value="445" table:style-name="ce28">
            <text:p><text:s/>445<text:s/></text:p>
          </table:table-cell>
          <table:table-cell office:value-type="float" office:value="1957" table:style-name="ce28">
            <text:p><text:s/>1,957<text:s/></text:p>
          </table:table-cell>
          <table:table-cell office:value-type="float" office:value="894" table:style-name="ce28">
            <text:p><text:s/>894<text:s/></text:p>
          </table:table-cell>
          <table:table-cell office:value-type="float" office:value="1617" table:style-name="ce133">
            <text:p><text:s/>1,617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204" table:formula="of:=SUM([.E255:.J255])" table:style-name="ce123">
            <text:p><text:s/>5,204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72" table:style-name="ce35">
            <text:p><text:s/>72<text:s/></text:p>
          </table:table-cell>
          <table:table-cell office:value-type="float" office:value="38" table:style-name="ce34">
            <text:p><text:s/>38<text:s/></text:p>
          </table:table-cell>
          <table:table-cell office:value-type="float" office:value="260" table:style-name="ce34">
            <text:p><text:s/>260<text:s/></text:p>
          </table:table-cell>
          <table:table-cell office:value-type="float" office:value="77" table:style-name="ce34">
            <text:p><text:s/>77<text:s/></text:p>
          </table:table-cell>
          <table:table-cell office:value-type="float" office:value="110" table:style-name="ce36">
            <text:p><text:s/>110<text:s/></text:p>
          </table:table-cell>
          <table:covered-table-cell/>
          <table:table-cell office:value-type="float" office:value="557" table:formula="of:=SUM([.E256:.J256])" table:style-name="ce123">
            <text:p><text:s/>55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363" table:formula="of:=SUM([.E255:.E256])" table:style-name="ce152">
            <text:p><text:s/>363<text:s/></text:p>
          </table:table-cell>
          <table:table-cell office:value-type="float" office:value="483" table:formula="of:=SUM([.F255:.F256])" table:style-name="ce153">
            <text:p><text:s/>483<text:s/></text:p>
          </table:table-cell>
          <table:table-cell office:value-type="float" office:value="2217" table:formula="of:=SUM([.G255:.G256])" table:style-name="ce153">
            <text:p><text:s/>2,217<text:s/></text:p>
          </table:table-cell>
          <table:table-cell office:value-type="float" office:value="971" table:formula="of:=SUM([.H255:.H256])" table:style-name="ce153">
            <text:p><text:s/>971<text:s/></text:p>
          </table:table-cell>
          <table:table-cell office:value-type="float" office:value="1727" table:formula="of:=SUM([.I255:.I256])" table:style-name="ce154">
            <text:p><text:s/>1,727<text:s/></text:p>
          </table:table-cell>
          <table:covered-table-cell/>
          <table:table-cell office:value-type="float" office:value="5761" table:formula="of:=SUM([.K255:.K256])" table:style-name="ce154">
            <text:p><text:s/>5,76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211" table:style-name="ce120">
            <text:p><text:s/>211<text:s/></text:p>
          </table:table-cell>
          <table:table-cell office:value-type="float" office:value="111" table:style-name="ce28">
            <text:p><text:s/>111<text:s/></text:p>
          </table:table-cell>
          <table:table-cell office:value-type="float" office:value="834" table:style-name="ce28">
            <text:p><text:s/>834<text:s/></text:p>
          </table:table-cell>
          <table:table-cell office:value-type="float" office:value="650" table:style-name="ce28">
            <text:p><text:s/>650<text:s/></text:p>
          </table:table-cell>
          <table:table-cell office:value-type="float" office:value="149" table:style-name="ce133">
            <text:p><text:s/>149<text:s/></text:p>
          </table:table-cell>
          <table:covered-table-cell/>
          <table:table-cell office:value-type="float" office:value="1955" table:formula="of:=SUM([.E258:.J258])" table:style-name="ce123">
            <text:p><text:s/>1,95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761" table:style-name="ce35">
            <text:p><text:s/>761<text:s/></text:p>
          </table:table-cell>
          <table:table-cell office:value-type="float" office:value="751" table:style-name="ce34">
            <text:p><text:s/>751<text:s/></text:p>
          </table:table-cell>
          <table:table-cell office:value-type="float" office:value="1928" table:style-name="ce34">
            <text:p><text:s/>1,928<text:s/></text:p>
          </table:table-cell>
          <table:table-cell office:value-type="float" office:value="869" table:style-name="ce34">
            <text:p><text:s/>869<text:s/></text:p>
          </table:table-cell>
          <table:table-cell office:value-type="float" office:value="1109" table:style-name="ce36">
            <text:p><text:s/>1,109<text:s/></text:p>
          </table:table-cell>
          <table:covered-table-cell/>
          <table:table-cell office:value-type="float" office:value="5418" table:formula="of:=SUM([.E259:.J259])" table:style-name="ce123">
            <text:p><text:s/>5,41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248" table:style-name="ce35">
            <text:p><text:s/>248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57" table:style-name="ce34">
            <text:p><text:s/>257<text:s/></text:p>
          </table:table-cell>
          <table:table-cell office:value-type="float" office:value="572" table:style-name="ce34">
            <text:p><text:s/>572<text:s/></text:p>
          </table:table-cell>
          <table:table-cell office:value-type="float" office:value="606" table:style-name="ce36">
            <text:p><text:s/>606<text:s/></text:p>
          </table:table-cell>
          <table:covered-table-cell/>
          <table:table-cell office:value-type="float" office:value="1683" table:formula="of:=SUM([.E260:.J260])" table:style-name="ce123">
            <text:p><text:s/>1,68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27" table:style-name="ce35">
            <text:p><text:s/>27<text:s/></text:p>
          </table:table-cell>
          <table:table-cell office:value-type="float" office:value="24" table:style-name="ce34">
            <text:p><text:s/>24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84" table:style-name="ce36">
            <text:p><text:s/>84<text:s/></text:p>
          </table:table-cell>
          <table:covered-table-cell/>
          <table:table-cell office:value-type="float" office:value="135" table:formula="of:=SUM([.E261:.J261])" table:style-name="ce123">
            <text:p><text:s/>13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77" table:style-name="ce35">
            <text:p><text:s/>177<text:s/></text:p>
          </table:table-cell>
          <table:table-cell office:value-type="float" office:value="73" table:style-name="ce34">
            <text:p><text:s/>73<text:s/></text:p>
          </table:table-cell>
          <table:table-cell office:value-type="float" office:value="204" table:style-name="ce34">
            <text:p><text:s/>204<text:s/></text:p>
          </table:table-cell>
          <table:table-cell office:value-type="float" office:value="128" table:style-name="ce34">
            <text:p><text:s/>128<text:s/></text:p>
          </table:table-cell>
          <table:table-cell office:value-type="float" office:value="93" table:style-name="ce36">
            <text:p><text:s/>93<text:s/></text:p>
          </table:table-cell>
          <table:covered-table-cell/>
          <table:table-cell office:value-type="float" office:value="675" table:formula="of:=SUM([.E262:.J262])" table:style-name="ce123">
            <text:p><text:s/>6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769" table:style-name="ce39">
            <text:p><text:s/>769<text:s/></text:p>
          </table:table-cell>
          <table:table-cell office:value-type="float" office:value="210" table:style-name="ce40">
            <text:p><text:s/>210<text:s/></text:p>
          </table:table-cell>
          <table:table-cell office:value-type="float" office:value="4050" table:style-name="ce40">
            <text:p><text:s/>4,050<text:s/></text:p>
          </table:table-cell>
          <table:table-cell office:value-type="float" office:value="831" table:style-name="ce40">
            <text:p><text:s/>831<text:s/></text:p>
          </table:table-cell>
          <table:table-cell office:value-type="float" office:value="1927" table:style-name="ce41">
            <text:p><text:s/>1,927<text:s/></text:p>
          </table:table-cell>
          <table:covered-table-cell/>
          <table:table-cell office:value-type="float" office:value="7787" table:formula="of:=SUM([.E263:.J263])" table:style-name="ce123">
            <text:p><text:s/>7,78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2193" table:formula="of:=SUM([.E258:.E263])" table:style-name="ce152">
            <text:p><text:s/>2,193<text:s/></text:p>
          </table:table-cell>
          <table:table-cell office:value-type="float" office:value="1169" table:formula="of:=SUM([.F258:.F263])" table:style-name="ce153">
            <text:p><text:s/>1,169<text:s/></text:p>
          </table:table-cell>
          <table:table-cell office:value-type="float" office:value="7273" table:formula="of:=SUM([.G258:.G263])" table:style-name="ce153">
            <text:p><text:s/>7,273<text:s/></text:p>
          </table:table-cell>
          <table:table-cell office:value-type="float" office:value="3050" table:formula="of:=SUM([.H258:.H263])" table:style-name="ce153">
            <text:p><text:s/>3,050<text:s/></text:p>
          </table:table-cell>
          <table:table-cell office:value-type="float" office:value="3968" table:formula="of:=SUM([.I258:.I263])" table:style-name="ce154">
            <text:p><text:s/>3,968<text:s/></text:p>
          </table:table-cell>
          <table:covered-table-cell/>
          <table:table-cell office:value-type="float" office:value="17653" table:formula="of:=SUM([.K258:.K263])" table:style-name="ce154">
            <text:p><text:s/>17,653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5" table:style-name="ce120">
            <text:p><text:s/>5<text:s/></text:p>
          </table:table-cell>
          <table:table-cell office:value-type="float" office:value="21" table:style-name="ce34">
            <text:p><text:s/>21<text:s/></text:p>
          </table:table-cell>
          <table:table-cell office:value-type="float" office:value="44" table:style-name="ce34">
            <text:p><text:s/>44<text:s/></text:p>
          </table:table-cell>
          <table:table-cell office:value-type="float" office:value="27" table:style-name="ce34">
            <text:p><text:s/>27<text:s/></text:p>
          </table:table-cell>
          <table:table-cell office:value-type="float" office:value="18" table:style-name="ce34">
            <text:p><text:s/>18<text:s/></text:p>
          </table:table-cell>
          <table:covered-table-cell/>
          <table:table-cell office:value-type="float" office:value="115" table:formula="of:=SUM([.E265:.J265])" table:style-name="ce123">
            <text:p><text:s/>11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39" table:style-name="ce39">
            <text:p><text:s/>39<text:s/></text:p>
          </table:table-cell>
          <table:table-cell office:value-type="float" office:value="13" table:style-name="ce34">
            <text:p><text:s/>13<text:s/></text:p>
          </table:table-cell>
          <table:table-cell office:value-type="float" office:value="693" table:style-name="ce34">
            <text:p><text:s/>693<text:s/></text:p>
          </table:table-cell>
          <table:table-cell office:value-type="float" office:value="134" table:style-name="ce34">
            <text:p><text:s/>134<text:s/></text:p>
          </table:table-cell>
          <table:table-cell office:value-type="float" office:value="3287" table:style-name="ce34">
            <text:p><text:s/>3,287<text:s/></text:p>
          </table:table-cell>
          <table:covered-table-cell/>
          <table:table-cell office:value-type="float" office:value="4166" table:formula="of:=SUM([.E266:.J266])" table:style-name="ce123">
            <text:p><text:s/>4,166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44" table:formula="of:=SUM([.E265:.E266])" table:style-name="ce153">
            <text:p><text:s/>44<text:s/></text:p>
          </table:table-cell>
          <table:table-cell office:value-type="float" office:value="34" table:formula="of:=SUM([.F265:.F266])" table:style-name="ce153">
            <text:p><text:s/>34<text:s/></text:p>
          </table:table-cell>
          <table:table-cell office:value-type="float" office:value="737" table:formula="of:=SUM([.G265:.G266])" table:style-name="ce153">
            <text:p><text:s/>737<text:s/></text:p>
          </table:table-cell>
          <table:table-cell office:value-type="float" office:value="161" table:formula="of:=SUM([.H265:.H266])" table:style-name="ce153">
            <text:p><text:s/>161<text:s/></text:p>
          </table:table-cell>
          <table:table-cell office:value-type="float" office:value="3305" table:formula="of:=SUM([.I265:.I266])" table:style-name="ce153">
            <text:p><text:s/>3,305<text:s/></text:p>
          </table:table-cell>
          <table:covered-table-cell/>
          <table:table-cell office:value-type="float" office:value="4281" table:formula="of:=SUM([.K265:.K266])" table:style-name="ce155">
            <text:p><text:s/>4,281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20 Total</text:p>
          </table:table-cell>
          <table:table-cell table:number-columns-repeated="2" table:style-name="ce82"/>
          <table:table-cell office:value-type="float" office:value="2600" table:formula="of:=+[.E267]+[.E264]+[.E257]" table:style-name="ce168">
            <text:p><text:s/>2,600<text:s/></text:p>
          </table:table-cell>
          <table:table-cell office:value-type="float" office:value="1686" table:formula="of:=+[.F267]+[.F264]+[.F257]" table:style-name="ce168">
            <text:p><text:s/>1,686<text:s/></text:p>
          </table:table-cell>
          <table:table-cell office:value-type="float" office:value="10227" table:formula="of:=+[.G267]+[.G264]+[.G257]" table:style-name="ce168">
            <text:p><text:s/>10,227<text:s/></text:p>
          </table:table-cell>
          <table:table-cell office:value-type="float" office:value="4182" table:formula="of:=+[.H267]+[.H264]+[.H257]" table:style-name="ce168">
            <text:p><text:s/>4,182<text:s/></text:p>
          </table:table-cell>
          <table:table-cell office:value-type="float" office:value="9000" table:formula="of:=+[.I267]+[.I264]+[.I257]" table:style-name="ce168">
            <text:p><text:s/>9,000<text:s/></text:p>
          </table:table-cell>
          <table:table-cell table:style-name="ce169"/>
          <table:table-cell office:value-type="float" office:value="27695" table:formula="of:=+[.K267]+[.K264]+[.K257]" table:style-name="ce125">
            <text:p><text:s/>27,695<text:s/></text:p>
          </table:table-cell>
          <table:table-cell table:number-columns-repeated="16373"/>
        </table:table-row>
        <table:table-row table:style-name="ro22">
          <table:table-cell/>
          <table:table-cell office:value-type="float" office:value="2021" table:number-columns-spanned="1" table:number-rows-spanned="13" table:style-name="ce408">
            <text:p>2021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350" table:style-name="ce120">
            <text:p><text:s/>350<text:s/>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2140" table:style-name="ce28">
            <text:p><text:s/>2,140<text:s/></text:p>
          </table:table-cell>
          <table:table-cell office:value-type="float" office:value="885" table:style-name="ce28">
            <text:p><text:s/>885<text:s/></text:p>
          </table:table-cell>
          <table:table-cell office:value-type="float" office:value="1667" table:style-name="ce133">
            <text:p><text:s/>1,667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392" table:formula="of:=SUM([.E269:.J269])" table:style-name="ce123">
            <text:p><text:s/>5,392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78" table:style-name="ce35">
            <text:p><text:s/>78<text:s/></text:p>
          </table:table-cell>
          <table:table-cell office:value-type="float" office:value="45" table:style-name="ce34">
            <text:p><text:s/>45<text:s/></text:p>
          </table:table-cell>
          <table:table-cell office:value-type="float" office:value="256" table:style-name="ce34">
            <text:p><text:s/>256<text:s/></text:p>
          </table:table-cell>
          <table:table-cell office:value-type="float" office:value="112" table:style-name="ce34">
            <text:p><text:s/>112<text:s/></text:p>
          </table:table-cell>
          <table:table-cell office:value-type="float" office:value="128" table:style-name="ce36">
            <text:p><text:s/>128<text:s/></text:p>
          </table:table-cell>
          <table:covered-table-cell/>
          <table:table-cell office:value-type="float" office:value="619" table:formula="of:=SUM([.E270:.J270])" table:style-name="ce123">
            <text:p><text:s/>61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428" table:formula="of:=SUM([.E269:.E270])" table:style-name="ce152">
            <text:p><text:s/>428<text:s/></text:p>
          </table:table-cell>
          <table:table-cell office:value-type="float" office:value="395" table:formula="of:=SUM([.F269:.F270])" table:style-name="ce153">
            <text:p><text:s/>395<text:s/></text:p>
          </table:table-cell>
          <table:table-cell office:value-type="float" office:value="2396" table:formula="of:=SUM([.G269:.G270])" table:style-name="ce153">
            <text:p><text:s/>2,396<text:s/></text:p>
          </table:table-cell>
          <table:table-cell office:value-type="float" office:value="997" table:formula="of:=SUM([.H269:.H270])" table:style-name="ce153">
            <text:p><text:s/>997<text:s/></text:p>
          </table:table-cell>
          <table:table-cell office:value-type="float" office:value="1795" table:formula="of:=SUM([.I269:.I270])" table:style-name="ce154">
            <text:p><text:s/>1,795<text:s/></text:p>
          </table:table-cell>
          <table:covered-table-cell/>
          <table:table-cell office:value-type="float" office:value="6011" table:formula="of:=SUM([.K269:.K270])" table:style-name="ce154">
            <text:p><text:s/>6,0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230" table:style-name="ce120">
            <text:p><text:s/>230<text:s/></text:p>
          </table:table-cell>
          <table:table-cell office:value-type="float" office:value="102" table:style-name="ce28">
            <text:p><text:s/>102<text:s/></text:p>
          </table:table-cell>
          <table:table-cell office:value-type="float" office:value="641" table:style-name="ce28">
            <text:p><text:s/>641<text:s/></text:p>
          </table:table-cell>
          <table:table-cell office:value-type="float" office:value="720" table:style-name="ce28">
            <text:p><text:s/>720<text:s/></text:p>
          </table:table-cell>
          <table:table-cell office:value-type="float" office:value="158" table:style-name="ce133">
            <text:p><text:s/>158<text:s/></text:p>
          </table:table-cell>
          <table:covered-table-cell/>
          <table:table-cell office:value-type="float" office:value="1851" table:formula="of:=SUM([.E272:.J272])" table:style-name="ce123">
            <text:p><text:s/>1,85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872" table:style-name="ce35">
            <text:p><text:s/>872<text:s/></text:p>
          </table:table-cell>
          <table:table-cell office:value-type="float" office:value="702" table:style-name="ce34">
            <text:p><text:s/>702<text:s/></text:p>
          </table:table-cell>
          <table:table-cell office:value-type="float" office:value="1918" table:style-name="ce34">
            <text:p><text:s/>1,918<text:s/></text:p>
          </table:table-cell>
          <table:table-cell office:value-type="float" office:value="1149" table:style-name="ce34">
            <text:p><text:s/>1,149<text:s/></text:p>
          </table:table-cell>
          <table:table-cell office:value-type="float" office:value="1146" table:style-name="ce36">
            <text:p><text:s/>1,146<text:s/></text:p>
          </table:table-cell>
          <table:covered-table-cell/>
          <table:table-cell office:value-type="float" office:value="5787" table:formula="of:=SUM([.E273:.J273])" table:style-name="ce123">
            <text:p><text:s/>5,78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216" table:style-name="ce35">
            <text:p><text:s/>216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75" table:style-name="ce34">
            <text:p><text:s/>475<text:s/></text:p>
          </table:table-cell>
          <table:table-cell office:value-type="float" office:value="590" table:style-name="ce34">
            <text:p><text:s/>590<text:s/></text:p>
          </table:table-cell>
          <table:table-cell office:value-type="float" office:value="559" table:style-name="ce36">
            <text:p><text:s/>559<text:s/></text:p>
          </table:table-cell>
          <table:covered-table-cell/>
          <table:table-cell office:value-type="float" office:value="1840" table:formula="of:=SUM([.E274:.J274])" table:style-name="ce123">
            <text:p><text:s/>1,84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27" table:style-name="ce35">
            <text:p><text:s/>27<text:s/></text:p>
          </table:table-cell>
          <table:table-cell office:value-type="float" office:value="18" table:style-name="ce34">
            <text:p><text:s/>18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3" table:style-name="ce36">
            <text:p><text:s/>43<text:s/></text:p>
          </table:table-cell>
          <table:covered-table-cell/>
          <table:table-cell office:value-type="float" office:value="88" table:formula="of:=SUM([.E275:.J275])" table:style-name="ce123">
            <text:p><text:s/>8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96" table:style-name="ce35">
            <text:p><text:s/>196<text:s/></text:p>
          </table:table-cell>
          <table:table-cell office:value-type="float" office:value="99" table:style-name="ce34">
            <text:p><text:s/>99<text:s/></text:p>
          </table:table-cell>
          <table:table-cell office:value-type="float" office:value="223" table:style-name="ce34">
            <text:p><text:s/>223<text:s/></text:p>
          </table:table-cell>
          <table:table-cell office:value-type="float" office:value="224" table:style-name="ce34">
            <text:p><text:s/>224<text:s/></text:p>
          </table:table-cell>
          <table:table-cell office:value-type="float" office:value="106" table:style-name="ce36">
            <text:p><text:s/>106<text:s/></text:p>
          </table:table-cell>
          <table:covered-table-cell/>
          <table:table-cell office:value-type="float" office:value="848" table:formula="of:=SUM([.E276:.J276])" table:style-name="ce123">
            <text:p><text:s/>848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758" table:style-name="ce39">
            <text:p><text:s/>758<text:s/></text:p>
          </table:table-cell>
          <table:table-cell office:value-type="float" office:value="156" table:style-name="ce40">
            <text:p><text:s/>156<text:s/></text:p>
          </table:table-cell>
          <table:table-cell office:value-type="float" office:value="4690" table:style-name="ce40">
            <text:p><text:s/>4,690<text:s/></text:p>
          </table:table-cell>
          <table:table-cell office:value-type="float" office:value="784" table:style-name="ce40">
            <text:p><text:s/>784<text:s/></text:p>
          </table:table-cell>
          <table:table-cell office:value-type="float" office:value="3246" table:style-name="ce41">
            <text:p><text:s/>3,246<text:s/></text:p>
          </table:table-cell>
          <table:covered-table-cell/>
          <table:table-cell office:value-type="float" office:value="9634" table:formula="of:=SUM([.E277:.J277])" table:style-name="ce123">
            <text:p><text:s/>9,63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2299" table:formula="of:=SUM([.E272:.E277])" table:style-name="ce152">
            <text:p><text:s/>2,299<text:s/></text:p>
          </table:table-cell>
          <table:table-cell office:value-type="float" office:value="1077" table:formula="of:=SUM([.F272:.F277])" table:style-name="ce153">
            <text:p><text:s/>1,077<text:s/></text:p>
          </table:table-cell>
          <table:table-cell office:value-type="float" office:value="7947" table:formula="of:=SUM([.G272:.G277])" table:style-name="ce153">
            <text:p><text:s/>7,947<text:s/></text:p>
          </table:table-cell>
          <table:table-cell office:value-type="float" office:value="3467" table:formula="of:=SUM([.H272:.H277])" table:style-name="ce153">
            <text:p><text:s/>3,467<text:s/></text:p>
          </table:table-cell>
          <table:table-cell office:value-type="float" office:value="5258" table:formula="of:=SUM([.I272:.I277])" table:style-name="ce154">
            <text:p><text:s/>5,258<text:s/></text:p>
          </table:table-cell>
          <table:covered-table-cell/>
          <table:table-cell office:value-type="float" office:value="20048" table:formula="of:=SUM([.K272:.K277])" table:style-name="ce154">
            <text:p><text:s/>20,04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3.5367999999999999" table:style-name="ce120">
            <text:p><text:s/>4<text:s/></text:p>
          </table:table-cell>
          <table:table-cell office:value-type="float" office:value="27.858899000000001" table:style-name="ce34">
            <text:p><text:s/>28<text:s/></text:p>
          </table:table-cell>
          <table:table-cell office:value-type="float" office:value="110.5635185" table:style-name="ce34">
            <text:p><text:s/>111<text:s/></text:p>
          </table:table-cell>
          <table:table-cell office:value-type="float" office:value="43.718136999999999" table:style-name="ce34">
            <text:p><text:s/>44<text:s/></text:p>
          </table:table-cell>
          <table:table-cell office:value-type="float" office:value="41.797879999999999" table:style-name="ce34">
            <text:p><text:s/>42<text:s/></text:p>
          </table:table-cell>
          <table:covered-table-cell/>
          <table:table-cell office:value-type="float" office:value="227.47523449999997" table:formula="of:=SUM([.E279:.J279])" table:style-name="ce123">
            <text:p><text:s/>22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297.42878000000002" table:style-name="ce39">
            <text:p><text:s/>297<text:s/></text:p>
          </table:table-cell>
          <table:table-cell office:value-type="float" office:value="18.128558999999999" table:style-name="ce34">
            <text:p><text:s/>18<text:s/></text:p>
          </table:table-cell>
          <table:table-cell office:value-type="float" office:value="689.38210795600003" table:style-name="ce34">
            <text:p><text:s/>689<text:s/></text:p>
          </table:table-cell>
          <table:table-cell office:value-type="float" office:value="159.08176599999999" table:style-name="ce34">
            <text:p><text:s/>159<text:s/></text:p>
          </table:table-cell>
          <table:table-cell office:value-type="float" office:value="2353.029997999" table:style-name="ce34">
            <text:p><text:s/>2,353<text:s/></text:p>
          </table:table-cell>
          <table:covered-table-cell/>
          <table:table-cell office:value-type="float" office:value="3517.051210955" table:formula="of:=SUM([.E280:.J280])" table:style-name="ce123">
            <text:p><text:s/>3,51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300.96558000000005" table:formula="of:=SUM([.E279:.E280])" table:style-name="ce153">
            <text:p><text:s/>301<text:s/></text:p>
          </table:table-cell>
          <table:table-cell office:value-type="float" office:value="45.987458000000004" table:formula="of:=SUM([.F279:.F280])" table:style-name="ce153">
            <text:p><text:s/>46<text:s/></text:p>
          </table:table-cell>
          <table:table-cell office:value-type="float" office:value="799.94562645600001" table:formula="of:=SUM([.G279:.G280])" table:style-name="ce153">
            <text:p><text:s/>800<text:s/></text:p>
          </table:table-cell>
          <table:table-cell office:value-type="float" office:value="202.79990299999997" table:formula="of:=SUM([.H279:.H280])" table:style-name="ce153">
            <text:p><text:s/>203<text:s/></text:p>
          </table:table-cell>
          <table:table-cell office:value-type="float" office:value="2394.8278779990001" table:formula="of:=SUM([.I279:.I280])" table:style-name="ce153">
            <text:p><text:s/>2,395<text:s/></text:p>
          </table:table-cell>
          <table:covered-table-cell/>
          <table:table-cell office:value-type="float" office:value="3744.5264454550002" table:formula="of:=SUM([.K279:.K280])" table:style-name="ce155">
            <text:p><text:s/>3,745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21 Total</text:p>
          </table:table-cell>
          <table:table-cell table:number-columns-repeated="2" table:style-name="ce82"/>
          <table:table-cell office:value-type="float" office:value="3027.96558" table:formula="of:=+[.E281]+[.E278]+[.E271]" table:style-name="ce168">
            <text:p><text:s/>3,028<text:s/></text:p>
          </table:table-cell>
          <table:table-cell office:value-type="float" office:value="1517.9874580000001" table:formula="of:=+[.F281]+[.F278]+[.F271]" table:style-name="ce168">
            <text:p><text:s/>1,518<text:s/></text:p>
          </table:table-cell>
          <table:table-cell office:value-type="float" office:value="11142.945626455999" table:formula="of:=+[.G281]+[.G278]+[.G271]" table:style-name="ce168">
            <text:p><text:s/>11,143<text:s/></text:p>
          </table:table-cell>
          <table:table-cell office:value-type="float" office:value="4666.7999030000001" table:formula="of:=+[.H281]+[.H278]+[.H271]" table:style-name="ce168">
            <text:p><text:s/>4,667<text:s/></text:p>
          </table:table-cell>
          <table:table-cell office:value-type="float" office:value="9447.8278779989996" table:formula="of:=+[.I281]+[.I278]+[.I271]" table:style-name="ce168">
            <text:p><text:s/>9,448<text:s/></text:p>
          </table:table-cell>
          <table:table-cell table:style-name="ce169"/>
          <table:table-cell office:value-type="float" office:value="29803.526445455002" table:formula="of:=+[.K281]+[.K278]+[.K271]" table:style-name="ce125">
            <text:p><text:s/>29,804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2" table:number-columns-spanned="1" table:number-rows-spanned="13" table:style-name="ce408">
            <text:p>2022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303" table:style-name="ce120">
            <text:p><text:s/>303<text:s/></text:p>
          </table:table-cell>
          <table:table-cell office:value-type="float" office:value="404" table:style-name="ce28">
            <text:p><text:s/>404<text:s/></text:p>
          </table:table-cell>
          <table:table-cell office:value-type="float" office:value="1915" table:style-name="ce28">
            <text:p><text:s/>1,915<text:s/></text:p>
          </table:table-cell>
          <table:table-cell office:value-type="float" office:value="804" table:style-name="ce28">
            <text:p><text:s/>804<text:s/></text:p>
          </table:table-cell>
          <table:table-cell office:value-type="float" office:value="1550" table:style-name="ce133">
            <text:p><text:s/>1,550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4975" table:style-name="ce123">
            <text:p><text:s/>4,97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74" table:style-name="ce35">
            <text:p><text:s/>74<text:s/></text:p>
          </table:table-cell>
          <table:table-cell office:value-type="float" office:value="47" table:style-name="ce34">
            <text:p><text:s/>47<text:s/></text:p>
          </table:table-cell>
          <table:table-cell office:value-type="float" office:value="191" table:style-name="ce34">
            <text:p><text:s/>191<text:s/></text:p>
          </table:table-cell>
          <table:table-cell office:value-type="float" office:value="117" table:style-name="ce34">
            <text:p><text:s/>117<text:s/></text:p>
          </table:table-cell>
          <table:table-cell office:value-type="float" office:value="118" table:style-name="ce36">
            <text:p><text:s/>118<text:s/></text:p>
          </table:table-cell>
          <table:covered-table-cell/>
          <table:table-cell office:value-type="float" office:value="547" table:formula="of:=SUM([.E284:.J284])" table:style-name="ce123">
            <text:p><text:s/>5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377" table:formula="of:=SUM([.E283:.E284])" table:style-name="ce152">
            <text:p><text:s/>377<text:s/></text:p>
          </table:table-cell>
          <table:table-cell office:value-type="float" office:value="451" table:formula="of:=SUM([.F283:.F284])" table:style-name="ce153">
            <text:p><text:s/>451<text:s/></text:p>
          </table:table-cell>
          <table:table-cell office:value-type="float" office:value="2106" table:formula="of:=SUM([.G283:.G284])" table:style-name="ce153">
            <text:p><text:s/>2,106<text:s/></text:p>
          </table:table-cell>
          <table:table-cell office:value-type="float" office:value="921" table:formula="of:=SUM([.H283:.H284])" table:style-name="ce153">
            <text:p><text:s/>921<text:s/></text:p>
          </table:table-cell>
          <table:table-cell office:value-type="float" office:value="1668" table:formula="of:=SUM([.I283:.I284])" table:style-name="ce154">
            <text:p><text:s/>1,668<text:s/></text:p>
          </table:table-cell>
          <table:covered-table-cell/>
          <table:table-cell office:value-type="float" office:value="5522" table:formula="of:=SUM([.K283:.K284])" table:style-name="ce154">
            <text:p><text:s/>5,522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267" table:style-name="ce120">
            <text:p><text:s/>267<text:s/></text:p>
          </table:table-cell>
          <table:table-cell office:value-type="float" office:value="116" table:style-name="ce28">
            <text:p><text:s/>116<text:s/></text:p>
          </table:table-cell>
          <table:table-cell office:value-type="float" office:value="527" table:style-name="ce28">
            <text:p><text:s/>527<text:s/></text:p>
          </table:table-cell>
          <table:table-cell office:value-type="float" office:value="693" table:style-name="ce28">
            <text:p><text:s/>693<text:s/></text:p>
          </table:table-cell>
          <table:table-cell office:value-type="float" office:value="147" table:style-name="ce133">
            <text:p><text:s/>147<text:s/></text:p>
          </table:table-cell>
          <table:covered-table-cell/>
          <table:table-cell office:value-type="float" office:value="1750" table:formula="of:=SUM([.E286:.J286])" table:style-name="ce123">
            <text:p><text:s/>1,750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842" table:style-name="ce35">
            <text:p><text:s/>842<text:s/></text:p>
          </table:table-cell>
          <table:table-cell office:value-type="float" office:value="735" table:style-name="ce34">
            <text:p><text:s/>735<text:s/></text:p>
          </table:table-cell>
          <table:table-cell office:value-type="float" office:value="2037" table:style-name="ce34">
            <text:p><text:s/>2,037<text:s/></text:p>
          </table:table-cell>
          <table:table-cell office:value-type="float" office:value="1156" table:style-name="ce34">
            <text:p><text:s/>1,156<text:s/></text:p>
          </table:table-cell>
          <table:table-cell office:value-type="float" office:value="1064" table:style-name="ce36">
            <text:p><text:s/>1,064<text:s/></text:p>
          </table:table-cell>
          <table:covered-table-cell/>
          <table:table-cell office:value-type="float" office:value="5833" table:style-name="ce123">
            <text:p><text:s/>5,83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250" table:style-name="ce35">
            <text:p><text:s/>250<text:s/></text:p>
          </table:table-cell>
          <table:table-cell office:value-type="float" office:value="6" table:style-name="ce34">
            <text:p><text:s/>6<text:s/></text:p>
          </table:table-cell>
          <table:table-cell office:value-type="float" office:value="482" table:style-name="ce34">
            <text:p><text:s/>482<text:s/></text:p>
          </table:table-cell>
          <table:table-cell office:value-type="float" office:value="612" table:style-name="ce34">
            <text:p><text:s/>612<text:s/></text:p>
          </table:table-cell>
          <table:table-cell office:value-type="float" office:value="561" table:style-name="ce36">
            <text:p><text:s/>561<text:s/></text:p>
          </table:table-cell>
          <table:covered-table-cell/>
          <table:table-cell office:value-type="float" office:value="1911" table:formula="of:=SUM([.E288:.J288])" table:style-name="ce123">
            <text:p><text:s/>1,9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27" table:style-name="ce35">
            <text:p><text:s/>27<text:s/></text:p>
          </table:table-cell>
          <table:table-cell office:value-type="float" office:value="25" table:style-name="ce34">
            <text:p><text:s/>25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5" table:style-name="ce36">
            <text:p><text:s/>25<text:s/></text:p>
          </table:table-cell>
          <table:covered-table-cell/>
          <table:table-cell office:value-type="float" office:value="77" table:formula="of:=SUM([.E289:.J289])" table:style-name="ce123">
            <text:p><text:s/>7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94" table:style-name="ce35">
            <text:p><text:s/>194<text:s/></text:p>
          </table:table-cell>
          <table:table-cell office:value-type="float" office:value="106" table:style-name="ce34">
            <text:p><text:s/>106<text:s/></text:p>
          </table:table-cell>
          <table:table-cell office:value-type="float" office:value="219" table:style-name="ce34">
            <text:p><text:s/>219<text:s/></text:p>
          </table:table-cell>
          <table:table-cell office:value-type="float" office:value="123" table:style-name="ce34">
            <text:p><text:s/>123<text:s/></text:p>
          </table:table-cell>
          <table:table-cell office:value-type="float" office:value="104" table:style-name="ce36">
            <text:p><text:s/>104<text:s/></text:p>
          </table:table-cell>
          <table:covered-table-cell/>
          <table:table-cell office:value-type="float" office:value="747" table:style-name="ce123">
            <text:p><text:s/>747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943" table:style-name="ce39">
            <text:p><text:s/>943<text:s/></text:p>
          </table:table-cell>
          <table:table-cell office:value-type="float" office:value="121" table:style-name="ce40">
            <text:p><text:s/>121<text:s/></text:p>
          </table:table-cell>
          <table:table-cell office:value-type="float" office:value="4598" table:style-name="ce40">
            <text:p><text:s/>4,598<text:s/></text:p>
          </table:table-cell>
          <table:table-cell office:value-type="float" office:value="765" table:style-name="ce40">
            <text:p><text:s/>765<text:s/></text:p>
          </table:table-cell>
          <table:table-cell office:value-type="float" office:value="1843" table:style-name="ce41">
            <text:p><text:s/>1,843<text:s/></text:p>
          </table:table-cell>
          <table:covered-table-cell/>
          <table:table-cell office:value-type="float" office:value="8270" table:formula="of:=SUM([.E291:.J291])" table:style-name="ce123">
            <text:p><text:s/>8,270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2523" table:formula="of:=SUM([.E286:.E291])" table:style-name="ce152">
            <text:p><text:s/>2,523<text:s/></text:p>
          </table:table-cell>
          <table:table-cell office:value-type="float" office:value="1109" table:formula="of:=SUM([.F286:.F291])" table:style-name="ce153">
            <text:p><text:s/>1,109<text:s/></text:p>
          </table:table-cell>
          <table:table-cell office:value-type="float" office:value="7863" table:formula="of:=SUM([.G286:.G291])" table:style-name="ce153">
            <text:p><text:s/>7,863<text:s/></text:p>
          </table:table-cell>
          <table:table-cell office:value-type="float" office:value="3349" table:formula="of:=SUM([.H286:.H291])" table:style-name="ce153">
            <text:p><text:s/>3,349<text:s/></text:p>
          </table:table-cell>
          <table:table-cell office:value-type="float" office:value="3744" table:formula="of:=SUM([.I286:.I291])" table:style-name="ce154">
            <text:p><text:s/>3,744<text:s/></text:p>
          </table:table-cell>
          <table:covered-table-cell/>
          <table:table-cell office:value-type="float" office:value="18588" table:formula="of:=SUM([.K286:.K291])" table:style-name="ce154">
            <text:p><text:s/>18,588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1" table:style-name="ce120">
            <text:p><text:s/>1<text:s/></text:p>
          </table:table-cell>
          <table:table-cell office:value-type="float" office:value="10" table:style-name="ce34">
            <text:p><text:s/>10<text:s/></text:p>
          </table:table-cell>
          <table:table-cell office:value-type="float" office:value="57" table:style-name="ce34">
            <text:p><text:s/>57<text:s/></text:p>
          </table:table-cell>
          <table:table-cell office:value-type="float" office:value="41" table:style-name="ce34">
            <text:p><text:s/>41<text:s/></text:p>
          </table:table-cell>
          <table:table-cell office:value-type="float" office:value="14" table:style-name="ce34">
            <text:p><text:s/>14<text:s/></text:p>
          </table:table-cell>
          <table:covered-table-cell/>
          <table:table-cell office:value-type="float" office:value="123" table:formula="of:=SUM([.E293:.J293])" table:style-name="ce123">
            <text:p><text:s/>123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21" table:style-name="ce39">
            <text:p><text:s/>21<text:s/></text:p>
          </table:table-cell>
          <table:table-cell office:value-type="float" office:value="34" table:style-name="ce34">
            <text:p><text:s/>34<text:s/></text:p>
          </table:table-cell>
          <table:table-cell office:value-type="float" office:value="741" table:style-name="ce34">
            <text:p><text:s/>741<text:s/></text:p>
          </table:table-cell>
          <table:table-cell office:value-type="float" office:value="143" table:style-name="ce34">
            <text:p><text:s/>143<text:s/></text:p>
          </table:table-cell>
          <table:table-cell office:value-type="float" office:value="2509" table:style-name="ce34">
            <text:p><text:s/>2,509<text:s/></text:p>
          </table:table-cell>
          <table:covered-table-cell/>
          <table:table-cell office:value-type="float" office:value="3449" table:style-name="ce123">
            <text:p><text:s/>3,449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22" table:formula="of:=SUM([.E293:.E294])" table:style-name="ce153">
            <text:p><text:s/>22<text:s/></text:p>
          </table:table-cell>
          <table:table-cell office:value-type="float" office:value="44" table:formula="of:=SUM([.F293:.F294])" table:style-name="ce153">
            <text:p><text:s/>44<text:s/></text:p>
          </table:table-cell>
          <table:table-cell office:value-type="float" office:value="798" table:formula="of:=SUM([.G293:.G294])" table:style-name="ce153">
            <text:p><text:s/>798<text:s/></text:p>
          </table:table-cell>
          <table:table-cell office:value-type="float" office:value="184" table:formula="of:=SUM([.H293:.H294])" table:style-name="ce153">
            <text:p><text:s/>184<text:s/></text:p>
          </table:table-cell>
          <table:table-cell office:value-type="float" office:value="2523" table:formula="of:=SUM([.I293:.I294])" table:style-name="ce153">
            <text:p><text:s/>2,523<text:s/></text:p>
          </table:table-cell>
          <table:covered-table-cell/>
          <table:table-cell office:value-type="float" office:value="3572" table:formula="of:=SUM([.K293:.K294])" table:style-name="ce155">
            <text:p><text:s/>3,57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22 Total</text:p>
          </table:table-cell>
          <table:table-cell table:number-columns-repeated="2" table:style-name="ce82"/>
          <table:table-cell office:value-type="float" office:value="2922" table:formula="of:=+[.E295]+[.E292]+[.E285]" table:style-name="ce168">
            <text:p><text:s/>2,922<text:s/></text:p>
          </table:table-cell>
          <table:table-cell office:value-type="float" office:value="1604" table:formula="of:=+[.F295]+[.F292]+[.F285]" table:style-name="ce168">
            <text:p><text:s/>1,604<text:s/></text:p>
          </table:table-cell>
          <table:table-cell office:value-type="float" office:value="10767" table:formula="of:=+[.G295]+[.G292]+[.G285]" table:style-name="ce168">
            <text:p><text:s/>10,767<text:s/></text:p>
          </table:table-cell>
          <table:table-cell office:value-type="float" office:value="4454" table:formula="of:=+[.H295]+[.H292]+[.H285]" table:style-name="ce168">
            <text:p><text:s/>4,454<text:s/></text:p>
          </table:table-cell>
          <table:table-cell office:value-type="float" office:value="7935" table:formula="of:=+[.I295]+[.I292]+[.I285]" table:style-name="ce168">
            <text:p><text:s/>7,935<text:s/></text:p>
          </table:table-cell>
          <table:table-cell table:style-name="ce169"/>
          <table:table-cell office:value-type="float" office:value="27682" table:formula="of:=+[.K295]+[.K292]+[.K285]" table:style-name="ce125">
            <text:p><text:s/>27,682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3" table:number-columns-spanned="1" table:number-rows-spanned="13" table:style-name="ce408">
            <text:p>2023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314" table:style-name="ce120">
            <text:p><text:s/>314<text:s/></text:p>
          </table:table-cell>
          <table:table-cell office:value-type="float" office:value="712" table:style-name="ce28">
            <text:p><text:s/>712<text:s/></text:p>
          </table:table-cell>
          <table:table-cell office:value-type="float" office:value="1936" table:style-name="ce28">
            <text:p><text:s/>1,936<text:s/></text:p>
          </table:table-cell>
          <table:table-cell office:value-type="float" office:value="1303" table:style-name="ce28">
            <text:p><text:s/>1,303<text:s/></text:p>
          </table:table-cell>
          <table:table-cell office:value-type="float" office:value="1580" table:style-name="ce133">
            <text:p><text:s/>1,580<text:s/>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845" table:style-name="ce123">
            <text:p><text:s/>5,845<text:s/>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80373.520999999993" table:style-name="ce319">
            <text:p><text:s text:c="2"/>80</text:p>
          </table:table-cell>
          <table:table-cell office:value-type="float" office:value="48871.511599999998" table:style-name="ce300">
            <text:p><text:s text:c="2"/>49</text:p>
          </table:table-cell>
          <table:table-cell office:value-type="float" office:value="183284.91" table:style-name="ce300">
            <text:p><text:s text:c="2"/>183</text:p>
          </table:table-cell>
          <table:table-cell office:value-type="float" office:value="118193.33629399999" table:style-name="ce300">
            <text:p><text:s text:c="2"/>118</text:p>
          </table:table-cell>
          <table:table-cell office:value-type="float" office:value="118654.554" table:style-name="ce300">
            <text:p><text:s text:c="2"/>119</text:p>
          </table:table-cell>
          <table:covered-table-cell/>
          <table:table-cell office:value-type="float" office:value="549377.83289399999" table:formula="of:=SUM([.E298:.J298])" table:style-name="ce296">
            <text:p>549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394" table:style-name="ce344">
            <text:p>394</text:p>
          </table:table-cell>
          <table:table-cell office:value-type="float" office:value="761" table:style-name="ce345">
            <text:p>761</text:p>
          </table:table-cell>
          <table:table-cell office:value-type="float" office:value="2119" table:style-name="ce345">
            <text:p>2,119</text:p>
          </table:table-cell>
          <table:table-cell office:value-type="float" office:value="1421" table:style-name="ce345">
            <text:p>1,421</text:p>
          </table:table-cell>
          <table:table-cell office:value-type="float" office:value="1698" table:style-name="ce345">
            <text:p>1,698</text:p>
          </table:table-cell>
          <table:covered-table-cell/>
          <table:table-cell office:value-type="float" office:value="6394" table:style-name="ce154">
            <text:p><text:s/>6,394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310927.96000000002" table:style-name="ce318">
            <text:p><text:s text:c="2"/>311</text:p>
          </table:table-cell>
          <table:table-cell office:value-type="float" office:value="50572.11" table:style-name="ce321">
            <text:p><text:s text:c="2"/>51</text:p>
          </table:table-cell>
          <table:table-cell office:value-type="float" office:value="575559.7807" table:style-name="ce321">
            <text:p><text:s text:c="2"/>576</text:p>
          </table:table-cell>
          <table:table-cell office:value-type="float" office:value="655483.20349999995" table:style-name="ce322">
            <text:p><text:s text:c="2"/>655</text:p>
          </table:table-cell>
          <table:table-cell office:value-type="float" office:value="244217.43700000001" table:style-name="ce323">
            <text:p><text:s text:c="2"/>244</text:p>
          </table:table-cell>
          <table:covered-table-cell/>
          <table:table-cell office:value-type="float" office:value="1836760.4912" table:formula="of:=SUM([.E300:.J300])" table:style-name="ce296">
            <text:p>1,837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768322.26800000004" table:style-name="ce324">
            <text:p><text:s text:c="2"/>768</text:p>
          </table:table-cell>
          <table:table-cell office:value-type="float" office:value="682393.27" table:style-name="ce325">
            <text:p><text:s text:c="2"/>682</text:p>
          </table:table-cell>
          <table:table-cell office:value-type="float" office:value="2075739.4410999999" table:style-name="ce325">
            <text:p><text:s text:c="2"/>2,076</text:p>
          </table:table-cell>
          <table:table-cell office:value-type="float" office:value="1459591.2455" table:style-name="ce325">
            <text:p><text:s text:c="2"/>1,460</text:p>
          </table:table-cell>
          <table:table-cell office:value-type="float" office:value="1213280.852002" table:style-name="ce326">
            <text:p><text:s text:c="2"/>1,213</text:p>
          </table:table-cell>
          <table:covered-table-cell/>
          <table:table-cell office:value-type="float" office:value="5833" table:style-name="ce177">
            <text:p>5,833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215206.2745" table:style-name="ce327">
            <text:p><text:s text:c="2"/>215</text:p>
          </table:table-cell>
          <table:table-cell office:value-type="float" office:value="203.2" table:style-name="ce300">
            <text:p><text:s text:c="2"/>0</text:p>
          </table:table-cell>
          <table:table-cell office:value-type="float" office:value="689416.41480800102" table:style-name="ce300">
            <text:p><text:s text:c="2"/>689</text:p>
          </table:table-cell>
          <table:table-cell office:value-type="float" office:value="600605.17000000004" table:style-name="ce300">
            <text:p><text:s text:c="2"/>601</text:p>
          </table:table-cell>
          <table:table-cell office:value-type="float" office:value="626613.62500000105" table:style-name="ce300">
            <text:p><text:s text:c="2"/>627</text:p>
          </table:table-cell>
          <table:covered-table-cell/>
          <table:table-cell office:value-type="float" office:value="2132044.6843080022" table:formula="of:=SUM([.E302:.J302])" table:style-name="ce296">
            <text:p>2,132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12607.65" table:style-name="ce324">
            <text:p><text:s text:c="2"/>13</text:p>
          </table:table-cell>
          <table:table-cell office:value-type="float" office:value="28255.63" table:style-name="ce300">
            <text:p><text:s text:c="2"/>28</text:p>
          </table:table-cell>
          <table:table-cell office:value-type="float" office:value="75" table:style-name="ce297">
            <text:p>0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31074.403999999999" table:style-name="ce300">
            <text:p><text:s text:c="2"/>31</text:p>
          </table:table-cell>
          <table:covered-table-cell/>
          <table:table-cell office:value-type="float" office:value="72012.683999999994" table:formula="of:=SUM([.E303:.J303])" table:style-name="ce296">
            <text:p>72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198018.93599999999" table:style-name="ce328">
            <text:p><text:s text:c="2"/>198</text:p>
          </table:table-cell>
          <table:table-cell office:value-type="float" office:value="92469.56" table:style-name="ce300">
            <text:p><text:s text:c="2"/>92</text:p>
          </table:table-cell>
          <table:table-cell office:value-type="float" office:value="213724.95" table:style-name="ce300">
            <text:p><text:s text:c="2"/>214</text:p>
          </table:table-cell>
          <table:table-cell office:value-type="float" office:value="272117.88" table:style-name="ce300">
            <text:p><text:s text:c="2"/>272</text:p>
          </table:table-cell>
          <table:table-cell office:value-type="float" office:value="92000.35" table:style-name="ce300">
            <text:p><text:s text:c="2"/>92</text:p>
          </table:table-cell>
          <table:covered-table-cell/>
          <table:table-cell office:value-type="float" office:value="868" table:style-name="ce177">
            <text:p>868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716708.77" table:style-name="ce329">
            <text:p><text:s text:c="2"/>717</text:p>
          </table:table-cell>
          <table:table-cell office:value-type="float" office:value="160614.04999999999" table:style-name="ce330">
            <text:p><text:s text:c="2"/>161</text:p>
          </table:table-cell>
          <table:table-cell office:value-type="float" office:value="3662261.65" table:style-name="ce300">
            <text:p><text:s text:c="2"/>3,662</text:p>
          </table:table-cell>
          <table:table-cell office:value-type="float" office:value="805625.89" table:style-name="ce330">
            <text:p><text:s text:c="2"/>806</text:p>
          </table:table-cell>
          <table:table-cell office:value-type="float" office:value="3157587.82" table:style-name="ce331">
            <text:p><text:s text:c="2"/>3,158</text:p>
          </table:table-cell>
          <table:covered-table-cell/>
          <table:table-cell office:value-type="float" office:value="8502798.1799999997" table:formula="of:=SUM([.E305:.J305])" table:style-name="ce296">
            <text:p>8,503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2221791.8585000001" table:formula="of:=SUM([.E300:.E305])" table:style-name="ce343">
            <text:p>2,222</text:p>
          </table:table-cell>
          <table:table-cell office:value-type="float" office:value="1014507.8200000001" table:formula="of:=SUM([.F300:.F305])" table:style-name="ce346">
            <text:p>1,015</text:p>
          </table:table-cell>
          <table:table-cell office:value-type="float" office:value="7216777.2366080005" table:formula="of:=SUM([.G300:.G305])" table:style-name="ce346">
            <text:p>7,217</text:p>
          </table:table-cell>
          <table:table-cell office:value-type="float" office:value="3793423.389" table:formula="of:=SUM([.H300:.H305])" table:style-name="ce346">
            <text:p>3,793</text:p>
          </table:table-cell>
          <table:table-cell office:value-type="float" office:value="5364774.4880020004" table:formula="of:=SUM([.I300:.I305])" table:style-name="ce347">
            <text:p>5,365</text:p>
          </table:table-cell>
          <table:covered-table-cell/>
          <table:table-cell office:value-type="float" office:value="19611" table:style-name="ce154">
            <text:p><text:s/>19,611<text:s/>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1500.79" table:style-name="ce318">
            <text:p><text:s text:c="2"/>2</text:p>
          </table:table-cell>
          <table:table-cell office:value-type="float" office:value="10674.2827" table:style-name="ce300">
            <text:p><text:s text:c="2"/>11</text:p>
          </table:table-cell>
          <table:table-cell office:value-type="float" office:value="51291.089414000002" table:style-name="ce300">
            <text:p><text:s text:c="2"/>51</text:p>
          </table:table-cell>
          <table:table-cell office:value-type="float" office:value="57395.705000000002" table:style-name="ce300">
            <text:p><text:s text:c="2"/>57</text:p>
          </table:table-cell>
          <table:table-cell office:value-type="float" office:value="21336.651999999998" table:style-name="ce300">
            <text:p><text:s text:c="2"/>21</text:p>
          </table:table-cell>
          <table:covered-table-cell/>
          <table:table-cell office:value-type="float" office:value="142198.519114" table:formula="of:=SUM([.E307:.J307])" table:style-name="ce296">
            <text:p>142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23477.242999999999" table:style-name="ce319">
            <text:p><text:s text:c="2"/>23</text:p>
          </table:table-cell>
          <table:table-cell office:value-type="float" office:value="16019.678" table:style-name="ce300">
            <text:p><text:s text:c="2"/>16</text:p>
          </table:table-cell>
          <table:table-cell office:value-type="float" office:value="578194.85990399995" table:style-name="ce300">
            <text:p><text:s text:c="2"/>578</text:p>
          </table:table-cell>
          <table:table-cell office:value-type="float" office:value="137497.989998" table:style-name="ce300">
            <text:p><text:s text:c="2"/>137</text:p>
          </table:table-cell>
          <table:table-cell office:value-type="float" office:value="2094630.5648990001" table:style-name="ce300">
            <text:p><text:s text:c="2"/>2,095</text:p>
          </table:table-cell>
          <table:covered-table-cell/>
          <table:table-cell office:value-type="float" office:value="2850" table:style-name="ce177">
            <text:p>2,850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24978.032999999999" table:formula="of:=SUM([.E307:.E308])" table:style-name="ce346">
            <text:p>25</text:p>
          </table:table-cell>
          <table:table-cell office:value-type="float" office:value="26693.9607" table:formula="of:=SUM([.F307:.F308])" table:style-name="ce346">
            <text:p>27</text:p>
          </table:table-cell>
          <table:table-cell office:value-type="float" office:value="629485.949318" table:formula="of:=SUM([.G307:.G308])" table:style-name="ce346">
            <text:p>629</text:p>
          </table:table-cell>
          <table:table-cell office:value-type="float" office:value="194893.69499799999" table:formula="of:=SUM([.H307:.H308])" table:style-name="ce346">
            <text:p>195</text:p>
          </table:table-cell>
          <table:table-cell office:value-type="float" office:value="2115967.2168990001" table:formula="of:=SUM([.I307:.I308])" table:style-name="ce346">
            <text:p>2,116</text:p>
          </table:table-cell>
          <table:covered-table-cell/>
          <table:table-cell office:value-type="float" office:value="2992" table:style-name="ce155">
            <text:p><text:s/>2,992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23 Total</text:p>
          </table:table-cell>
          <table:table-cell table:number-columns-repeated="2" table:style-name="ce82"/>
          <table:table-cell office:value-type="float" office:value="2641" table:style-name="ce351">
            <text:p>2,641</text:p>
          </table:table-cell>
          <table:table-cell office:value-type="float" office:value="1803" table:style-name="ce351">
            <text:p>1,803</text:p>
          </table:table-cell>
          <table:table-cell office:value-type="float" office:value="9965" table:style-name="ce351">
            <text:p>9,965</text:p>
          </table:table-cell>
          <table:table-cell office:value-type="float" office:value="5409" table:style-name="ce351">
            <text:p>5,409</text:p>
          </table:table-cell>
          <table:table-cell office:value-type="float" office:value="9179" table:style-name="ce351">
            <text:p>9,179</text:p>
          </table:table-cell>
          <table:table-cell table:style-name="ce169"/>
          <table:table-cell office:value-type="float" office:value="28997" table:formula="of:=+[.K309]+[.K306]+[.K299]" table:style-name="ce125">
            <text:p><text:s/>28,997<text:s/>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2024" table:number-columns-spanned="1" table:number-rows-spanned="13" table:style-name="ce408">
            <text:p>2024</text:p>
          </table:table-cell>
          <table:table-cell office:value-type="string" table:number-columns-spanned="1" table:number-rows-spanned="2" table:style-name="ce419">
            <text:p>Transfer</text:p>
          </table:table-cell>
          <table:table-cell office:value-type="string" table:style-name="ce157">
            <text:p>Transfer</text:p>
          </table:table-cell>
          <table:table-cell office:value-type="float" office:value="376000" table:style-name="ce356">
            <text:p>376</text:p>
          </table:table-cell>
          <table:table-cell office:value-type="float" office:value="651000" table:style-name="ce393">
            <text:p>651</text:p>
          </table:table-cell>
          <table:table-cell office:value-type="float" office:value="2017000" table:style-name="ce393">
            <text:p>2,017</text:p>
          </table:table-cell>
          <table:table-cell office:value-type="float" office:value="1085000" table:style-name="ce393">
            <text:p>1,085</text:p>
          </table:table-cell>
          <table:table-cell office:value-type="float" office:value="1734000" table:style-name="ce394">
            <text:p>1,734</text:p>
          </table:table-cell>
          <table:table-cell office:value-type="string" table:number-columns-spanned="1" table:number-rows-spanned="13" table:style-name="ce420">
            <text:p>See Table Note</text:p>
          </table:table-cell>
          <table:table-cell office:value-type="float" office:value="5863000" table:formula="of:=SUM([.E311:.J311])" table:style-name="ce296">
            <text:p>5,863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71">
            <text:p>Civic amenity</text:p>
          </table:table-cell>
          <table:table-cell office:value-type="float" office:value="85887.582000000009" table:style-name="ce333">
            <text:p><text:s text:c="2"/>86</text:p>
          </table:table-cell>
          <table:table-cell office:value-type="float" office:value="51210.404371000011" table:style-name="ce300">
            <text:p><text:s text:c="2"/>51</text:p>
          </table:table-cell>
          <table:table-cell office:value-type="float" office:value="172561.63" table:style-name="ce300">
            <text:p><text:s text:c="2"/>173</text:p>
          </table:table-cell>
          <table:table-cell office:value-type="float" office:value="136480.464355" table:style-name="ce300">
            <text:p><text:s text:c="2"/>136</text:p>
          </table:table-cell>
          <table:table-cell office:value-type="float" office:value="122053.01909999999" table:style-name="ce300">
            <text:p><text:s text:c="2"/>122</text:p>
          </table:table-cell>
          <table:covered-table-cell/>
          <table:table-cell office:value-type="float" office:value="568193.09982600005" table:formula="of:=SUM([.E312:.J312])" table:style-name="ce296">
            <text:p>568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ansfer Total</text:p>
          </table:table-cell>
          <table:table-cell table:style-name="ce151"/>
          <table:table-cell office:value-type="float" office:value="461887.58199999999" table:formula="of:=+SUM([.E311:.E312])" table:style-name="ce343">
            <text:p>462</text:p>
          </table:table-cell>
          <table:table-cell office:value-type="float" office:value="702210.40437100001" table:formula="of:=+SUM([.F311:.F312])" table:style-name="ce346">
            <text:p>702</text:p>
          </table:table-cell>
          <table:table-cell office:value-type="float" office:value="2189561.63" table:formula="of:=+SUM([.G311:.G312])" table:style-name="ce346">
            <text:p>2,190</text:p>
          </table:table-cell>
          <table:table-cell office:value-type="float" office:value="1221480.4643550001" table:formula="of:=+SUM([.H311:.H312])" table:style-name="ce346">
            <text:p>1,221</text:p>
          </table:table-cell>
          <table:table-cell office:value-type="float" office:value="1856053.0190999999" table:formula="of:=+SUM([.I311:.I312])" table:style-name="ce347">
            <text:p>1,856</text:p>
          </table:table-cell>
          <table:covered-table-cell/>
          <table:table-cell office:value-type="float" office:value="6431193.0998260006" table:formula="of:=+SUM([.E313];[.F313];[.G313];[.H313];[.I313])" table:style-name="ce347">
            <text:p>6,431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6" table:style-name="ce419">
            <text:p>Treatment</text:p>
          </table:table-cell>
          <table:table-cell office:value-type="string" table:style-name="ce150">
            <text:p>Material recovery</text:p>
          </table:table-cell>
          <table:table-cell office:value-type="float" office:value="260501.48000000004" table:style-name="ce333">
            <text:p><text:s text:c="2"/>261</text:p>
          </table:table-cell>
          <table:table-cell office:value-type="float" office:value="804852" table:style-name="ce300">
            <text:p><text:s text:c="2"/>805</text:p>
          </table:table-cell>
          <table:table-cell office:value-type="float" office:value="563319.87434999994" table:style-name="ce300">
            <text:p><text:s text:c="2"/>563</text:p>
          </table:table-cell>
          <table:table-cell office:value-type="float" office:value="656048" table:style-name="ce395">
            <text:p><text:s text:c="2"/>656</text:p>
          </table:table-cell>
          <table:table-cell office:value-type="float" office:value="104533.52299999999" table:style-name="ce396">
            <text:p><text:s text:c="2"/>105</text:p>
          </table:table-cell>
          <table:covered-table-cell/>
          <table:table-cell office:value-type="float" office:value="2389254.8773499997" table:formula="of:=SUM([.E314:.J314])" table:style-name="ce296">
            <text:p>2,389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al</text:p>
          </table:table-cell>
          <table:table-cell office:value-type="float" office:value="741346" table:style-name="ce324">
            <text:p><text:s text:c="2"/>741</text:p>
          </table:table-cell>
          <table:table-cell office:value-type="float" office:value="727445" table:style-name="ce325">
            <text:p><text:s text:c="2"/>727</text:p>
          </table:table-cell>
          <table:table-cell office:value-type="float" office:value="1942431" table:style-name="ce325">
            <text:p><text:s text:c="2"/>1,942</text:p>
          </table:table-cell>
          <table:table-cell office:value-type="float" office:value="1137742" table:style-name="ce325">
            <text:p><text:s text:c="2"/>1,138</text:p>
          </table:table-cell>
          <table:table-cell office:value-type="float" office:value="1306775" table:style-name="ce326">
            <text:p><text:s text:c="2"/>1,307</text:p>
          </table:table-cell>
          <table:covered-table-cell/>
          <table:table-cell office:value-type="float" office:value="5855739" table:formula="of:=SUM([.E315:.J315])" table:style-name="ce296">
            <text:p>5,856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Physico-chemical</text:p>
          </table:table-cell>
          <table:table-cell office:value-type="float" office:value="240602" table:style-name="ce327">
            <text:p><text:s text:c="2"/>241</text:p>
          </table:table-cell>
          <table:table-cell office:value-type="float" office:value="235.4" table:style-name="ce300">
            <text:p><text:s text:c="2"/>0</text:p>
          </table:table-cell>
          <table:table-cell office:value-type="float" office:value="668746.27880999993" table:style-name="ce300">
            <text:p><text:s text:c="2"/>669</text:p>
          </table:table-cell>
          <table:table-cell office:value-type="float" office:value="1021601.7100000001" table:style-name="ce300">
            <text:p><text:s text:c="2"/>1,022</text:p>
          </table:table-cell>
          <table:table-cell office:value-type="float" office:value="633904.72599999991" table:style-name="ce300">
            <text:p><text:s text:c="2"/>634</text:p>
          </table:table-cell>
          <table:covered-table-cell/>
          <table:table-cell office:value-type="float" office:value="2565090.1148099997" table:formula="of:=SUM([.E316:.J316])" table:style-name="ce296">
            <text:p>2,565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hemical</text:p>
          </table:table-cell>
          <table:table-cell office:value-type="float" office:value="12451" table:style-name="ce324">
            <text:p><text:s text:c="2"/>12</text:p>
          </table:table-cell>
          <table:table-cell office:value-type="float" office:value="28893.449999999997" table:style-name="ce300">
            <text:p><text:s text:c="2"/>29</text:p>
          </table:table-cell>
          <table:table-cell office:value-type="float" office:value="0" table:style-name="ce297">
            <text:p>0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42604.397000000004" table:style-name="ce300">
            <text:p><text:s text:c="2"/>43</text:p>
          </table:table-cell>
          <table:covered-table-cell/>
          <table:table-cell office:value-type="float" office:value="83948.847000000009" table:formula="of:=SUM([.E317:.J317])" table:style-name="ce296">
            <text:p>8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Composting</text:p>
          </table:table-cell>
          <table:table-cell office:value-type="float" office:value="208258.55000000005" table:style-name="ce328">
            <text:p><text:s text:c="2"/>208</text:p>
          </table:table-cell>
          <table:table-cell office:value-type="float" office:value="154075.80999999997" table:style-name="ce300">
            <text:p><text:s text:c="2"/>154</text:p>
          </table:table-cell>
          <table:table-cell office:value-type="float" office:value="188442.64999999991" table:style-name="ce300">
            <text:p><text:s text:c="2"/>188</text:p>
          </table:table-cell>
          <table:table-cell office:value-type="float" office:value="236539.12" table:style-name="ce300">
            <text:p><text:s text:c="2"/>237</text:p>
          </table:table-cell>
          <table:table-cell office:value-type="float" office:value="82188.01999999999" table:style-name="ce300">
            <text:p><text:s text:c="2"/>82</text:p>
          </table:table-cell>
          <table:covered-table-cell/>
          <table:table-cell office:value-type="float" office:value="869504.14999999991" table:formula="of:=SUM([.E318:.J318])" table:style-name="ce296">
            <text:p>870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Biological</text:p>
          </table:table-cell>
          <table:table-cell office:value-type="float" office:value="476129" table:style-name="ce329">
            <text:p><text:s text:c="2"/>476</text:p>
          </table:table-cell>
          <table:table-cell office:value-type="float" office:value="220895" table:style-name="ce330">
            <text:p><text:s text:c="2"/>221</text:p>
          </table:table-cell>
          <table:table-cell office:value-type="float" office:value="3958499" table:style-name="ce300">
            <text:p><text:s text:c="2"/>3,958</text:p>
          </table:table-cell>
          <table:table-cell office:value-type="float" office:value="869925" table:style-name="ce330">
            <text:p><text:s text:c="2"/>870</text:p>
          </table:table-cell>
          <table:table-cell office:value-type="float" office:value="2710760" table:style-name="ce331">
            <text:p><text:s text:c="2"/>2,711</text:p>
          </table:table-cell>
          <table:covered-table-cell/>
          <table:table-cell office:value-type="float" office:value="8236208" table:formula="of:=SUM([.E319:.J319])" table:style-name="ce296">
            <text:p>8,236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7">
            <text:p>Treatment Total</text:p>
          </table:table-cell>
          <table:table-cell table:style-name="ce151"/>
          <table:table-cell office:value-type="float" office:value="1939288.03" table:formula="of:=SUM([.E314:.E319])" table:style-name="ce343">
            <text:p>1,939</text:p>
          </table:table-cell>
          <table:table-cell office:value-type="float" office:value="1936396.66" table:formula="of:=SUM([.F314:.F319])" table:style-name="ce346">
            <text:p>1,936</text:p>
          </table:table-cell>
          <table:table-cell office:value-type="float" office:value="7321438.8031600006" table:formula="of:=SUM([.G314:.G319])" table:style-name="ce346">
            <text:p>7,321</text:p>
          </table:table-cell>
          <table:table-cell office:value-type="float" office:value="3921855.83" table:formula="of:=SUM([.H314:.H319])" table:style-name="ce346">
            <text:p>3,922</text:p>
          </table:table-cell>
          <table:table-cell office:value-type="float" office:value="4880765.6659999993" table:formula="of:=SUM([.I314:.I319])" table:style-name="ce347">
            <text:p>4,881</text:p>
          </table:table-cell>
          <table:covered-table-cell/>
          <table:table-cell office:value-type="float" office:value="20000000" table:style-name="ce347">
            <text:p>20,000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19">
            <text:p>MRS</text:p>
          </table:table-cell>
          <table:table-cell office:value-type="string" table:style-name="ce150">
            <text:p>Vehicle depollution</text:p>
          </table:table-cell>
          <table:table-cell office:value-type="float" office:value="1760" table:style-name="ce318">
            <text:p><text:s text:c="2"/>2</text:p>
          </table:table-cell>
          <table:table-cell office:value-type="float" office:value="10640" table:style-name="ce300">
            <text:p><text:s text:c="2"/>11</text:p>
          </table:table-cell>
          <table:table-cell office:value-type="float" office:value="109785" table:style-name="ce300">
            <text:p><text:s text:c="2"/>110</text:p>
          </table:table-cell>
          <table:table-cell office:value-type="float" office:value="65699" table:style-name="ce300">
            <text:p><text:s text:c="2"/>66</text:p>
          </table:table-cell>
          <table:table-cell office:value-type="float" office:value="16304" table:style-name="ce300">
            <text:p><text:s text:c="2"/>16</text:p>
          </table:table-cell>
          <table:covered-table-cell/>
          <table:table-cell office:value-type="float" office:value="204188" table:formula="of:=SUM([.E321:.J321])" table:style-name="ce296">
            <text:p>204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table-cell office:value-type="string" table:style-name="ce150">
            <text:p>Metal recycling</text:p>
          </table:table-cell>
          <table:table-cell office:value-type="float" office:value="40784.053" table:style-name="ce319">
            <text:p><text:s text:c="2"/>41</text:p>
          </table:table-cell>
          <table:table-cell office:value-type="float" office:value="16861.382000000001" table:style-name="ce300">
            <text:p><text:s text:c="2"/>17</text:p>
          </table:table-cell>
          <table:table-cell office:value-type="float" office:value="635280.11348800012" table:style-name="ce300">
            <text:p><text:s text:c="2"/>635</text:p>
          </table:table-cell>
          <table:table-cell office:value-type="float" office:value="129236.61008200001" table:style-name="ce300">
            <text:p><text:s text:c="2"/>129</text:p>
          </table:table-cell>
          <table:table-cell office:value-type="float" office:value="2292178.1470000013" table:style-name="ce300">
            <text:p><text:s text:c="2"/>2,292</text:p>
          </table:table-cell>
          <table:covered-table-cell/>
          <table:table-cell office:value-type="float" office:value="3114340.3055700017" table:formula="of:=SUM([.E322:.J322])" table:style-name="ce296">
            <text:p>3,114</text:p>
          </table:table-cell>
          <table:table-cell table:number-columns-repeated="16373"/>
        </table:table-row>
        <table:table-row table:style-name="ro5">
          <table:table-cell/>
          <table:covered-table-cell/>
          <table:table-cell office:value-type="string" table:style-name="ce79">
            <text:p>MRS Total</text:p>
          </table:table-cell>
          <table:table-cell table:style-name="ce167"/>
          <table:table-cell office:value-type="float" office:value="42544.053" table:formula="of:=SUM([.E321:.E322])" table:style-name="ce346">
            <text:p>43</text:p>
          </table:table-cell>
          <table:table-cell office:value-type="float" office:value="27501.382000000001" table:formula="of:=SUM([.F321:.F322])" table:style-name="ce346">
            <text:p>28</text:p>
          </table:table-cell>
          <table:table-cell office:value-type="float" office:value="745065.11348800012" table:formula="of:=SUM([.G321:.G322])" table:style-name="ce346">
            <text:p>745</text:p>
          </table:table-cell>
          <table:table-cell office:value-type="float" office:value="194935.61008200003" table:formula="of:=SUM([.H321:.H322])" table:style-name="ce346">
            <text:p>195</text:p>
          </table:table-cell>
          <table:table-cell office:value-type="float" office:value="2308482.1470000013" table:formula="of:=SUM([.I321:.I322])" table:style-name="ce346">
            <text:p>2,308</text:p>
          </table:table-cell>
          <table:covered-table-cell/>
          <table:table-cell office:value-type="float" office:value="3318528.3055700017" table:formula="of:=+SUM([.K321:.K322])" table:style-name="ce397">
            <text:p>3,319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81">
            <text:p>2024 Total</text:p>
          </table:table-cell>
          <table:table-cell table:number-columns-repeated="2" table:style-name="ce82"/>
          <table:table-cell office:value-type="float" office:value="2443719.665" table:formula="of:=+SUM([.E313];[.E320];[.E323])" table:style-name="ce398">
            <text:p>2,444</text:p>
          </table:table-cell>
          <table:table-cell office:value-type="float" office:value="2666108.4463710003" table:formula="of:=+SUM([.F313];[.F320];[.F323])" table:style-name="ce398">
            <text:p>2,666</text:p>
          </table:table-cell>
          <table:table-cell office:value-type="float" office:value="10256065.546647999" table:formula="of:=+SUM([.G313];[.G320];[.G323])" table:style-name="ce398">
            <text:p>10,256</text:p>
          </table:table-cell>
          <table:table-cell office:value-type="float" office:value="5338271.9044369999" table:formula="of:=+SUM([.H313];[.H320];[.H323])" table:style-name="ce398">
            <text:p>5,338</text:p>
          </table:table-cell>
          <table:table-cell office:value-type="float" office:value="9045300.8321000002" table:formula="of:=+SUM([.I313];[.I320];[.I323])" table:style-name="ce398">
            <text:p>9,045</text:p>
          </table:table-cell>
          <table:table-cell table:style-name="ce169"/>
          <table:table-cell office:value-type="float" office:value="29750000" table:style-name="ce299">
            <text:p>29,750</text:p>
          </table:table-cell>
          <table:table-cell table:number-columns-repeated="16373"/>
        </table:table-row>
        <table:table-row table:style-name="ro5">
          <table:table-cell table:style-name="ce387"/>
          <table:table-cell table:style-name="ce388"/>
          <table:table-cell table:number-columns-repeated="2" table:style-name="ce389"/>
          <table:table-cell table:number-columns-repeated="5" table:style-name="ce390"/>
          <table:table-cell table:style-name="ce391"/>
          <table:table-cell table:style-name="ce392"/>
          <table:table-cell table:number-columns-repeated="16373" table:style-name="ce387"/>
        </table:table-row>
        <table:table-row table:style-name="ro22">
          <table:table-cell/>
          <table:table-cell office:value-type="string" table:style-name="ce14">
            <text:p>In 2005 and previous years, data for Warrington &amp; Halton was reported in a separate category. <text:s/>From 2006, Halton is included in Merseyside and Warrington in Cheshire.</text:p>
          </table:table-cell>
          <table:table-cell table:number-columns-repeated="16382" table:style-name="ce14"/>
        </table:table-row>
        <table:table-row table:number-rows-repeated="1048250" table:style-name="ro5">
          <table:table-cell table:number-columns-repeated="16384"/>
        </table:table-row>
      </table:table>
      <table:table table:name="Incineration_Input_&amp;_Capacity" table:style-name="ta2">
        <table:table-column table:style-name="co6" table:default-cell-style-name="ce14"/>
        <table:table-column table:style-name="co40" table:default-cell-style-name="ce14"/>
        <table:table-column table:style-name="co33" table:default-cell-style-name="ce14"/>
        <table:table-column table:style-name="co41" table:number-columns-repeated="2" table:default-cell-style-name="ce14"/>
        <table:table-column table:style-name="co36" table:default-cell-style-name="ce14"/>
        <table:table-column table:style-name="co42" table:default-cell-style-name="ce14"/>
        <table:table-column table:style-name="co33" table:default-cell-style-name="ce14"/>
        <table:table-column table:style-name="co15" table:number-columns-repeated="16376" table:default-cell-style-name="ce14"/>
        <table:table-row table:style-name="ro5">
          <table:table-cell table:style-name="ce13"/>
          <table:table-cell table:number-columns-repeated="16383" table:style-name="ce14"/>
        </table:table-row>
        <table:table-row table:style-name="ro6">
          <table:table-cell table:style-name="ce14"/>
          <table:table-cell office:value-type="string" table:style-name="ce15">
            <text:p>North West: Incineration throughput 2024</text:p>
          </table:table-cell>
          <table:table-cell table:number-columns-repeated="16382" table:style-name="ce14"/>
        </table:table-row>
        <table:table-row table:style-name="ro6">
          <table:table-cell table:style-name="ce14"/>
          <table:table-cell office:value-type="string" table:style-name="ce17">
            <text:p>All figures provided in 000s tonnes</text:p>
          </table:table-cell>
          <table:table-cell table:style-name="ce16"/>
          <table:table-cell table:number-columns-repeated="16381" table:style-name="ce14"/>
        </table:table-row>
        <table:table-row table:style-name="ro5">
          <table:table-cell table:style-name="ce14"/>
          <table:table-cell table:style-name="ce46"/>
          <table:table-cell table:number-columns-repeated="16382" table:style-name="ce14"/>
        </table:table-row>
        <table:table-row table:style-name="ro5">
          <table:table-cell table:style-name="ce14"/>
          <table:table-cell office:value-type="string" table:number-columns-spanned="1" table:number-rows-spanned="2" table:style-name="ce403">
            <text:p>Incineration Type</text:p>
          </table:table-cell>
          <table:table-cell office:value-type="string" table:number-columns-spanned="5" table:number-rows-spanned="1" table:style-name="ce404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5">
            <text:p>NORTH WEST</text:p>
          </table:table-cell>
          <table:table-cell table:number-columns-repeated="16376"/>
        </table:table-row>
        <table:table-row table:style-name="ro23">
          <table:table-cell table:style-name="ce14"/>
          <table:covered-table-cell/>
          <table:table-cell office:value-type="string" table:style-name="ce2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covered-table-cell/>
          <table:table-cell table:number-columns-repeated="16376"/>
        </table:table-row>
        <table:table-row table:style-name="ro24">
          <table:table-cell table:style-name="ce14"/>
          <table:table-cell office:value-type="string" table:style-name="ce33">
            <text:p>Animal By-Product</text:p>
          </table:table-cell>
          <table:table-cell office:value-type="float" office:value="39588" table:style-name="ce297">
            <text:p>40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39588" table:formula="of:=SUM([.C7:.G7])" table:style-name="ce292">
            <text:p>40</text:p>
          </table:table-cell>
          <table:table-cell table:number-columns-repeated="16376"/>
        </table:table-row>
        <table:table-row table:style-name="ro24">
          <table:table-cell table:style-name="ce14"/>
          <table:table-cell office:value-type="string" table:style-name="ce33">
            <text:p>Animal Carcasses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string" table:style-name="ce32">
            <text:p>-</text:p>
          </table:table-cell>
          <table:table-cell table:number-columns-repeated="16376"/>
        </table:table-row>
        <table:table-row table:style-name="ro24">
          <table:table-cell table:style-name="ce14"/>
          <table:table-cell office:value-type="string" table:style-name="ce33">
            <text:p>Clinical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0732" table:style-name="ce297">
            <text:p>11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0732" table:formula="of:=SUM([.C9:.G9])" table:style-name="ce292">
            <text:p>11</text:p>
          </table:table-cell>
          <table:table-cell table:number-columns-repeated="16376"/>
        </table:table-row>
        <table:table-row table:style-name="ro24">
          <table:table-cell table:style-name="ce14"/>
          <table:table-cell office:value-type="string" table:style-name="ce37">
            <text:p>Co-Incineration of Hazardous Waste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79461" table:style-name="ce297">
            <text:p>79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79461" table:formula="of:=SUM([.C10:.G10])" table:style-name="ce292">
            <text:p>79</text:p>
          </table:table-cell>
          <table:table-cell table:number-columns-repeated="16376"/>
        </table:table-row>
        <table:table-row table:style-name="ro24">
          <table:table-cell table:style-name="ce14"/>
          <table:table-cell office:value-type="string" table:style-name="ce37">
            <text:p>Co-Incineration of Non Hazardous Waste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09045" table:style-name="ce297">
            <text:p>109</text:p>
          </table:table-cell>
          <table:table-cell office:value-type="float" office:value="109045" table:formula="of:=SUM([.C11:.G11])" table:style-name="ce292">
            <text:p>109</text:p>
          </table:table-cell>
          <table:table-cell table:number-columns-repeated="16376"/>
        </table:table-row>
        <table:table-row table:style-name="ro24">
          <table:table-cell table:style-name="ce14"/>
          <table:table-cell office:value-type="string" table:style-name="ce37">
            <text:p>Hazardous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65646" table:style-name="ce297">
            <text:p>66</text:p>
          </table:table-cell>
          <table:table-cell office:value-type="float" office:value="65646" table:formula="of:=SUM([.C12:.G12])" table:style-name="ce292">
            <text:p>66</text:p>
          </table:table-cell>
          <table:table-cell table:number-columns-repeated="16376"/>
        </table:table-row>
        <table:table-row table:style-name="ro24">
          <table:table-cell table:style-name="ce14"/>
          <table:table-cell office:value-type="string" table:style-name="ce173">
            <text:p>Municipal and/or Industrial &amp; Commercial</text:p>
          </table:table-cell>
          <table:table-cell office:value-type="float" office:value="991224" table:style-name="ce297">
            <text:p>991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89072" table:style-name="ce297">
            <text:p>89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080296" table:formula="of:=SUM([.C13:.G13])" table:style-name="ce292">
            <text:p>1,080</text:p>
          </table:table-cell>
          <table:table-cell table:number-columns-repeated="16376"/>
        </table:table-row>
        <table:table-row table:style-name="ro24">
          <table:table-cell table:style-name="ce14"/>
          <table:table-cell office:value-type="string" table:style-name="ce33">
            <text:p>Sewage Sludge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formula="of:=SUM([.C14:.G14])" table:style-name="ce32">
            <text:p><text:s/>-<text:s/></text:p>
          </table:table-cell>
          <table:table-cell table:number-columns-repeated="16376"/>
        </table:table-row>
        <table:table-row table:style-name="ro24">
          <table:table-cell table:style-name="ce14"/>
          <table:table-cell office:value-type="string" table:style-name="ce122">
            <text:p>Biomass/Waste Wood</text:p>
          </table:table-cell>
          <table:table-cell office:value-type="float" office:value="121550" table:style-name="ce297">
            <text:p>122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54726" table:style-name="ce297">
            <text:p>155</text:p>
          </table:table-cell>
          <table:table-cell office:value-type="float" office:value="276276" table:formula="of:=SUM([.C15:.G15])" table:style-name="ce292">
            <text:p>276</text:p>
          </table:table-cell>
          <table:table-cell table:number-columns-repeated="16376"/>
        </table:table-row>
        <table:table-row table:style-name="ro24">
          <table:table-cell table:style-name="ce14"/>
          <table:table-cell office:value-type="string" table:style-name="ce174">
            <text:p>Total</text:p>
          </table:table-cell>
          <table:table-cell office:value-type="float" office:value="1152362" table:formula="of:=SUM([.C7:.C15])" table:style-name="ce355">
            <text:p>1,152</text:p>
          </table:table-cell>
          <table:table-cell office:value-type="string" table:style-name="ce44">
            <text:p>-</text:p>
          </table:table-cell>
          <table:table-cell office:value-type="float" office:value="99804" table:formula="of:=SUM([.E7:.E15])" table:style-name="ce294">
            <text:p>100</text:p>
          </table:table-cell>
          <table:table-cell office:value-type="float" office:value="79461" table:formula="of:=SUM([.F7:.F15])" table:style-name="ce294">
            <text:p>79</text:p>
          </table:table-cell>
          <table:table-cell office:value-type="float" office:value="329417" table:formula="of:=SUM([.G7:.G15])" table:style-name="ce338">
            <text:p>329</text:p>
          </table:table-cell>
          <table:table-cell office:value-type="float" office:value="1661044" table:formula="of:=SUM([.H7:.H15])" table:style-name="ce294">
            <text:p>1,661</text:p>
          </table:table-cell>
          <table:table-cell table:number-columns-repeated="16376"/>
        </table:table-row>
        <table:table-row table:style-name="ro5">
          <table:table-cell/>
          <table:table-cell table:style-name="ce175"/>
          <table:table-cell table:number-columns-repeated="16382" table:style-name="ce14"/>
        </table:table-row>
        <table:table-row table:style-name="ro5">
          <table:table-cell/>
          <table:table-cell office:value-type="string" table:style-name="ce46">
            <text:p>Table Notes:</text:p>
          </table:table-cell>
          <table:table-cell table:number-columns-repeated="16382" table:style-name="ce14"/>
        </table:table-row>
        <table:table-row table:style-name="ro5">
          <table:table-cell/>
          <table:table-cell office:value-type="string" table:style-name="ce180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4"/>
        </table:table-row>
        <table:table-row table:style-name="ro5">
          <table:table-cell/>
          <table:table-cell table:style-name="ce176"/>
          <table:table-cell table:number-columns-repeated="16382" table:style-name="ce14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5">
            <text:p>North West: Incineration capacity 2024</text:p>
          </table:table-cell>
          <table:table-cell table:number-columns-repeated="16382" table:style-name="ce14"/>
        </table:table-row>
        <table:table-row table:style-name="ro6">
          <table:table-cell/>
          <table:table-cell office:value-type="string" table:style-name="ce17">
            <text:p>All figures provided in 000s tonnes</text:p>
          </table:table-cell>
          <table:table-cell table:number-columns-repeated="16382" table:style-name="ce14"/>
        </table:table-row>
        <table:table-row table:style-name="ro5">
          <table:table-cell/>
          <table:table-cell table:style-name="ce46"/>
          <table:table-cell table:number-columns-repeated="16382" table:style-name="ce14"/>
        </table:table-row>
        <table:table-row table:style-name="ro5">
          <table:table-cell/>
          <table:table-cell office:value-type="string" table:number-columns-spanned="1" table:number-rows-spanned="2" table:style-name="ce403">
            <text:p>Incineration Type</text:p>
          </table:table-cell>
          <table:table-cell office:value-type="string" table:number-columns-spanned="5" table:number-rows-spanned="1" table:style-name="ce404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5">
            <text:p>NORTH WEST</text:p>
          </table:table-cell>
          <table:table-cell table:number-columns-repeated="16376"/>
        </table:table-row>
        <table:table-row table:style-name="ro25">
          <table:table-cell/>
          <table:covered-table-cell/>
          <table:table-cell office:value-type="string" table:style-name="ce2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covered-table-cell/>
          <table:table-cell table:number-columns-repeated="16376"/>
        </table:table-row>
        <table:table-row table:style-name="ro24">
          <table:table-cell/>
          <table:table-cell office:value-type="string" table:style-name="ce29">
            <text:p>Animal By-Product</text:p>
          </table:table-cell>
          <table:table-cell office:value-type="float" office:value="180000" table:style-name="ce356">
            <text:p>180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80000" table:formula="of:=+SUM([.C27:.G27])" table:style-name="ce296">
            <text:p>180</text:p>
          </table:table-cell>
          <table:table-cell table:number-columns-repeated="16376"/>
        </table:table-row>
        <table:table-row table:style-name="ro24">
          <table:table-cell/>
          <table:table-cell office:value-type="string" table:style-name="ce29">
            <text:p>Animal Carcasses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string" table:style-name="ce32">
            <text:p>-</text:p>
          </table:table-cell>
          <table:table-cell table:number-columns-repeated="16376"/>
        </table:table-row>
        <table:table-row table:style-name="ro24">
          <table:table-cell/>
          <table:table-cell office:value-type="string" table:style-name="ce29">
            <text:p>Clinical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3884" table:style-name="ce297">
            <text:p>14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3884" table:formula="of:=+SUM([.C29:.G29])" table:style-name="ce296">
            <text:p>14</text:p>
          </table:table-cell>
          <table:table-cell table:number-columns-repeated="16376"/>
        </table:table-row>
        <table:table-row table:style-name="ro24">
          <table:table-cell/>
          <table:table-cell office:value-type="string" table:style-name="ce142">
            <text:p>Co-Incineration of Hazardous Waste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75428" table:style-name="ce297">
            <text:p>175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75428" table:formula="of:=+SUM([.C30:.G30])" table:style-name="ce296">
            <text:p>175</text:p>
          </table:table-cell>
          <table:table-cell table:number-columns-repeated="16376"/>
        </table:table-row>
        <table:table-row table:style-name="ro24">
          <table:table-cell/>
          <table:table-cell office:value-type="string" table:style-name="ce142">
            <text:p>Co-Incineration of Non Hazardous Waste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266000" table:style-name="ce400">
            <text:p>266</text:p>
          </table:table-cell>
          <table:table-cell office:value-type="float" office:value="266000" table:formula="of:=+SUM([.C31:.G31])" table:style-name="ce296">
            <text:p>266</text:p>
          </table:table-cell>
          <table:table-cell table:number-columns-repeated="16376"/>
        </table:table-row>
        <table:table-row table:style-name="ro24">
          <table:table-cell/>
          <table:table-cell office:value-type="string" table:style-name="ce142">
            <text:p>Hazardous<text:s/>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00000" table:style-name="ce400">
            <text:p>100</text:p>
          </table:table-cell>
          <table:table-cell office:value-type="float" office:value="100000" table:formula="of:=+SUM([.C32:.G32])" table:style-name="ce296">
            <text:p>100</text:p>
          </table:table-cell>
          <table:table-cell table:number-columns-repeated="16376"/>
        </table:table-row>
        <table:table-row table:style-name="ro24">
          <table:table-cell/>
          <table:table-cell office:value-type="string" table:style-name="ce178">
            <text:p>Municipal and/or Industrial &amp; Commercial</text:p>
          </table:table-cell>
          <table:table-cell office:value-type="float" office:value="1100000" table:style-name="ce357">
            <text:p>1,100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27100" table:style-name="ce297">
            <text:p>127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227100" table:formula="of:=+SUM([.C33:.G33])" table:style-name="ce296">
            <text:p>1,227</text:p>
          </table:table-cell>
          <table:table-cell table:number-columns-repeated="16376"/>
        </table:table-row>
        <table:table-row table:style-name="ro24">
          <table:table-cell/>
          <table:table-cell office:value-type="string" table:style-name="ce29">
            <text:p>Sewage Sludge</text:p>
          </table:table-cell>
          <table:table-cell office:value-type="float" office:value="0" table:style-name="ce35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string" table:style-name="ce32">
            <text:p>-</text:p>
          </table:table-cell>
          <table:table-cell table:number-columns-repeated="16376"/>
        </table:table-row>
        <table:table-row table:style-name="ro24">
          <table:table-cell/>
          <table:table-cell office:value-type="string" table:style-name="ce156">
            <text:p>Biomass/Waste Wood</text:p>
          </table:table-cell>
          <table:table-cell office:value-type="float" office:value="176500" table:style-name="ce358">
            <text:p>177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47000" table:style-name="ce297">
            <text:p>147</text:p>
          </table:table-cell>
          <table:table-cell office:value-type="float" office:value="323500" table:formula="of:=+SUM([.C35:.G35])" table:style-name="ce296">
            <text:p>324</text:p>
          </table:table-cell>
          <table:table-cell table:number-columns-repeated="16376"/>
        </table:table-row>
        <table:table-row table:style-name="ro24">
          <table:table-cell/>
          <table:table-cell office:value-type="string" table:style-name="ce174">
            <text:p>Total</text:p>
          </table:table-cell>
          <table:table-cell office:value-type="float" office:value="1456500" table:formula="of:=+SUM([.C27:.C35])" table:style-name="ce305">
            <text:p><text:s text:c="2"/>1,457</text:p>
          </table:table-cell>
          <table:table-cell office:value-type="float" office:value="0" table:formula="of:=+SUM([.D27:.D35])" table:style-name="ce305">
            <text:p><text:s text:c="2"/>0</text:p>
          </table:table-cell>
          <table:table-cell office:value-type="float" office:value="140984" table:formula="of:=+SUM([.E27:.E35])" table:style-name="ce305">
            <text:p><text:s text:c="2"/>141</text:p>
          </table:table-cell>
          <table:table-cell office:value-type="float" office:value="175428" table:formula="of:=+SUM([.F27:.F35])" table:style-name="ce305">
            <text:p><text:s text:c="2"/>175</text:p>
          </table:table-cell>
          <table:table-cell office:value-type="float" office:value="513000" table:formula="of:=+SUM([.G27:.G35])" table:style-name="ce305">
            <text:p><text:s text:c="2"/>513</text:p>
          </table:table-cell>
          <table:table-cell office:value-type="float" office:value="2285912" table:formula="of:=+SUM([.H27:.H35])" table:style-name="ce305">
            <text:p><text:s text:c="2"/>2,286</text:p>
          </table:table-cell>
          <table:table-cell table:number-columns-repeated="16376"/>
        </table:table-row>
        <table:table-row table:style-name="ro5">
          <table:table-cell/>
          <table:table-cell table:style-name="ce179"/>
          <table:table-cell table:number-columns-repeated="16382" table:style-name="ce14"/>
        </table:table-row>
        <table:table-row table:style-name="ro5">
          <table:table-cell/>
          <table:table-cell office:value-type="string" table:style-name="ce46">
            <text:p>Table Notes:</text:p>
          </table:table-cell>
          <table:table-cell table:number-columns-repeated="16382" table:style-name="ce14"/>
        </table:table-row>
        <table:table-row table:style-name="ro5">
          <table:table-cell/>
          <table:table-cell office:value-type="string" table:style-name="ce180">
            <text:p>This datatable is for operational incineration facilities that accepted waste from off-site sources. <text:s/>It does not include facilities that burned waste from their own in-house processes or were non or pre-operational.</text:p>
          </table:table-cell>
          <table:table-cell table:number-columns-repeated="16382" table:style-name="ce14"/>
        </table:table-row>
        <table:table-row table:style-name="ro5">
          <table:table-cell/>
          <table:table-cell table:style-name="ce176"/>
          <table:table-cell table:number-columns-repeated="16382" table:style-name="ce14"/>
        </table:table-row>
        <table:table-row table:number-rows-repeated="1048536" table:style-name="ro5">
          <table:table-cell table:number-columns-repeated="16384"/>
        </table:table-row>
      </table:table>
      <table:table table:name="Land_Disposal" table:style-name="ta2">
        <table:table-column table:style-name="co6" table:default-cell-style-name="ce14"/>
        <table:table-column table:style-name="co43" table:default-cell-style-name="ce14"/>
        <table:table-column table:style-name="co27" table:default-cell-style-name="ce14"/>
        <table:table-column table:style-name="co22" table:number-columns-repeated="2" table:default-cell-style-name="ce14"/>
        <table:table-column table:style-name="co44" table:default-cell-style-name="ce14"/>
        <table:table-column table:style-name="co45" table:default-cell-style-name="ce14"/>
        <table:table-column table:style-name="co20" table:default-cell-style-name="ce14"/>
        <table:table-column table:style-name="co22" table:default-cell-style-name="ce14"/>
        <table:table-column table:style-name="co23" table:default-cell-style-name="ce14"/>
        <table:table-column table:style-name="co30" table:default-cell-style-name="ce14"/>
        <table:table-column table:style-name="co15" table:number-columns-repeated="16373" table:default-cell-style-name="ce14"/>
        <table:table-row table:style-name="ro5">
          <table:table-cell table:style-name="ce354"/>
          <table:table-cell table:number-columns-repeated="16383" table:style-name="ce14"/>
        </table:table-row>
        <table:table-row table:style-name="ro6">
          <table:table-cell table:style-name="ce14"/>
          <table:table-cell office:value-type="string" table:style-name="ce15">
            <text:p>North West: Borehole and lagoon inputs 2024</text:p>
          </table:table-cell>
          <table:table-cell table:number-columns-repeated="2" table:style-name="ce14"/>
          <table:table-cell table:style-name="ce181"/>
          <table:table-cell table:number-columns-repeated="16379" table:style-name="ce14"/>
        </table:table-row>
        <table:table-row table:style-name="ro6">
          <table:table-cell table:style-name="ce14"/>
          <table:table-cell office:value-type="string" table:style-name="ce17">
            <text:p>All figures are provided in 000s tonnes</text:p>
          </table:table-cell>
          <table:table-cell table:number-columns-repeated="16382" table:style-name="ce14"/>
        </table:table-row>
        <table:table-row table:style-name="ro5">
          <table:table-cell table:number-columns-repeated="16384"/>
        </table:table-row>
        <table:table-row table:style-name="ro5">
          <table:table-cell table:style-name="ce14"/>
          <table:table-cell office:value-type="string" table:number-columns-spanned="1" table:number-rows-spanned="2" table:style-name="ce403">
            <text:p>Site Type</text:p>
          </table:table-cell>
          <table:table-cell office:value-type="string" table:number-columns-spanned="5" table:number-rows-spanned="1" table:style-name="ce404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5">
            <text:p>NORTH WEST</text:p>
          </table:table-cell>
          <table:table-cell table:number-columns-repeated="16376" table:style-name="ce14"/>
        </table:table-row>
        <table:table-row table:style-name="ro26">
          <table:table-cell table:style-name="ce14"/>
          <table:covered-table-cell/>
          <table:table-cell office:value-type="string" table:style-name="ce2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covered-table-cell/>
          <table:table-cell table:number-columns-repeated="16376" table:style-name="ce14"/>
        </table:table-row>
        <table:table-row table:style-name="ro20">
          <table:table-cell table:style-name="ce14"/>
          <table:table-cell office:value-type="string" table:style-name="ce119">
            <text:p>Borehole</text:p>
          </table:table-cell>
          <table:table-cell office:value-type="string" table:style-name="ce34">
            <text:p>-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formula="of:=SUM([.C7:.G7])" table:style-name="ce32">
            <text:p><text:s/>-<text:s/></text:p>
          </table:table-cell>
          <table:table-cell table:number-columns-repeated="16376" table:style-name="ce14"/>
        </table:table-row>
        <table:table-row table:style-name="ro20">
          <table:table-cell table:style-name="ce14"/>
          <table:table-cell office:value-type="string" table:style-name="ce156">
            <text:p>Lagoon</text:p>
          </table:table-cell>
          <table:table-cell office:value-type="float" office:value="92935.57" table:style-name="ce339">
            <text:p>93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92935.57" table:formula="of:=SUM([.C8:.G8])" table:style-name="ce292">
            <text:p>93</text:p>
          </table:table-cell>
          <table:table-cell table:number-columns-repeated="16376" table:style-name="ce14"/>
        </table:table-row>
        <table:table-row table:style-name="ro5">
          <table:table-cell table:style-name="ce14"/>
          <table:table-cell office:value-type="string" table:style-name="ce42">
            <text:p>Total</text:p>
          </table:table-cell>
          <table:table-cell office:value-type="float" office:value="92935.57" table:formula="of:=SUM([.C7:.C8])" table:style-name="ce336">
            <text:p>93</text:p>
          </table:table-cell>
          <table:table-cell office:value-type="float" office:value="0" table:formula="of:=SUM([.D7:.D8])" table:style-name="ce294">
            <text:p>0</text:p>
          </table:table-cell>
          <table:table-cell office:value-type="float" office:value="0" table:formula="of:=SUM([.E7:.E8])" table:style-name="ce294">
            <text:p>0</text:p>
          </table:table-cell>
          <table:table-cell office:value-type="float" office:value="0" table:formula="of:=SUM([.F7:.F8])" table:style-name="ce294">
            <text:p>0</text:p>
          </table:table-cell>
          <table:table-cell office:value-type="float" office:value="0" table:formula="of:=SUM([.G7:.G8])" table:style-name="ce337">
            <text:p>0</text:p>
          </table:table-cell>
          <table:table-cell office:value-type="float" office:value="92935.57" table:formula="of:=SUM([.H7:.H8])" table:style-name="ce338">
            <text:p>93</text:p>
          </table:table-cell>
          <table:table-cell table:number-columns-repeated="16376" table:style-name="ce14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table:style-name="ce14"/>
          <table:table-cell office:value-type="string" table:style-name="ce15">
            <text:p>North West: Deposit in landfill for recovery inputs 2024</text:p>
          </table:table-cell>
          <table:table-cell table:number-columns-repeated="3" table:style-name="ce14"/>
          <table:table-cell table:number-columns-repeated="5" table:style-name="ce130"/>
          <table:table-cell table:number-columns-repeated="16374"/>
        </table:table-row>
        <table:table-row table:style-name="ro6">
          <table:table-cell table:style-name="ce14"/>
          <table:table-cell office:value-type="string" table:style-name="ce17">
            <text:p>All figures are provided in 000s tonnes</text:p>
          </table:table-cell>
          <table:table-cell table:number-columns-repeated="16382" table:style-name="ce14"/>
        </table:table-row>
        <table:table-row table:style-name="ro5">
          <table:table-cell table:number-columns-repeated="16384"/>
        </table:table-row>
        <table:table-row table:style-name="ro5">
          <table:table-cell table:style-name="ce14"/>
          <table:table-cell office:value-type="string" table:number-columns-spanned="1" table:number-rows-spanned="2" table:style-name="ce403">
            <text:p>Site Type</text:p>
          </table:table-cell>
          <table:table-cell office:value-type="string" table:number-columns-spanned="5" table:number-rows-spanned="1" table:style-name="ce404">
            <text:p>Sub-Region</text:p>
          </table:table-cell>
          <table:covered-table-cell table:number-columns-repeated="4"/>
          <table:table-cell office:value-type="string" table:number-columns-spanned="1" table:number-rows-spanned="2" table:style-name="ce405">
            <text:p>NORTH WEST</text:p>
          </table:table-cell>
          <table:table-cell table:number-columns-repeated="2" table:style-name="ce130"/>
          <table:table-cell table:number-columns-repeated="16374"/>
        </table:table-row>
        <table:table-row table:style-name="ro26">
          <table:table-cell table:style-name="ce14"/>
          <table:covered-table-cell/>
          <table:table-cell office:value-type="string" table:style-name="ce2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covered-table-cell/>
          <table:table-cell table:number-columns-repeated="2" table:style-name="ce130"/>
          <table:table-cell table:number-columns-repeated="16374"/>
        </table:table-row>
        <table:table-row table:style-name="ro27">
          <table:table-cell/>
          <table:table-cell office:value-type="string" table:style-name="ce62">
            <text:p>Deposit in landfill for recovery</text:p>
          </table:table-cell>
          <table:table-cell office:value-type="float" office:value="207506.15" table:style-name="ce334">
            <text:p>208</text:p>
          </table:table-cell>
          <table:table-cell office:value-type="float" office:value="221538.90999999997" table:style-name="ce334">
            <text:p>222</text:p>
          </table:table-cell>
          <table:table-cell office:value-type="float" office:value="242140.72200000001" table:style-name="ce334">
            <text:p>242</text:p>
          </table:table-cell>
          <table:table-cell office:value-type="float" office:value="392090.85" table:style-name="ce334">
            <text:p>392</text:p>
          </table:table-cell>
          <table:table-cell office:value-type="float" office:value="46480" table:style-name="ce334">
            <text:p>46</text:p>
          </table:table-cell>
          <table:table-cell office:value-type="float" office:value="1109756.6319999998" table:formula="of:=SUM([.C17:.G17])" table:style-name="ce335">
            <text:p>1,11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42">
            <text:p>Total</text:p>
          </table:table-cell>
          <table:table-cell office:value-type="float" office:value="207506.15" table:formula="of:=SUM([.C17:.C17])" table:style-name="ce336">
            <text:p>208</text:p>
          </table:table-cell>
          <table:table-cell office:value-type="float" office:value="221538.90999999997" table:formula="of:=SUM([.D17:.D17])" table:style-name="ce294">
            <text:p>222</text:p>
          </table:table-cell>
          <table:table-cell office:value-type="float" office:value="242140.72200000001" table:formula="of:=SUM([.E17:.E17])" table:style-name="ce294">
            <text:p>242</text:p>
          </table:table-cell>
          <table:table-cell office:value-type="float" office:value="392090.85" table:formula="of:=SUM([.F17:.F17])" table:style-name="ce294">
            <text:p>392</text:p>
          </table:table-cell>
          <table:table-cell office:value-type="float" office:value="46480" table:formula="of:=SUM([.G17:.G17])" table:style-name="ce337">
            <text:p>46</text:p>
          </table:table-cell>
          <table:table-cell office:value-type="float" office:value="1109756.6319999998" table:formula="of:=SUM([.H17:.H17])" table:style-name="ce338">
            <text:p>1,11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4">
            <text:p>Note: This activity is the deposit of waste in land for benefit and recovery purposes. <text:s/>Landfilling is the deposit in land for the purposes of final disposal.<text:s text:c="2"/></text:p>
          </table:table-cell>
          <table:table-cell table:number-columns-repeated="16382" table:style-name="ce14"/>
        </table:table-row>
        <table:table-row table:style-name="ro5">
          <table:table-cell/>
          <table:table-cell office:value-type="string" table:style-name="ce14">
            <text:p>Both activities require an environmental permit under the Environmental Permitting Regulations.</text:p>
          </table:table-cell>
          <table:table-cell table:number-columns-repeated="16382" table:style-name="ce14"/>
        </table:table-row>
        <table:table-row table:number-rows-repeated="1048555" table:style-name="ro5">
          <table:table-cell table:number-columns-repeated="16384"/>
        </table:table-row>
      </table:table>
      <table:table table:name="Use_of_Waste" table:style-name="ta3">
        <table:table-column table:style-name="co6" table:default-cell-style-name="ce50"/>
        <table:table-column table:style-name="co46" table:default-cell-style-name="ce50"/>
        <table:table-column table:style-name="co32" table:default-cell-style-name="ce50"/>
        <table:table-column table:style-name="co39" table:number-columns-repeated="2" table:default-cell-style-name="ce50"/>
        <table:table-column table:style-name="co8" table:default-cell-style-name="ce50"/>
        <table:table-column table:style-name="co36" table:default-cell-style-name="ce50"/>
        <table:table-column table:style-name="co2" table:default-cell-style-name="ce50"/>
        <table:table-column table:style-name="co15" table:number-columns-repeated="16376" table:default-cell-style-name="ce50"/>
        <table:table-row table:style-name="ro5">
          <table:table-cell table:style-name="ce10"/>
          <table:table-cell table:number-columns-repeated="16383" table:style-name="ce50"/>
        </table:table-row>
        <table:table-row table:style-name="ro6">
          <table:table-cell table:style-name="ce50"/>
          <table:table-cell office:value-type="string" table:style-name="ce105">
            <text:p>North West: Use of waste inputs 2024</text:p>
          </table:table-cell>
          <table:table-cell table:number-columns-repeated="16382" table:style-name="ce50"/>
        </table:table-row>
        <table:table-row table:style-name="ro6">
          <table:table-cell table:style-name="ce50"/>
          <table:table-cell office:value-type="string" table:style-name="ce52">
            <text:p>All figures provided in 000s tonnes</text:p>
          </table:table-cell>
          <table:table-cell table:number-columns-repeated="16382" table:style-name="ce50"/>
        </table:table-row>
        <table:table-row table:style-name="ro5">
          <table:table-cell table:style-name="ce50"/>
          <table:table-cell table:style-name="ce114"/>
          <table:table-cell table:number-columns-repeated="16382" table:style-name="ce50"/>
        </table:table-row>
        <table:table-row table:style-name="ro8">
          <table:table-cell table:style-name="ce50"/>
          <table:table-cell office:value-type="string" table:number-columns-spanned="1" table:number-rows-spanned="2" table:style-name="ce403">
            <text:p>Site Type</text:p>
          </table:table-cell>
          <table:table-cell office:value-type="string" table:number-columns-spanned="5" table:number-rows-spanned="1" table:style-name="ce414">
            <text:p>Sub Region</text:p>
          </table:table-cell>
          <table:covered-table-cell table:number-columns-repeated="4"/>
          <table:table-cell office:value-type="string" table:number-columns-spanned="1" table:number-rows-spanned="2" table:style-name="ce405">
            <text:p>NORTH WEST</text:p>
          </table:table-cell>
          <table:table-cell table:number-columns-repeated="16376"/>
        </table:table-row>
        <table:table-row table:style-name="ro28">
          <table:table-cell table:style-name="ce50"/>
          <table:covered-table-cell/>
          <table:table-cell office:value-type="string" table:style-name="ce182">
            <text:p>Cheshire</text:p>
          </table:table-cell>
          <table:table-cell office:value-type="string" table:style-name="ce22">
            <text:p>Cumbria</text:p>
          </table:table-cell>
          <table:table-cell office:value-type="string" table:style-name="ce22">
            <text:p>Greater Manchester</text:p>
          </table:table-cell>
          <table:table-cell office:value-type="string" table:style-name="ce22">
            <text:p>Lancashire</text:p>
          </table:table-cell>
          <table:table-cell office:value-type="string" table:style-name="ce22">
            <text:p>Merseyside</text:p>
          </table:table-cell>
          <table:covered-table-cell/>
          <table:table-cell table:number-columns-repeated="16376"/>
        </table:table-row>
        <table:table-row table:style-name="ro29">
          <table:table-cell table:style-name="ce50"/>
          <table:table-cell office:value-type="string" table:style-name="ce183">
            <text:p>Use of waste in construction</text:p>
          </table:table-cell>
          <table:table-cell office:value-type="string" table:style-name="ce120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formula="of:=SUM([.C7:.G7])" table:style-name="ce123">
            <text:p><text:s/>-<text:s/></text:p>
          </table:table-cell>
          <table:table-cell table:number-columns-repeated="16376"/>
        </table:table-row>
        <table:table-row table:style-name="ro5">
          <table:table-cell table:style-name="ce50"/>
          <table:table-cell office:value-type="string" table:style-name="ce184">
            <text:p>Use of waste in reclamation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formula="of:=SUM([.C8:.G8])" table:style-name="ce123">
            <text:p><text:s/>-<text:s/></text:p>
          </table:table-cell>
          <table:table-cell table:number-columns-repeated="16376"/>
        </table:table-row>
        <table:table-row table:style-name="ro30">
          <table:table-cell table:style-name="ce50"/>
          <table:table-cell office:value-type="string" table:style-name="ce185">
            <text:p>Use of waste for timber manufacturing</text:p>
          </table:table-cell>
          <table:table-cell office:value-type="float" office:value="0" table:style-name="ce39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0" table:formula="of:=SUM([.C9:.G9])" table:style-name="ce123">
            <text:p><text:s/>-<text:s/></text:p>
          </table:table-cell>
          <table:table-cell table:number-columns-repeated="16376"/>
        </table:table-row>
        <table:table-row table:style-name="ro31">
          <table:table-cell table:style-name="ce50"/>
          <table:table-cell office:value-type="string" table:style-name="ce124">
            <text:p>Total</text:p>
          </table:table-cell>
          <table:table-cell office:value-type="float" office:value="0" table:formula="of:=SUM([.C7:.C9])" table:style-name="ce43">
            <text:p><text:s/>-<text:s/></text:p>
          </table:table-cell>
          <table:table-cell office:value-type="float" office:value="0" table:formula="of:=SUM([.D7:.D9])" table:style-name="ce44">
            <text:p><text:s/>-<text:s/></text:p>
          </table:table-cell>
          <table:table-cell office:value-type="float" office:value="0" table:formula="of:=SUM([.E7:.E9])" table:style-name="ce44">
            <text:p><text:s/>-<text:s/></text:p>
          </table:table-cell>
          <table:table-cell office:value-type="float" office:value="0" table:formula="of:=SUM([.F7:.F9])" table:style-name="ce44">
            <text:p><text:s/>-<text:s/></text:p>
          </table:table-cell>
          <table:table-cell office:value-type="float" office:value="0" table:formula="of:=SUM([.G7:.G9])" table:style-name="ce44">
            <text:p><text:s/>-<text:s/></text:p>
          </table:table-cell>
          <table:table-cell office:value-type="float" office:value="0" table:formula="of:=+[.H8]+[.H7]+[.H9]" table:style-name="ce111">
            <text:p><text:s/>-<text:s/>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style-name="ce50"/>
          <table:table-cell office:value-type="string" table:style-name="ce50">
            <text:p>Note: These activities are for use of waste permitted under Standard Rules Permits for waste operations.</text:p>
          </table:table-cell>
          <table:table-cell table:number-columns-repeated="16382" table:style-name="ce50"/>
        </table:table-row>
        <table:table-row table:number-rows-repeated="1048564" table:style-name="ro5">
          <table:table-cell table:number-columns-repeated="16384"/>
        </table:table-row>
      </table:table>
      <table:table table:name="Haz_Waste_Managed_&amp;_Deposits" table:style-name="ta1">
        <table:table-column table:style-name="co47" table:default-cell-style-name="ce186"/>
        <table:table-column table:style-name="co15" table:default-cell-style-name="ce186"/>
        <table:table-column table:style-name="co48" table:default-cell-style-name="ce186"/>
        <table:table-column table:style-name="co45" table:default-cell-style-name="ce186"/>
        <table:table-column table:style-name="co49" table:number-columns-repeated="2" table:default-cell-style-name="ce186"/>
        <table:table-column table:style-name="co50" table:default-cell-style-name="ce186"/>
        <table:table-column table:style-name="co14" table:default-cell-style-name="ce186"/>
        <table:table-column table:style-name="co51" table:default-cell-style-name="ce186"/>
        <table:table-column table:style-name="co15" table:number-columns-repeated="16375" table:default-cell-style-name="ce186"/>
        <table:table-row table:style-name="ro4">
          <table:table-cell table:style-name="ce13"/>
          <table:table-cell table:number-columns-repeated="16383" table:style-name="ce186"/>
        </table:table-row>
        <table:table-row table:style-name="ro6">
          <table:table-cell table:style-name="ce186"/>
          <table:table-cell office:value-type="string" table:style-name="ce15">
            <text:p>North West: Hazardous waste managed by EWC chapter and former planning sub-region 2024 (tonnes)</text:p>
          </table:table-cell>
          <table:table-cell table:number-columns-repeated="16382" table:style-name="ce186"/>
        </table:table-row>
        <table:table-row table:style-name="ro5">
          <table:table-cell table:style-name="ce186"/>
          <table:table-cell table:style-name="ce187"/>
          <table:table-cell table:number-columns-repeated="16382" table:style-name="ce186"/>
        </table:table-row>
        <table:table-row table:style-name="ro32">
          <table:table-cell table:style-name="ce186"/>
          <table:table-cell office:value-type="string" table:style-name="ce81">
            <text:p>EWC Chapter</text:p>
          </table:table-cell>
          <table:table-cell office:value-type="string" table:style-name="ce188">
            <text:p>EWC Chapter Description</text:p>
          </table:table-cell>
          <table:table-cell office:value-type="string" table:style-name="ce19">
            <text:p>Cheshire</text:p>
          </table:table-cell>
          <table:table-cell office:value-type="string" table:style-name="ce189">
            <text:p>Cumbria</text:p>
          </table:table-cell>
          <table:table-cell office:value-type="string" table:style-name="ce189">
            <text:p>Greater Manchester</text:p>
          </table:table-cell>
          <table:table-cell office:value-type="string" table:style-name="ce189">
            <text:p>Lancashire</text:p>
          </table:table-cell>
          <table:table-cell office:value-type="string" table:style-name="ce20">
            <text:p>Merseyside</text:p>
          </table:table-cell>
          <table:table-cell office:value-type="string" table:style-name="ce190">
            <text:p>NORTH WEST</text:p>
          </table:table-cell>
          <table:table-cell table:style-name="ce191"/>
          <table:table-cell table:number-columns-repeated="16374"/>
        </table:table-row>
        <table:table-row table:style-name="ro5">
          <table:table-cell table:style-name="ce186"/>
          <table:table-cell office:value-type="string" table:style-name="ce141">
            <text:p>01</text:p>
          </table:table-cell>
          <table:table-cell office:value-type="string" table:style-name="ce165">
            <text:p>Mining and Minerals</text:p>
          </table:table-cell>
          <table:table-cell table:number-columns-repeated="2" table:style-name="ce359"/>
          <table:table-cell office:value-type="float" office:value="7" table:style-name="ce359">
            <text:p>7</text:p>
          </table:table-cell>
          <table:table-cell office:value-type="float" office:value="591" table:style-name="ce359">
            <text:p>591</text:p>
          </table:table-cell>
          <table:table-cell office:value-type="float" office:value="2" table:style-name="ce359">
            <text:p>2</text:p>
          </table:table-cell>
          <table:table-cell office:value-type="float" office:value="599" table:style-name="ce363">
            <text:p>599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02</text:p>
          </table:table-cell>
          <table:table-cell office:value-type="string" table:style-name="ce192">
            <text:p>Agricultural and Food Production</text:p>
          </table:table-cell>
          <table:table-cell office:value-type="float" office:value="20" table:style-name="ce359">
            <text:p>20</text:p>
          </table:table-cell>
          <table:table-cell office:value-type="float" office:value="0" table:style-name="ce359">
            <text:p>0</text:p>
          </table:table-cell>
          <table:table-cell office:value-type="float" office:value="4" table:style-name="ce359">
            <text:p>4</text:p>
          </table:table-cell>
          <table:table-cell office:value-type="float" office:value="7" table:style-name="ce359">
            <text:p>7</text:p>
          </table:table-cell>
          <table:table-cell office:value-type="float" office:value="6" table:style-name="ce359">
            <text:p>6</text:p>
          </table:table-cell>
          <table:table-cell office:value-type="float" office:value="37" table:style-name="ce363">
            <text:p>37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03</text:p>
          </table:table-cell>
          <table:table-cell office:value-type="string" table:style-name="ce192">
            <text:p>Wood and Paper Production</text:p>
          </table:table-cell>
          <table:table-cell table:number-columns-repeated="2" table:style-name="ce359"/>
          <table:table-cell office:value-type="float" office:value="2" table:style-name="ce359">
            <text:p>2</text:p>
          </table:table-cell>
          <table:table-cell table:number-columns-repeated="2" table:style-name="ce359"/>
          <table:table-cell office:value-type="float" office:value="2" table:style-name="ce363">
            <text:p>2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04</text:p>
          </table:table-cell>
          <table:table-cell office:value-type="string" table:style-name="ce192">
            <text:p>Leather and Textile Production</text:p>
          </table:table-cell>
          <table:table-cell office:value-type="float" office:value="8" table:style-name="ce359">
            <text:p>8</text:p>
          </table:table-cell>
          <table:table-cell office:value-type="float" office:value="6" table:style-name="ce359">
            <text:p>6</text:p>
          </table:table-cell>
          <table:table-cell office:value-type="float" office:value="4" table:style-name="ce359">
            <text:p>4</text:p>
          </table:table-cell>
          <table:table-cell office:value-type="float" office:value="2" table:style-name="ce359">
            <text:p>2</text:p>
          </table:table-cell>
          <table:table-cell office:value-type="float" office:value="1" table:style-name="ce359">
            <text:p>1</text:p>
          </table:table-cell>
          <table:table-cell office:value-type="float" office:value="21" table:style-name="ce363">
            <text:p>21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05</text:p>
          </table:table-cell>
          <table:table-cell office:value-type="string" table:style-name="ce192">
            <text:p>Petrol, Gas and Coal Refining/Treatment</text:p>
          </table:table-cell>
          <table:table-cell office:value-type="float" office:value="465" table:style-name="ce359">
            <text:p>465</text:p>
          </table:table-cell>
          <table:table-cell office:value-type="float" office:value="1" table:style-name="ce359">
            <text:p>1</text:p>
          </table:table-cell>
          <table:table-cell office:value-type="float" office:value="346" table:style-name="ce359">
            <text:p>346</text:p>
          </table:table-cell>
          <table:table-cell office:value-type="float" office:value="85" table:style-name="ce359">
            <text:p>85</text:p>
          </table:table-cell>
          <table:table-cell office:value-type="float" office:value="174" table:style-name="ce359">
            <text:p>174</text:p>
          </table:table-cell>
          <table:table-cell office:value-type="float" office:value="1072" table:style-name="ce364">
            <text:p>1,072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06</text:p>
          </table:table-cell>
          <table:table-cell office:value-type="string" table:style-name="ce192">
            <text:p>Inorganic Chemical Processes</text:p>
          </table:table-cell>
          <table:table-cell office:value-type="float" office:value="5917" table:style-name="ce360">
            <text:p>5,917</text:p>
          </table:table-cell>
          <table:table-cell office:value-type="float" office:value="447" table:style-name="ce359">
            <text:p>447</text:p>
          </table:table-cell>
          <table:table-cell office:value-type="float" office:value="926" table:style-name="ce359">
            <text:p>926</text:p>
          </table:table-cell>
          <table:table-cell office:value-type="float" office:value="2228" table:style-name="ce360">
            <text:p>2,228</text:p>
          </table:table-cell>
          <table:table-cell office:value-type="float" office:value="3156" table:style-name="ce360">
            <text:p>3,156</text:p>
          </table:table-cell>
          <table:table-cell office:value-type="float" office:value="12674" table:style-name="ce364">
            <text:p>12,674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07</text:p>
          </table:table-cell>
          <table:table-cell office:value-type="string" table:style-name="ce192">
            <text:p>Organic Chemical Processes</text:p>
          </table:table-cell>
          <table:table-cell office:value-type="float" office:value="13289" table:style-name="ce360">
            <text:p>13,289</text:p>
          </table:table-cell>
          <table:table-cell office:value-type="float" office:value="2429" table:style-name="ce360">
            <text:p>2,429</text:p>
          </table:table-cell>
          <table:table-cell office:value-type="float" office:value="2557" table:style-name="ce360">
            <text:p>2,557</text:p>
          </table:table-cell>
          <table:table-cell office:value-type="float" office:value="3959" table:style-name="ce360">
            <text:p>3,959</text:p>
          </table:table-cell>
          <table:table-cell office:value-type="float" office:value="21723" table:style-name="ce360">
            <text:p>21,723</text:p>
          </table:table-cell>
          <table:table-cell office:value-type="float" office:value="43959" table:style-name="ce364">
            <text:p>43,959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08</text:p>
          </table:table-cell>
          <table:table-cell office:value-type="string" table:style-name="ce192">
            <text:p>MFSU Paints, Varnish, Adhesive and Inks</text:p>
          </table:table-cell>
          <table:table-cell office:value-type="float" office:value="1788" table:style-name="ce360">
            <text:p>1,788</text:p>
          </table:table-cell>
          <table:table-cell office:value-type="float" office:value="386" table:style-name="ce359">
            <text:p>386</text:p>
          </table:table-cell>
          <table:table-cell office:value-type="float" office:value="2798" table:style-name="ce360">
            <text:p>2,798</text:p>
          </table:table-cell>
          <table:table-cell office:value-type="float" office:value="2691" table:style-name="ce360">
            <text:p>2,691</text:p>
          </table:table-cell>
          <table:table-cell office:value-type="float" office:value="2887" table:style-name="ce360">
            <text:p>2,887</text:p>
          </table:table-cell>
          <table:table-cell office:value-type="float" office:value="10551" table:style-name="ce364">
            <text:p>10,551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09</text:p>
          </table:table-cell>
          <table:table-cell office:value-type="string" table:style-name="ce192">
            <text:p>Photographic Industry</text:p>
          </table:table-cell>
          <table:table-cell office:value-type="float" office:value="38" table:style-name="ce359">
            <text:p>38</text:p>
          </table:table-cell>
          <table:table-cell office:value-type="float" office:value="16" table:style-name="ce359">
            <text:p>16</text:p>
          </table:table-cell>
          <table:table-cell office:value-type="float" office:value="49" table:style-name="ce359">
            <text:p>49</text:p>
          </table:table-cell>
          <table:table-cell office:value-type="float" office:value="11" table:style-name="ce359">
            <text:p>11</text:p>
          </table:table-cell>
          <table:table-cell office:value-type="float" office:value="129" table:style-name="ce359">
            <text:p>129</text:p>
          </table:table-cell>
          <table:table-cell office:value-type="float" office:value="243" table:style-name="ce363">
            <text:p>243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10</text:p>
          </table:table-cell>
          <table:table-cell office:value-type="string" table:style-name="ce192">
            <text:p>Thermal Process Waste (inorganic)</text:p>
          </table:table-cell>
          <table:table-cell office:value-type="float" office:value="1970" table:style-name="ce360">
            <text:p>1,970</text:p>
          </table:table-cell>
          <table:table-cell office:value-type="float" office:value="6" table:style-name="ce359">
            <text:p>6</text:p>
          </table:table-cell>
          <table:table-cell office:value-type="float" office:value="7268" table:style-name="ce360">
            <text:p>7,268</text:p>
          </table:table-cell>
          <table:table-cell office:value-type="float" office:value="230" table:style-name="ce359">
            <text:p>230</text:p>
          </table:table-cell>
          <table:table-cell office:value-type="float" office:value="1154" table:style-name="ce360">
            <text:p>1,154</text:p>
          </table:table-cell>
          <table:table-cell office:value-type="float" office:value="10629" table:style-name="ce364">
            <text:p>10,629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11</text:p>
          </table:table-cell>
          <table:table-cell office:value-type="string" table:style-name="ce192">
            <text:p>Metal Treatment and Coating Processes</text:p>
          </table:table-cell>
          <table:table-cell office:value-type="float" office:value="3615" table:style-name="ce360">
            <text:p>3,615</text:p>
          </table:table-cell>
          <table:table-cell office:value-type="float" office:value="61" table:style-name="ce359">
            <text:p>61</text:p>
          </table:table-cell>
          <table:table-cell office:value-type="float" office:value="1589" table:style-name="ce360">
            <text:p>1,589</text:p>
          </table:table-cell>
          <table:table-cell office:value-type="float" office:value="6895" table:style-name="ce360">
            <text:p>6,895</text:p>
          </table:table-cell>
          <table:table-cell office:value-type="float" office:value="1351" table:style-name="ce360">
            <text:p>1,351</text:p>
          </table:table-cell>
          <table:table-cell office:value-type="float" office:value="13511" table:style-name="ce364">
            <text:p>13,511</text:p>
          </table:table-cell>
          <table:table-cell table:number-columns-repeated="16375" table:style-name="ce186"/>
        </table:table-row>
        <table:table-row table:style-name="ro5">
          <table:table-cell table:style-name="ce186"/>
          <table:table-cell office:value-type="string" table:style-name="ce156">
            <text:p>12</text:p>
          </table:table-cell>
          <table:table-cell office:value-type="string" table:style-name="ce192">
            <text:p>Shaping/Treatment of Metals and Plastics</text:p>
          </table:table-cell>
          <table:table-cell office:value-type="float" office:value="414" table:style-name="ce359">
            <text:p>414</text:p>
          </table:table-cell>
          <table:table-cell office:value-type="float" office:value="165" table:style-name="ce359">
            <text:p>165</text:p>
          </table:table-cell>
          <table:table-cell office:value-type="float" office:value="1556" table:style-name="ce360">
            <text:p>1,556</text:p>
          </table:table-cell>
          <table:table-cell office:value-type="float" office:value="1736" table:style-name="ce360">
            <text:p>1,736</text:p>
          </table:table-cell>
          <table:table-cell office:value-type="float" office:value="762" table:style-name="ce359">
            <text:p>762</text:p>
          </table:table-cell>
          <table:table-cell office:value-type="float" office:value="4633" table:style-name="ce364">
            <text:p>4,633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56">
            <text:p>13</text:p>
          </table:table-cell>
          <table:table-cell office:value-type="string" table:style-name="ce192">
            <text:p>Oil and Oil/Water Mixtures</text:p>
          </table:table-cell>
          <table:table-cell office:value-type="float" office:value="11395" table:style-name="ce360">
            <text:p>11,395</text:p>
          </table:table-cell>
          <table:table-cell office:value-type="float" office:value="4694" table:style-name="ce360">
            <text:p>4,694</text:p>
          </table:table-cell>
          <table:table-cell office:value-type="float" office:value="24494" table:style-name="ce360">
            <text:p>24,494</text:p>
          </table:table-cell>
          <table:table-cell office:value-type="float" office:value="15215" table:style-name="ce360">
            <text:p>15,215</text:p>
          </table:table-cell>
          <table:table-cell office:value-type="float" office:value="14233" table:style-name="ce360">
            <text:p>14,233</text:p>
          </table:table-cell>
          <table:table-cell office:value-type="float" office:value="70031" table:style-name="ce364">
            <text:p>70,031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6">
            <text:p>14</text:p>
          </table:table-cell>
          <table:table-cell office:value-type="string" table:style-name="ce192">
            <text:p>Solvents</text:p>
          </table:table-cell>
          <table:table-cell office:value-type="float" office:value="908" table:style-name="ce359">
            <text:p>908</text:p>
          </table:table-cell>
          <table:table-cell office:value-type="float" office:value="86" table:style-name="ce359">
            <text:p>86</text:p>
          </table:table-cell>
          <table:table-cell office:value-type="float" office:value="1991" table:style-name="ce360">
            <text:p>1,991</text:p>
          </table:table-cell>
          <table:table-cell office:value-type="float" office:value="878" table:style-name="ce359">
            <text:p>878</text:p>
          </table:table-cell>
          <table:table-cell office:value-type="float" office:value="547" table:style-name="ce359">
            <text:p>547</text:p>
          </table:table-cell>
          <table:table-cell office:value-type="float" office:value="4409" table:style-name="ce364">
            <text:p>4,409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6">
            <text:p>15</text:p>
          </table:table-cell>
          <table:table-cell office:value-type="string" table:style-name="ce192">
            <text:p>Packaging, Cloths, Filter Materials</text:p>
          </table:table-cell>
          <table:table-cell office:value-type="float" office:value="2202" table:style-name="ce360">
            <text:p>2,202</text:p>
          </table:table-cell>
          <table:table-cell office:value-type="float" office:value="674" table:style-name="ce359">
            <text:p>674</text:p>
          </table:table-cell>
          <table:table-cell office:value-type="float" office:value="7917" table:style-name="ce360">
            <text:p>7,917</text:p>
          </table:table-cell>
          <table:table-cell office:value-type="float" office:value="3176" table:style-name="ce360">
            <text:p>3,176</text:p>
          </table:table-cell>
          <table:table-cell office:value-type="float" office:value="4484" table:style-name="ce360">
            <text:p>4,484</text:p>
          </table:table-cell>
          <table:table-cell office:value-type="float" office:value="18453" table:style-name="ce364">
            <text:p>18,453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6">
            <text:p>16</text:p>
          </table:table-cell>
          <table:table-cell office:value-type="string" table:style-name="ce192">
            <text:p>Not Otherwise Specified*</text:p>
          </table:table-cell>
          <table:table-cell office:value-type="float" office:value="8927" table:style-name="ce360">
            <text:p>8,927</text:p>
          </table:table-cell>
          <table:table-cell office:value-type="float" office:value="3178" table:style-name="ce360">
            <text:p>3,178</text:p>
          </table:table-cell>
          <table:table-cell office:value-type="float" office:value="23686" table:style-name="ce360">
            <text:p>23,686</text:p>
          </table:table-cell>
          <table:table-cell office:value-type="float" office:value="22060" table:style-name="ce360">
            <text:p>22,060</text:p>
          </table:table-cell>
          <table:table-cell office:value-type="float" office:value="17830" table:style-name="ce360">
            <text:p>17,830</text:p>
          </table:table-cell>
          <table:table-cell office:value-type="float" office:value="75683" table:style-name="ce364">
            <text:p>75,683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6">
            <text:p>17</text:p>
          </table:table-cell>
          <table:table-cell office:value-type="string" table:style-name="ce192">
            <text:p>C&amp;D Waste and Asbestos</text:p>
          </table:table-cell>
          <table:table-cell office:value-type="float" office:value="23847" table:style-name="ce360">
            <text:p>23,847</text:p>
          </table:table-cell>
          <table:table-cell office:value-type="float" office:value="19095" table:style-name="ce360">
            <text:p>19,095</text:p>
          </table:table-cell>
          <table:table-cell office:value-type="float" office:value="73256" table:style-name="ce360">
            <text:p>73,256</text:p>
          </table:table-cell>
          <table:table-cell office:value-type="float" office:value="14100" table:style-name="ce360">
            <text:p>14,100</text:p>
          </table:table-cell>
          <table:table-cell office:value-type="float" office:value="24542" table:style-name="ce360">
            <text:p>24,542</text:p>
          </table:table-cell>
          <table:table-cell office:value-type="float" office:value="154840" table:style-name="ce364">
            <text:p>154,84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6">
            <text:p>18</text:p>
          </table:table-cell>
          <table:table-cell office:value-type="string" table:style-name="ce192">
            <text:p>Healthcare</text:p>
          </table:table-cell>
          <table:table-cell office:value-type="float" office:value="2974" table:style-name="ce360">
            <text:p>2,974</text:p>
          </table:table-cell>
          <table:table-cell office:value-type="float" office:value="851" table:style-name="ce359">
            <text:p>851</text:p>
          </table:table-cell>
          <table:table-cell office:value-type="float" office:value="6929" table:style-name="ce360">
            <text:p>6,929</text:p>
          </table:table-cell>
          <table:table-cell office:value-type="float" office:value="2187" table:style-name="ce360">
            <text:p>2,187</text:p>
          </table:table-cell>
          <table:table-cell office:value-type="float" office:value="5962" table:style-name="ce360">
            <text:p>5,962</text:p>
          </table:table-cell>
          <table:table-cell office:value-type="float" office:value="18903" table:style-name="ce364">
            <text:p>18,903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56">
            <text:p>19</text:p>
          </table:table-cell>
          <table:table-cell office:value-type="string" table:style-name="ce192">
            <text:p>Waste Treatment /Water Treatment and Water Industry</text:p>
          </table:table-cell>
          <table:table-cell office:value-type="float" office:value="25209" table:style-name="ce360">
            <text:p>25,209</text:p>
          </table:table-cell>
          <table:table-cell office:value-type="float" office:value="160" table:style-name="ce359">
            <text:p>160</text:p>
          </table:table-cell>
          <table:table-cell office:value-type="float" office:value="36384" table:style-name="ce360">
            <text:p>36,384</text:p>
          </table:table-cell>
          <table:table-cell office:value-type="float" office:value="55219" table:style-name="ce360">
            <text:p>55,219</text:p>
          </table:table-cell>
          <table:table-cell office:value-type="float" office:value="225619" table:style-name="ce360">
            <text:p>225,619</text:p>
          </table:table-cell>
          <table:table-cell office:value-type="float" office:value="342590" table:style-name="ce364">
            <text:p>342,59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93">
            <text:p>20</text:p>
          </table:table-cell>
          <table:table-cell office:value-type="string" table:style-name="ce166">
            <text:p>Municipal and Similar Commercial Wastes</text:p>
          </table:table-cell>
          <table:table-cell office:value-type="float" office:value="11338" table:style-name="ce360">
            <text:p>11,338</text:p>
          </table:table-cell>
          <table:table-cell office:value-type="float" office:value="5599" table:style-name="ce360">
            <text:p>5,599</text:p>
          </table:table-cell>
          <table:table-cell office:value-type="float" office:value="23059" table:style-name="ce360">
            <text:p>23,059</text:p>
          </table:table-cell>
          <table:table-cell office:value-type="float" office:value="16184" table:style-name="ce360">
            <text:p>16,184</text:p>
          </table:table-cell>
          <table:table-cell office:value-type="float" office:value="9381" table:style-name="ce360">
            <text:p>9,381</text:p>
          </table:table-cell>
          <table:table-cell office:value-type="float" office:value="65560" table:style-name="ce364">
            <text:p>65,560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42">
            <text:p>Total<text:s/></text:p>
          </table:table-cell>
          <table:table-cell table:style-name="ce194"/>
          <table:table-cell office:value-type="float" office:value="114322" table:style-name="ce361">
            <text:p>114,322</text:p>
          </table:table-cell>
          <table:table-cell office:value-type="float" office:value="37857" table:style-name="ce361">
            <text:p>37,857</text:p>
          </table:table-cell>
          <table:table-cell office:value-type="float" office:value="214822" table:style-name="ce361">
            <text:p>214,822</text:p>
          </table:table-cell>
          <table:table-cell office:value-type="float" office:value="147454" table:style-name="ce361">
            <text:p>147,454</text:p>
          </table:table-cell>
          <table:table-cell office:value-type="float" office:value="333944" table:style-name="ce361">
            <text:p>333,944</text:p>
          </table:table-cell>
          <table:table-cell office:value-type="float" office:value="848399" table:style-name="ce362">
            <text:p>848,399</text:p>
          </table:table-cell>
          <table:table-cell table:number-columns-repeated="16375"/>
        </table:table-row>
        <table:table-row table:style-name="ro4">
          <table:table-cell/>
          <table:table-cell table:style-name="ce195"/>
          <table:table-cell table:number-columns-repeated="16382" table:style-name="ce186"/>
        </table:table-row>
        <table:table-row table:style-name="ro5">
          <table:table-cell/>
          <table:table-cell office:value-type="string" table:style-name="ce46">
            <text:p>Notes:</text:p>
          </table:table-cell>
          <table:table-cell table:style-name="ce186"/>
          <table:table-cell table:style-name="ce196"/>
          <table:table-cell table:number-columns-repeated="16380" table:style-name="ce186"/>
        </table:table-row>
        <table:table-row table:style-name="ro5">
          <table:table-cell/>
          <table:table-cell office:value-type="string" table:style-name="ce14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86"/>
        </table:table-row>
        <table:table-row table:style-name="ro5">
          <table:table-cell/>
          <table:table-cell office:value-type="string" table:style-name="ce14">
            <text:p>This double counting should be taken into account when using this data.</text:p>
          </table:table-cell>
          <table:table-cell table:number-columns-repeated="16382" table:style-name="ce186"/>
        </table:table-row>
        <table:table-row table:style-name="ro5">
          <table:table-cell/>
          <table:table-cell office:value-type="string" table:style-name="ce14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86"/>
        </table:table-row>
        <table:table-row table:number-rows-repeated="2" table:style-name="ro4">
          <table:table-cell table:number-columns-repeated="16384"/>
        </table:table-row>
        <table:table-row table:style-name="ro6">
          <table:table-cell/>
          <table:table-cell office:value-type="string" table:style-name="ce15">
            <text:p>North West: Hazardous waste deposited by EWC chapter and former planning sub-region 2024 (tonnes)</text:p>
          </table:table-cell>
          <table:table-cell table:number-columns-repeated="16382" table:style-name="ce186"/>
        </table:table-row>
        <table:table-row table:style-name="ro4">
          <table:table-cell table:number-columns-repeated="16384"/>
        </table:table-row>
        <table:table-row table:style-name="ro32">
          <table:table-cell/>
          <table:table-cell office:value-type="string" table:style-name="ce81">
            <text:p>EWC Chapter</text:p>
          </table:table-cell>
          <table:table-cell office:value-type="string" table:style-name="ce188">
            <text:p>EWC Chapter Description</text:p>
          </table:table-cell>
          <table:table-cell office:value-type="string" table:style-name="ce19">
            <text:p>Cheshire</text:p>
          </table:table-cell>
          <table:table-cell office:value-type="string" table:style-name="ce189">
            <text:p>Cumbria</text:p>
          </table:table-cell>
          <table:table-cell office:value-type="string" table:style-name="ce189">
            <text:p>Greater Manchester</text:p>
          </table:table-cell>
          <table:table-cell office:value-type="string" table:style-name="ce189">
            <text:p>Lancashire</text:p>
          </table:table-cell>
          <table:table-cell office:value-type="string" table:style-name="ce20">
            <text:p>Merseyside</text:p>
          </table:table-cell>
          <table:table-cell office:value-type="string" table:style-name="ce190">
            <text:p>NORTH WEST</text:p>
          </table:table-cell>
          <table:table-cell table:number-columns-repeated="3" table:style-name="ce197"/>
          <table:table-cell table:number-columns-repeated="16372"/>
        </table:table-row>
        <table:table-row table:style-name="ro5">
          <table:table-cell/>
          <table:table-cell office:value-type="string" table:style-name="ce198">
            <text:p>01</text:p>
          </table:table-cell>
          <table:table-cell office:value-type="string" table:style-name="ce199">
            <text:p>Mining and Minerals</text:p>
          </table:table-cell>
          <table:table-cell office:value-type="float" office:value="14" table:style-name="ce359">
            <text:p>14</text:p>
          </table:table-cell>
          <table:table-cell table:style-name="ce359"/>
          <table:table-cell office:value-type="float" office:value="228" table:style-name="ce359">
            <text:p>228</text:p>
          </table:table-cell>
          <table:table-cell office:value-type="float" office:value="181" table:style-name="ce359">
            <text:p>181</text:p>
          </table:table-cell>
          <table:table-cell office:value-type="float" office:value="3" table:style-name="ce359">
            <text:p>3</text:p>
          </table:table-cell>
          <table:table-cell office:value-type="float" office:value="426" table:style-name="ce363">
            <text:p>426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02</text:p>
          </table:table-cell>
          <table:table-cell office:value-type="string" table:style-name="ce199">
            <text:p>Agricultural and Food Production</text:p>
          </table:table-cell>
          <table:table-cell office:value-type="float" office:value="51" table:style-name="ce359">
            <text:p>51</text:p>
          </table:table-cell>
          <table:table-cell office:value-type="float" office:value="0" table:style-name="ce359">
            <text:p>0</text:p>
          </table:table-cell>
          <table:table-cell office:value-type="float" office:value="40" table:style-name="ce359">
            <text:p>40</text:p>
          </table:table-cell>
          <table:table-cell office:value-type="float" office:value="24" table:style-name="ce359">
            <text:p>24</text:p>
          </table:table-cell>
          <table:table-cell office:value-type="float" office:value="139" table:style-name="ce359">
            <text:p>139</text:p>
          </table:table-cell>
          <table:table-cell office:value-type="float" office:value="253" table:style-name="ce363">
            <text:p>253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03</text:p>
          </table:table-cell>
          <table:table-cell office:value-type="string" table:style-name="ce199">
            <text:p>Wood and Paper Production</text:p>
          </table:table-cell>
          <table:table-cell office:value-type="float" office:value="20" table:style-name="ce359">
            <text:p>20</text:p>
          </table:table-cell>
          <table:table-cell table:style-name="ce359"/>
          <table:table-cell office:value-type="float" office:value="70" table:style-name="ce359">
            <text:p>70</text:p>
          </table:table-cell>
          <table:table-cell office:value-type="float" office:value="3" table:style-name="ce359">
            <text:p>3</text:p>
          </table:table-cell>
          <table:table-cell office:value-type="float" office:value="1" table:style-name="ce359">
            <text:p>1</text:p>
          </table:table-cell>
          <table:table-cell office:value-type="float" office:value="94" table:style-name="ce363">
            <text:p>94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04</text:p>
          </table:table-cell>
          <table:table-cell office:value-type="string" table:style-name="ce199">
            <text:p>Leather and Textile Production</text:p>
          </table:table-cell>
          <table:table-cell office:value-type="float" office:value="2" table:style-name="ce359">
            <text:p>2</text:p>
          </table:table-cell>
          <table:table-cell office:value-type="float" office:value="6" table:style-name="ce359">
            <text:p>6</text:p>
          </table:table-cell>
          <table:table-cell office:value-type="float" office:value="126" table:style-name="ce359">
            <text:p>126</text:p>
          </table:table-cell>
          <table:table-cell office:value-type="float" office:value="55" table:style-name="ce359">
            <text:p>55</text:p>
          </table:table-cell>
          <table:table-cell office:value-type="float" office:value="8" table:style-name="ce359">
            <text:p>8</text:p>
          </table:table-cell>
          <table:table-cell office:value-type="float" office:value="196" table:style-name="ce363">
            <text:p>196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05</text:p>
          </table:table-cell>
          <table:table-cell office:value-type="string" table:style-name="ce199">
            <text:p>Petrol, Gas and Coal Refining/Treatment</text:p>
          </table:table-cell>
          <table:table-cell office:value-type="float" office:value="2415" table:style-name="ce360">
            <text:p>2,415</text:p>
          </table:table-cell>
          <table:table-cell table:style-name="ce359"/>
          <table:table-cell office:value-type="float" office:value="2961" table:style-name="ce360">
            <text:p>2,961</text:p>
          </table:table-cell>
          <table:table-cell office:value-type="float" office:value="506" table:style-name="ce359">
            <text:p>506</text:p>
          </table:table-cell>
          <table:table-cell office:value-type="float" office:value="38" table:style-name="ce359">
            <text:p>38</text:p>
          </table:table-cell>
          <table:table-cell office:value-type="float" office:value="5921" table:style-name="ce364">
            <text:p>5,921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06</text:p>
          </table:table-cell>
          <table:table-cell office:value-type="string" table:style-name="ce199">
            <text:p>Inorganic Chemical Processes</text:p>
          </table:table-cell>
          <table:table-cell office:value-type="float" office:value="5003" table:style-name="ce360">
            <text:p>5,003</text:p>
          </table:table-cell>
          <table:table-cell office:value-type="float" office:value="280" table:style-name="ce359">
            <text:p>280</text:p>
          </table:table-cell>
          <table:table-cell office:value-type="float" office:value="8276" table:style-name="ce360">
            <text:p>8,276</text:p>
          </table:table-cell>
          <table:table-cell office:value-type="float" office:value="584" table:style-name="ce359">
            <text:p>584</text:p>
          </table:table-cell>
          <table:table-cell office:value-type="float" office:value="6011" table:style-name="ce360">
            <text:p>6,011</text:p>
          </table:table-cell>
          <table:table-cell office:value-type="float" office:value="20155" table:style-name="ce364">
            <text:p>20,155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07</text:p>
          </table:table-cell>
          <table:table-cell office:value-type="string" table:style-name="ce199">
            <text:p>Organic Chemical Processes</text:p>
          </table:table-cell>
          <table:table-cell office:value-type="float" office:value="25909" table:style-name="ce360">
            <text:p>25,909</text:p>
          </table:table-cell>
          <table:table-cell office:value-type="float" office:value="476" table:style-name="ce359">
            <text:p>476</text:p>
          </table:table-cell>
          <table:table-cell office:value-type="float" office:value="19129" table:style-name="ce360">
            <text:p>19,129</text:p>
          </table:table-cell>
          <table:table-cell office:value-type="float" office:value="31956" table:style-name="ce360">
            <text:p>31,956</text:p>
          </table:table-cell>
          <table:table-cell office:value-type="float" office:value="12704" table:style-name="ce360">
            <text:p>12,704</text:p>
          </table:table-cell>
          <table:table-cell office:value-type="float" office:value="90173" table:style-name="ce364">
            <text:p>90,173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08</text:p>
          </table:table-cell>
          <table:table-cell office:value-type="string" table:style-name="ce199">
            <text:p>MFSU Paints, Varnish, Adhesive and Inks</text:p>
          </table:table-cell>
          <table:table-cell office:value-type="float" office:value="3879" table:style-name="ce360">
            <text:p>3,879</text:p>
          </table:table-cell>
          <table:table-cell office:value-type="float" office:value="97" table:style-name="ce359">
            <text:p>97</text:p>
          </table:table-cell>
          <table:table-cell office:value-type="float" office:value="4087" table:style-name="ce360">
            <text:p>4,087</text:p>
          </table:table-cell>
          <table:table-cell office:value-type="float" office:value="6765" table:style-name="ce360">
            <text:p>6,765</text:p>
          </table:table-cell>
          <table:table-cell office:value-type="float" office:value="11520" table:style-name="ce360">
            <text:p>11,520</text:p>
          </table:table-cell>
          <table:table-cell office:value-type="float" office:value="26348" table:style-name="ce364">
            <text:p>26,348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09</text:p>
          </table:table-cell>
          <table:table-cell office:value-type="string" table:style-name="ce199">
            <text:p>Photographic Industry</text:p>
          </table:table-cell>
          <table:table-cell office:value-type="float" office:value="27" table:style-name="ce359">
            <text:p>27</text:p>
          </table:table-cell>
          <table:table-cell office:value-type="float" office:value="3" table:style-name="ce359">
            <text:p>3</text:p>
          </table:table-cell>
          <table:table-cell office:value-type="float" office:value="530" table:style-name="ce359">
            <text:p>530</text:p>
          </table:table-cell>
          <table:table-cell office:value-type="float" office:value="12" table:style-name="ce359">
            <text:p>12</text:p>
          </table:table-cell>
          <table:table-cell office:value-type="float" office:value="119" table:style-name="ce359">
            <text:p>119</text:p>
          </table:table-cell>
          <table:table-cell office:value-type="float" office:value="691" table:style-name="ce363">
            <text:p>691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10</text:p>
          </table:table-cell>
          <table:table-cell office:value-type="string" table:style-name="ce199">
            <text:p>Thermal Process Waste (inorganic)</text:p>
          </table:table-cell>
          <table:table-cell office:value-type="float" office:value="5402" table:style-name="ce360">
            <text:p>5,402</text:p>
          </table:table-cell>
          <table:table-cell office:value-type="float" office:value="0" table:style-name="ce359">
            <text:p>0</text:p>
          </table:table-cell>
          <table:table-cell office:value-type="float" office:value="1323" table:style-name="ce360">
            <text:p>1,323</text:p>
          </table:table-cell>
          <table:table-cell office:value-type="float" office:value="71335" table:style-name="ce360">
            <text:p>71,335</text:p>
          </table:table-cell>
          <table:table-cell office:value-type="float" office:value="34" table:style-name="ce359">
            <text:p>34</text:p>
          </table:table-cell>
          <table:table-cell office:value-type="float" office:value="78094" table:style-name="ce364">
            <text:p>78,094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11</text:p>
          </table:table-cell>
          <table:table-cell office:value-type="string" table:style-name="ce199">
            <text:p>Metal Treatment and Coating Processes</text:p>
          </table:table-cell>
          <table:table-cell office:value-type="float" office:value="255" table:style-name="ce359">
            <text:p>255</text:p>
          </table:table-cell>
          <table:table-cell office:value-type="float" office:value="34" table:style-name="ce359">
            <text:p>34</text:p>
          </table:table-cell>
          <table:table-cell office:value-type="float" office:value="5184" table:style-name="ce360">
            <text:p>5,184</text:p>
          </table:table-cell>
          <table:table-cell office:value-type="float" office:value="1165" table:style-name="ce360">
            <text:p>1,165</text:p>
          </table:table-cell>
          <table:table-cell office:value-type="float" office:value="6118" table:style-name="ce360">
            <text:p>6,118</text:p>
          </table:table-cell>
          <table:table-cell office:value-type="float" office:value="12756" table:style-name="ce364">
            <text:p>12,756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12</text:p>
          </table:table-cell>
          <table:table-cell office:value-type="string" table:style-name="ce199">
            <text:p>Shaping/Treatment of Metals and Plastics</text:p>
          </table:table-cell>
          <table:table-cell office:value-type="float" office:value="125" table:style-name="ce359">
            <text:p>125</text:p>
          </table:table-cell>
          <table:table-cell office:value-type="float" office:value="51" table:style-name="ce359">
            <text:p>51</text:p>
          </table:table-cell>
          <table:table-cell office:value-type="float" office:value="1247" table:style-name="ce360">
            <text:p>1,247</text:p>
          </table:table-cell>
          <table:table-cell office:value-type="float" office:value="3019" table:style-name="ce360">
            <text:p>3,019</text:p>
          </table:table-cell>
          <table:table-cell office:value-type="float" office:value="1732" table:style-name="ce360">
            <text:p>1,732</text:p>
          </table:table-cell>
          <table:table-cell office:value-type="float" office:value="6175" table:style-name="ce364">
            <text:p>6,175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13</text:p>
          </table:table-cell>
          <table:table-cell office:value-type="string" table:style-name="ce199">
            <text:p>Oil and Oil/Water Mixtures</text:p>
          </table:table-cell>
          <table:table-cell office:value-type="float" office:value="12986" table:style-name="ce360">
            <text:p>12,986</text:p>
          </table:table-cell>
          <table:table-cell office:value-type="float" office:value="1265" table:style-name="ce360">
            <text:p>1,265</text:p>
          </table:table-cell>
          <table:table-cell office:value-type="float" office:value="33789" table:style-name="ce360">
            <text:p>33,789</text:p>
          </table:table-cell>
          <table:table-cell office:value-type="float" office:value="8490" table:style-name="ce360">
            <text:p>8,490</text:p>
          </table:table-cell>
          <table:table-cell office:value-type="float" office:value="66126" table:style-name="ce360">
            <text:p>66,126</text:p>
          </table:table-cell>
          <table:table-cell office:value-type="float" office:value="122655" table:style-name="ce364">
            <text:p>122,655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14</text:p>
          </table:table-cell>
          <table:table-cell office:value-type="string" table:style-name="ce199">
            <text:p>Solvents</text:p>
          </table:table-cell>
          <table:table-cell office:value-type="float" office:value="2708" table:style-name="ce360">
            <text:p>2,708</text:p>
          </table:table-cell>
          <table:table-cell office:value-type="float" office:value="56" table:style-name="ce359">
            <text:p>56</text:p>
          </table:table-cell>
          <table:table-cell office:value-type="float" office:value="601" table:style-name="ce359">
            <text:p>601</text:p>
          </table:table-cell>
          <table:table-cell office:value-type="float" office:value="6838" table:style-name="ce360">
            <text:p>6,838</text:p>
          </table:table-cell>
          <table:table-cell office:value-type="float" office:value="1970" table:style-name="ce360">
            <text:p>1,970</text:p>
          </table:table-cell>
          <table:table-cell office:value-type="float" office:value="12173" table:style-name="ce364">
            <text:p>12,173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15</text:p>
          </table:table-cell>
          <table:table-cell office:value-type="string" table:style-name="ce199">
            <text:p>Packaging, Cloths, Filter Materials</text:p>
          </table:table-cell>
          <table:table-cell office:value-type="float" office:value="3049" table:style-name="ce360">
            <text:p>3,049</text:p>
          </table:table-cell>
          <table:table-cell office:value-type="float" office:value="249" table:style-name="ce359">
            <text:p>249</text:p>
          </table:table-cell>
          <table:table-cell office:value-type="float" office:value="7928" table:style-name="ce360">
            <text:p>7,928</text:p>
          </table:table-cell>
          <table:table-cell office:value-type="float" office:value="4376" table:style-name="ce360">
            <text:p>4,376</text:p>
          </table:table-cell>
          <table:table-cell office:value-type="float" office:value="6038" table:style-name="ce360">
            <text:p>6,038</text:p>
          </table:table-cell>
          <table:table-cell office:value-type="float" office:value="21641" table:style-name="ce364">
            <text:p>21,641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16</text:p>
          </table:table-cell>
          <table:table-cell office:value-type="string" table:style-name="ce199">
            <text:p>Not Otherwise Specified*</text:p>
          </table:table-cell>
          <table:table-cell office:value-type="float" office:value="11637" table:style-name="ce360">
            <text:p>11,637</text:p>
          </table:table-cell>
          <table:table-cell office:value-type="float" office:value="403" table:style-name="ce359">
            <text:p>403</text:p>
          </table:table-cell>
          <table:table-cell office:value-type="float" office:value="41333" table:style-name="ce360">
            <text:p>41,333</text:p>
          </table:table-cell>
          <table:table-cell office:value-type="float" office:value="19394" table:style-name="ce360">
            <text:p>19,394</text:p>
          </table:table-cell>
          <table:table-cell office:value-type="float" office:value="22737" table:style-name="ce360">
            <text:p>22,737</text:p>
          </table:table-cell>
          <table:table-cell office:value-type="float" office:value="95504" table:style-name="ce364">
            <text:p>95,504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17</text:p>
          </table:table-cell>
          <table:table-cell office:value-type="string" table:style-name="ce199">
            <text:p>C&amp;D Waste and Asbestos</text:p>
          </table:table-cell>
          <table:table-cell office:value-type="float" office:value="55113" table:style-name="ce360">
            <text:p>55,113</text:p>
          </table:table-cell>
          <table:table-cell office:value-type="float" office:value="873" table:style-name="ce359">
            <text:p>873</text:p>
          </table:table-cell>
          <table:table-cell office:value-type="float" office:value="6235" table:style-name="ce360">
            <text:p>6,235</text:p>
          </table:table-cell>
          <table:table-cell office:value-type="float" office:value="41470" table:style-name="ce360">
            <text:p>41,470</text:p>
          </table:table-cell>
          <table:table-cell office:value-type="float" office:value="1484" table:style-name="ce360">
            <text:p>1,484</text:p>
          </table:table-cell>
          <table:table-cell office:value-type="float" office:value="105175" table:style-name="ce364">
            <text:p>105,175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18</text:p>
          </table:table-cell>
          <table:table-cell office:value-type="string" table:style-name="ce199">
            <text:p>Healthcare</text:p>
          </table:table-cell>
          <table:table-cell office:value-type="float" office:value="1038" table:style-name="ce360">
            <text:p>1,038</text:p>
          </table:table-cell>
          <table:table-cell office:value-type="float" office:value="1" table:style-name="ce359">
            <text:p>1</text:p>
          </table:table-cell>
          <table:table-cell office:value-type="float" office:value="5896" table:style-name="ce360">
            <text:p>5,896</text:p>
          </table:table-cell>
          <table:table-cell office:value-type="float" office:value="377" table:style-name="ce359">
            <text:p>377</text:p>
          </table:table-cell>
          <table:table-cell office:value-type="float" office:value="11684" table:style-name="ce360">
            <text:p>11,684</text:p>
          </table:table-cell>
          <table:table-cell office:value-type="float" office:value="18996" table:style-name="ce364">
            <text:p>18,996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198">
            <text:p>19</text:p>
          </table:table-cell>
          <table:table-cell office:value-type="string" table:style-name="ce199">
            <text:p>Waste Treatment /Water Treatment and Water Industry</text:p>
          </table:table-cell>
          <table:table-cell office:value-type="float" office:value="40268" table:style-name="ce360">
            <text:p>40,268</text:p>
          </table:table-cell>
          <table:table-cell office:value-type="float" office:value="0" table:style-name="ce359">
            <text:p>0</text:p>
          </table:table-cell>
          <table:table-cell office:value-type="float" office:value="94171" table:style-name="ce360">
            <text:p>94,171</text:p>
          </table:table-cell>
          <table:table-cell office:value-type="float" office:value="102228" table:style-name="ce360">
            <text:p>102,228</text:p>
          </table:table-cell>
          <table:table-cell office:value-type="float" office:value="9957" table:style-name="ce360">
            <text:p>9,957</text:p>
          </table:table-cell>
          <table:table-cell office:value-type="float" office:value="246623" table:style-name="ce364">
            <text:p>246,623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200">
            <text:p>20</text:p>
          </table:table-cell>
          <table:table-cell office:value-type="string" table:style-name="ce201">
            <text:p>Municipal and Similar Commercial Wastes</text:p>
          </table:table-cell>
          <table:table-cell office:value-type="float" office:value="2837" table:style-name="ce360">
            <text:p>2,837</text:p>
          </table:table-cell>
          <table:table-cell office:value-type="float" office:value="2900" table:style-name="ce360">
            <text:p>2,900</text:p>
          </table:table-cell>
          <table:table-cell office:value-type="float" office:value="29217" table:style-name="ce360">
            <text:p>29,217</text:p>
          </table:table-cell>
          <table:table-cell office:value-type="float" office:value="12478" table:style-name="ce360">
            <text:p>12,478</text:p>
          </table:table-cell>
          <table:table-cell office:value-type="float" office:value="31206" table:style-name="ce360">
            <text:p>31,206</text:p>
          </table:table-cell>
          <table:table-cell office:value-type="float" office:value="78639" table:style-name="ce364">
            <text:p>78,639</text:p>
          </table:table-cell>
          <table:table-cell table:number-columns-repeated="16375" table:style-name="ce186"/>
        </table:table-row>
        <table:table-row table:style-name="ro5">
          <table:table-cell/>
          <table:table-cell office:value-type="string" table:style-name="ce42">
            <text:p>Total<text:s/></text:p>
          </table:table-cell>
          <table:table-cell table:style-name="ce82"/>
          <table:table-cell office:value-type="float" office:value="172738" table:style-name="ce365">
            <text:p>172,738</text:p>
          </table:table-cell>
          <table:table-cell office:value-type="float" office:value="6696" table:style-name="ce365">
            <text:p>6,696</text:p>
          </table:table-cell>
          <table:table-cell office:value-type="float" office:value="262369" table:style-name="ce365">
            <text:p>262,369</text:p>
          </table:table-cell>
          <table:table-cell office:value-type="float" office:value="311258" table:style-name="ce365">
            <text:p>311,258</text:p>
          </table:table-cell>
          <table:table-cell office:value-type="float" office:value="189629" table:style-name="ce365">
            <text:p>189,629</text:p>
          </table:table-cell>
          <table:table-cell office:value-type="float" office:value="942689" table:style-name="ce366">
            <text:p>942,689</text:p>
          </table:table-cell>
          <table:table-cell table:number-columns-repeated="3" table:style-name="ce187"/>
          <table:table-cell table:number-columns-repeated="16372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table:style-name="ce46">
            <text:p>Notes:</text:p>
          </table:table-cell>
          <table:table-cell table:number-columns-repeated="16382" table:style-name="ce186"/>
        </table:table-row>
        <table:table-row table:style-name="ro5">
          <table:table-cell/>
          <table:table-cell office:value-type="string" table:style-name="ce14">
            <text:p>The Environment Agency is required to monitor registered hazardous waste movements. <text:s/>The data published here is a summary of these movements. <text:s/>The same waste may be moved between multiple facilities and each separate movement is recorded.<text:s text:c="2"/></text:p>
          </table:table-cell>
          <table:table-cell table:number-columns-repeated="16382" table:style-name="ce186"/>
        </table:table-row>
        <table:table-row table:style-name="ro5">
          <table:table-cell/>
          <table:table-cell office:value-type="string" table:style-name="ce14">
            <text:p>This double counting should be taken into account when using this data.</text:p>
          </table:table-cell>
          <table:table-cell table:number-columns-repeated="16382" table:style-name="ce186"/>
        </table:table-row>
        <table:table-row table:style-name="ro5">
          <table:table-cell/>
          <table:table-cell office:value-type="string" table:style-name="ce14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86"/>
        </table:table-row>
        <table:table-row table:number-rows-repeated="1048515" table:style-name="ro4">
          <table:table-cell table:number-columns-repeated="16384"/>
        </table:table-row>
      </table:table>
      <table:table table:name="Haz_Waste_Deposits_by_Fate" table:style-name="ta1">
        <table:table-column table:style-name="co52" table:default-cell-style-name="ce186"/>
        <table:table-column table:style-name="co53" table:default-cell-style-name="ce186"/>
        <table:table-column table:style-name="co5" table:number-columns-repeated="3" table:default-cell-style-name="ce186"/>
        <table:table-column table:style-name="co38" table:default-cell-style-name="ce186"/>
        <table:table-column table:style-name="co13" table:default-cell-style-name="ce186"/>
        <table:table-column table:style-name="co16" table:default-cell-style-name="ce186"/>
        <table:table-column table:style-name="co15" table:number-columns-repeated="16376" table:default-cell-style-name="ce186"/>
        <table:table-row table:style-name="ro4">
          <table:table-cell table:style-name="ce13"/>
          <table:table-cell table:number-columns-repeated="16383" table:style-name="ce186"/>
        </table:table-row>
        <table:table-row table:style-name="ro6">
          <table:table-cell table:style-name="ce186"/>
          <table:table-cell office:value-type="string" table:style-name="ce15">
            <text:p>North West: Hazardous waste deposited by fate and former planning sub-region 2024 (tonnes)</text:p>
          </table:table-cell>
          <table:table-cell table:number-columns-repeated="16382" table:style-name="ce186"/>
        </table:table-row>
        <table:table-row table:style-name="ro4">
          <table:table-cell table:number-columns-repeated="16384"/>
        </table:table-row>
        <table:table-row table:style-name="ro33">
          <table:table-cell table:style-name="ce186"/>
          <table:table-cell office:value-type="string" table:style-name="ce202">
            <text:p>Waste Fate</text:p>
          </table:table-cell>
          <table:table-cell office:value-type="string" table:style-name="ce19">
            <text:p>Cheshire</text:p>
          </table:table-cell>
          <table:table-cell office:value-type="string" table:style-name="ce189">
            <text:p>Cumbria</text:p>
          </table:table-cell>
          <table:table-cell office:value-type="string" table:style-name="ce189">
            <text:p>Greater Manchester</text:p>
          </table:table-cell>
          <table:table-cell office:value-type="string" table:style-name="ce189">
            <text:p>Lancashire</text:p>
          </table:table-cell>
          <table:table-cell office:value-type="string" table:style-name="ce20">
            <text:p>Merseyside</text:p>
          </table:table-cell>
          <table:table-cell office:value-type="string" table:style-name="ce190">
            <text:p>NORTH WEST</text:p>
          </table:table-cell>
          <table:table-cell table:number-columns-repeated="16376" table:style-name="ce186"/>
        </table:table-row>
        <table:table-row table:style-name="ro5">
          <table:table-cell table:style-name="ce186"/>
          <table:table-cell office:value-type="string" table:style-name="ce203">
            <text:p>Incineration with energy recovery</text:p>
          </table:table-cell>
          <table:table-cell office:value-type="float" office:value="1088" table:style-name="ce367">
            <text:p>1,088</text:p>
          </table:table-cell>
          <table:table-cell office:value-type="float" office:value="6" table:style-name="ce359">
            <text:p>6</text:p>
          </table:table-cell>
          <table:table-cell office:value-type="float" office:value="716" table:style-name="ce359">
            <text:p>716</text:p>
          </table:table-cell>
          <table:table-cell office:value-type="float" office:value="20763" table:style-name="ce360">
            <text:p>20,763</text:p>
          </table:table-cell>
          <table:table-cell office:value-type="float" office:value="49" table:style-name="ce359">
            <text:p>49</text:p>
          </table:table-cell>
          <table:table-cell office:value-type="float" office:value="22622" table:formula="of:=SUM([.C5:.G5])" table:style-name="ce32">
            <text:p><text:s/>22,622<text:s/></text:p>
          </table:table-cell>
          <table:table-cell table:number-columns-repeated="16376" table:style-name="ce186"/>
        </table:table-row>
        <table:table-row table:style-name="ro5">
          <table:table-cell table:style-name="ce186"/>
          <table:table-cell office:value-type="string" table:style-name="ce204">
            <text:p>Incineration without energy recovery</text:p>
          </table:table-cell>
          <table:table-cell office:value-type="float" office:value="62002" table:style-name="ce367">
            <text:p>62,002</text:p>
          </table:table-cell>
          <table:table-cell table:style-name="ce359"/>
          <table:table-cell office:value-type="float" office:value="4841" table:style-name="ce360">
            <text:p>4,841</text:p>
          </table:table-cell>
          <table:table-cell office:value-type="float" office:value="9" table:style-name="ce359">
            <text:p>9</text:p>
          </table:table-cell>
          <table:table-cell table:style-name="ce359"/>
          <table:table-cell office:value-type="float" office:value="66852" table:formula="of:=SUM([.C6:.G6])" table:style-name="ce32">
            <text:p><text:s/>66,852<text:s/></text:p>
          </table:table-cell>
          <table:table-cell table:number-columns-repeated="16376" table:style-name="ce186"/>
        </table:table-row>
        <table:table-row table:style-name="ro5">
          <table:table-cell table:style-name="ce186"/>
          <table:table-cell office:value-type="string" table:style-name="ce204">
            <text:p>Landfill</text:p>
          </table:table-cell>
          <table:table-cell table:style-name="ce368"/>
          <table:table-cell table:style-name="ce359"/>
          <table:table-cell office:value-type="float" office:value="28" table:style-name="ce359">
            <text:p>28</text:p>
          </table:table-cell>
          <table:table-cell office:value-type="float" office:value="120743" table:style-name="ce360">
            <text:p>120,743</text:p>
          </table:table-cell>
          <table:table-cell table:style-name="ce359"/>
          <table:table-cell office:value-type="float" office:value="120770" table:style-name="ce32">
            <text:p><text:s/>120,770<text:s/></text:p>
          </table:table-cell>
          <table:table-cell table:number-columns-repeated="16376" table:style-name="ce186"/>
        </table:table-row>
        <table:table-row table:style-name="ro5">
          <table:table-cell table:style-name="ce186"/>
          <table:table-cell office:value-type="string" table:style-name="ce204">
            <text:p>Long term storage</text:p>
          </table:table-cell>
          <table:table-cell office:value-type="float" office:value="14813" table:style-name="ce367">
            <text:p>14,813</text:p>
          </table:table-cell>
          <table:table-cell table:number-columns-repeated="4" table:style-name="ce359"/>
          <table:table-cell office:value-type="float" office:value="14813" table:formula="of:=SUM([.C8:.G8])" table:style-name="ce32">
            <text:p><text:s/>14,813<text:s/></text:p>
          </table:table-cell>
          <table:table-cell table:number-columns-repeated="16376" table:style-name="ce186"/>
        </table:table-row>
        <table:table-row table:style-name="ro5">
          <table:table-cell table:style-name="ce186"/>
          <table:table-cell office:value-type="string" table:style-name="ce204">
            <text:p>Other Fate</text:p>
          </table:table-cell>
          <table:table-cell table:style-name="ce368"/>
          <table:table-cell table:style-name="ce359"/>
          <table:table-cell office:value-type="float" office:value="8" table:style-name="ce359">
            <text:p>8</text:p>
          </table:table-cell>
          <table:table-cell table:number-columns-repeated="2" table:style-name="ce359"/>
          <table:table-cell office:value-type="float" office:value="8" table:formula="of:=SUM([.C9:.G9])" table:style-name="ce32">
            <text:p><text:s/>8<text:s/></text:p>
          </table:table-cell>
          <table:table-cell table:number-columns-repeated="16376" table:style-name="ce186"/>
        </table:table-row>
        <table:table-row table:style-name="ro5">
          <table:table-cell table:style-name="ce186"/>
          <table:table-cell office:value-type="string" table:style-name="ce204">
            <text:p>Recovery</text:p>
          </table:table-cell>
          <table:table-cell office:value-type="float" office:value="68907" table:style-name="ce367">
            <text:p>68,907</text:p>
          </table:table-cell>
          <table:table-cell office:value-type="float" office:value="74" table:style-name="ce359">
            <text:p>74</text:p>
          </table:table-cell>
          <table:table-cell office:value-type="float" office:value="123816" table:style-name="ce360">
            <text:p>123,816</text:p>
          </table:table-cell>
          <table:table-cell office:value-type="float" office:value="70549" table:style-name="ce360">
            <text:p>70,549</text:p>
          </table:table-cell>
          <table:table-cell office:value-type="float" office:value="97373" table:style-name="ce360">
            <text:p>97,373</text:p>
          </table:table-cell>
          <table:table-cell office:value-type="float" office:value="360720" table:style-name="ce32">
            <text:p><text:s/>360,720<text:s/></text:p>
          </table:table-cell>
          <table:table-cell table:style-name="ce206"/>
          <table:table-cell table:number-columns-repeated="16375"/>
        </table:table-row>
        <table:table-row table:style-name="ro5">
          <table:table-cell table:style-name="ce186"/>
          <table:table-cell office:value-type="string" table:style-name="ce204">
            <text:p>Rejected</text:p>
          </table:table-cell>
          <table:table-cell office:value-type="float" office:value="464" table:style-name="ce368">
            <text:p>464</text:p>
          </table:table-cell>
          <table:table-cell office:value-type="float" office:value="0" table:style-name="ce359">
            <text:p>0</text:p>
          </table:table-cell>
          <table:table-cell office:value-type="float" office:value="2645" table:style-name="ce360">
            <text:p>2,645</text:p>
          </table:table-cell>
          <table:table-cell office:value-type="float" office:value="145" table:style-name="ce359">
            <text:p>145</text:p>
          </table:table-cell>
          <table:table-cell office:value-type="float" office:value="897" table:style-name="ce359">
            <text:p>897</text:p>
          </table:table-cell>
          <table:table-cell office:value-type="float" office:value="4152" table:style-name="ce32">
            <text:p><text:s/>4,152<text:s/></text:p>
          </table:table-cell>
          <table:table-cell table:style-name="ce206"/>
          <table:table-cell table:number-columns-repeated="16375"/>
        </table:table-row>
        <table:table-row table:style-name="ro5">
          <table:table-cell table:style-name="ce186"/>
          <table:table-cell office:value-type="string" table:style-name="ce204">
            <text:p>Transfer (D)</text:p>
          </table:table-cell>
          <table:table-cell office:value-type="float" office:value="3345" table:style-name="ce367">
            <text:p>3,345</text:p>
          </table:table-cell>
          <table:table-cell office:value-type="float" office:value="2831" table:style-name="ce360">
            <text:p>2,831</text:p>
          </table:table-cell>
          <table:table-cell office:value-type="float" office:value="24127" table:style-name="ce360">
            <text:p>24,127</text:p>
          </table:table-cell>
          <table:table-cell office:value-type="float" office:value="7962" table:style-name="ce360">
            <text:p>7,962</text:p>
          </table:table-cell>
          <table:table-cell office:value-type="float" office:value="25328" table:style-name="ce360">
            <text:p>25,328</text:p>
          </table:table-cell>
          <table:table-cell office:value-type="float" office:value="63593" table:formula="of:=SUM([.C12:.G12])" table:style-name="ce32">
            <text:p><text:s/>63,593<text:s/></text:p>
          </table:table-cell>
          <table:table-cell table:style-name="ce206"/>
          <table:table-cell table:number-columns-repeated="16375"/>
        </table:table-row>
        <table:table-row table:style-name="ro5">
          <table:table-cell table:style-name="ce186"/>
          <table:table-cell office:value-type="string" table:style-name="ce204">
            <text:p>Transfer (R)</text:p>
          </table:table-cell>
          <table:table-cell office:value-type="float" office:value="9760" table:style-name="ce367">
            <text:p>9,760</text:p>
          </table:table-cell>
          <table:table-cell office:value-type="float" office:value="3783" table:style-name="ce360">
            <text:p>3,783</text:p>
          </table:table-cell>
          <table:table-cell office:value-type="float" office:value="71791" table:style-name="ce360">
            <text:p>71,791</text:p>
          </table:table-cell>
          <table:table-cell office:value-type="float" office:value="90943" table:style-name="ce360">
            <text:p>90,943</text:p>
          </table:table-cell>
          <table:table-cell office:value-type="float" office:value="49886" table:style-name="ce360">
            <text:p>49,886</text:p>
          </table:table-cell>
          <table:table-cell office:value-type="float" office:value="226163" table:formula="of:=SUM([.C13:.G13])" table:style-name="ce32">
            <text:p><text:s/>226,163<text:s/></text:p>
          </table:table-cell>
          <table:table-cell table:number-columns-repeated="16376" table:style-name="ce186"/>
        </table:table-row>
        <table:table-row table:style-name="ro5">
          <table:table-cell table:style-name="ce186"/>
          <table:table-cell office:value-type="string" table:style-name="ce204">
            <text:p>Treatment</text:p>
          </table:table-cell>
          <table:table-cell office:value-type="float" office:value="12359" table:style-name="ce367">
            <text:p>12,359</text:p>
          </table:table-cell>
          <table:table-cell office:value-type="float" office:value="0" table:style-name="ce359">
            <text:p>0</text:p>
          </table:table-cell>
          <table:table-cell office:value-type="float" office:value="34398" table:style-name="ce360">
            <text:p>34,398</text:p>
          </table:table-cell>
          <table:table-cell office:value-type="float" office:value="143" table:style-name="ce359">
            <text:p>143</text:p>
          </table:table-cell>
          <table:table-cell office:value-type="float" office:value="16095" table:style-name="ce360">
            <text:p>16,095</text:p>
          </table:table-cell>
          <table:table-cell office:value-type="float" office:value="62996" table:style-name="ce32">
            <text:p><text:s/>62,996<text:s/></text:p>
          </table:table-cell>
          <table:table-cell table:number-columns-repeated="16376" table:style-name="ce186"/>
        </table:table-row>
        <table:table-row table:style-name="ro12">
          <table:table-cell table:style-name="ce186"/>
          <table:table-cell office:value-type="string" table:style-name="ce207">
            <text:p>Total<text:s/></text:p>
          </table:table-cell>
          <table:table-cell office:value-type="float" office:value="172738" table:formula="of:=SUM([.C5:.C14])" table:style-name="ce143">
            <text:p><text:s/>172,738<text:s/></text:p>
          </table:table-cell>
          <table:table-cell office:value-type="float" office:value="6694" table:formula="of:=SUM([.D5:.D14])" table:style-name="ce44">
            <text:p><text:s/>6,694<text:s/></text:p>
          </table:table-cell>
          <table:table-cell office:value-type="float" office:value="262370" table:formula="of:=SUM([.E5:.E14])" table:style-name="ce44">
            <text:p><text:s/>262,370<text:s/></text:p>
          </table:table-cell>
          <table:table-cell office:value-type="float" office:value="311257" table:formula="of:=SUM([.F5:.F14])" table:style-name="ce44">
            <text:p><text:s/>311,257<text:s/></text:p>
          </table:table-cell>
          <table:table-cell office:value-type="float" office:value="189628" table:formula="of:=SUM([.G5:.G14])" table:style-name="ce127">
            <text:p><text:s/>189,628<text:s/></text:p>
          </table:table-cell>
          <table:table-cell office:value-type="float" office:value="942689" table:formula="of:=SUM([.H5:.H14])" table:style-name="ce127">
            <text:p><text:s/>942,689<text:s/></text:p>
          </table:table-cell>
          <table:table-cell table:number-columns-repeated="16376" table:style-name="ce186"/>
        </table:table-row>
        <table:table-row table:style-name="ro5">
          <table:table-cell table:style-name="ce186"/>
          <table:table-cell table:number-columns-repeated="7" table:style-name="ce14"/>
          <table:table-cell table:number-columns-repeated="16376" table:style-name="ce186"/>
        </table:table-row>
        <table:table-row table:style-name="ro5">
          <table:table-cell/>
          <table:table-cell office:value-type="string" table:style-name="ce46">
            <text:p>Notes:</text:p>
          </table:table-cell>
          <table:table-cell office:value-type="string" table:style-name="ce196">
            <text:p>-</text:p>
          </table:table-cell>
          <table:table-cell table:number-columns-repeated="5" table:style-name="ce14"/>
          <table:table-cell table:number-columns-repeated="16376"/>
        </table:table-row>
        <table:table-row table:style-name="ro5">
          <table:table-cell/>
          <table:table-cell office:value-type="string" table:style-name="ce14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6" table:style-name="ce14"/>
          <table:table-cell table:number-columns-repeated="16376"/>
        </table:table-row>
        <table:table-row table:style-name="ro5">
          <table:table-cell/>
          <table:table-cell office:value-type="string" table:style-name="ce14">
            <text:p>multiple facilities and each separate movement is recorded. <text:s/>This double counting should be taken into account when using this data.</text:p>
          </table:table-cell>
          <table:table-cell table:number-columns-repeated="6" table:style-name="ce14"/>
          <table:table-cell table:number-columns-repeated="16376"/>
        </table:table-row>
        <table:table-row table:style-name="ro5">
          <table:table-cell/>
          <table:table-cell office:value-type="string" table:style-name="ce14">
            <text:p>Transfer (D) means transfer before disposal, Transfer (R) means transfer before recovery.</text:p>
          </table:table-cell>
          <table:table-cell table:number-columns-repeated="6" table:style-name="ce14"/>
          <table:table-cell table:number-columns-repeated="16376"/>
        </table:table-row>
        <table:table-row table:style-name="ro5">
          <table:table-cell/>
          <table:table-cell office:value-type="string" table:style-name="ce14">
            <text:p>In previous years Recovery was called Recycling/reuse.</text:p>
          </table:table-cell>
          <table:table-cell table:number-columns-repeated="6" table:style-name="ce14"/>
          <table:table-cell table:number-columns-repeated="16376"/>
        </table:table-row>
        <table:table-row table:style-name="ro5">
          <table:table-cell/>
          <table:table-cell office:value-type="string" table:style-name="ce14">
            <text:p>In previous years the Landfill category included deep injection, land treatment and surface impoundment. <text:s/>These are now included in Other Fate.</text:p>
          </table:table-cell>
          <table:table-cell table:number-columns-repeated="6" table:style-name="ce14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Haz_Waste_Trends" table:style-name="ta1">
        <table:table-column table:style-name="co54" table:default-cell-style-name="ce14"/>
        <table:table-column table:style-name="co55" table:default-cell-style-name="ce14"/>
        <table:table-column table:style-name="co56" table:default-cell-style-name="ce14"/>
        <table:table-column table:style-name="co33" table:default-cell-style-name="ce14"/>
        <table:table-column table:style-name="co57" table:default-cell-style-name="ce14"/>
        <table:table-column table:style-name="co58" table:default-cell-style-name="ce14"/>
        <table:table-column table:style-name="co59" table:number-columns-repeated="3" table:default-cell-style-name="ce14"/>
        <table:table-column table:style-name="co60" table:default-cell-style-name="ce14"/>
        <table:table-column table:style-name="co61" table:default-cell-style-name="ce14"/>
        <table:table-column table:style-name="co15" table:number-columns-repeated="5" table:default-cell-style-name="ce14"/>
        <table:table-column table:style-name="co62" table:default-cell-style-name="ce14"/>
        <table:table-column table:style-name="co15" table:number-columns-repeated="5" table:default-cell-style-name="ce14"/>
        <table:table-column table:style-name="co63" table:default-cell-style-name="ce14"/>
        <table:table-column table:style-name="co64" table:default-cell-style-name="ce14"/>
        <table:table-column table:style-name="co15" table:number-columns-repeated="16360" table:default-cell-style-name="ce14"/>
        <table:table-row table:style-name="ro5">
          <table:table-cell table:number-columns-repeated="16384"/>
        </table:table-row>
        <table:table-row table:style-name="ro6">
          <table:table-cell table:style-name="ce14"/>
          <table:table-cell office:value-type="string" table:style-name="ce15">
            <text:p>North West: Hazardous waste trends from 1998 to 2024</text:p>
          </table:table-cell>
          <table:table-cell table:number-columns-repeated="16382" table:style-name="ce14"/>
        </table:table-row>
        <table:table-row table:style-name="ro16">
          <table:table-cell table:style-name="ce14"/>
          <table:table-cell table:style-name="ce15"/>
          <table:table-cell table:number-columns-repeated="16382" table:style-name="ce14"/>
        </table:table-row>
        <table:table-row table:style-name="ro5">
          <table:table-cell table:style-name="ce14"/>
          <table:table-cell office:value-type="string" table:style-name="ce14">
            <text:p>The Environment Agency is required to monitor registered hazardous waste movements. <text:s/>The data published here is a summary of these movements. <text:s/>The same waste may be moved between<text:s/></text:p>
          </table:table-cell>
          <table:table-cell table:number-columns-repeated="16382" table:style-name="ce14"/>
        </table:table-row>
        <table:table-row table:style-name="ro5">
          <table:table-cell table:style-name="ce14"/>
          <table:table-cell office:value-type="string" table:style-name="ce14">
            <text:p>multiple facilities and each separate movement is recorded. <text:s/>This double counting should be taken into account when using this data.</text:p>
          </table:table-cell>
          <table:table-cell table:number-columns-repeated="16382" table:style-name="ce14"/>
        </table:table-row>
        <table:table-row table:style-name="ro5">
          <table:table-cell table:style-name="ce14"/>
          <table:table-cell office:value-type="string" table:style-name="ce208">
            <text:p>EWC Chapter 16 contains a mix of coded wastes including wastes from end-of-life vehicles, waste electrical and electronic equipment, batteries, spent catalysts and aqueous solutions</text:p>
          </table:table-cell>
          <table:table-cell table:number-columns-repeated="16382" table:style-name="ce14"/>
        </table:table-row>
        <table:table-row table:style-name="ro5">
          <table:table-cell table:style-name="ce14"/>
          <table:table-cell office:value-type="string" table:style-name="ce208">
            <text:p>2005 data is unreliable and has not been included in the above tables; a new hazardous waste management system and database was introduced in mid-2005 to coincide with the introduction of the new Hazardous Waste Regulations,<text:s/></text:p>
          </table:table-cell>
          <table:table-cell table:number-columns-repeated="16382" table:style-name="ce14"/>
        </table:table-row>
        <table:table-row table:style-name="ro5">
          <table:table-cell table:style-name="ce14"/>
          <table:table-cell office:value-type="string" table:style-name="ce208">
            <text:p>classification and data collection changes introduced some inconsistency and some data was lost as new systems took a little time to become fully operational.<text:s/></text:p>
          </table:table-cell>
          <table:table-cell table:number-columns-repeated="16382" table:style-name="ce14"/>
        </table:table-row>
        <table:table-row table:style-name="ro5">
          <table:table-cell table:style-name="ce14"/>
          <table:table-cell office:value-type="string" table:style-name="ce14">
            <text:p>In previous years Recovery was called Recycling/reuse.</text:p>
          </table:table-cell>
          <table:table-cell table:number-columns-repeated="16382" table:style-name="ce14"/>
        </table:table-row>
        <table:table-row table:style-name="ro5">
          <table:table-cell table:style-name="ce13"/>
          <table:table-cell office:value-type="string" table:style-name="ce14">
            <text:p>In previous years the Landfill category included deep injection, land treatment and surface impoundment. <text:s/>These are now included in Other Fate.</text:p>
          </table:table-cell>
          <table:table-cell table:number-columns-repeated="16382" table:style-name="ce14"/>
        </table:table-row>
        <table:table-row table:style-name="ro5">
          <table:table-cell table:style-name="ce13"/>
          <table:table-cell table:style-name="ce179"/>
          <table:table-cell table:number-columns-repeated="16382" table:style-name="ce14"/>
        </table:table-row>
        <table:table-row table:style-name="ro6">
          <table:table-cell table:style-name="ce14"/>
          <table:table-cell office:value-type="string" table:style-name="ce15">
            <text:p>North West: Hazardous waste managed by EWC chapter from 1998 to 2024 (tonnes)</text:p>
          </table:table-cell>
          <table:table-cell table:number-columns-repeated="15" table:style-name="ce209"/>
          <table:table-cell table:number-columns-repeated="16367" table:style-name="ce14"/>
        </table:table-row>
        <table:table-row table:style-name="ro5">
          <table:table-cell table:style-name="ce14"/>
          <table:table-cell table:number-columns-repeated="16" table:style-name="ce209"/>
          <table:table-cell table:number-columns-repeated="16367" table:style-name="ce14"/>
        </table:table-row>
        <table:table-row table:style-name="ro3">
          <table:table-cell table:style-name="ce14"/>
          <table:table-cell office:value-type="string" table:style-name="ce210">
            <text:p>EWC chapter</text:p>
          </table:table-cell>
          <table:table-cell office:value-type="string" table:style-name="ce211">
            <text:p>EWC Chapter Description</text:p>
          </table:table-cell>
          <table:table-cell office:value-type="string" table:style-name="ce210">
            <text:p>1998/9</text:p>
          </table:table-cell>
          <table:table-cell office:value-type="float" office:value="2000" table:style-name="ce211">
            <text:p>2000</text:p>
          </table:table-cell>
          <table:table-cell office:value-type="float" office:value="2001" table:style-name="ce211">
            <text:p>2001</text:p>
          </table:table-cell>
          <table:table-cell office:value-type="float" office:value="2002" table:style-name="ce211">
            <text:p>2002</text:p>
          </table:table-cell>
          <table:table-cell office:value-type="float" office:value="2003" table:style-name="ce211">
            <text:p>2003</text:p>
          </table:table-cell>
          <table:table-cell office:value-type="float" office:value="2004" table:style-name="ce211">
            <text:p>2004</text:p>
          </table:table-cell>
          <table:table-cell office:value-type="float" office:value="2006" table:style-name="ce211">
            <text:p>2006</text:p>
          </table:table-cell>
          <table:table-cell office:value-type="float" office:value="2007" table:style-name="ce211">
            <text:p>2007</text:p>
          </table:table-cell>
          <table:table-cell office:value-type="float" office:value="2008" table:style-name="ce211">
            <text:p>2008</text:p>
          </table:table-cell>
          <table:table-cell office:value-type="float" office:value="2009" table:style-name="ce211">
            <text:p>2009</text:p>
          </table:table-cell>
          <table:table-cell office:value-type="float" office:value="2010" table:style-name="ce211">
            <text:p>2010</text:p>
          </table:table-cell>
          <table:table-cell office:value-type="float" office:value="2011" table:style-name="ce212">
            <text:p>2011</text:p>
          </table:table-cell>
          <table:table-cell office:value-type="float" office:value="2012" table:style-name="ce212">
            <text:p>2012</text:p>
          </table:table-cell>
          <table:table-cell office:value-type="float" office:value="2013" table:style-name="ce211">
            <text:p>2013</text:p>
          </table:table-cell>
          <table:table-cell office:value-type="float" office:value="2014" table:style-name="ce211">
            <text:p>2014</text:p>
          </table:table-cell>
          <table:table-cell office:value-type="float" office:value="2015" table:style-name="ce211">
            <text:p>2015</text:p>
          </table:table-cell>
          <table:table-cell office:value-type="float" office:value="2016" table:style-name="ce211">
            <text:p>2016</text:p>
          </table:table-cell>
          <table:table-cell office:value-type="float" office:value="2017" table:style-name="ce211">
            <text:p>2017</text:p>
          </table:table-cell>
          <table:table-cell office:value-type="float" office:value="2018" table:style-name="ce211">
            <text:p>2018</text:p>
          </table:table-cell>
          <table:table-cell office:value-type="float" office:value="2019" table:style-name="ce211">
            <text:p>2019</text:p>
          </table:table-cell>
          <table:table-cell office:value-type="float" office:value="2020" table:style-name="ce211">
            <text:p>2020</text:p>
          </table:table-cell>
          <table:table-cell office:value-type="float" office:value="2021" table:style-name="ce211">
            <text:p>2021</text:p>
          </table:table-cell>
          <table:table-cell office:value-type="float" office:value="2022" table:style-name="ce211">
            <text:p>2022</text:p>
          </table:table-cell>
          <table:table-cell office:value-type="float" office:value="2023" table:style-name="ce374">
            <text:p>2023</text:p>
          </table:table-cell>
          <table:table-cell office:value-type="float" office:value="2024" table:style-name="ce213">
            <text:p>2024</text:p>
          </table:table-cell>
          <table:table-cell table:number-columns-repeated="16356"/>
        </table:table-row>
        <table:table-row table:style-name="ro10">
          <table:table-cell table:style-name="ce14"/>
          <table:table-cell office:value-type="string" table:style-name="ce214">
            <text:p>01</text:p>
          </table:table-cell>
          <table:table-cell office:value-type="string" table:style-name="ce215">
            <text:p>Mining and Minerals</text:p>
          </table:table-cell>
          <table:table-cell office:value-type="float" office:value="63.698900000000009" table:style-name="ce162">
            <text:p><text:s/>64<text:s/></text:p>
          </table:table-cell>
          <table:table-cell office:value-type="float" office:value="22.940000534057617" table:style-name="ce162">
            <text:p><text:s/>23<text:s/></text:p>
          </table:table-cell>
          <table:table-cell office:value-type="float" office:value="0" table:style-name="ce162">
            <text:p><text:s/>-<text:s/></text:p>
          </table:table-cell>
          <table:table-cell office:value-type="float" office:value="25.299999296665192" table:style-name="ce162">
            <text:p><text:s/>25<text:s/></text:p>
          </table:table-cell>
          <table:table-cell office:value-type="float" office:value="42.284999999999997" table:style-name="ce162">
            <text:p><text:s/>42<text:s/></text:p>
          </table:table-cell>
          <table:table-cell office:value-type="float" office:value="27.553000077605247" table:style-name="ce162">
            <text:p><text:s/>28<text:s/></text:p>
          </table:table-cell>
          <table:table-cell office:value-type="float" office:value="187.57249999999999" table:style-name="ce160">
            <text:p><text:s/>188<text:s/></text:p>
          </table:table-cell>
          <table:table-cell office:value-type="float" office:value="33.347999999999999" table:style-name="ce216">
            <text:p><text:s/>33<text:s/></text:p>
          </table:table-cell>
          <table:table-cell office:value-type="float" office:value="446.31" table:style-name="ce34">
            <text:p><text:s/>446<text:s/></text:p>
          </table:table-cell>
          <table:table-cell office:value-type="float" office:value="273.17500000000001" table:style-name="ce217">
            <text:p><text:s/>273<text:s/></text:p>
          </table:table-cell>
          <table:table-cell office:value-type="float" office:value="2.82" table:style-name="ce217">
            <text:p><text:s/>3<text:s/></text:p>
          </table:table-cell>
          <table:table-cell office:value-type="float" office:value="36.448" table:style-name="ce218">
            <text:p><text:s/>36<text:s/></text:p>
          </table:table-cell>
          <table:table-cell office:value-type="float" office:value="63.115000000000002" table:style-name="ce219">
            <text:p><text:s/>63<text:s/></text:p>
          </table:table-cell>
          <table:table-cell office:value-type="float" office:value="67.322499999999991" table:style-name="ce219">
            <text:p><text:s/>67<text:s/></text:p>
          </table:table-cell>
          <table:table-cell office:value-type="float" office:value="55.764029999999998" table:style-name="ce34">
            <text:p><text:s/>56<text:s/></text:p>
          </table:table-cell>
          <table:table-cell office:value-type="float" office:value="96.918000000000006" table:style-name="ce34">
            <text:p><text:s/>97<text:s/></text:p>
          </table:table-cell>
          <table:table-cell office:value-type="float" office:value="176.774" table:style-name="ce34">
            <text:p><text:s/>177<text:s/></text:p>
          </table:table-cell>
          <table:table-cell office:value-type="float" office:value="1951.4720000000002" table:style-name="ce34">
            <text:p><text:s/>1,951<text:s/></text:p>
          </table:table-cell>
          <table:table-cell office:value-type="float" office:value="3093.6613000000007" table:style-name="ce220">
            <text:p>3,094</text:p>
          </table:table-cell>
          <table:table-cell office:value-type="float" office:value="522.70299999999997" table:style-name="ce220">
            <text:p>523</text:p>
          </table:table-cell>
          <table:table-cell office:value-type="float" office:value="78.685000000000002" table:style-name="ce274">
            <text:p>79</text:p>
          </table:table-cell>
          <table:table-cell office:value-type="float" office:value="18.734999999999999" table:style-name="ce220">
            <text:p>19</text:p>
          </table:table-cell>
          <table:table-cell office:value-type="float" office:value="7.6189999999999998" table:style-name="ce371">
            <text:p>8</text:p>
          </table:table-cell>
          <table:table-cell office:value-type="float" office:value="20" table:style-name="ce349">
            <text:p>20</text:p>
          </table:table-cell>
          <table:table-cell office:value-type="float" office:value="599" table:style-name="ce372">
            <text:p>599</text:p>
          </table:table-cell>
          <table:table-cell table:number-columns-repeated="16356"/>
        </table:table-row>
        <table:table-row table:style-name="ro10">
          <table:table-cell table:style-name="ce14"/>
          <table:table-cell office:value-type="string" table:style-name="ce221">
            <text:p>02</text:p>
          </table:table-cell>
          <table:table-cell office:value-type="string" table:style-name="ce222">
            <text:p>Agricultural and Food Production</text:p>
          </table:table-cell>
          <table:table-cell office:value-type="float" office:value="585.78174999999987" table:style-name="ce162">
            <text:p><text:s/>586<text:s/></text:p>
          </table:table-cell>
          <table:table-cell office:value-type="float" office:value="610.5500078041805" table:style-name="ce162">
            <text:p><text:s/>611<text:s/></text:p>
          </table:table-cell>
          <table:table-cell office:value-type="float" office:value="1013.2700083674863" table:style-name="ce162">
            <text:p><text:s/>1,013<text:s/></text:p>
          </table:table-cell>
          <table:table-cell office:value-type="float" office:value="918.71162058413029" table:style-name="ce162">
            <text:p><text:s/>919<text:s/></text:p>
          </table:table-cell>
          <table:table-cell office:value-type="float" office:value="343.59558000000004" table:style-name="ce162">
            <text:p><text:s/>344<text:s/></text:p>
          </table:table-cell>
          <table:table-cell office:value-type="float" office:value="413.84075914649293" table:style-name="ce162">
            <text:p><text:s/>414<text:s/></text:p>
          </table:table-cell>
          <table:table-cell office:value-type="float" office:value="9.9791000000000007" table:style-name="ce162">
            <text:p><text:s/>10<text:s/></text:p>
          </table:table-cell>
          <table:table-cell office:value-type="float" office:value="65.416989999999998" table:style-name="ce216">
            <text:p><text:s/>65<text:s/></text:p>
          </table:table-cell>
          <table:table-cell office:value-type="float" office:value="64.720600000000005" table:style-name="ce34">
            <text:p><text:s/>65<text:s/></text:p>
          </table:table-cell>
          <table:table-cell office:value-type="float" office:value="17.3521" table:style-name="ce218">
            <text:p><text:s/>17<text:s/></text:p>
          </table:table-cell>
          <table:table-cell office:value-type="float" office:value="78.309049999999999" table:style-name="ce218">
            <text:p><text:s/>78<text:s/></text:p>
          </table:table-cell>
          <table:table-cell office:value-type="float" office:value="72.55725000000001" table:style-name="ce218">
            <text:p><text:s/>73<text:s/></text:p>
          </table:table-cell>
          <table:table-cell office:value-type="float" office:value="38.084099999999999" table:style-name="ce223">
            <text:p><text:s/>38<text:s/></text:p>
          </table:table-cell>
          <table:table-cell office:value-type="float" office:value="35.494" table:style-name="ce223">
            <text:p><text:s/>35<text:s/></text:p>
          </table:table-cell>
          <table:table-cell office:value-type="float" office:value="284.80099999999999" table:style-name="ce34">
            <text:p><text:s/>285<text:s/></text:p>
          </table:table-cell>
          <table:table-cell office:value-type="float" office:value="40.573979999999999" table:style-name="ce34">
            <text:p><text:s/>41<text:s/></text:p>
          </table:table-cell>
          <table:table-cell office:value-type="float" office:value="53.416749999999993" table:style-name="ce34">
            <text:p><text:s/>53<text:s/></text:p>
          </table:table-cell>
          <table:table-cell office:value-type="float" office:value="211.77805000000001" table:style-name="ce34">
            <text:p><text:s/>212<text:s/></text:p>
          </table:table-cell>
          <table:table-cell office:value-type="float" office:value="281.89049999999997" table:style-name="ce172">
            <text:p>282</text:p>
          </table:table-cell>
          <table:table-cell office:value-type="float" office:value="46.120849999999997" table:style-name="ce172">
            <text:p>46</text:p>
          </table:table-cell>
          <table:table-cell office:value-type="float" office:value="32.1554" table:style-name="ce275">
            <text:p>32</text:p>
          </table:table-cell>
          <table:table-cell office:value-type="float" office:value="20.127239999999997" table:style-name="ce172">
            <text:p>20</text:p>
          </table:table-cell>
          <table:table-cell office:value-type="float" office:value="77.597800000000007" table:style-name="ce371">
            <text:p>78</text:p>
          </table:table-cell>
          <table:table-cell office:value-type="float" office:value="45" table:style-name="ce349">
            <text:p>45</text:p>
          </table:table-cell>
          <table:table-cell office:value-type="float" office:value="37" table:style-name="ce372">
            <text:p>37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03</text:p>
          </table:table-cell>
          <table:table-cell office:value-type="string" table:style-name="ce222">
            <text:p>Wood and Paper Production</text:p>
          </table:table-cell>
          <table:table-cell office:value-type="float" office:value="616.5476799999999" table:style-name="ce162">
            <text:p><text:s/>617<text:s/></text:p>
          </table:table-cell>
          <table:table-cell office:value-type="float" office:value="5611.8673188835382" table:style-name="ce162">
            <text:p><text:s/>5,612<text:s/></text:p>
          </table:table-cell>
          <table:table-cell office:value-type="float" office:value="2725.0579607185209" table:style-name="ce162">
            <text:p><text:s/>2,725<text:s/></text:p>
          </table:table-cell>
          <table:table-cell office:value-type="float" office:value="372.22347177192569" table:style-name="ce162">
            <text:p><text:s/>372<text:s/></text:p>
          </table:table-cell>
          <table:table-cell office:value-type="float" office:value="697.19500000000005" table:style-name="ce162">
            <text:p><text:s/>697<text:s/></text:p>
          </table:table-cell>
          <table:table-cell office:value-type="float" office:value="958.04166913405061" table:style-name="ce162">
            <text:p><text:s/>958<text:s/></text:p>
          </table:table-cell>
          <table:table-cell office:value-type="float" office:value="1360.4364" table:style-name="ce162">
            <text:p><text:s/>1,360<text:s/></text:p>
          </table:table-cell>
          <table:table-cell office:value-type="float" office:value="1193.03" table:style-name="ce216">
            <text:p><text:s/>1,193<text:s/></text:p>
          </table:table-cell>
          <table:table-cell office:value-type="float" office:value="1419.8040000000001" table:style-name="ce34">
            <text:p><text:s/>1,420<text:s/></text:p>
          </table:table-cell>
          <table:table-cell office:value-type="float" office:value="267.28399999999999" table:style-name="ce218">
            <text:p><text:s/>267<text:s/></text:p>
          </table:table-cell>
          <table:table-cell office:value-type="float" office:value="574.94000000000005" table:style-name="ce218">
            <text:p><text:s/>575<text:s/></text:p>
          </table:table-cell>
          <table:table-cell office:value-type="float" office:value="159.715" table:style-name="ce218">
            <text:p><text:s/>160<text:s/></text:p>
          </table:table-cell>
          <table:table-cell office:value-type="float" office:value="43.586999999999996" table:style-name="ce223">
            <text:p><text:s/>44<text:s/></text:p>
          </table:table-cell>
          <table:table-cell office:value-type="float" office:value="64.22999999999999" table:style-name="ce223">
            <text:p><text:s/>64<text:s/></text:p>
          </table:table-cell>
          <table:table-cell office:value-type="float" office:value="57.820000000000007" table:style-name="ce34">
            <text:p><text:s/>58<text:s/></text:p>
          </table:table-cell>
          <table:table-cell office:value-type="float" office:value="37.380000000000003" table:style-name="ce34">
            <text:p><text:s/>37<text:s/></text:p>
          </table:table-cell>
          <table:table-cell office:value-type="float" office:value="90.189819999999997" table:style-name="ce34">
            <text:p><text:s/>90<text:s/></text:p>
          </table:table-cell>
          <table:table-cell office:value-type="float" office:value="31.04946" table:style-name="ce34">
            <text:p><text:s/>31<text:s/></text:p>
          </table:table-cell>
          <table:table-cell office:value-type="float" office:value="4.8325000000000005" table:style-name="ce172">
            <text:p>5</text:p>
          </table:table-cell>
          <table:table-cell office:value-type="float" office:value="27.966999999999999" table:style-name="ce172">
            <text:p>28</text:p>
          </table:table-cell>
          <table:table-cell office:value-type="float" office:value="38.409999999999997" table:style-name="ce275">
            <text:p>38</text:p>
          </table:table-cell>
          <table:table-cell office:value-type="float" office:value="32.657609999999998" table:style-name="ce172">
            <text:p>33</text:p>
          </table:table-cell>
          <table:table-cell office:value-type="float" office:value="59.176000000000002" table:style-name="ce371">
            <text:p>59</text:p>
          </table:table-cell>
          <table:table-cell office:value-type="float" office:value="2" table:style-name="ce349">
            <text:p>2</text:p>
          </table:table-cell>
          <table:table-cell office:value-type="float" office:value="2" table:style-name="ce372">
            <text:p>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04</text:p>
          </table:table-cell>
          <table:table-cell office:value-type="string" table:style-name="ce222">
            <text:p>Leather and Textile Production</text:p>
          </table:table-cell>
          <table:table-cell office:value-type="float" office:value="177.18754999999999" table:style-name="ce162">
            <text:p><text:s/>177<text:s/></text:p>
          </table:table-cell>
          <table:table-cell office:value-type="float" office:value="519.45951204746962" table:style-name="ce162">
            <text:p><text:s/>519<text:s/></text:p>
          </table:table-cell>
          <table:table-cell office:value-type="float" office:value="354.32156755030155" table:style-name="ce162">
            <text:p><text:s/>354<text:s/></text:p>
          </table:table-cell>
          <table:table-cell office:value-type="float" office:value="356.7255135923624" table:style-name="ce162">
            <text:p><text:s/>357<text:s/></text:p>
          </table:table-cell>
          <table:table-cell office:value-type="float" office:value="106.8205" table:style-name="ce162">
            <text:p><text:s/>107<text:s/></text:p>
          </table:table-cell>
          <table:table-cell office:value-type="float" office:value="75.292700335383415" table:style-name="ce162">
            <text:p><text:s/>75<text:s/></text:p>
          </table:table-cell>
          <table:table-cell office:value-type="float" office:value="348.38699999999989" table:style-name="ce162">
            <text:p><text:s/>348<text:s/></text:p>
          </table:table-cell>
          <table:table-cell office:value-type="float" office:value="298.62899999999996" table:style-name="ce216">
            <text:p><text:s/>299<text:s/></text:p>
          </table:table-cell>
          <table:table-cell office:value-type="float" office:value="568.49580000000003" table:style-name="ce34">
            <text:p><text:s/>568<text:s/></text:p>
          </table:table-cell>
          <table:table-cell office:value-type="float" office:value="59.784000000000006" table:style-name="ce218">
            <text:p><text:s/>60<text:s/></text:p>
          </table:table-cell>
          <table:table-cell office:value-type="float" office:value="49.616" table:style-name="ce218">
            <text:p><text:s/>50<text:s/></text:p>
          </table:table-cell>
          <table:table-cell office:value-type="float" office:value="30.8371" table:style-name="ce218">
            <text:p><text:s/>31<text:s/></text:p>
          </table:table-cell>
          <table:table-cell office:value-type="float" office:value="96.016999999999996" table:style-name="ce223">
            <text:p><text:s/>96<text:s/></text:p>
          </table:table-cell>
          <table:table-cell office:value-type="float" office:value="81.337999999999994" table:style-name="ce223">
            <text:p><text:s/>81<text:s/></text:p>
          </table:table-cell>
          <table:table-cell office:value-type="float" office:value="51.697000000000003" table:style-name="ce34">
            <text:p><text:s/>52<text:s/></text:p>
          </table:table-cell>
          <table:table-cell office:value-type="float" office:value="17.137" table:style-name="ce34">
            <text:p><text:s/>17<text:s/></text:p>
          </table:table-cell>
          <table:table-cell office:value-type="float" office:value="67.566070000000011" table:style-name="ce34">
            <text:p><text:s/>68<text:s/></text:p>
          </table:table-cell>
          <table:table-cell office:value-type="float" office:value="30.998999999999999" table:style-name="ce34">
            <text:p><text:s/>31<text:s/></text:p>
          </table:table-cell>
          <table:table-cell office:value-type="float" office:value="52.539099999999998" table:style-name="ce172">
            <text:p>53</text:p>
          </table:table-cell>
          <table:table-cell office:value-type="float" office:value="48.596539999999997" table:style-name="ce172">
            <text:p>49</text:p>
          </table:table-cell>
          <table:table-cell office:value-type="float" office:value="16.454999999999998" table:style-name="ce275">
            <text:p>16</text:p>
          </table:table-cell>
          <table:table-cell office:value-type="float" office:value="15.8416" table:style-name="ce172">
            <text:p>16</text:p>
          </table:table-cell>
          <table:table-cell office:value-type="float" office:value="41.24183" table:style-name="ce371">
            <text:p>41</text:p>
          </table:table-cell>
          <table:table-cell office:value-type="float" office:value="45" table:style-name="ce349">
            <text:p>45</text:p>
          </table:table-cell>
          <table:table-cell office:value-type="float" office:value="21" table:style-name="ce372">
            <text:p>2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05</text:p>
          </table:table-cell>
          <table:table-cell office:value-type="string" table:style-name="ce222">
            <text:p>Petrol, Gas and Coal Refining/Treatment</text:p>
          </table:table-cell>
          <table:table-cell office:value-type="float" office:value="53558.176119999996" table:style-name="ce162">
            <text:p><text:s/>53,558<text:s/></text:p>
          </table:table-cell>
          <table:table-cell office:value-type="float" office:value="27998.97245670855" table:style-name="ce162">
            <text:p><text:s/>27,999<text:s/></text:p>
          </table:table-cell>
          <table:table-cell office:value-type="float" office:value="6870.8410115242004" table:style-name="ce162">
            <text:p><text:s/>6,871<text:s/></text:p>
          </table:table-cell>
          <table:table-cell office:value-type="float" office:value="4720.717089402744" table:style-name="ce162">
            <text:p><text:s/>4,721<text:s/></text:p>
          </table:table-cell>
          <table:table-cell office:value-type="float" office:value="4942.8175300000003" table:style-name="ce162">
            <text:p><text:s/>4,943<text:s/></text:p>
          </table:table-cell>
          <table:table-cell office:value-type="float" office:value="20483.798416949809" table:style-name="ce162">
            <text:p><text:s/>20,484<text:s/></text:p>
          </table:table-cell>
          <table:table-cell office:value-type="float" office:value="3480.4833999999996" table:style-name="ce162">
            <text:p><text:s/>3,480<text:s/></text:p>
          </table:table-cell>
          <table:table-cell office:value-type="float" office:value="1183.05825" table:style-name="ce216">
            <text:p><text:s/>1,183<text:s/></text:p>
          </table:table-cell>
          <table:table-cell office:value-type="float" office:value="2171.5340000000001" table:style-name="ce34">
            <text:p><text:s/>2,172<text:s/></text:p>
          </table:table-cell>
          <table:table-cell office:value-type="float" office:value="2087.2336999999998" table:style-name="ce218">
            <text:p><text:s/>2,087<text:s/></text:p>
          </table:table-cell>
          <table:table-cell office:value-type="float" office:value="1323.4392499999999" table:style-name="ce218">
            <text:p><text:s/>1,323<text:s/></text:p>
          </table:table-cell>
          <table:table-cell office:value-type="float" office:value="632.21401000000003" table:style-name="ce218">
            <text:p><text:s/>632<text:s/></text:p>
          </table:table-cell>
          <table:table-cell office:value-type="float" office:value="265.56" table:style-name="ce223">
            <text:p><text:s/>266<text:s/></text:p>
          </table:table-cell>
          <table:table-cell office:value-type="float" office:value="698.1049999999999" table:style-name="ce223">
            <text:p><text:s/>698<text:s/></text:p>
          </table:table-cell>
          <table:table-cell office:value-type="float" office:value="1017.9254999999998" table:style-name="ce34">
            <text:p><text:s/>1,018<text:s/></text:p>
          </table:table-cell>
          <table:table-cell office:value-type="float" office:value="1329.7323500000002" table:style-name="ce34">
            <text:p><text:s/>1,330<text:s/></text:p>
          </table:table-cell>
          <table:table-cell office:value-type="float" office:value="1750.5025999999998" table:style-name="ce34">
            <text:p><text:s/>1,751<text:s/></text:p>
          </table:table-cell>
          <table:table-cell office:value-type="float" office:value="482.755" table:style-name="ce34">
            <text:p><text:s/>483<text:s/></text:p>
          </table:table-cell>
          <table:table-cell office:value-type="float" office:value="1205.3329999999999" table:style-name="ce172">
            <text:p>1,205</text:p>
          </table:table-cell>
          <table:table-cell office:value-type="float" office:value="1521.9279999999997" table:style-name="ce172">
            <text:p>1,522</text:p>
          </table:table-cell>
          <table:table-cell office:value-type="float" office:value="952.57920000000013" table:style-name="ce275">
            <text:p>953</text:p>
          </table:table-cell>
          <table:table-cell office:value-type="float" office:value="811.03699999999992" table:style-name="ce172">
            <text:p>811</text:p>
          </table:table-cell>
          <table:table-cell office:value-type="float" office:value="3129.2640000000001" table:style-name="ce371">
            <text:p>3,129</text:p>
          </table:table-cell>
          <table:table-cell office:value-type="float" office:value="922" table:style-name="ce349">
            <text:p>922</text:p>
          </table:table-cell>
          <table:table-cell office:value-type="float" office:value="1072" table:style-name="ce373">
            <text:p>1,072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06</text:p>
          </table:table-cell>
          <table:table-cell office:value-type="string" table:style-name="ce222">
            <text:p>Inorganic Chemical Processes</text:p>
          </table:table-cell>
          <table:table-cell office:value-type="float" office:value="49609.008579999994" table:style-name="ce162">
            <text:p><text:s/>49,609<text:s/></text:p>
          </table:table-cell>
          <table:table-cell office:value-type="float" office:value="66289.831677260881" table:style-name="ce162">
            <text:p><text:s/>66,290<text:s/></text:p>
          </table:table-cell>
          <table:table-cell office:value-type="float" office:value="32709.47698578778" table:style-name="ce162">
            <text:p><text:s/>32,709<text:s/></text:p>
          </table:table-cell>
          <table:table-cell office:value-type="float" office:value="45156.889469074602" table:style-name="ce162">
            <text:p><text:s/>45,157<text:s/></text:p>
          </table:table-cell>
          <table:table-cell office:value-type="float" office:value="41175.50029000004" table:style-name="ce162">
            <text:p><text:s/>41,176<text:s/></text:p>
          </table:table-cell>
          <table:table-cell office:value-type="float" office:value="18107.671098113533" table:style-name="ce162">
            <text:p><text:s/>18,108<text:s/></text:p>
          </table:table-cell>
          <table:table-cell office:value-type="float" office:value="53451.803250000012" table:style-name="ce162">
            <text:p><text:s/>53,452<text:s/></text:p>
          </table:table-cell>
          <table:table-cell office:value-type="float" office:value="27943.726169999994" table:style-name="ce216">
            <text:p><text:s/>27,944<text:s/></text:p>
          </table:table-cell>
          <table:table-cell office:value-type="float" office:value="13680.129660000001" table:style-name="ce34">
            <text:p><text:s/>13,680<text:s/></text:p>
          </table:table-cell>
          <table:table-cell office:value-type="float" office:value="14894.579890000001" table:style-name="ce218">
            <text:p><text:s/>14,895<text:s/></text:p>
          </table:table-cell>
          <table:table-cell office:value-type="float" office:value="15745.323900000003" table:style-name="ce218">
            <text:p><text:s/>15,745<text:s/></text:p>
          </table:table-cell>
          <table:table-cell office:value-type="float" office:value="20218.505959999995" table:style-name="ce218">
            <text:p><text:s/>20,219<text:s/></text:p>
          </table:table-cell>
          <table:table-cell office:value-type="float" office:value="17392.56813" table:style-name="ce223">
            <text:p><text:s/>17,393<text:s/></text:p>
          </table:table-cell>
          <table:table-cell office:value-type="float" office:value="16425.91805" table:style-name="ce223">
            <text:p><text:s/>16,426<text:s/></text:p>
          </table:table-cell>
          <table:table-cell office:value-type="float" office:value="14968.312689999999" table:style-name="ce34">
            <text:p><text:s/>14,968<text:s/></text:p>
          </table:table-cell>
          <table:table-cell office:value-type="float" office:value="26661.495280000003" table:style-name="ce34">
            <text:p><text:s/>26,661<text:s/></text:p>
          </table:table-cell>
          <table:table-cell office:value-type="float" office:value="15234.687389999997" table:style-name="ce34">
            <text:p><text:s/>15,235<text:s/></text:p>
          </table:table-cell>
          <table:table-cell office:value-type="float" office:value="14374.12084" table:style-name="ce34">
            <text:p><text:s/>14,374<text:s/></text:p>
          </table:table-cell>
          <table:table-cell office:value-type="float" office:value="12734.065529999996" table:style-name="ce172">
            <text:p>12,734</text:p>
          </table:table-cell>
          <table:table-cell office:value-type="float" office:value="15174.466510000002" table:style-name="ce172">
            <text:p>15,174</text:p>
          </table:table-cell>
          <table:table-cell office:value-type="float" office:value="17529.214289999996" table:style-name="ce275">
            <text:p>17,529</text:p>
          </table:table-cell>
          <table:table-cell office:value-type="float" office:value="11461.669520000003" table:style-name="ce172">
            <text:p>11,462</text:p>
          </table:table-cell>
          <table:table-cell office:value-type="float" office:value="14099.616969999999" table:style-name="ce371">
            <text:p>14,100</text:p>
          </table:table-cell>
          <table:table-cell office:value-type="float" office:value="16424" table:style-name="ce349">
            <text:p>16,424</text:p>
          </table:table-cell>
          <table:table-cell office:value-type="float" office:value="12674" table:style-name="ce373">
            <text:p>12,67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07</text:p>
          </table:table-cell>
          <table:table-cell office:value-type="string" table:style-name="ce222">
            <text:p>Organic Chemical Processes</text:p>
          </table:table-cell>
          <table:table-cell office:value-type="float" office:value="147752.45499999993" table:style-name="ce162">
            <text:p><text:s/>147,752<text:s/></text:p>
          </table:table-cell>
          <table:table-cell office:value-type="float" office:value="137605.34248698869" table:style-name="ce162">
            <text:p><text:s/>137,605<text:s/></text:p>
          </table:table-cell>
          <table:table-cell office:value-type="float" office:value="139406.93903752684" table:style-name="ce162">
            <text:p><text:s/>139,407<text:s/></text:p>
          </table:table-cell>
          <table:table-cell office:value-type="float" office:value="135234.89855710685" table:style-name="ce162">
            <text:p><text:s/>135,235<text:s/></text:p>
          </table:table-cell>
          <table:table-cell office:value-type="float" office:value="136319.64504000003" table:style-name="ce162">
            <text:p><text:s/>136,320<text:s/></text:p>
          </table:table-cell>
          <table:table-cell office:value-type="float" office:value="143617.09249490744" table:style-name="ce162">
            <text:p><text:s/>143,617<text:s/></text:p>
          </table:table-cell>
          <table:table-cell office:value-type="float" office:value="164472.35435000001" table:style-name="ce162">
            <text:p><text:s/>164,472<text:s/></text:p>
          </table:table-cell>
          <table:table-cell office:value-type="float" office:value="53608.928069999994" table:style-name="ce216">
            <text:p><text:s/>53,609<text:s/></text:p>
          </table:table-cell>
          <table:table-cell office:value-type="float" office:value="50507.877200000017" table:style-name="ce34">
            <text:p><text:s/>50,508<text:s/></text:p>
          </table:table-cell>
          <table:table-cell office:value-type="float" office:value="42345.210030000009" table:style-name="ce218">
            <text:p><text:s/>42,345<text:s/></text:p>
          </table:table-cell>
          <table:table-cell office:value-type="float" office:value="41717.440369999997" table:style-name="ce218">
            <text:p><text:s/>41,717<text:s/></text:p>
          </table:table-cell>
          <table:table-cell office:value-type="float" office:value="42638.936510000007" table:style-name="ce218">
            <text:p><text:s/>42,639<text:s/></text:p>
          </table:table-cell>
          <table:table-cell office:value-type="float" office:value="41045.433430000005" table:style-name="ce223">
            <text:p><text:s/>41,045<text:s/></text:p>
          </table:table-cell>
          <table:table-cell office:value-type="float" office:value="94262.433779999992" table:style-name="ce223">
            <text:p><text:s/>94,262<text:s/></text:p>
          </table:table-cell>
          <table:table-cell office:value-type="float" office:value="125401.94445999998" table:style-name="ce34">
            <text:p><text:s/>125,402<text:s/></text:p>
          </table:table-cell>
          <table:table-cell office:value-type="float" office:value="128897.40288000001" table:style-name="ce34">
            <text:p><text:s/>128,897<text:s/></text:p>
          </table:table-cell>
          <table:table-cell office:value-type="float" office:value="129651.58485999999" table:style-name="ce34">
            <text:p><text:s/>129,652<text:s/></text:p>
          </table:table-cell>
          <table:table-cell office:value-type="float" office:value="175507.77130000014" table:style-name="ce34">
            <text:p><text:s/>175,508<text:s/></text:p>
          </table:table-cell>
          <table:table-cell office:value-type="float" office:value="225499.55822000001" table:style-name="ce172">
            <text:p>225,500</text:p>
          </table:table-cell>
          <table:table-cell office:value-type="float" office:value="201069.02763" table:style-name="ce172">
            <text:p>201,069</text:p>
          </table:table-cell>
          <table:table-cell office:value-type="float" office:value="195592.31282999995" table:style-name="ce275">
            <text:p>195,592</text:p>
          </table:table-cell>
          <table:table-cell office:value-type="float" office:value="123852.20360999997" table:style-name="ce172">
            <text:p>123,852</text:p>
          </table:table-cell>
          <table:table-cell office:value-type="float" office:value="113886.11354000005" table:style-name="ce371">
            <text:p>113,886</text:p>
          </table:table-cell>
          <table:table-cell office:value-type="float" office:value="70540" table:style-name="ce349">
            <text:p>70,540</text:p>
          </table:table-cell>
          <table:table-cell office:value-type="float" office:value="43959" table:style-name="ce373">
            <text:p>43,95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08</text:p>
          </table:table-cell>
          <table:table-cell office:value-type="string" table:style-name="ce222">
            <text:p>MFSU Paints, Varnish, Adhesive and Inks</text:p>
          </table:table-cell>
          <table:table-cell office:value-type="float" office:value="28158.746719999988" table:style-name="ce162">
            <text:p><text:s/>28,159<text:s/></text:p>
          </table:table-cell>
          <table:table-cell office:value-type="float" office:value="28303.808320662356" table:style-name="ce162">
            <text:p><text:s/>28,304<text:s/></text:p>
          </table:table-cell>
          <table:table-cell office:value-type="float" office:value="25337.571710250268" table:style-name="ce162">
            <text:p><text:s/>25,338<text:s/></text:p>
          </table:table-cell>
          <table:table-cell office:value-type="float" office:value="19692.119454543186" table:style-name="ce162">
            <text:p><text:s/>19,692<text:s/></text:p>
          </table:table-cell>
          <table:table-cell office:value-type="float" office:value="15235.059050000005" table:style-name="ce162">
            <text:p><text:s/>15,235<text:s/></text:p>
          </table:table-cell>
          <table:table-cell office:value-type="float" office:value="16436.23927343082" table:style-name="ce162">
            <text:p><text:s/>16,436<text:s/></text:p>
          </table:table-cell>
          <table:table-cell office:value-type="float" office:value="13679.53096" table:style-name="ce162">
            <text:p><text:s/>13,680<text:s/></text:p>
          </table:table-cell>
          <table:table-cell office:value-type="float" office:value="15136.140170000004" table:style-name="ce216">
            <text:p><text:s/>15,136<text:s/></text:p>
          </table:table-cell>
          <table:table-cell office:value-type="float" office:value="14596.196919999997" table:style-name="ce34">
            <text:p><text:s/>14,596<text:s/></text:p>
          </table:table-cell>
          <table:table-cell office:value-type="float" office:value="11795.000749999996" table:style-name="ce218">
            <text:p><text:s/>11,795<text:s/></text:p>
          </table:table-cell>
          <table:table-cell office:value-type="float" office:value="11810.610199999999" table:style-name="ce218">
            <text:p><text:s/>11,811<text:s/></text:p>
          </table:table-cell>
          <table:table-cell office:value-type="float" office:value="12137.356079999998" table:style-name="ce218">
            <text:p><text:s/>12,137<text:s/></text:p>
          </table:table-cell>
          <table:table-cell office:value-type="float" office:value="12704.393380000001" table:style-name="ce223">
            <text:p><text:s/>12,704<text:s/></text:p>
          </table:table-cell>
          <table:table-cell office:value-type="float" office:value="18940.82072" table:style-name="ce223">
            <text:p><text:s/>18,941<text:s/></text:p>
          </table:table-cell>
          <table:table-cell office:value-type="float" office:value="13376.34519" table:style-name="ce34">
            <text:p><text:s/>13,376<text:s/></text:p>
          </table:table-cell>
          <table:table-cell office:value-type="float" office:value="14913.976000000002" table:style-name="ce34">
            <text:p><text:s/>14,914<text:s/></text:p>
          </table:table-cell>
          <table:table-cell office:value-type="float" office:value="15496.487670000008" table:style-name="ce34">
            <text:p><text:s/>15,496<text:s/></text:p>
          </table:table-cell>
          <table:table-cell office:value-type="float" office:value="16341.921250000005" table:style-name="ce34">
            <text:p><text:s/>16,342<text:s/></text:p>
          </table:table-cell>
          <table:table-cell office:value-type="float" office:value="14331.02082" table:style-name="ce172">
            <text:p>14,331</text:p>
          </table:table-cell>
          <table:table-cell office:value-type="float" office:value="14499.135999999999" table:style-name="ce172">
            <text:p>14,499</text:p>
          </table:table-cell>
          <table:table-cell office:value-type="float" office:value="12831.617099999998" table:style-name="ce275">
            <text:p>12,832</text:p>
          </table:table-cell>
          <table:table-cell office:value-type="float" office:value="11800.116209999996" table:style-name="ce172">
            <text:p>11,800</text:p>
          </table:table-cell>
          <table:table-cell office:value-type="float" office:value="11070.600279999999" table:style-name="ce371">
            <text:p>11,071</text:p>
          </table:table-cell>
          <table:table-cell office:value-type="float" office:value="9899" table:style-name="ce349">
            <text:p>9,899</text:p>
          </table:table-cell>
          <table:table-cell office:value-type="float" office:value="10551" table:style-name="ce373">
            <text:p>10,55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09</text:p>
          </table:table-cell>
          <table:table-cell office:value-type="string" table:style-name="ce222">
            <text:p>Photographic Industry</text:p>
          </table:table-cell>
          <table:table-cell office:value-type="float" office:value="3031.5996300000002" table:style-name="ce162">
            <text:p><text:s/>3,032<text:s/></text:p>
          </table:table-cell>
          <table:table-cell office:value-type="float" office:value="10059.653419015463" table:style-name="ce162">
            <text:p><text:s/>10,060<text:s/></text:p>
          </table:table-cell>
          <table:table-cell office:value-type="float" office:value="11111.493360226974" table:style-name="ce162">
            <text:p><text:s/>11,111<text:s/></text:p>
          </table:table-cell>
          <table:table-cell office:value-type="float" office:value="8423.9950916934758" table:style-name="ce162">
            <text:p><text:s/>8,424<text:s/></text:p>
          </table:table-cell>
          <table:table-cell office:value-type="float" office:value="14845.043320000001" table:style-name="ce162">
            <text:p><text:s/>14,845<text:s/></text:p>
          </table:table-cell>
          <table:table-cell office:value-type="float" office:value="8473.9778251727112" table:style-name="ce162">
            <text:p><text:s/>8,474<text:s/></text:p>
          </table:table-cell>
          <table:table-cell office:value-type="float" office:value="2081.7190199999995" table:style-name="ce162">
            <text:p><text:s/>2,082<text:s/></text:p>
          </table:table-cell>
          <table:table-cell office:value-type="float" office:value="1406.0925" table:style-name="ce216">
            <text:p><text:s/>1,406<text:s/></text:p>
          </table:table-cell>
          <table:table-cell office:value-type="float" office:value="1144.7095200000001" table:style-name="ce34">
            <text:p><text:s/>1,145<text:s/></text:p>
          </table:table-cell>
          <table:table-cell office:value-type="float" office:value="978.43876000000012" table:style-name="ce218">
            <text:p><text:s/>978<text:s/></text:p>
          </table:table-cell>
          <table:table-cell office:value-type="float" office:value="932.67434000000014" table:style-name="ce218">
            <text:p><text:s/>933<text:s/></text:p>
          </table:table-cell>
          <table:table-cell office:value-type="float" office:value="1056.5472500000001" table:style-name="ce218">
            <text:p><text:s/>1,057<text:s/></text:p>
          </table:table-cell>
          <table:table-cell office:value-type="float" office:value="1263.1666700000001" table:style-name="ce223">
            <text:p><text:s/>1,263<text:s/></text:p>
          </table:table-cell>
          <table:table-cell office:value-type="float" office:value="1000.6907000000001" table:style-name="ce223">
            <text:p><text:s/>1,001<text:s/></text:p>
          </table:table-cell>
          <table:table-cell office:value-type="float" office:value="890.87440000000004" table:style-name="ce34">
            <text:p><text:s/>891<text:s/></text:p>
          </table:table-cell>
          <table:table-cell office:value-type="float" office:value="766.11223000000007" table:style-name="ce34">
            <text:p><text:s/>766<text:s/></text:p>
          </table:table-cell>
          <table:table-cell office:value-type="float" office:value="714.13749999999982" table:style-name="ce34">
            <text:p><text:s/>714<text:s/></text:p>
          </table:table-cell>
          <table:table-cell office:value-type="float" office:value="717.53420000000006" table:style-name="ce34">
            <text:p><text:s/>718<text:s/></text:p>
          </table:table-cell>
          <table:table-cell office:value-type="float" office:value="631.18605000000002" table:style-name="ce172">
            <text:p>631</text:p>
          </table:table-cell>
          <table:table-cell office:value-type="float" office:value="453.95575000000002" table:style-name="ce172">
            <text:p>454</text:p>
          </table:table-cell>
          <table:table-cell office:value-type="float" office:value="224.37017000000009" table:style-name="ce275">
            <text:p>224</text:p>
          </table:table-cell>
          <table:table-cell office:value-type="float" office:value="264.23888000000005" table:style-name="ce172">
            <text:p>264</text:p>
          </table:table-cell>
          <table:table-cell office:value-type="float" office:value="272.17903999999999" table:style-name="ce371">
            <text:p>272</text:p>
          </table:table-cell>
          <table:table-cell office:value-type="float" office:value="240" table:style-name="ce349">
            <text:p>240</text:p>
          </table:table-cell>
          <table:table-cell office:value-type="float" office:value="243" table:style-name="ce372">
            <text:p>24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10</text:p>
          </table:table-cell>
          <table:table-cell office:value-type="string" table:style-name="ce222">
            <text:p>Thermal Process Waste (inorganic)</text:p>
          </table:table-cell>
          <table:table-cell office:value-type="float" office:value="12617.316579999999" table:style-name="ce162">
            <text:p><text:s/>12,617<text:s/></text:p>
          </table:table-cell>
          <table:table-cell office:value-type="float" office:value="13802.131780780852" table:style-name="ce162">
            <text:p><text:s/>13,802<text:s/></text:p>
          </table:table-cell>
          <table:table-cell office:value-type="float" office:value="20409.616578421206" table:style-name="ce162">
            <text:p><text:s/>20,410<text:s/></text:p>
          </table:table-cell>
          <table:table-cell office:value-type="float" office:value="20115.456295490265" table:style-name="ce162">
            <text:p><text:s/>20,115<text:s/></text:p>
          </table:table-cell>
          <table:table-cell office:value-type="float" office:value="28731.65119" table:style-name="ce162">
            <text:p><text:s/>28,732<text:s/></text:p>
          </table:table-cell>
          <table:table-cell office:value-type="float" office:value="26314.764153478667" table:style-name="ce162">
            <text:p><text:s/>26,315<text:s/></text:p>
          </table:table-cell>
          <table:table-cell office:value-type="float" office:value="22422.150269999998" table:style-name="ce162">
            <text:p><text:s/>22,422<text:s/></text:p>
          </table:table-cell>
          <table:table-cell office:value-type="float" office:value="22608.330919999997" table:style-name="ce216">
            <text:p><text:s/>22,608<text:s/></text:p>
          </table:table-cell>
          <table:table-cell office:value-type="float" office:value="17328.8639" table:style-name="ce34">
            <text:p><text:s/>17,329<text:s/></text:p>
          </table:table-cell>
          <table:table-cell office:value-type="float" office:value="13446.637749999998" table:style-name="ce218">
            <text:p><text:s/>13,447<text:s/></text:p>
          </table:table-cell>
          <table:table-cell office:value-type="float" office:value="15501.33913" table:style-name="ce218">
            <text:p><text:s/>15,501<text:s/></text:p>
          </table:table-cell>
          <table:table-cell office:value-type="float" office:value="15754.0118" table:style-name="ce218">
            <text:p><text:s/>15,754<text:s/></text:p>
          </table:table-cell>
          <table:table-cell office:value-type="float" office:value="22209.129819999998" table:style-name="ce223">
            <text:p><text:s/>22,209<text:s/></text:p>
          </table:table-cell>
          <table:table-cell office:value-type="float" office:value="46962.702759999993" table:style-name="ce223">
            <text:p><text:s/>46,963<text:s/></text:p>
          </table:table-cell>
          <table:table-cell office:value-type="float" office:value="32570.668079999999" table:style-name="ce34">
            <text:p><text:s/>32,571<text:s/></text:p>
          </table:table-cell>
          <table:table-cell office:value-type="float" office:value="14866.6168" table:style-name="ce34">
            <text:p><text:s/>14,867<text:s/></text:p>
          </table:table-cell>
          <table:table-cell office:value-type="float" office:value="14600.085590000001" table:style-name="ce34">
            <text:p><text:s/>14,600<text:s/></text:p>
          </table:table-cell>
          <table:table-cell office:value-type="float" office:value="18702.922350000008" table:style-name="ce34">
            <text:p><text:s/>18,703<text:s/></text:p>
          </table:table-cell>
          <table:table-cell office:value-type="float" office:value="20996.920279999998" table:style-name="ce172">
            <text:p>20,997</text:p>
          </table:table-cell>
          <table:table-cell office:value-type="float" office:value="28001.722320000001" table:style-name="ce172">
            <text:p>28,002</text:p>
          </table:table-cell>
          <table:table-cell office:value-type="float" office:value="20331.680220000002" table:style-name="ce275">
            <text:p>20,332</text:p>
          </table:table-cell>
          <table:table-cell office:value-type="float" office:value="15529.8042" table:style-name="ce172">
            <text:p>15,530</text:p>
          </table:table-cell>
          <table:table-cell office:value-type="float" office:value="16757.278909999997" table:style-name="ce371">
            <text:p>16,757</text:p>
          </table:table-cell>
          <table:table-cell office:value-type="float" office:value="12815" table:style-name="ce349">
            <text:p>12,815</text:p>
          </table:table-cell>
          <table:table-cell office:value-type="float" office:value="10629" table:style-name="ce373">
            <text:p>10,62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11</text:p>
          </table:table-cell>
          <table:table-cell office:value-type="string" table:style-name="ce222">
            <text:p>Metal Treatment and Coating Processes</text:p>
          </table:table-cell>
          <table:table-cell office:value-type="float" office:value="10436.894389999998" table:style-name="ce162">
            <text:p><text:s/>10,437<text:s/></text:p>
          </table:table-cell>
          <table:table-cell office:value-type="float" office:value="7071.7293937502764" table:style-name="ce162">
            <text:p><text:s/>7,072<text:s/></text:p>
          </table:table-cell>
          <table:table-cell office:value-type="float" office:value="7763.5130763439629" table:style-name="ce162">
            <text:p><text:s/>7,764<text:s/></text:p>
          </table:table-cell>
          <table:table-cell office:value-type="float" office:value="7148.7338132821023" table:style-name="ce162">
            <text:p><text:s/>7,149<text:s/></text:p>
          </table:table-cell>
          <table:table-cell office:value-type="float" office:value="11131.458800000006" table:style-name="ce162">
            <text:p><text:s/>11,131<text:s/></text:p>
          </table:table-cell>
          <table:table-cell office:value-type="float" office:value="10501.009229150543" table:style-name="ce162">
            <text:p><text:s/>10,501<text:s/></text:p>
          </table:table-cell>
          <table:table-cell office:value-type="float" office:value="12303.283159999999" table:style-name="ce162">
            <text:p><text:s/>12,303<text:s/></text:p>
          </table:table-cell>
          <table:table-cell office:value-type="float" office:value="9258.2683300000008" table:style-name="ce216">
            <text:p><text:s/>9,258<text:s/></text:p>
          </table:table-cell>
          <table:table-cell office:value-type="float" office:value="9542.1889499999979" table:style-name="ce34">
            <text:p><text:s/>9,542<text:s/></text:p>
          </table:table-cell>
          <table:table-cell office:value-type="float" office:value="8924.10455" table:style-name="ce218">
            <text:p><text:s/>8,924<text:s/></text:p>
          </table:table-cell>
          <table:table-cell office:value-type="float" office:value="6821.9970700000003" table:style-name="ce218">
            <text:p><text:s/>6,822<text:s/></text:p>
          </table:table-cell>
          <table:table-cell office:value-type="float" office:value="7789.8752399999994" table:style-name="ce218">
            <text:p><text:s/>7,790<text:s/></text:p>
          </table:table-cell>
          <table:table-cell office:value-type="float" office:value="8595.8088500000013" table:style-name="ce223">
            <text:p><text:s/>8,596<text:s/></text:p>
          </table:table-cell>
          <table:table-cell office:value-type="float" office:value="10764.997010000001" table:style-name="ce223">
            <text:p><text:s/>10,765<text:s/></text:p>
          </table:table-cell>
          <table:table-cell office:value-type="float" office:value="12456.111140000001" table:style-name="ce34">
            <text:p><text:s/>12,456<text:s/></text:p>
          </table:table-cell>
          <table:table-cell office:value-type="float" office:value="13335.486990000001" table:style-name="ce34">
            <text:p><text:s/>13,335<text:s/></text:p>
          </table:table-cell>
          <table:table-cell office:value-type="float" office:value="11004.171800000002" table:style-name="ce34">
            <text:p><text:s/>11,004<text:s/></text:p>
          </table:table-cell>
          <table:table-cell office:value-type="float" office:value="12015.4751" table:style-name="ce34">
            <text:p><text:s/>12,015<text:s/></text:p>
          </table:table-cell>
          <table:table-cell office:value-type="float" office:value="12712.704590000003" table:style-name="ce172">
            <text:p>12,713</text:p>
          </table:table-cell>
          <table:table-cell office:value-type="float" office:value="13417.4483" table:style-name="ce172">
            <text:p>13,417</text:p>
          </table:table-cell>
          <table:table-cell office:value-type="float" office:value="10351.26779" table:style-name="ce275">
            <text:p>10,351</text:p>
          </table:table-cell>
          <table:table-cell office:value-type="float" office:value="11273.844579999997" table:style-name="ce172">
            <text:p>11,274</text:p>
          </table:table-cell>
          <table:table-cell office:value-type="float" office:value="11876.17323" table:style-name="ce371">
            <text:p>11,876</text:p>
          </table:table-cell>
          <table:table-cell office:value-type="float" office:value="10902" table:style-name="ce349">
            <text:p>10,902</text:p>
          </table:table-cell>
          <table:table-cell office:value-type="float" office:value="13511" table:style-name="ce373">
            <text:p>13,51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12</text:p>
          </table:table-cell>
          <table:table-cell office:value-type="string" table:style-name="ce222">
            <text:p>Shaping/Treatment of Metals and Plastics</text:p>
          </table:table-cell>
          <table:table-cell office:value-type="float" office:value="17070.234439999993" table:style-name="ce162">
            <text:p><text:s/>17,070<text:s/></text:p>
          </table:table-cell>
          <table:table-cell office:value-type="float" office:value="10168.453011706471" table:style-name="ce162">
            <text:p><text:s/>10,168<text:s/></text:p>
          </table:table-cell>
          <table:table-cell office:value-type="float" office:value="5780.3263499252498" table:style-name="ce162">
            <text:p><text:s/>5,780<text:s/></text:p>
          </table:table-cell>
          <table:table-cell office:value-type="float" office:value="6155.5347162373364" table:style-name="ce162">
            <text:p><text:s/>6,156<text:s/></text:p>
          </table:table-cell>
          <table:table-cell office:value-type="float" office:value="6608.8915400000014" table:style-name="ce162">
            <text:p><text:s/>6,609<text:s/></text:p>
          </table:table-cell>
          <table:table-cell office:value-type="float" office:value="4209.3332895003259" table:style-name="ce162">
            <text:p><text:s/>4,209<text:s/></text:p>
          </table:table-cell>
          <table:table-cell office:value-type="float" office:value="4699.0021600000009" table:style-name="ce162">
            <text:p><text:s/>4,699<text:s/></text:p>
          </table:table-cell>
          <table:table-cell office:value-type="float" office:value="4491.9022599999998" table:style-name="ce216">
            <text:p><text:s/>4,492<text:s/></text:p>
          </table:table-cell>
          <table:table-cell office:value-type="float" office:value="4146.7058500000003" table:style-name="ce34">
            <text:p><text:s/>4,147<text:s/></text:p>
          </table:table-cell>
          <table:table-cell office:value-type="float" office:value="3275.1577300000004" table:style-name="ce218">
            <text:p><text:s/>3,275<text:s/></text:p>
          </table:table-cell>
          <table:table-cell office:value-type="float" office:value="4436.91914" table:style-name="ce218">
            <text:p><text:s/>4,437<text:s/></text:p>
          </table:table-cell>
          <table:table-cell office:value-type="float" office:value="5080.5470499999992" table:style-name="ce218">
            <text:p><text:s/>5,081<text:s/></text:p>
          </table:table-cell>
          <table:table-cell office:value-type="float" office:value="4400.2699000000002" table:style-name="ce223">
            <text:p><text:s/>4,400<text:s/></text:p>
          </table:table-cell>
          <table:table-cell office:value-type="float" office:value="3539.52531" table:style-name="ce223">
            <text:p><text:s/>3,540<text:s/></text:p>
          </table:table-cell>
          <table:table-cell office:value-type="float" office:value="4149.06412" table:style-name="ce34">
            <text:p><text:s/>4,149<text:s/></text:p>
          </table:table-cell>
          <table:table-cell office:value-type="float" office:value="4094.0043300000007" table:style-name="ce34">
            <text:p><text:s/>4,094<text:s/></text:p>
          </table:table-cell>
          <table:table-cell office:value-type="float" office:value="3222.8929099999996" table:style-name="ce34">
            <text:p><text:s/>3,223<text:s/></text:p>
          </table:table-cell>
          <table:table-cell office:value-type="float" office:value="3363.2682199999999" table:style-name="ce34">
            <text:p><text:s/>3,363<text:s/></text:p>
          </table:table-cell>
          <table:table-cell office:value-type="float" office:value="3271.8913299999995" table:style-name="ce172">
            <text:p>3,272</text:p>
          </table:table-cell>
          <table:table-cell office:value-type="float" office:value="3652.1756899999996" table:style-name="ce172">
            <text:p>3,652</text:p>
          </table:table-cell>
          <table:table-cell office:value-type="float" office:value="3127.1243199999999" table:style-name="ce275">
            <text:p>3,127</text:p>
          </table:table-cell>
          <table:table-cell office:value-type="float" office:value="3368.3369599999992" table:style-name="ce172">
            <text:p>3,368</text:p>
          </table:table-cell>
          <table:table-cell office:value-type="float" office:value="3692.3056799999999" table:style-name="ce371">
            <text:p>3,692</text:p>
          </table:table-cell>
          <table:table-cell office:value-type="float" office:value="4383" table:style-name="ce349">
            <text:p>4,383</text:p>
          </table:table-cell>
          <table:table-cell office:value-type="float" office:value="4633" table:style-name="ce373">
            <text:p>4,63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13</text:p>
          </table:table-cell>
          <table:table-cell office:value-type="string" table:style-name="ce222">
            <text:p>Oil and Oil/Water Mixtures</text:p>
          </table:table-cell>
          <table:table-cell office:value-type="float" office:value="95117.945440000287" table:style-name="ce162">
            <text:p><text:s/>95,118<text:s/></text:p>
          </table:table-cell>
          <table:table-cell office:value-type="float" office:value="105391.22622322272" table:style-name="ce162">
            <text:p><text:s/>105,391<text:s/></text:p>
          </table:table-cell>
          <table:table-cell office:value-type="float" office:value="126015.3398274603" table:style-name="ce162">
            <text:p><text:s/>126,015<text:s/></text:p>
          </table:table-cell>
          <table:table-cell office:value-type="float" office:value="82224.565294553526" table:style-name="ce162">
            <text:p><text:s/>82,225<text:s/></text:p>
          </table:table-cell>
          <table:table-cell office:value-type="float" office:value="78822.988570000016" table:style-name="ce162">
            <text:p><text:s/>78,823<text:s/></text:p>
          </table:table-cell>
          <table:table-cell office:value-type="float" office:value="73372.284724953046" table:style-name="ce162">
            <text:p><text:s/>73,372<text:s/></text:p>
          </table:table-cell>
          <table:table-cell office:value-type="float" office:value="80401.834499999997" table:style-name="ce162">
            <text:p><text:s/>80,402<text:s/></text:p>
          </table:table-cell>
          <table:table-cell office:value-type="float" office:value="68657.471470000033" table:style-name="ce216">
            <text:p><text:s/>68,657<text:s/></text:p>
          </table:table-cell>
          <table:table-cell office:value-type="float" office:value="67205.144680000041" table:style-name="ce34">
            <text:p><text:s/>67,205<text:s/></text:p>
          </table:table-cell>
          <table:table-cell office:value-type="float" office:value="84895.858280000044" table:style-name="ce218">
            <text:p><text:s/>84,896<text:s/></text:p>
          </table:table-cell>
          <table:table-cell office:value-type="float" office:value="69059.279549999992" table:style-name="ce218">
            <text:p><text:s/>69,059<text:s/></text:p>
          </table:table-cell>
          <table:table-cell office:value-type="float" office:value="81803.696200000049" table:style-name="ce218">
            <text:p><text:s/>81,804<text:s/></text:p>
          </table:table-cell>
          <table:table-cell office:value-type="float" office:value="85539.068409999993" table:style-name="ce223">
            <text:p><text:s/>85,539<text:s/></text:p>
          </table:table-cell>
          <table:table-cell office:value-type="float" office:value="82648.497070000012" table:style-name="ce223">
            <text:p><text:s/>82,648<text:s/></text:p>
          </table:table-cell>
          <table:table-cell office:value-type="float" office:value="85440.11927000001" table:style-name="ce34">
            <text:p><text:s/>85,440<text:s/></text:p>
          </table:table-cell>
          <table:table-cell office:value-type="float" office:value="73293.525810000006" table:style-name="ce34">
            <text:p><text:s/>73,294<text:s/></text:p>
          </table:table-cell>
          <table:table-cell office:value-type="float" office:value="71919.635159999991" table:style-name="ce34">
            <text:p><text:s/>71,920<text:s/></text:p>
          </table:table-cell>
          <table:table-cell office:value-type="float" office:value="86072.110050000003" table:style-name="ce34">
            <text:p><text:s/>86,072<text:s/></text:p>
          </table:table-cell>
          <table:table-cell office:value-type="float" office:value="84290.19868000006" table:style-name="ce172">
            <text:p>84,290</text:p>
          </table:table-cell>
          <table:table-cell office:value-type="float" office:value="82569.496799999994" table:style-name="ce172">
            <text:p>82,569</text:p>
          </table:table-cell>
          <table:table-cell office:value-type="float" office:value="74002.297440000009" table:style-name="ce275">
            <text:p>74,002</text:p>
          </table:table-cell>
          <table:table-cell office:value-type="float" office:value="73029.355360000016" table:style-name="ce172">
            <text:p>73,029</text:p>
          </table:table-cell>
          <table:table-cell office:value-type="float" office:value="67469.868390000018" table:style-name="ce371">
            <text:p>67,470</text:p>
          </table:table-cell>
          <table:table-cell office:value-type="float" office:value="68976" table:style-name="ce349">
            <text:p>68,976</text:p>
          </table:table-cell>
          <table:table-cell office:value-type="float" office:value="70031" table:style-name="ce373">
            <text:p>70,03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14</text:p>
          </table:table-cell>
          <table:table-cell office:value-type="string" table:style-name="ce222">
            <text:p>Solvents</text:p>
          </table:table-cell>
          <table:table-cell office:value-type="float" office:value="11237.445210000002" table:style-name="ce162">
            <text:p><text:s/>11,237<text:s/></text:p>
          </table:table-cell>
          <table:table-cell office:value-type="float" office:value="42363.69612561151" table:style-name="ce162">
            <text:p><text:s/>42,364<text:s/></text:p>
          </table:table-cell>
          <table:table-cell office:value-type="float" office:value="37793.920561774481" table:style-name="ce162">
            <text:p><text:s/>37,794<text:s/></text:p>
          </table:table-cell>
          <table:table-cell office:value-type="float" office:value="10641.4413975887" table:style-name="ce162">
            <text:p><text:s/>10,641<text:s/></text:p>
          </table:table-cell>
          <table:table-cell office:value-type="float" office:value="6199.3162599999996" table:style-name="ce162">
            <text:p><text:s/>6,199<text:s/></text:p>
          </table:table-cell>
          <table:table-cell office:value-type="float" office:value="2943.2890336217824" table:style-name="ce162">
            <text:p><text:s/>2,943<text:s/></text:p>
          </table:table-cell>
          <table:table-cell office:value-type="float" office:value="5292.4913299999989" table:style-name="ce162">
            <text:p><text:s/>5,292<text:s/></text:p>
          </table:table-cell>
          <table:table-cell office:value-type="float" office:value="4648.9124900000006" table:style-name="ce216">
            <text:p><text:s/>4,649<text:s/></text:p>
          </table:table-cell>
          <table:table-cell office:value-type="float" office:value="5023.120780000002" table:style-name="ce34">
            <text:p><text:s/>5,023<text:s/></text:p>
          </table:table-cell>
          <table:table-cell office:value-type="float" office:value="3829.4688499999997" table:style-name="ce218">
            <text:p><text:s/>3,829<text:s/></text:p>
          </table:table-cell>
          <table:table-cell office:value-type="float" office:value="2807.5859800000003" table:style-name="ce218">
            <text:p><text:s/>2,808<text:s/></text:p>
          </table:table-cell>
          <table:table-cell office:value-type="float" office:value="5408.2541599999986" table:style-name="ce218">
            <text:p><text:s/>5,408<text:s/></text:p>
          </table:table-cell>
          <table:table-cell office:value-type="float" office:value="5333.9458400000003" table:style-name="ce223">
            <text:p><text:s/>5,334<text:s/></text:p>
          </table:table-cell>
          <table:table-cell office:value-type="float" office:value="5733.0216899999996" table:style-name="ce223">
            <text:p><text:s/>5,733<text:s/></text:p>
          </table:table-cell>
          <table:table-cell office:value-type="float" office:value="5575.8297899999998" table:style-name="ce34">
            <text:p><text:s/>5,576<text:s/></text:p>
          </table:table-cell>
          <table:table-cell office:value-type="float" office:value="4222.7705099999994" table:style-name="ce34">
            <text:p><text:s/>4,223<text:s/></text:p>
          </table:table-cell>
          <table:table-cell office:value-type="float" office:value="3699.4769300000003" table:style-name="ce34">
            <text:p><text:s/>3,699<text:s/></text:p>
          </table:table-cell>
          <table:table-cell office:value-type="float" office:value="4700.6646400000009" table:style-name="ce34">
            <text:p><text:s/>4,701<text:s/></text:p>
          </table:table-cell>
          <table:table-cell office:value-type="float" office:value="5263.0265100000024" table:style-name="ce172">
            <text:p>5,263</text:p>
          </table:table-cell>
          <table:table-cell office:value-type="float" office:value="6245.6749400000008" table:style-name="ce172">
            <text:p>6,246</text:p>
          </table:table-cell>
          <table:table-cell office:value-type="float" office:value="6178.5196199999982" table:style-name="ce275">
            <text:p>6,179</text:p>
          </table:table-cell>
          <table:table-cell office:value-type="float" office:value="6174.5465499999991" table:style-name="ce172">
            <text:p>6,175</text:p>
          </table:table-cell>
          <table:table-cell office:value-type="float" office:value="5231.4313100000008" table:style-name="ce371">
            <text:p>5,231</text:p>
          </table:table-cell>
          <table:table-cell office:value-type="float" office:value="4973" table:style-name="ce349">
            <text:p>4,973</text:p>
          </table:table-cell>
          <table:table-cell office:value-type="float" office:value="4409" table:style-name="ce373">
            <text:p>4,40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15</text:p>
          </table:table-cell>
          <table:table-cell office:value-type="string" table:style-name="ce222">
            <text:p>Packaging, Cloths, Filter Materials</text:p>
          </table:table-cell>
          <table:table-cell office:value-type="float" office:value="12664.964319999997" table:style-name="ce162">
            <text:p><text:s/>12,665<text:s/></text:p>
          </table:table-cell>
          <table:table-cell office:value-type="float" office:value="17411.616421115003" table:style-name="ce162">
            <text:p><text:s/>17,412<text:s/></text:p>
          </table:table-cell>
          <table:table-cell office:value-type="float" office:value="23064.806286586216" table:style-name="ce162">
            <text:p><text:s/>23,065<text:s/></text:p>
          </table:table-cell>
          <table:table-cell office:value-type="float" office:value="14419.670234693836" table:style-name="ce162">
            <text:p><text:s/>14,420<text:s/></text:p>
          </table:table-cell>
          <table:table-cell office:value-type="float" office:value="14191.439589999994" table:style-name="ce162">
            <text:p><text:s/>14,191<text:s/></text:p>
          </table:table-cell>
          <table:table-cell office:value-type="float" office:value="11493.427426132374" table:style-name="ce162">
            <text:p><text:s/>11,493<text:s/></text:p>
          </table:table-cell>
          <table:table-cell office:value-type="float" office:value="9654.4920600000005" table:style-name="ce162">
            <text:p><text:s/>9,654<text:s/></text:p>
          </table:table-cell>
          <table:table-cell office:value-type="float" office:value="12237.152239999992" table:style-name="ce216">
            <text:p><text:s/>12,237<text:s/></text:p>
          </table:table-cell>
          <table:table-cell office:value-type="float" office:value="12417.62664" table:style-name="ce34">
            <text:p><text:s/>12,418<text:s/></text:p>
          </table:table-cell>
          <table:table-cell office:value-type="float" office:value="11250.107259999999" table:style-name="ce218">
            <text:p><text:s/>11,250<text:s/></text:p>
          </table:table-cell>
          <table:table-cell office:value-type="float" office:value="9993.6424799999986" table:style-name="ce218">
            <text:p><text:s/>9,994<text:s/></text:p>
          </table:table-cell>
          <table:table-cell office:value-type="float" office:value="11001.626999999999" table:style-name="ce218">
            <text:p><text:s/>11,002<text:s/></text:p>
          </table:table-cell>
          <table:table-cell office:value-type="float" office:value="12346.39327" table:style-name="ce223">
            <text:p><text:s/>12,346<text:s/></text:p>
          </table:table-cell>
          <table:table-cell office:value-type="float" office:value="13106.01569" table:style-name="ce223">
            <text:p><text:s/>13,106<text:s/></text:p>
          </table:table-cell>
          <table:table-cell office:value-type="float" office:value="15624.641790000001" table:style-name="ce34">
            <text:p><text:s/>15,625<text:s/></text:p>
          </table:table-cell>
          <table:table-cell office:value-type="float" office:value="16878.943319999998" table:style-name="ce34">
            <text:p><text:s/>16,879<text:s/></text:p>
          </table:table-cell>
          <table:table-cell office:value-type="float" office:value="17292.329500000003" table:style-name="ce34">
            <text:p><text:s/>17,292<text:s/></text:p>
          </table:table-cell>
          <table:table-cell office:value-type="float" office:value="18644.778539999996" table:style-name="ce34">
            <text:p><text:s/>18,645<text:s/></text:p>
          </table:table-cell>
          <table:table-cell office:value-type="float" office:value="18796.067679999982" table:style-name="ce172">
            <text:p>18,796</text:p>
          </table:table-cell>
          <table:table-cell office:value-type="float" office:value="20786.120179999998" table:style-name="ce172">
            <text:p>20,786</text:p>
          </table:table-cell>
          <table:table-cell office:value-type="float" office:value="27173.162429999997" table:style-name="ce275">
            <text:p>27,173</text:p>
          </table:table-cell>
          <table:table-cell office:value-type="float" office:value="18733.556460000007" table:style-name="ce172">
            <text:p>18,734</text:p>
          </table:table-cell>
          <table:table-cell office:value-type="float" office:value="19436.89645" table:style-name="ce371">
            <text:p>19,437</text:p>
          </table:table-cell>
          <table:table-cell office:value-type="float" office:value="18756" table:style-name="ce349">
            <text:p>18,756</text:p>
          </table:table-cell>
          <table:table-cell office:value-type="float" office:value="18453" table:style-name="ce373">
            <text:p>18,45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16</text:p>
          </table:table-cell>
          <table:table-cell office:value-type="string" table:style-name="ce222">
            <text:p>Not Otherwise Specified*</text:p>
          </table:table-cell>
          <table:table-cell office:value-type="float" office:value="41237.579630000087" table:style-name="ce162">
            <text:p><text:s/>41,238<text:s/></text:p>
          </table:table-cell>
          <table:table-cell office:value-type="float" office:value="32429.131664599565" table:style-name="ce162">
            <text:p><text:s/>32,429<text:s/></text:p>
          </table:table-cell>
          <table:table-cell office:value-type="float" office:value="29694.646422377031" table:style-name="ce162">
            <text:p><text:s/>29,695<text:s/></text:p>
          </table:table-cell>
          <table:table-cell office:value-type="float" office:value="30244.637871123366" table:style-name="ce162">
            <text:p><text:s/>30,245<text:s/></text:p>
          </table:table-cell>
          <table:table-cell office:value-type="float" office:value="18010.795750000005" table:style-name="ce162">
            <text:p><text:s/>18,011<text:s/></text:p>
          </table:table-cell>
          <table:table-cell office:value-type="float" office:value="21378.653387656246" table:style-name="ce162">
            <text:p><text:s/>21,379<text:s/></text:p>
          </table:table-cell>
          <table:table-cell office:value-type="float" office:value="78379.387889999984" table:style-name="ce162">
            <text:p><text:s/>78,379<text:s/></text:p>
          </table:table-cell>
          <table:table-cell office:value-type="float" office:value="92685.595259999987" table:style-name="ce216">
            <text:p><text:s/>92,686<text:s/></text:p>
          </table:table-cell>
          <table:table-cell office:value-type="float" office:value="101514.89186000003" table:style-name="ce34">
            <text:p><text:s/>101,515<text:s/></text:p>
          </table:table-cell>
          <table:table-cell office:value-type="float" office:value="95340.403059999968" table:style-name="ce218">
            <text:p><text:s/>95,340<text:s/></text:p>
          </table:table-cell>
          <table:table-cell office:value-type="float" office:value="92532.134810000003" table:style-name="ce218">
            <text:p><text:s/>92,532<text:s/></text:p>
          </table:table-cell>
          <table:table-cell office:value-type="float" office:value="101276.21795000005" table:style-name="ce218">
            <text:p><text:s/>101,276<text:s/></text:p>
          </table:table-cell>
          <table:table-cell office:value-type="float" office:value="89502.105479999998" table:style-name="ce223">
            <text:p><text:s/>89,502<text:s/></text:p>
          </table:table-cell>
          <table:table-cell office:value-type="float" office:value="88598.038159999996" table:style-name="ce223">
            <text:p><text:s/>88,598<text:s/></text:p>
          </table:table-cell>
          <table:table-cell office:value-type="float" office:value="67529.359500000006" table:style-name="ce34">
            <text:p><text:s/>67,529<text:s/></text:p>
          </table:table-cell>
          <table:table-cell office:value-type="float" office:value="68301.987169999993" table:style-name="ce34">
            <text:p><text:s/>68,302<text:s/></text:p>
          </table:table-cell>
          <table:table-cell office:value-type="float" office:value="72100.623939999976" table:style-name="ce34">
            <text:p><text:s/>72,101<text:s/></text:p>
          </table:table-cell>
          <table:table-cell office:value-type="float" office:value="69243.673219999982" table:style-name="ce34">
            <text:p><text:s/>69,244<text:s/></text:p>
          </table:table-cell>
          <table:table-cell office:value-type="float" office:value="67881.047790000011" table:style-name="ce172">
            <text:p>67,881</text:p>
          </table:table-cell>
          <table:table-cell office:value-type="float" office:value="91048.98219000001" table:style-name="ce172">
            <text:p>91,049</text:p>
          </table:table-cell>
          <table:table-cell office:value-type="float" office:value="66089.055730000007" table:style-name="ce275">
            <text:p>66,089</text:p>
          </table:table-cell>
          <table:table-cell office:value-type="float" office:value="71088.59132000005" table:style-name="ce172">
            <text:p>71,089</text:p>
          </table:table-cell>
          <table:table-cell office:value-type="float" office:value="68749.308570000023" table:style-name="ce371">
            <text:p>68,749</text:p>
          </table:table-cell>
          <table:table-cell office:value-type="float" office:value="70605" table:style-name="ce349">
            <text:p>70,605</text:p>
          </table:table-cell>
          <table:table-cell office:value-type="float" office:value="75683" table:style-name="ce373">
            <text:p>75,68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17</text:p>
          </table:table-cell>
          <table:table-cell office:value-type="string" table:style-name="ce222">
            <text:p>C&amp;D Waste and Asbestos</text:p>
          </table:table-cell>
          <table:table-cell office:value-type="float" office:value="79129.608590000047" table:style-name="ce162">
            <text:p><text:s/>79,130<text:s/></text:p>
          </table:table-cell>
          <table:table-cell office:value-type="float" office:value="120651.59501605417" table:style-name="ce162">
            <text:p><text:s/>120,652<text:s/></text:p>
          </table:table-cell>
          <table:table-cell office:value-type="float" office:value="63042.046021282906" table:style-name="ce162">
            <text:p><text:s/>63,042<text:s/></text:p>
          </table:table-cell>
          <table:table-cell office:value-type="float" office:value="105196.49129880918" table:style-name="ce162">
            <text:p><text:s/>105,196<text:s/></text:p>
          </table:table-cell>
          <table:table-cell office:value-type="float" office:value="140690.57981999984" table:style-name="ce162">
            <text:p><text:s/>140,691<text:s/></text:p>
          </table:table-cell>
          <table:table-cell office:value-type="float" office:value="258946.19836336438" table:style-name="ce162">
            <text:p><text:s/>258,946<text:s/></text:p>
          </table:table-cell>
          <table:table-cell office:value-type="float" office:value="98993.068879999992" table:style-name="ce162">
            <text:p><text:s/>98,993<text:s/></text:p>
          </table:table-cell>
          <table:table-cell office:value-type="float" office:value="93288.903820000094" table:style-name="ce216">
            <text:p><text:s/>93,289<text:s/></text:p>
          </table:table-cell>
          <table:table-cell office:value-type="float" office:value="93752.896559999892" table:style-name="ce34">
            <text:p><text:s/>93,753<text:s/></text:p>
          </table:table-cell>
          <table:table-cell office:value-type="float" office:value="49820.166730000004" table:style-name="ce218">
            <text:p><text:s/>49,820<text:s/></text:p>
          </table:table-cell>
          <table:table-cell office:value-type="float" office:value="53259.002709999986" table:style-name="ce218">
            <text:p><text:s/>53,259<text:s/></text:p>
          </table:table-cell>
          <table:table-cell office:value-type="float" office:value="87707.661419999989" table:style-name="ce218">
            <text:p><text:s/>87,708<text:s/></text:p>
          </table:table-cell>
          <table:table-cell office:value-type="float" office:value="60952.486050000021" table:style-name="ce223">
            <text:p><text:s/>60,952<text:s/></text:p>
          </table:table-cell>
          <table:table-cell office:value-type="float" office:value="60959.54326000002" table:style-name="ce223">
            <text:p><text:s/>60,960<text:s/></text:p>
          </table:table-cell>
          <table:table-cell office:value-type="float" office:value="85049.068350000001" table:style-name="ce34">
            <text:p><text:s/>85,049<text:s/></text:p>
          </table:table-cell>
          <table:table-cell office:value-type="float" office:value="63166.920189999997" table:style-name="ce34">
            <text:p><text:s/>63,167<text:s/></text:p>
          </table:table-cell>
          <table:table-cell office:value-type="float" office:value="67515.320979999931" table:style-name="ce34">
            <text:p><text:s/>67,515<text:s/></text:p>
          </table:table-cell>
          <table:table-cell office:value-type="float" office:value="99944.04084999999" table:style-name="ce34">
            <text:p><text:s/>99,944<text:s/></text:p>
          </table:table-cell>
          <table:table-cell office:value-type="float" office:value="103107.87656999999" table:style-name="ce172">
            <text:p>103,108</text:p>
          </table:table-cell>
          <table:table-cell office:value-type="float" office:value="102779.23028" table:style-name="ce172">
            <text:p>102,779</text:p>
          </table:table-cell>
          <table:table-cell office:value-type="float" office:value="67135.840230000016" table:style-name="ce275">
            <text:p>67,136</text:p>
          </table:table-cell>
          <table:table-cell office:value-type="float" office:value="109512.12628" table:style-name="ce172">
            <text:p>109,512</text:p>
          </table:table-cell>
          <table:table-cell office:value-type="float" office:value="86124.578450000001" table:style-name="ce371">
            <text:p>86,125</text:p>
          </table:table-cell>
          <table:table-cell office:value-type="float" office:value="130357" table:style-name="ce349">
            <text:p>130,357</text:p>
          </table:table-cell>
          <table:table-cell office:value-type="float" office:value="154840" table:style-name="ce373">
            <text:p>154,84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18</text:p>
          </table:table-cell>
          <table:table-cell office:value-type="string" table:style-name="ce222">
            <text:p>Healthcare</text:p>
          </table:table-cell>
          <table:table-cell office:value-type="float" office:value="2564.1623499999996" table:style-name="ce162">
            <text:p><text:s/>2,564<text:s/></text:p>
          </table:table-cell>
          <table:table-cell office:value-type="float" office:value="3089.9703467565705" table:style-name="ce162">
            <text:p><text:s/>3,090<text:s/></text:p>
          </table:table-cell>
          <table:table-cell office:value-type="float" office:value="3088.9516534572467" table:style-name="ce162">
            <text:p><text:s/>3,089<text:s/></text:p>
          </table:table-cell>
          <table:table-cell office:value-type="float" office:value="2130.0888565618516" table:style-name="ce162">
            <text:p><text:s/>2,130<text:s/></text:p>
          </table:table-cell>
          <table:table-cell office:value-type="float" office:value="1396.6990099999994" table:style-name="ce162">
            <text:p><text:s/>1,397<text:s/></text:p>
          </table:table-cell>
          <table:table-cell office:value-type="float" office:value="1672.8354589428054" table:style-name="ce162">
            <text:p><text:s/>1,673<text:s/></text:p>
          </table:table-cell>
          <table:table-cell office:value-type="float" office:value="17885.054710000004" table:style-name="ce162">
            <text:p><text:s/>17,885<text:s/></text:p>
          </table:table-cell>
          <table:table-cell office:value-type="float" office:value="20089.528670000007" table:style-name="ce216">
            <text:p><text:s/>20,090<text:s/></text:p>
          </table:table-cell>
          <table:table-cell office:value-type="float" office:value="22008.875270000011" table:style-name="ce34">
            <text:p><text:s/>22,009<text:s/></text:p>
          </table:table-cell>
          <table:table-cell office:value-type="float" office:value="22062.904060000015" table:style-name="ce218">
            <text:p><text:s/>22,063<text:s/></text:p>
          </table:table-cell>
          <table:table-cell office:value-type="float" office:value="22672.577029999997" table:style-name="ce218">
            <text:p><text:s/>22,673<text:s/></text:p>
          </table:table-cell>
          <table:table-cell office:value-type="float" office:value="23714.503189999992" table:style-name="ce218">
            <text:p><text:s/>23,715<text:s/></text:p>
          </table:table-cell>
          <table:table-cell office:value-type="float" office:value="23410.139370000001" table:style-name="ce223">
            <text:p><text:s/>23,410<text:s/></text:p>
          </table:table-cell>
          <table:table-cell office:value-type="float" office:value="23896.425940000001" table:style-name="ce223">
            <text:p><text:s/>23,896<text:s/></text:p>
          </table:table-cell>
          <table:table-cell office:value-type="float" office:value="26022.32591" table:style-name="ce34">
            <text:p><text:s/>26,022<text:s/></text:p>
          </table:table-cell>
          <table:table-cell office:value-type="float" office:value="22293.216780000002" table:style-name="ce34">
            <text:p><text:s/>22,293<text:s/></text:p>
          </table:table-cell>
          <table:table-cell office:value-type="float" office:value="21701.031730000024" table:style-name="ce34">
            <text:p><text:s/>21,701<text:s/></text:p>
          </table:table-cell>
          <table:table-cell office:value-type="float" office:value="21795.452299999997" table:style-name="ce34">
            <text:p><text:s/>21,795<text:s/></text:p>
          </table:table-cell>
          <table:table-cell office:value-type="float" office:value="22394.821699999997" table:style-name="ce172">
            <text:p>22,395</text:p>
          </table:table-cell>
          <table:table-cell office:value-type="float" office:value="22819.813399999999" table:style-name="ce172">
            <text:p>22,820</text:p>
          </table:table-cell>
          <table:table-cell office:value-type="float" office:value="24805.620690000003" table:style-name="ce275">
            <text:p>24,806</text:p>
          </table:table-cell>
          <table:table-cell office:value-type="float" office:value="28114.147040000003" table:style-name="ce172">
            <text:p>28,114</text:p>
          </table:table-cell>
          <table:table-cell office:value-type="float" office:value="26960.120859999992" table:style-name="ce371">
            <text:p>26,960</text:p>
          </table:table-cell>
          <table:table-cell office:value-type="float" office:value="19580" table:style-name="ce349">
            <text:p>19,580</text:p>
          </table:table-cell>
          <table:table-cell office:value-type="float" office:value="18903" table:style-name="ce373">
            <text:p>18,90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19</text:p>
          </table:table-cell>
          <table:table-cell office:value-type="string" table:style-name="ce222">
            <text:p>Waste/Water Treatment and Water Industry</text:p>
          </table:table-cell>
          <table:table-cell office:value-type="float" office:value="44085.367469999983" table:style-name="ce162">
            <text:p><text:s/>44,085<text:s/></text:p>
          </table:table-cell>
          <table:table-cell office:value-type="float" office:value="48748.129349487252" table:style-name="ce162">
            <text:p><text:s/>48,748<text:s/></text:p>
          </table:table-cell>
          <table:table-cell office:value-type="float" office:value="22581.634390853345" table:style-name="ce162">
            <text:p><text:s/>22,582<text:s/></text:p>
          </table:table-cell>
          <table:table-cell office:value-type="float" office:value="76620.465405263007" table:style-name="ce162">
            <text:p><text:s/>76,620<text:s/></text:p>
          </table:table-cell>
          <table:table-cell office:value-type="float" office:value="103839.38897" table:style-name="ce162">
            <text:p><text:s/>103,839<text:s/></text:p>
          </table:table-cell>
          <table:table-cell office:value-type="float" office:value="124895.44407197414" table:style-name="ce162">
            <text:p><text:s/>124,895<text:s/></text:p>
          </table:table-cell>
          <table:table-cell office:value-type="float" office:value="130341.57166" table:style-name="ce162">
            <text:p><text:s/>130,342<text:s/></text:p>
          </table:table-cell>
          <table:table-cell office:value-type="float" office:value="121143.87930000002" table:style-name="ce216">
            <text:p><text:s/>121,144<text:s/></text:p>
          </table:table-cell>
          <table:table-cell office:value-type="float" office:value="88493.433480000007" table:style-name="ce34">
            <text:p><text:s/>88,493<text:s/></text:p>
          </table:table-cell>
          <table:table-cell office:value-type="float" office:value="79809.012310000006" table:style-name="ce218">
            <text:p><text:s/>79,809<text:s/></text:p>
          </table:table-cell>
          <table:table-cell office:value-type="float" office:value="94573.789539999998" table:style-name="ce218">
            <text:p><text:s/>94,574<text:s/></text:p>
          </table:table-cell>
          <table:table-cell office:value-type="float" office:value="78651.907199999987" table:style-name="ce218">
            <text:p><text:s/>78,652<text:s/></text:p>
          </table:table-cell>
          <table:table-cell office:value-type="float" office:value="89354.791179999986" table:style-name="ce223">
            <text:p><text:s/>89,355<text:s/></text:p>
          </table:table-cell>
          <table:table-cell office:value-type="float" office:value="74636.989549999998" table:style-name="ce223">
            <text:p><text:s/>74,637<text:s/></text:p>
          </table:table-cell>
          <table:table-cell office:value-type="float" office:value="74670.030559999999" table:style-name="ce34">
            <text:p><text:s/>74,670<text:s/></text:p>
          </table:table-cell>
          <table:table-cell office:value-type="float" office:value="128899.14672000002" table:style-name="ce34">
            <text:p><text:s/>128,899<text:s/></text:p>
          </table:table-cell>
          <table:table-cell office:value-type="float" office:value="132696.7415699999" table:style-name="ce34">
            <text:p><text:s/>132,697<text:s/></text:p>
          </table:table-cell>
          <table:table-cell office:value-type="float" office:value="167970.50072000007" table:style-name="ce34">
            <text:p><text:s/>167,971<text:s/></text:p>
          </table:table-cell>
          <table:table-cell office:value-type="float" office:value="133920.08047999998" table:style-name="ce172">
            <text:p>133,920</text:p>
          </table:table-cell>
          <table:table-cell office:value-type="float" office:value="153432.10761000004" table:style-name="ce172">
            <text:p>153,432</text:p>
          </table:table-cell>
          <table:table-cell office:value-type="float" office:value="179916.34807000001" table:style-name="ce275">
            <text:p>179,916</text:p>
          </table:table-cell>
          <table:table-cell office:value-type="float" office:value="179186.01376" table:style-name="ce172">
            <text:p>179,186</text:p>
          </table:table-cell>
          <table:table-cell office:value-type="float" office:value="210808.71802000003" table:style-name="ce371">
            <text:p>210,809</text:p>
          </table:table-cell>
          <table:table-cell office:value-type="float" office:value="256070" table:style-name="ce349">
            <text:p>256,070</text:p>
          </table:table-cell>
          <table:table-cell office:value-type="float" office:value="342590" table:style-name="ce373">
            <text:p>342,59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1">
            <text:p>20</text:p>
          </table:table-cell>
          <table:table-cell office:value-type="string" table:style-name="ce222">
            <text:p>Municipal and Similar Commercial Wastes</text:p>
          </table:table-cell>
          <table:table-cell office:value-type="float" office:value="32360.561509999974" table:style-name="ce162">
            <text:p><text:s/>32,361<text:s/></text:p>
          </table:table-cell>
          <table:table-cell office:value-type="float" office:value="21193.662258600874" table:style-name="ce162">
            <text:p><text:s/>21,194<text:s/></text:p>
          </table:table-cell>
          <table:table-cell office:value-type="float" office:value="9388.8945664537605" table:style-name="ce162">
            <text:p><text:s/>9,389<text:s/></text:p>
          </table:table-cell>
          <table:table-cell office:value-type="float" office:value="32823.198683745453" table:style-name="ce162">
            <text:p><text:s/>32,823<text:s/></text:p>
          </table:table-cell>
          <table:table-cell office:value-type="float" office:value="30928.277400000021" table:style-name="ce162">
            <text:p><text:s/>30,928<text:s/></text:p>
          </table:table-cell>
          <table:table-cell office:value-type="float" office:value="9494.8588412428035" table:style-name="ce162">
            <text:p><text:s/>9,495<text:s/></text:p>
          </table:table-cell>
          <table:table-cell office:value-type="float" office:value="28379.750939999994" table:style-name="ce162">
            <text:p><text:s/>28,380<text:s/></text:p>
          </table:table-cell>
          <table:table-cell office:value-type="float" office:value="34120.062060000011" table:style-name="ce216">
            <text:p><text:s/>34,120<text:s/></text:p>
          </table:table-cell>
          <table:table-cell office:value-type="float" office:value="37936.93759999999" table:style-name="ce34">
            <text:p><text:s/>37,937<text:s/></text:p>
          </table:table-cell>
          <table:table-cell office:value-type="float" office:value="31376.71816" table:style-name="ce218">
            <text:p><text:s/>31,377<text:s/></text:p>
          </table:table-cell>
          <table:table-cell office:value-type="float" office:value="29938.947280000004" table:style-name="ce218">
            <text:p><text:s/>29,939<text:s/></text:p>
          </table:table-cell>
          <table:table-cell office:value-type="float" office:value="26232.071500000005" table:style-name="ce218">
            <text:p><text:s/>26,232<text:s/></text:p>
          </table:table-cell>
          <table:table-cell office:value-type="float" office:value="23418.752229999998" table:style-name="ce223">
            <text:p><text:s/>23,419<text:s/></text:p>
          </table:table-cell>
          <table:table-cell office:value-type="float" office:value="22140.485700000012" table:style-name="ce223">
            <text:p><text:s/>22,140<text:s/></text:p>
          </table:table-cell>
          <table:table-cell office:value-type="float" office:value="48294.402160000012" table:style-name="ce34">
            <text:p><text:s/>48,294<text:s/></text:p>
          </table:table-cell>
          <table:table-cell office:value-type="float" office:value="78003.035280000011" table:style-name="ce34">
            <text:p><text:s/>78,003<text:s/></text:p>
          </table:table-cell>
          <table:table-cell office:value-type="float" office:value="63273.475929999986" table:style-name="ce34">
            <text:p><text:s/>63,273<text:s/></text:p>
          </table:table-cell>
          <table:table-cell office:value-type="float" office:value="59692.938830000006" table:style-name="ce34">
            <text:p><text:s/>59,693<text:s/></text:p>
          </table:table-cell>
          <table:table-cell office:value-type="float" office:value="61586.676920000034" table:style-name="ce172">
            <text:p>61,587</text:p>
          </table:table-cell>
          <table:table-cell office:value-type="float" office:value="62656.269990000015" table:style-name="ce172">
            <text:p>62,656</text:p>
          </table:table-cell>
          <table:table-cell office:value-type="float" office:value="57845.120600000089" table:style-name="ce275">
            <text:p>57,845</text:p>
          </table:table-cell>
          <table:table-cell office:value-type="float" office:value="68313.316430000195" table:style-name="ce172">
            <text:p>68,313</text:p>
          </table:table-cell>
          <table:table-cell office:value-type="float" office:value="70326.375170000043" table:style-name="ce371">
            <text:p>70,326</text:p>
          </table:table-cell>
          <table:table-cell office:value-type="float" office:value="68099" table:style-name="ce349">
            <text:p>68,099</text:p>
          </table:table-cell>
          <table:table-cell office:value-type="float" office:value="65560" table:style-name="ce373">
            <text:p>65,560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24">
            <text:p>99</text:p>
          </table:table-cell>
          <table:table-cell office:value-type="string" table:style-name="ce225">
            <text:p>Unclassified</text:p>
          </table:table-cell>
          <table:table-cell office:value-type="float" office:value="53003.378749999996" table:style-name="ce162">
            <text:p><text:s/>53,003<text:s/></text:p>
          </table:table-cell>
          <table:table-cell office:value-type="float" office:value="25002.256732495502" table:style-name="ce162">
            <text:p><text:s/>25,002<text:s/></text:p>
          </table:table-cell>
          <table:table-cell office:value-type="float" office:value="34545.54055805807" table:style-name="ce162">
            <text:p><text:s/>34,546<text:s/></text:p>
          </table:table-cell>
          <table:table-cell office:value-type="float" office:value="42185.208040971076" table:style-name="ce162">
            <text:p><text:s/>42,185<text:s/></text:p>
          </table:table-cell>
          <table:table-cell office:value-type="float" office:value="36757.498669999979" table:style-name="ce162">
            <text:p><text:s/>36,757<text:s/></text:p>
          </table:table-cell>
          <table:table-cell office:value-type="float" office:value="20977.11949608607" table:style-name="ce163">
            <text:p><text:s/>20,977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216">
            <text:p><text:s/>-<text:s/></text:p>
          </table:table-cell>
          <table:table-cell office:value-type="float" office:value="0" table:style-name="ce218">
            <text:p><text:s/>-<text:s/></text:p>
          </table:table-cell>
          <table:table-cell office:value-type="float" office:value="0" table:style-name="ce218">
            <text:p><text:s/>-<text:s/></text:p>
          </table:table-cell>
          <table:table-cell office:value-type="float" office:value="0" table:style-name="ce218">
            <text:p><text:s/>-<text:s/></text:p>
          </table:table-cell>
          <table:table-cell office:value-type="float" office:value="0" table:style-name="ce218">
            <text:p><text:s/>-<text:s/></text:p>
          </table:table-cell>
          <table:table-cell office:value-type="float" office:value="0" table:style-name="ce227">
            <text:p><text:s/>-<text:s/>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0" table:style-name="ce228">
            <text:p><text:s/>-<text:s/></text:p>
          </table:table-cell>
          <table:table-cell office:value-type="float" office:value="0" table:style-name="ce348">
            <text:p><text:s/>-<text:s/></text:p>
          </table:table-cell>
          <table:table-cell office:value-type="float" office:value="0" table:style-name="ce348">
            <text:p><text:s/>-<text:s/></text:p>
          </table:table-cell>
          <table:table-cell office:value-type="float" office:value="0" table:style-name="ce375">
            <text:p><text:s/>-<text:s/></text:p>
          </table:table-cell>
          <table:table-cell office:value-type="float" office:value="0" table:style-name="ce248">
            <text:p><text:s/>-<text:s/></text:p>
          </table:table-cell>
          <table:table-cell table:number-columns-repeated="16356"/>
        </table:table-row>
        <table:table-row table:style-name="ro20">
          <table:table-cell/>
          <table:table-cell table:style-name="ce229"/>
          <table:table-cell office:value-type="string" table:style-name="ce230">
            <text:p>Total<text:s/></text:p>
          </table:table-cell>
          <table:table-cell office:value-type="float" office:value="695078.66061000025" table:formula="of:=SUM([.D15:.D35])" table:style-name="ce140">
            <text:p><text:s/>695,079<text:s/></text:p>
          </table:table-cell>
          <table:table-cell office:value-type="float" office:value="724346.02352408599" table:formula="of:=SUM([.E15:.E35])" table:style-name="ce140">
            <text:p><text:s/>724,346<text:s/></text:p>
          </table:table-cell>
          <table:table-cell office:value-type="float" office:value="602698.20793494617" table:formula="of:=SUM([.F15:.F35])" table:style-name="ce140">
            <text:p><text:s/>602,698<text:s/></text:p>
          </table:table-cell>
          <table:table-cell office:value-type="float" office:value="644807.07217538566" table:formula="of:=SUM([.G15:.G35])" table:style-name="ce140">
            <text:p><text:s/>644,807<text:s/></text:p>
          </table:table-cell>
          <table:table-cell office:value-type="float" office:value="691016.94687999983" table:formula="of:=SUM([.H15:.H35])" table:style-name="ce140">
            <text:p><text:s/>691,017<text:s/></text:p>
          </table:table-cell>
          <table:table-cell office:value-type="float" office:value="774792.72471337102" table:formula="of:=SUM([.I15:.I35])" table:style-name="ce140">
            <text:p><text:s/>774,793<text:s/></text:p>
          </table:table-cell>
          <table:table-cell office:value-type="float" office:value="727824.35354000004" table:formula="of:=SUM([.J15:.J35])" table:style-name="ce231">
            <text:p><text:s/>727,824<text:s/></text:p>
          </table:table-cell>
          <table:table-cell office:value-type="float" office:value="584098.37597000017" table:formula="of:=SUM([.K15:.K35])" table:style-name="ce231">
            <text:p><text:s/>584,098<text:s/></text:p>
          </table:table-cell>
          <table:table-cell office:value-type="float" office:value="543970.46327000007" table:formula="of:=SUM([.L15:.L35])" table:style-name="ce231">
            <text:p><text:s/>543,970<text:s/></text:p>
          </table:table-cell>
          <table:table-cell office:value-type="float" office:value="476748.59697000007" table:formula="of:=SUM([.M15:.M35])" table:style-name="ce231">
            <text:p><text:s/>476,749<text:s/></text:p>
          </table:table-cell>
          <table:table-cell office:value-type="float" office:value="473832.38782999996" table:formula="of:=SUM([.N15:.N35])" table:style-name="ce231">
            <text:p><text:s/>473,832<text:s/></text:p>
          </table:table-cell>
          <table:table-cell office:value-type="float" office:value="521403.48987000011" table:formula="of:=SUM([.O15:.O35])" table:style-name="ce231">
            <text:p><text:s/>521,403<text:s/></text:p>
          </table:table-cell>
          <table:table-cell office:value-type="float" office:value="497974.81510999997" table:formula="of:=SUM([.P15:.P35])" table:style-name="ce232">
            <text:p><text:s/>497,975<text:s/></text:p>
          </table:table-cell>
          <table:table-cell office:value-type="float" office:value="564562.59488999995" table:formula="of:=SUM([.Q15:.Q35])" table:style-name="ce231">
            <text:p><text:s/>564,563<text:s/></text:p>
          </table:table-cell>
          <table:table-cell office:value-type="float" office:value="613487.10494000011" table:formula="of:=SUM([.R15:.R35])" table:style-name="ce232">
            <text:p><text:s/>613,487<text:s/></text:p>
          </table:table-cell>
          <table:table-cell office:value-type="float" office:value="660116.38161999988" table:formula="of:=SUM([.S15:.S35])" table:style-name="ce232">
            <text:p><text:s/>660,116<text:s/></text:p>
          </table:table-cell>
          <table:table-cell office:value-type="float" office:value="642261.13269999973" table:formula="of:=SUM([.T15:.T35])" table:style-name="ce232">
            <text:p><text:s/>642,261<text:s/></text:p>
          </table:table-cell>
          <table:table-cell office:value-type="float" office:value="771795.22592000023" table:formula="of:=SUM([.U15:.U35])" table:style-name="ce232">
            <text:p><text:s/>771,795<text:s/></text:p>
          </table:table-cell>
          <table:table-cell office:value-type="float" office:value="792055.39954999997" table:formula="of:=SUM([.V15:.V35])" table:style-name="ce232">
            <text:p><text:s/>792,055<text:s/></text:p>
          </table:table-cell>
          <table:table-cell office:value-type="float" office:value="820772.94298000017" table:formula="of:=SUM([.W15:.W35])" table:style-name="ce232">
            <text:p><text:s/>820,773<text:s/></text:p>
          </table:table-cell>
          <table:table-cell office:value-type="float" office:value="764251" table:style-name="ce232">
            <text:p><text:s/>764,251<text:s/></text:p>
          </table:table-cell>
          <table:table-cell office:value-type="float" office:value="732600.26561000024" table:formula="of:=SUM([.Y15:.Y35])" table:style-name="ce232">
            <text:p><text:s/>732,600<text:s/></text:p>
          </table:table-cell>
          <table:table-cell office:value-type="float" office:value="730076.46350000019" table:formula="of:=SUM([.Z15:.Z35])" table:style-name="ce232">
            <text:p><text:s/>730,076<text:s/></text:p>
          </table:table-cell>
          <table:table-cell office:value-type="float" office:value="763653" table:formula="of:=SUM([.AA15:.AA35])" table:style-name="ce376">
            <text:p><text:s/>763,653<text:s/></text:p>
          </table:table-cell>
          <table:table-cell office:value-type="float" office:value="848399" table:style-name="ce232">
            <text:p><text:s/>848,399<text:s/></text:p>
          </table:table-cell>
          <table:table-cell table:number-columns-repeated="16356"/>
        </table:table-row>
        <table:table-row table:style-name="ro5">
          <table:table-cell/>
          <table:table-cell table:style-name="ce179"/>
          <table:table-cell table:number-columns-repeated="15" table:style-name="ce209"/>
          <table:table-cell table:number-columns-repeated="16367" table:style-name="ce14"/>
        </table:table-row>
        <table:table-row table:style-name="ro5">
          <table:table-cell/>
          <table:table-cell table:style-name="ce234"/>
          <table:table-cell table:number-columns-repeated="15" table:style-name="ce209"/>
          <table:table-cell table:number-columns-repeated="16367" table:style-name="ce14"/>
        </table:table-row>
        <table:table-row table:style-name="ro6">
          <table:table-cell/>
          <table:table-cell office:value-type="string" table:style-name="ce15">
            <text:p>North West: Hazardous waste deposited by EWC chapter from 1998 to 2024 (tonnes)</text:p>
          </table:table-cell>
          <table:table-cell table:number-columns-repeated="9" table:style-name="ce235"/>
          <table:table-cell table:number-columns-repeated="6" table:style-name="ce209"/>
          <table:table-cell table:number-columns-repeated="16367" table:style-name="ce14"/>
        </table:table-row>
        <table:table-row table:style-name="ro5">
          <table:table-cell/>
          <table:table-cell table:number-columns-repeated="10" table:style-name="ce235"/>
          <table:table-cell table:number-columns-repeated="6" table:style-name="ce209"/>
          <table:table-cell table:number-columns-repeated="16367" table:style-name="ce14"/>
        </table:table-row>
        <table:table-row table:style-name="ro3">
          <table:table-cell/>
          <table:table-cell office:value-type="string" table:style-name="ce210">
            <text:p>EWC chapter</text:p>
          </table:table-cell>
          <table:table-cell office:value-type="string" table:style-name="ce211">
            <text:p>EWC Chapter Description</text:p>
          </table:table-cell>
          <table:table-cell office:value-type="string" table:style-name="ce210">
            <text:p>1998/9</text:p>
          </table:table-cell>
          <table:table-cell office:value-type="float" office:value="2000" table:style-name="ce211">
            <text:p>2000</text:p>
          </table:table-cell>
          <table:table-cell office:value-type="float" office:value="2001" table:style-name="ce211">
            <text:p>2001</text:p>
          </table:table-cell>
          <table:table-cell office:value-type="float" office:value="2002" table:style-name="ce211">
            <text:p>2002</text:p>
          </table:table-cell>
          <table:table-cell office:value-type="float" office:value="2003" table:style-name="ce211">
            <text:p>2003</text:p>
          </table:table-cell>
          <table:table-cell office:value-type="float" office:value="2004" table:style-name="ce211">
            <text:p>2004</text:p>
          </table:table-cell>
          <table:table-cell office:value-type="float" office:value="2006" table:style-name="ce211">
            <text:p>2006</text:p>
          </table:table-cell>
          <table:table-cell office:value-type="float" office:value="2007" table:style-name="ce211">
            <text:p>2007</text:p>
          </table:table-cell>
          <table:table-cell office:value-type="float" office:value="2008" table:style-name="ce211">
            <text:p>2008</text:p>
          </table:table-cell>
          <table:table-cell office:value-type="float" office:value="2009" table:style-name="ce211">
            <text:p>2009</text:p>
          </table:table-cell>
          <table:table-cell office:value-type="float" office:value="2010" table:style-name="ce211">
            <text:p>2010</text:p>
          </table:table-cell>
          <table:table-cell office:value-type="float" office:value="2011" table:style-name="ce211">
            <text:p>2011</text:p>
          </table:table-cell>
          <table:table-cell office:value-type="float" office:value="2012" table:style-name="ce211">
            <text:p>2012</text:p>
          </table:table-cell>
          <table:table-cell office:value-type="float" office:value="2013" table:style-name="ce211">
            <text:p>2013</text:p>
          </table:table-cell>
          <table:table-cell office:value-type="float" office:value="2014" table:style-name="ce211">
            <text:p>2014</text:p>
          </table:table-cell>
          <table:table-cell office:value-type="float" office:value="2015" table:style-name="ce211">
            <text:p>2015</text:p>
          </table:table-cell>
          <table:table-cell office:value-type="float" office:value="2016" table:style-name="ce211">
            <text:p>2016</text:p>
          </table:table-cell>
          <table:table-cell office:value-type="float" office:value="2017" table:style-name="ce211">
            <text:p>2017</text:p>
          </table:table-cell>
          <table:table-cell office:value-type="float" office:value="2018" table:style-name="ce211">
            <text:p>2018</text:p>
          </table:table-cell>
          <table:table-cell office:value-type="float" office:value="2019" table:style-name="ce211">
            <text:p>2019</text:p>
          </table:table-cell>
          <table:table-cell office:value-type="float" office:value="2020" table:style-name="ce211">
            <text:p>2020</text:p>
          </table:table-cell>
          <table:table-cell office:value-type="float" office:value="2021" table:style-name="ce211">
            <text:p>2021</text:p>
          </table:table-cell>
          <table:table-cell office:value-type="float" office:value="2022" table:style-name="ce211">
            <text:p>2022</text:p>
          </table:table-cell>
          <table:table-cell office:value-type="float" office:value="2023" table:style-name="ce374">
            <text:p>2023</text:p>
          </table:table-cell>
          <table:table-cell office:value-type="float" office:value="2024" table:style-name="ce213">
            <text:p>202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6">
            <text:p>01</text:p>
          </table:table-cell>
          <table:table-cell office:value-type="string" table:style-name="ce237">
            <text:p>Mining and Minerals</text:p>
          </table:table-cell>
          <table:table-cell office:value-type="float" office:value="5532.9422999999997" table:style-name="ce238">
            <text:p><text:s/>5,533<text:s/></text:p>
          </table:table-cell>
          <table:table-cell office:value-type="float" office:value="70.259999394416809" table:style-name="ce238">
            <text:p><text:s/>70<text:s/></text:p>
          </table:table-cell>
          <table:table-cell office:value-type="float" office:value="40.815999269485474" table:style-name="ce238">
            <text:p><text:s/>41<text:s/></text:p>
          </table:table-cell>
          <table:table-cell office:value-type="float" office:value="59.839999198913574" table:style-name="ce238">
            <text:p><text:s/>60<text:s/></text:p>
          </table:table-cell>
          <table:table-cell office:value-type="float" office:value="2990.1548399999997" table:style-name="ce238">
            <text:p><text:s/>2,990<text:s/></text:p>
          </table:table-cell>
          <table:table-cell office:value-type="float" office:value="1323.9899997711182" table:style-name="ce238">
            <text:p><text:s/>1,324<text:s/></text:p>
          </table:table-cell>
          <table:table-cell office:value-type="float" office:value="11977.182999999999" table:style-name="ce160">
            <text:p><text:s/>11,977<text:s/></text:p>
          </table:table-cell>
          <table:table-cell office:value-type="float" office:value="4775.0659999999998" table:style-name="ce216">
            <text:p><text:s/>4,775<text:s/></text:p>
          </table:table-cell>
          <table:table-cell office:value-type="float" office:value="2032.13" table:style-name="ce28">
            <text:p><text:s/>2,032<text:s/></text:p>
          </table:table-cell>
          <table:table-cell office:value-type="float" office:value="2997.6710000000003" table:style-name="ce218">
            <text:p><text:s/>2,998<text:s/></text:p>
          </table:table-cell>
          <table:table-cell office:value-type="float" office:value="6315.9549999999999" table:style-name="ce217">
            <text:p><text:s/>6,316<text:s/></text:p>
          </table:table-cell>
          <table:table-cell office:value-type="float" office:value="6709.877199999999" table:style-name="ce218">
            <text:p><text:s/>6,710<text:s/></text:p>
          </table:table-cell>
          <table:table-cell office:value-type="float" office:value="3677.5045100000002" table:style-name="ce223">
            <text:p><text:s/>3,678<text:s/></text:p>
          </table:table-cell>
          <table:table-cell office:value-type="float" office:value="10494.461600000001" table:style-name="ce219">
            <text:p><text:s/>10,494<text:s/></text:p>
          </table:table-cell>
          <table:table-cell office:value-type="float" office:value="8109.2725300000002" table:style-name="ce34">
            <text:p><text:s/>8,109<text:s/></text:p>
          </table:table-cell>
          <table:table-cell office:value-type="float" office:value="14758.103940000005" table:style-name="ce34">
            <text:p><text:s/>14,758<text:s/></text:p>
          </table:table-cell>
          <table:table-cell office:value-type="float" office:value="24639.905510000001" table:style-name="ce34">
            <text:p><text:s/>24,640<text:s/></text:p>
          </table:table-cell>
          <table:table-cell office:value-type="float" office:value="24539.32599999999" table:style-name="ce34">
            <text:p><text:s/>24,539<text:s/></text:p>
          </table:table-cell>
          <table:table-cell office:value-type="float" office:value="28997.052080000001" table:style-name="ce172">
            <text:p>28,997</text:p>
          </table:table-cell>
          <table:table-cell office:value-type="float" office:value="40036.700000000004" table:style-name="ce220">
            <text:p>40,037</text:p>
          </table:table-cell>
          <table:table-cell office:value-type="float" office:value="21922.550999999999" table:style-name="ce274">
            <text:p>21,923</text:p>
          </table:table-cell>
          <table:table-cell office:value-type="float" office:value="6232.6359999999995" table:style-name="ce220">
            <text:p>6,233</text:p>
          </table:table-cell>
          <table:table-cell office:value-type="float" office:value="1572.4270000000004" table:style-name="ce377">
            <text:p>1,572</text:p>
          </table:table-cell>
          <table:table-cell office:value-type="float" office:value="3408" table:style-name="ce349">
            <text:p>3,408</text:p>
          </table:table-cell>
          <table:table-cell office:value-type="float" office:value="426" table:style-name="ce369">
            <text:p>42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02</text:p>
          </table:table-cell>
          <table:table-cell office:value-type="string" table:style-name="ce240">
            <text:p>Agricultural and Food Production</text:p>
          </table:table-cell>
          <table:table-cell office:value-type="float" office:value="1902.5279699999999" table:style-name="ce162">
            <text:p><text:s/>1,903<text:s/></text:p>
          </table:table-cell>
          <table:table-cell office:value-type="float" office:value="1220.8131435809191" table:style-name="ce162">
            <text:p><text:s/>1,221<text:s/></text:p>
          </table:table-cell>
          <table:table-cell office:value-type="float" office:value="1418.7408614596352" table:style-name="ce162">
            <text:p><text:s/>1,419<text:s/></text:p>
          </table:table-cell>
          <table:table-cell office:value-type="float" office:value="1262.208474798128" table:style-name="ce162">
            <text:p><text:s/>1,262<text:s/></text:p>
          </table:table-cell>
          <table:table-cell office:value-type="float" office:value="513.81275000000005" table:style-name="ce162">
            <text:p><text:s/>514<text:s/></text:p>
          </table:table-cell>
          <table:table-cell office:value-type="float" office:value="431.65733986906707" table:style-name="ce162">
            <text:p><text:s/>432<text:s/></text:p>
          </table:table-cell>
          <table:table-cell office:value-type="float" office:value="941.54470999999978" table:style-name="ce162">
            <text:p><text:s/>942<text:s/></text:p>
          </table:table-cell>
          <table:table-cell office:value-type="float" office:value="539.57254" table:style-name="ce216">
            <text:p><text:s/>540<text:s/></text:p>
          </table:table-cell>
          <table:table-cell office:value-type="float" office:value="950.3501" table:style-name="ce34">
            <text:p><text:s/>950<text:s/></text:p>
          </table:table-cell>
          <table:table-cell office:value-type="float" office:value="423.40260000000001" table:style-name="ce218">
            <text:p><text:s/>423<text:s/></text:p>
          </table:table-cell>
          <table:table-cell office:value-type="float" office:value="667.49704999999994" table:style-name="ce218">
            <text:p><text:s/>667<text:s/></text:p>
          </table:table-cell>
          <table:table-cell office:value-type="float" office:value="107.86385" table:style-name="ce218">
            <text:p><text:s/>108<text:s/></text:p>
          </table:table-cell>
          <table:table-cell office:value-type="float" office:value="100.2757" table:style-name="ce223">
            <text:p><text:s/>100<text:s/></text:p>
          </table:table-cell>
          <table:table-cell office:value-type="float" office:value="70.527000000000001" table:style-name="ce223">
            <text:p><text:s/>71<text:s/></text:p>
          </table:table-cell>
          <table:table-cell office:value-type="float" office:value="431.50650000000007" table:style-name="ce34">
            <text:p><text:s/>432<text:s/></text:p>
          </table:table-cell>
          <table:table-cell office:value-type="float" office:value="183.41047" table:style-name="ce34">
            <text:p><text:s/>183<text:s/></text:p>
          </table:table-cell>
          <table:table-cell office:value-type="float" office:value="195.20440999999997" table:style-name="ce34">
            <text:p><text:s/>195<text:s/></text:p>
          </table:table-cell>
          <table:table-cell office:value-type="float" office:value="387.10717000000005" table:style-name="ce34">
            <text:p><text:s/>387<text:s/></text:p>
          </table:table-cell>
          <table:table-cell office:value-type="float" office:value="568.21340000000009" table:style-name="ce172">
            <text:p>568</text:p>
          </table:table-cell>
          <table:table-cell office:value-type="float" office:value="366.00074000000001" table:style-name="ce172">
            <text:p>366</text:p>
          </table:table-cell>
          <table:table-cell office:value-type="float" office:value="202.22950000000003" table:style-name="ce275">
            <text:p>202</text:p>
          </table:table-cell>
          <table:table-cell office:value-type="float" office:value="72.60575" table:style-name="ce172">
            <text:p>73</text:p>
          </table:table-cell>
          <table:table-cell office:value-type="float" office:value="251.74156000000002" table:style-name="ce371">
            <text:p>252</text:p>
          </table:table-cell>
          <table:table-cell office:value-type="float" office:value="394" table:style-name="ce349">
            <text:p>394</text:p>
          </table:table-cell>
          <table:table-cell office:value-type="float" office:value="253" table:style-name="ce369">
            <text:p>25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03</text:p>
          </table:table-cell>
          <table:table-cell office:value-type="string" table:style-name="ce240">
            <text:p>Wood and Paper Production</text:p>
          </table:table-cell>
          <table:table-cell office:value-type="float" office:value="852.89887999999985" table:style-name="ce162">
            <text:p><text:s/>853<text:s/></text:p>
          </table:table-cell>
          <table:table-cell office:value-type="float" office:value="5825.1978212893009" table:style-name="ce162">
            <text:p><text:s/>5,825<text:s/></text:p>
          </table:table-cell>
          <table:table-cell office:value-type="float" office:value="2743.5576604567468" table:style-name="ce162">
            <text:p><text:s/>2,744<text:s/></text:p>
          </table:table-cell>
          <table:table-cell office:value-type="float" office:value="603.13448190316558" table:style-name="ce162">
            <text:p><text:s/>603<text:s/></text:p>
          </table:table-cell>
          <table:table-cell office:value-type="float" office:value="659.03690000000017" table:style-name="ce162">
            <text:p><text:s/>659<text:s/></text:p>
          </table:table-cell>
          <table:table-cell office:value-type="float" office:value="880.22000999748707" table:style-name="ce162">
            <text:p><text:s/>880<text:s/></text:p>
          </table:table-cell>
          <table:table-cell office:value-type="float" office:value="2063.1929" table:style-name="ce162">
            <text:p><text:s/>2,063<text:s/></text:p>
          </table:table-cell>
          <table:table-cell office:value-type="float" office:value="1129.9170000000001" table:style-name="ce216">
            <text:p><text:s/>1,130<text:s/></text:p>
          </table:table-cell>
          <table:table-cell office:value-type="float" office:value="1244.653" table:style-name="ce34">
            <text:p><text:s/>1,245<text:s/></text:p>
          </table:table-cell>
          <table:table-cell office:value-type="float" office:value="319.59399999999999" table:style-name="ce218">
            <text:p><text:s/>320<text:s/></text:p>
          </table:table-cell>
          <table:table-cell office:value-type="float" office:value="592.5920000000001" table:style-name="ce218">
            <text:p><text:s/>593<text:s/></text:p>
          </table:table-cell>
          <table:table-cell office:value-type="float" office:value="181.31" table:style-name="ce218">
            <text:p><text:s/>181<text:s/></text:p>
          </table:table-cell>
          <table:table-cell office:value-type="float" office:value="54.824000000000005" table:style-name="ce223">
            <text:p><text:s/>55<text:s/></text:p>
          </table:table-cell>
          <table:table-cell office:value-type="float" office:value="37.47" table:style-name="ce223">
            <text:p><text:s/>37<text:s/></text:p>
          </table:table-cell>
          <table:table-cell office:value-type="float" office:value="101.825" table:style-name="ce34">
            <text:p><text:s/>102<text:s/></text:p>
          </table:table-cell>
          <table:table-cell office:value-type="float" office:value="71.071749999999994" table:style-name="ce34">
            <text:p><text:s/>71<text:s/></text:p>
          </table:table-cell>
          <table:table-cell office:value-type="float" office:value="113.71082" table:style-name="ce34">
            <text:p><text:s/>114<text:s/></text:p>
          </table:table-cell>
          <table:table-cell office:value-type="float" office:value="31.480460000000001" table:style-name="ce34">
            <text:p><text:s/>31<text:s/></text:p>
          </table:table-cell>
          <table:table-cell office:value-type="float" office:value="30.193499999999997" table:style-name="ce172">
            <text:p>30</text:p>
          </table:table-cell>
          <table:table-cell office:value-type="float" office:value="16.3535" table:style-name="ce172">
            <text:p>16</text:p>
          </table:table-cell>
          <table:table-cell office:value-type="float" office:value="58.214999999999989" table:style-name="ce275">
            <text:p>58</text:p>
          </table:table-cell>
          <table:table-cell office:value-type="float" office:value="12.04433" table:style-name="ce172">
            <text:p>12</text:p>
          </table:table-cell>
          <table:table-cell office:value-type="float" office:value="132.10529" table:style-name="ce371">
            <text:p>132</text:p>
          </table:table-cell>
          <table:table-cell office:value-type="float" office:value="213" table:style-name="ce349">
            <text:p>213</text:p>
          </table:table-cell>
          <table:table-cell office:value-type="float" office:value="94" table:style-name="ce369">
            <text:p>9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04</text:p>
          </table:table-cell>
          <table:table-cell office:value-type="string" table:style-name="ce240">
            <text:p>Leather and Textile Production</text:p>
          </table:table-cell>
          <table:table-cell office:value-type="float" office:value="521.46874000000003" table:style-name="ce162">
            <text:p><text:s/>521<text:s/></text:p>
          </table:table-cell>
          <table:table-cell office:value-type="float" office:value="655.82004410028458" table:style-name="ce162">
            <text:p><text:s/>656<text:s/></text:p>
          </table:table-cell>
          <table:table-cell office:value-type="float" office:value="1604.0854580551386" table:style-name="ce162">
            <text:p><text:s/>1,604<text:s/></text:p>
          </table:table-cell>
          <table:table-cell office:value-type="float" office:value="2438.6758938729763" table:style-name="ce162">
            <text:p><text:s/>2,439<text:s/></text:p>
          </table:table-cell>
          <table:table-cell office:value-type="float" office:value="1484.19" table:style-name="ce162">
            <text:p><text:s/>1,484<text:s/></text:p>
          </table:table-cell>
          <table:table-cell office:value-type="float" office:value="2022.679711446166" table:style-name="ce162">
            <text:p><text:s/>2,023<text:s/></text:p>
          </table:table-cell>
          <table:table-cell office:value-type="float" office:value="2236.5940000000001" table:style-name="ce162">
            <text:p><text:s/>2,237<text:s/></text:p>
          </table:table-cell>
          <table:table-cell office:value-type="float" office:value="913.21400000000006" table:style-name="ce216">
            <text:p><text:s/>913<text:s/></text:p>
          </table:table-cell>
          <table:table-cell office:value-type="float" office:value="931.38" table:style-name="ce34">
            <text:p><text:s/>931<text:s/></text:p>
          </table:table-cell>
          <table:table-cell office:value-type="float" office:value="73.663999999999987" table:style-name="ce218">
            <text:p><text:s/>74<text:s/></text:p>
          </table:table-cell>
          <table:table-cell office:value-type="float" office:value="76.314999999999998" table:style-name="ce218">
            <text:p><text:s/>76<text:s/></text:p>
          </table:table-cell>
          <table:table-cell office:value-type="float" office:value="55.153000000000006" table:style-name="ce218">
            <text:p><text:s/>55<text:s/></text:p>
          </table:table-cell>
          <table:table-cell office:value-type="float" office:value="96.275000000000006" table:style-name="ce223">
            <text:p><text:s/>96<text:s/></text:p>
          </table:table-cell>
          <table:table-cell office:value-type="float" office:value="88.38300000000001" table:style-name="ce223">
            <text:p><text:s/>88<text:s/></text:p>
          </table:table-cell>
          <table:table-cell office:value-type="float" office:value="58.103200000000001" table:style-name="ce34">
            <text:p><text:s/>58<text:s/></text:p>
          </table:table-cell>
          <table:table-cell office:value-type="float" office:value="55.343500000000006" table:style-name="ce34">
            <text:p><text:s/>55<text:s/></text:p>
          </table:table-cell>
          <table:table-cell office:value-type="float" office:value="90.453569999999985" table:style-name="ce34">
            <text:p><text:s/>90<text:s/></text:p>
          </table:table-cell>
          <table:table-cell office:value-type="float" office:value="149.59100000000001" table:style-name="ce34">
            <text:p><text:s/>150<text:s/></text:p>
          </table:table-cell>
          <table:table-cell office:value-type="float" office:value="271.17060000000004" table:style-name="ce172">
            <text:p>271</text:p>
          </table:table-cell>
          <table:table-cell office:value-type="float" office:value="282.55449999999996" table:style-name="ce172">
            <text:p>283</text:p>
          </table:table-cell>
          <table:table-cell office:value-type="float" office:value="382.24495000000002" table:style-name="ce275">
            <text:p>382</text:p>
          </table:table-cell>
          <table:table-cell office:value-type="float" office:value="285.50559999999996" table:style-name="ce172">
            <text:p>286</text:p>
          </table:table-cell>
          <table:table-cell office:value-type="float" office:value="275.08992999999998" table:style-name="ce371">
            <text:p>275</text:p>
          </table:table-cell>
          <table:table-cell office:value-type="float" office:value="245" table:style-name="ce349">
            <text:p>245</text:p>
          </table:table-cell>
          <table:table-cell office:value-type="float" office:value="196" table:style-name="ce369">
            <text:p>19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05</text:p>
          </table:table-cell>
          <table:table-cell office:value-type="string" table:style-name="ce241">
            <text:p>Petrol, Gas and Coal Refining/Treatment</text:p>
          </table:table-cell>
          <table:table-cell office:value-type="float" office:value="9927.5323299999964" table:style-name="ce205">
            <text:p><text:s/>9,928<text:s/></text:p>
          </table:table-cell>
          <table:table-cell office:value-type="float" office:value="33413.017185796052" table:style-name="ce162">
            <text:p><text:s/>33,413<text:s/></text:p>
          </table:table-cell>
          <table:table-cell office:value-type="float" office:value="18179.915037959814" table:style-name="ce162">
            <text:p><text:s/>18,180<text:s/></text:p>
          </table:table-cell>
          <table:table-cell office:value-type="float" office:value="9368.0987474674876" table:style-name="ce162">
            <text:p><text:s/>9,368<text:s/></text:p>
          </table:table-cell>
          <table:table-cell office:value-type="float" office:value="9933.201500000001" table:style-name="ce162">
            <text:p><text:s/>9,933<text:s/></text:p>
          </table:table-cell>
          <table:table-cell office:value-type="float" office:value="9123.8571753576398" table:style-name="ce162">
            <text:p><text:s/>9,124<text:s/></text:p>
          </table:table-cell>
          <table:table-cell office:value-type="float" office:value="6253.3933999999999" table:style-name="ce162">
            <text:p><text:s/>6,253<text:s/></text:p>
          </table:table-cell>
          <table:table-cell office:value-type="float" office:value="1394.6125" table:style-name="ce216">
            <text:p><text:s/>1,395<text:s/></text:p>
          </table:table-cell>
          <table:table-cell office:value-type="float" office:value="2685.9859999999999" table:style-name="ce34">
            <text:p><text:s/>2,686<text:s/></text:p>
          </table:table-cell>
          <table:table-cell office:value-type="float" office:value="10356.522700000001" table:style-name="ce218">
            <text:p><text:s/>10,357<text:s/></text:p>
          </table:table-cell>
          <table:table-cell office:value-type="float" office:value="21930.73689" table:style-name="ce218">
            <text:p><text:s/>21,931<text:s/></text:p>
          </table:table-cell>
          <table:table-cell office:value-type="float" office:value="19877.144059999999" table:style-name="ce218">
            <text:p><text:s/>19,877<text:s/></text:p>
          </table:table-cell>
          <table:table-cell office:value-type="float" office:value="16928.916109999998" table:style-name="ce223">
            <text:p><text:s/>16,929<text:s/></text:p>
          </table:table-cell>
          <table:table-cell office:value-type="float" office:value="21233.210999999996" table:style-name="ce223">
            <text:p><text:s/>21,233<text:s/></text:p>
          </table:table-cell>
          <table:table-cell office:value-type="float" office:value="12130.339160000001" table:style-name="ce34">
            <text:p><text:s/>12,130<text:s/></text:p>
          </table:table-cell>
          <table:table-cell office:value-type="float" office:value="4167.0225" table:style-name="ce34">
            <text:p><text:s/>4,167<text:s/></text:p>
          </table:table-cell>
          <table:table-cell office:value-type="float" office:value="3529.8607499999989" table:style-name="ce34">
            <text:p><text:s/>3,530<text:s/></text:p>
          </table:table-cell>
          <table:table-cell office:value-type="float" office:value="2657.7266799999993" table:style-name="ce34">
            <text:p><text:s/>2,658<text:s/></text:p>
          </table:table-cell>
          <table:table-cell office:value-type="float" office:value="2622.6223" table:style-name="ce172">
            <text:p>2,623</text:p>
          </table:table-cell>
          <table:table-cell office:value-type="float" office:value="3710.1527500000002" table:style-name="ce172">
            <text:p>3,710</text:p>
          </table:table-cell>
          <table:table-cell office:value-type="float" office:value="3972.54493" table:style-name="ce275">
            <text:p>3,973</text:p>
          </table:table-cell>
          <table:table-cell office:value-type="float" office:value="1876.5066399999998" table:style-name="ce172">
            <text:p>1,877</text:p>
          </table:table-cell>
          <table:table-cell office:value-type="float" office:value="5404.7180000000008" table:style-name="ce371">
            <text:p>5,405</text:p>
          </table:table-cell>
          <table:table-cell office:value-type="float" office:value="3366" table:style-name="ce349">
            <text:p>3,366</text:p>
          </table:table-cell>
          <table:table-cell office:value-type="float" office:value="5921" table:style-name="ce370">
            <text:p>5,92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06</text:p>
          </table:table-cell>
          <table:table-cell office:value-type="string" table:style-name="ce241">
            <text:p>Inorganic Chemical Processes</text:p>
          </table:table-cell>
          <table:table-cell office:value-type="float" office:value="64912.159620000057" table:style-name="ce205">
            <text:p><text:s/>64,912<text:s/></text:p>
          </table:table-cell>
          <table:table-cell office:value-type="float" office:value="57360.252752611676" table:style-name="ce162">
            <text:p><text:s/>57,360<text:s/></text:p>
          </table:table-cell>
          <table:table-cell office:value-type="float" office:value="41890.524052041284" table:style-name="ce162">
            <text:p><text:s/>41,891<text:s/></text:p>
          </table:table-cell>
          <table:table-cell office:value-type="float" office:value="48637.418280878221" table:style-name="ce162">
            <text:p><text:s/>48,637<text:s/></text:p>
          </table:table-cell>
          <table:table-cell office:value-type="float" office:value="47230.147310000037" table:style-name="ce162">
            <text:p><text:s/>47,230<text:s/></text:p>
          </table:table-cell>
          <table:table-cell office:value-type="float" office:value="18429.132797118571" table:style-name="ce162">
            <text:p><text:s/>18,429<text:s/></text:p>
          </table:table-cell>
          <table:table-cell office:value-type="float" office:value="56320.306919999995" table:style-name="ce162">
            <text:p><text:s/>56,320<text:s/></text:p>
          </table:table-cell>
          <table:table-cell office:value-type="float" office:value="28681.760599999994" table:style-name="ce216">
            <text:p><text:s/>28,682<text:s/></text:p>
          </table:table-cell>
          <table:table-cell office:value-type="float" office:value="12851.556580000002" table:style-name="ce34">
            <text:p><text:s/>12,852<text:s/></text:p>
          </table:table-cell>
          <table:table-cell office:value-type="float" office:value="16721.53544" table:style-name="ce218">
            <text:p><text:s/>16,722<text:s/></text:p>
          </table:table-cell>
          <table:table-cell office:value-type="float" office:value="20458.12588" table:style-name="ce218">
            <text:p><text:s/>20,458<text:s/></text:p>
          </table:table-cell>
          <table:table-cell office:value-type="float" office:value="33034.356759999995" table:style-name="ce218">
            <text:p><text:s/>33,034<text:s/></text:p>
          </table:table-cell>
          <table:table-cell office:value-type="float" office:value="26395.022750000004" table:style-name="ce223">
            <text:p><text:s/>26,395<text:s/></text:p>
          </table:table-cell>
          <table:table-cell office:value-type="float" office:value="23948.878400000001" table:style-name="ce223">
            <text:p><text:s/>23,949<text:s/></text:p>
          </table:table-cell>
          <table:table-cell office:value-type="float" office:value="20125.856789999998" table:style-name="ce34">
            <text:p><text:s/>20,126<text:s/></text:p>
          </table:table-cell>
          <table:table-cell office:value-type="float" office:value="24507.245219999997" table:style-name="ce34">
            <text:p><text:s/>24,507<text:s/></text:p>
          </table:table-cell>
          <table:table-cell office:value-type="float" office:value="25173.76474000001" table:style-name="ce34">
            <text:p><text:s/>25,174<text:s/></text:p>
          </table:table-cell>
          <table:table-cell office:value-type="float" office:value="26170.378270000008" table:style-name="ce34">
            <text:p><text:s/>26,170<text:s/></text:p>
          </table:table-cell>
          <table:table-cell office:value-type="float" office:value="19460.856460000003" table:style-name="ce172">
            <text:p>19,461</text:p>
          </table:table-cell>
          <table:table-cell office:value-type="float" office:value="24084.614310000004" table:style-name="ce172">
            <text:p>24,085</text:p>
          </table:table-cell>
          <table:table-cell office:value-type="float" office:value="25453.945400000001" table:style-name="ce275">
            <text:p>25,454</text:p>
          </table:table-cell>
          <table:table-cell office:value-type="float" office:value="20587.050460000002" table:style-name="ce172">
            <text:p>20,587</text:p>
          </table:table-cell>
          <table:table-cell office:value-type="float" office:value="25079.276740000001" table:style-name="ce371">
            <text:p>25,079</text:p>
          </table:table-cell>
          <table:table-cell office:value-type="float" office:value="22916" table:style-name="ce349">
            <text:p>22,916</text:p>
          </table:table-cell>
          <table:table-cell office:value-type="float" office:value="20155" table:style-name="ce370">
            <text:p>20,15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07</text:p>
          </table:table-cell>
          <table:table-cell office:value-type="string" table:style-name="ce241">
            <text:p>Organic Chemical Processes</text:p>
          </table:table-cell>
          <table:table-cell office:value-type="float" office:value="227443.19940999965" table:style-name="ce242">
            <text:p><text:s/>227,443<text:s/></text:p>
          </table:table-cell>
          <table:table-cell office:value-type="float" office:value="227139.87257332887" table:style-name="ce216">
            <text:p><text:s/>227,140<text:s/></text:p>
          </table:table-cell>
          <table:table-cell office:value-type="float" office:value="237913.15580453962" table:style-name="ce216">
            <text:p><text:s/>237,913<text:s/></text:p>
          </table:table-cell>
          <table:table-cell office:value-type="float" office:value="239172.83052783" table:style-name="ce216">
            <text:p><text:s/>239,173<text:s/></text:p>
          </table:table-cell>
          <table:table-cell office:value-type="float" office:value="237053.94575000036" table:style-name="ce216">
            <text:p><text:s/>237,054<text:s/></text:p>
          </table:table-cell>
          <table:table-cell office:value-type="float" office:value="245330.0912092065" table:style-name="ce162">
            <text:p><text:s/>245,330<text:s/></text:p>
          </table:table-cell>
          <table:table-cell office:value-type="float" office:value="148799.67418999993" table:style-name="ce162">
            <text:p><text:s/>148,800<text:s/></text:p>
          </table:table-cell>
          <table:table-cell office:value-type="float" office:value="125145.68230999999" table:style-name="ce216">
            <text:p><text:s/>125,146<text:s/></text:p>
          </table:table-cell>
          <table:table-cell office:value-type="float" office:value="106593.84843000001" table:style-name="ce34">
            <text:p><text:s/>106,594<text:s/></text:p>
          </table:table-cell>
          <table:table-cell office:value-type="float" office:value="102943.39077999996" table:style-name="ce218">
            <text:p><text:s/>102,943<text:s/></text:p>
          </table:table-cell>
          <table:table-cell office:value-type="float" office:value="109191.67900000002" table:style-name="ce218">
            <text:p><text:s/>109,192<text:s/></text:p>
          </table:table-cell>
          <table:table-cell office:value-type="float" office:value="125311.32753000002" table:style-name="ce218">
            <text:p><text:s/>125,311<text:s/></text:p>
          </table:table-cell>
          <table:table-cell office:value-type="float" office:value="113155.96345" table:style-name="ce223">
            <text:p><text:s/>113,156<text:s/></text:p>
          </table:table-cell>
          <table:table-cell office:value-type="float" office:value="127867.30818000011" table:style-name="ce223">
            <text:p><text:s/>127,867<text:s/></text:p>
          </table:table-cell>
          <table:table-cell office:value-type="float" office:value="126612.34046000001" table:style-name="ce34">
            <text:p><text:s/>126,612<text:s/></text:p>
          </table:table-cell>
          <table:table-cell office:value-type="float" office:value="131212.25565000001" table:style-name="ce34">
            <text:p><text:s/>131,212<text:s/></text:p>
          </table:table-cell>
          <table:table-cell office:value-type="float" office:value="117359.48893000001" table:style-name="ce34">
            <text:p><text:s/>117,359<text:s/></text:p>
          </table:table-cell>
          <table:table-cell office:value-type="float" office:value="190721.26418000017" table:style-name="ce34">
            <text:p><text:s/>190,721<text:s/></text:p>
          </table:table-cell>
          <table:table-cell office:value-type="float" office:value="262144.85352999996" table:style-name="ce172">
            <text:p>262,145</text:p>
          </table:table-cell>
          <table:table-cell office:value-type="float" office:value="257342.33299999998" table:style-name="ce172">
            <text:p>257,342</text:p>
          </table:table-cell>
          <table:table-cell office:value-type="float" office:value="252589.6109899999" table:style-name="ce275">
            <text:p>252,590</text:p>
          </table:table-cell>
          <table:table-cell office:value-type="float" office:value="195476.68971000012" table:style-name="ce172">
            <text:p>195,477</text:p>
          </table:table-cell>
          <table:table-cell office:value-type="float" office:value="183077.35816" table:style-name="ce371">
            <text:p>183,077</text:p>
          </table:table-cell>
          <table:table-cell office:value-type="float" office:value="128222" table:style-name="ce349">
            <text:p>128,222</text:p>
          </table:table-cell>
          <table:table-cell office:value-type="float" office:value="90173" table:style-name="ce370">
            <text:p>90,17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08</text:p>
          </table:table-cell>
          <table:table-cell office:value-type="string" table:style-name="ce241">
            <text:p>MFSU Paints, Varnish, Adhesive and Inks</text:p>
          </table:table-cell>
          <table:table-cell office:value-type="float" office:value="40565.654449999951" table:style-name="ce242">
            <text:p><text:s/>40,566<text:s/></text:p>
          </table:table-cell>
          <table:table-cell office:value-type="float" office:value="42405.952513694414" table:style-name="ce216">
            <text:p><text:s/>42,406<text:s/></text:p>
          </table:table-cell>
          <table:table-cell office:value-type="float" office:value="36869.086373680504" table:style-name="ce216">
            <text:p><text:s/>36,869<text:s/></text:p>
          </table:table-cell>
          <table:table-cell office:value-type="float" office:value="26572.753975280153" table:style-name="ce216">
            <text:p><text:s/>26,573<text:s/></text:p>
          </table:table-cell>
          <table:table-cell office:value-type="float" office:value="19080.231430000036" table:style-name="ce216">
            <text:p><text:s/>19,080<text:s/></text:p>
          </table:table-cell>
          <table:table-cell office:value-type="float" office:value="19117.365385857061" table:style-name="ce216">
            <text:p><text:s/>19,117<text:s/></text:p>
          </table:table-cell>
          <table:table-cell office:value-type="float" office:value="24810.603920000001" table:style-name="ce162">
            <text:p><text:s/>24,811<text:s/></text:p>
          </table:table-cell>
          <table:table-cell office:value-type="float" office:value="27086.425330000009" table:style-name="ce216">
            <text:p><text:s/>27,086<text:s/></text:p>
          </table:table-cell>
          <table:table-cell office:value-type="float" office:value="26284.451370000028" table:style-name="ce34">
            <text:p><text:s/>26,284<text:s/></text:p>
          </table:table-cell>
          <table:table-cell office:value-type="float" office:value="24959.483629999988" table:style-name="ce218">
            <text:p><text:s/>24,959<text:s/></text:p>
          </table:table-cell>
          <table:table-cell office:value-type="float" office:value="29050.902300000002" table:style-name="ce218">
            <text:p><text:s/>29,051<text:s/></text:p>
          </table:table-cell>
          <table:table-cell office:value-type="float" office:value="26115.948849999993" table:style-name="ce218">
            <text:p><text:s/>26,116<text:s/></text:p>
          </table:table-cell>
          <table:table-cell office:value-type="float" office:value="22894.314050000001" table:style-name="ce223">
            <text:p><text:s/>22,894<text:s/></text:p>
          </table:table-cell>
          <table:table-cell office:value-type="float" office:value="24388.546659999993" table:style-name="ce223">
            <text:p><text:s/>24,389<text:s/></text:p>
          </table:table-cell>
          <table:table-cell office:value-type="float" office:value="24292.48718" table:style-name="ce34">
            <text:p><text:s/>24,292<text:s/></text:p>
          </table:table-cell>
          <table:table-cell office:value-type="float" office:value="27515.723499999996" table:style-name="ce34">
            <text:p><text:s/>27,516<text:s/></text:p>
          </table:table-cell>
          <table:table-cell office:value-type="float" office:value="25501.668449999997" table:style-name="ce34">
            <text:p><text:s/>25,502<text:s/></text:p>
          </table:table-cell>
          <table:table-cell office:value-type="float" office:value="28906.377490000024" table:style-name="ce34">
            <text:p><text:s/>28,906<text:s/></text:p>
          </table:table-cell>
          <table:table-cell office:value-type="float" office:value="32118.599790000011" table:style-name="ce172">
            <text:p>32,119</text:p>
          </table:table-cell>
          <table:table-cell office:value-type="float" office:value="29749.822720000011" table:style-name="ce172">
            <text:p>29,750</text:p>
          </table:table-cell>
          <table:table-cell office:value-type="float" office:value="29145.481979999986" table:style-name="ce275">
            <text:p>29,145</text:p>
          </table:table-cell>
          <table:table-cell office:value-type="float" office:value="28676.940490000008" table:style-name="ce172">
            <text:p>28,677</text:p>
          </table:table-cell>
          <table:table-cell office:value-type="float" office:value="28563.530479999969" table:style-name="ce371">
            <text:p>28,564</text:p>
          </table:table-cell>
          <table:table-cell office:value-type="float" office:value="26164" table:style-name="ce349">
            <text:p>26,164</text:p>
          </table:table-cell>
          <table:table-cell office:value-type="float" office:value="26348" table:style-name="ce370">
            <text:p>26,348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09</text:p>
          </table:table-cell>
          <table:table-cell office:value-type="string" table:style-name="ce240">
            <text:p>Photographic Industry</text:p>
          </table:table-cell>
          <table:table-cell office:value-type="float" office:value="6214.2639499999859" table:style-name="ce216">
            <text:p><text:s/>6,214<text:s/></text:p>
          </table:table-cell>
          <table:table-cell office:value-type="float" office:value="11309.980722121429" table:style-name="ce216">
            <text:p><text:s/>11,310<text:s/></text:p>
          </table:table-cell>
          <table:table-cell office:value-type="float" office:value="20850.262417810038" table:style-name="ce216">
            <text:p><text:s/>20,850<text:s/></text:p>
          </table:table-cell>
          <table:table-cell office:value-type="float" office:value="16151.810764717869" table:style-name="ce216">
            <text:p><text:s/>16,152<text:s/></text:p>
          </table:table-cell>
          <table:table-cell office:value-type="float" office:value="26983.358770000003" table:style-name="ce216">
            <text:p><text:s/>26,983<text:s/></text:p>
          </table:table-cell>
          <table:table-cell office:value-type="float" office:value="20226.938787350897" table:style-name="ce216">
            <text:p><text:s/>20,227<text:s/></text:p>
          </table:table-cell>
          <table:table-cell office:value-type="float" office:value="10162.425529999993" table:style-name="ce162">
            <text:p><text:s/>10,162<text:s/></text:p>
          </table:table-cell>
          <table:table-cell office:value-type="float" office:value="8959.1936000000005" table:style-name="ce216">
            <text:p><text:s/>8,959<text:s/></text:p>
          </table:table-cell>
          <table:table-cell office:value-type="float" office:value="7808.2138999999997" table:style-name="ce34">
            <text:p><text:s/>7,808<text:s/></text:p>
          </table:table-cell>
          <table:table-cell office:value-type="float" office:value="6483.8365700000022" table:style-name="ce218">
            <text:p><text:s/>6,484<text:s/></text:p>
          </table:table-cell>
          <table:table-cell office:value-type="float" office:value="5718.0836000000008" table:style-name="ce218">
            <text:p><text:s/>5,718<text:s/></text:p>
          </table:table-cell>
          <table:table-cell office:value-type="float" office:value="7141.4562499999993" table:style-name="ce218">
            <text:p><text:s/>7,141<text:s/></text:p>
          </table:table-cell>
          <table:table-cell office:value-type="float" office:value="6505.4304299999994" table:style-name="ce223">
            <text:p><text:s/>6,505<text:s/></text:p>
          </table:table-cell>
          <table:table-cell office:value-type="float" office:value="5292.8585699999994" table:style-name="ce223">
            <text:p><text:s/>5,293<text:s/></text:p>
          </table:table-cell>
          <table:table-cell office:value-type="float" office:value="4779.5967299999993" table:style-name="ce34">
            <text:p><text:s/>4,780<text:s/></text:p>
          </table:table-cell>
          <table:table-cell office:value-type="float" office:value="4692.5166099999997" table:style-name="ce34">
            <text:p><text:s/>4,693<text:s/></text:p>
          </table:table-cell>
          <table:table-cell office:value-type="float" office:value="4076.5638800000015" table:style-name="ce34">
            <text:p><text:s/>4,077<text:s/></text:p>
          </table:table-cell>
          <table:table-cell office:value-type="float" office:value="3349.6765599999976" table:style-name="ce34">
            <text:p><text:s/>3,350<text:s/></text:p>
          </table:table-cell>
          <table:table-cell office:value-type="float" office:value="3078.0897800000002" table:style-name="ce172">
            <text:p>3,078</text:p>
          </table:table-cell>
          <table:table-cell office:value-type="float" office:value="2556.08835" table:style-name="ce172">
            <text:p>2,556</text:p>
          </table:table-cell>
          <table:table-cell office:value-type="float" office:value="1294.42608" table:style-name="ce275">
            <text:p>1,294</text:p>
          </table:table-cell>
          <table:table-cell office:value-type="float" office:value="1377.6479100000004" table:style-name="ce172">
            <text:p>1,378</text:p>
          </table:table-cell>
          <table:table-cell office:value-type="float" office:value="776.92091000000005" table:style-name="ce371">
            <text:p>777</text:p>
          </table:table-cell>
          <table:table-cell office:value-type="float" office:value="617" table:style-name="ce349">
            <text:p>617</text:p>
          </table:table-cell>
          <table:table-cell office:value-type="float" office:value="691" table:style-name="ce369">
            <text:p>69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10</text:p>
          </table:table-cell>
          <table:table-cell office:value-type="string" table:style-name="ce240">
            <text:p>Thermal Process Waste (inorganic)</text:p>
          </table:table-cell>
          <table:table-cell office:value-type="float" office:value="15616.831380000001" table:style-name="ce216">
            <text:p><text:s/>15,617<text:s/></text:p>
          </table:table-cell>
          <table:table-cell office:value-type="float" office:value="6404.4588458165526" table:style-name="ce216">
            <text:p><text:s/>6,404<text:s/></text:p>
          </table:table-cell>
          <table:table-cell office:value-type="float" office:value="8003.3969134005019" table:style-name="ce216">
            <text:p><text:s/>8,003<text:s/></text:p>
          </table:table-cell>
          <table:table-cell office:value-type="float" office:value="6698.8972093521152" table:style-name="ce216">
            <text:p><text:s/>6,699<text:s/></text:p>
          </table:table-cell>
          <table:table-cell office:value-type="float" office:value="8756.6859199999963" table:style-name="ce216">
            <text:p><text:s/>8,757<text:s/></text:p>
          </table:table-cell>
          <table:table-cell office:value-type="float" office:value="7833.171134557575" table:style-name="ce216">
            <text:p><text:s/>7,833<text:s/></text:p>
          </table:table-cell>
          <table:table-cell office:value-type="float" office:value="12633.29111" table:style-name="ce162">
            <text:p><text:s/>12,633<text:s/></text:p>
          </table:table-cell>
          <table:table-cell office:value-type="float" office:value="10031.014920000001" table:style-name="ce216">
            <text:p><text:s/>10,031<text:s/></text:p>
          </table:table-cell>
          <table:table-cell office:value-type="float" office:value="4676.2089999999998" table:style-name="ce34">
            <text:p><text:s/>4,676<text:s/></text:p>
          </table:table-cell>
          <table:table-cell office:value-type="float" office:value="5230.3277499999995" table:style-name="ce218">
            <text:p><text:s/>5,230<text:s/></text:p>
          </table:table-cell>
          <table:table-cell office:value-type="float" office:value="10225.452930000001" table:style-name="ce218">
            <text:p><text:s/>10,225<text:s/></text:p>
          </table:table-cell>
          <table:table-cell office:value-type="float" office:value="21766.130409999994" table:style-name="ce218">
            <text:p><text:s/>21,766<text:s/></text:p>
          </table:table-cell>
          <table:table-cell office:value-type="float" office:value="12618.86577" table:style-name="ce223">
            <text:p><text:s/>12,619<text:s/></text:p>
          </table:table-cell>
          <table:table-cell office:value-type="float" office:value="54064.404999999999" table:style-name="ce223">
            <text:p><text:s/>54,064<text:s/></text:p>
          </table:table-cell>
          <table:table-cell office:value-type="float" office:value="36868.199060000006" table:style-name="ce34">
            <text:p><text:s/>36,868<text:s/></text:p>
          </table:table-cell>
          <table:table-cell office:value-type="float" office:value="22649.060439999997" table:style-name="ce34">
            <text:p><text:s/>22,649<text:s/></text:p>
          </table:table-cell>
          <table:table-cell office:value-type="float" office:value="21247.164760000003" table:style-name="ce34">
            <text:p><text:s/>21,247<text:s/></text:p>
          </table:table-cell>
          <table:table-cell office:value-type="float" office:value="33082.070000000007" table:style-name="ce34">
            <text:p><text:s/>33,082<text:s/></text:p>
          </table:table-cell>
          <table:table-cell office:value-type="float" office:value="39911.700490000003" table:style-name="ce172">
            <text:p>39,912</text:p>
          </table:table-cell>
          <table:table-cell office:value-type="float" office:value="64277.194320000002" table:style-name="ce172">
            <text:p>64,277</text:p>
          </table:table-cell>
          <table:table-cell office:value-type="float" office:value="80180.583589999966" table:style-name="ce275">
            <text:p>80,181</text:p>
          </table:table-cell>
          <table:table-cell office:value-type="float" office:value="39123.872610000006" table:style-name="ce172">
            <text:p>39,124</text:p>
          </table:table-cell>
          <table:table-cell office:value-type="float" office:value="64439.100540000021" table:style-name="ce371">
            <text:p>64,439</text:p>
          </table:table-cell>
          <table:table-cell office:value-type="float" office:value="69740" table:style-name="ce349">
            <text:p>69,740</text:p>
          </table:table-cell>
          <table:table-cell office:value-type="float" office:value="78094" table:style-name="ce370">
            <text:p>78,09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11</text:p>
          </table:table-cell>
          <table:table-cell office:value-type="string" table:style-name="ce240">
            <text:p>Metal Treatment and Coating Processes</text:p>
          </table:table-cell>
          <table:table-cell office:value-type="float" office:value="13355.881879999999" table:style-name="ce216">
            <text:p><text:s/>13,356<text:s/></text:p>
          </table:table-cell>
          <table:table-cell office:value-type="float" office:value="14007.513813920319" table:style-name="ce216">
            <text:p><text:s/>14,008<text:s/></text:p>
          </table:table-cell>
          <table:table-cell office:value-type="float" office:value="11322.412096142769" table:style-name="ce216">
            <text:p><text:s/>11,322<text:s/></text:p>
          </table:table-cell>
          <table:table-cell office:value-type="float" office:value="6913.4685812685639" table:style-name="ce216">
            <text:p><text:s/>6,913<text:s/></text:p>
          </table:table-cell>
          <table:table-cell office:value-type="float" office:value="12433.67148000001" table:style-name="ce216">
            <text:p><text:s/>12,434<text:s/></text:p>
          </table:table-cell>
          <table:table-cell office:value-type="float" office:value="16013.738997250795" table:style-name="ce216">
            <text:p><text:s/>16,014<text:s/></text:p>
          </table:table-cell>
          <table:table-cell office:value-type="float" office:value="20382.756429999998" table:style-name="ce162">
            <text:p><text:s/>20,383<text:s/></text:p>
          </table:table-cell>
          <table:table-cell office:value-type="float" office:value="16322.015049999995" table:style-name="ce216">
            <text:p><text:s/>16,322<text:s/></text:p>
          </table:table-cell>
          <table:table-cell office:value-type="float" office:value="19069.691469999998" table:style-name="ce34">
            <text:p><text:s/>19,070<text:s/></text:p>
          </table:table-cell>
          <table:table-cell office:value-type="float" office:value="18227.794750000001" table:style-name="ce218">
            <text:p><text:s/>18,228<text:s/></text:p>
          </table:table-cell>
          <table:table-cell office:value-type="float" office:value="26694.031210000001" table:style-name="ce218">
            <text:p><text:s/>26,694<text:s/></text:p>
          </table:table-cell>
          <table:table-cell office:value-type="float" office:value="27746.501600000011" table:style-name="ce218">
            <text:p><text:s/>27,747<text:s/></text:p>
          </table:table-cell>
          <table:table-cell office:value-type="float" office:value="21629.264699999992" table:style-name="ce223">
            <text:p><text:s/>21,629<text:s/></text:p>
          </table:table-cell>
          <table:table-cell office:value-type="float" office:value="20949.876700000001" table:style-name="ce223">
            <text:p><text:s/>20,950<text:s/></text:p>
          </table:table-cell>
          <table:table-cell office:value-type="float" office:value="23139.367139999998" table:style-name="ce34">
            <text:p><text:s/>23,139<text:s/></text:p>
          </table:table-cell>
          <table:table-cell office:value-type="float" office:value="21340.573610000007" table:style-name="ce34">
            <text:p><text:s/>21,341<text:s/></text:p>
          </table:table-cell>
          <table:table-cell office:value-type="float" office:value="18728.926250000004" table:style-name="ce34">
            <text:p><text:s/>18,729<text:s/></text:p>
          </table:table-cell>
          <table:table-cell office:value-type="float" office:value="17384.445889999985" table:style-name="ce34">
            <text:p><text:s/>17,384<text:s/></text:p>
          </table:table-cell>
          <table:table-cell office:value-type="float" office:value="18368.131630000003" table:style-name="ce172">
            <text:p>18,368</text:p>
          </table:table-cell>
          <table:table-cell office:value-type="float" office:value="19407.559420000001" table:style-name="ce172">
            <text:p>19,408</text:p>
          </table:table-cell>
          <table:table-cell office:value-type="float" office:value="14549.862159999999" table:style-name="ce275">
            <text:p>14,550</text:p>
          </table:table-cell>
          <table:table-cell office:value-type="float" office:value="15336.388770000001" table:style-name="ce172">
            <text:p>15,336</text:p>
          </table:table-cell>
          <table:table-cell office:value-type="float" office:value="13481.889389999993" table:style-name="ce371">
            <text:p>13,482</text:p>
          </table:table-cell>
          <table:table-cell office:value-type="float" office:value="11620" table:style-name="ce349">
            <text:p>11,620</text:p>
          </table:table-cell>
          <table:table-cell office:value-type="float" office:value="12756" table:style-name="ce370">
            <text:p>12,75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12</text:p>
          </table:table-cell>
          <table:table-cell office:value-type="string" table:style-name="ce240">
            <text:p>Shaping/Treatment of Metals and Plastics</text:p>
          </table:table-cell>
          <table:table-cell office:value-type="float" office:value="35177.102329999994" table:style-name="ce216">
            <text:p><text:s/>35,177<text:s/></text:p>
          </table:table-cell>
          <table:table-cell office:value-type="float" office:value="13200.008235104382" table:style-name="ce216">
            <text:p><text:s/>13,200<text:s/></text:p>
          </table:table-cell>
          <table:table-cell office:value-type="float" office:value="7191.7249616738409" table:style-name="ce216">
            <text:p><text:s/>7,192<text:s/></text:p>
          </table:table-cell>
          <table:table-cell office:value-type="float" office:value="8511.7329025864601" table:style-name="ce216">
            <text:p><text:s/>8,512<text:s/></text:p>
          </table:table-cell>
          <table:table-cell office:value-type="float" office:value="6148.8019999999979" table:style-name="ce216">
            <text:p><text:s/>6,149<text:s/></text:p>
          </table:table-cell>
          <table:table-cell office:value-type="float" office:value="5434.3716421499848" table:style-name="ce216">
            <text:p><text:s/>5,434<text:s/></text:p>
          </table:table-cell>
          <table:table-cell office:value-type="float" office:value="4207.5016200000009" table:style-name="ce162">
            <text:p><text:s/>4,208<text:s/></text:p>
          </table:table-cell>
          <table:table-cell office:value-type="float" office:value="5005.437880000005" table:style-name="ce216">
            <text:p><text:s/>5,005<text:s/></text:p>
          </table:table-cell>
          <table:table-cell office:value-type="float" office:value="3956.0079999999989" table:style-name="ce34">
            <text:p><text:s/>3,956<text:s/></text:p>
          </table:table-cell>
          <table:table-cell office:value-type="float" office:value="4023.00893" table:style-name="ce218">
            <text:p><text:s/>4,023<text:s/></text:p>
          </table:table-cell>
          <table:table-cell office:value-type="float" office:value="4512.7991399999992" table:style-name="ce218">
            <text:p><text:s/>4,513<text:s/></text:p>
          </table:table-cell>
          <table:table-cell office:value-type="float" office:value="5643.9100499999986" table:style-name="ce218">
            <text:p><text:s/>5,644<text:s/></text:p>
          </table:table-cell>
          <table:table-cell office:value-type="float" office:value="5223.5211400000007" table:style-name="ce223">
            <text:p><text:s/>5,224<text:s/></text:p>
          </table:table-cell>
          <table:table-cell office:value-type="float" office:value="4767.5177199999989" table:style-name="ce223">
            <text:p><text:s/>4,768<text:s/></text:p>
          </table:table-cell>
          <table:table-cell office:value-type="float" office:value="5060.4407000000001" table:style-name="ce34">
            <text:p><text:s/>5,060<text:s/></text:p>
          </table:table-cell>
          <table:table-cell office:value-type="float" office:value="5059.2337100000004" table:style-name="ce34">
            <text:p><text:s/>5,059<text:s/></text:p>
          </table:table-cell>
          <table:table-cell office:value-type="float" office:value="5090.413340000001" table:style-name="ce34">
            <text:p><text:s/>5,090<text:s/></text:p>
          </table:table-cell>
          <table:table-cell office:value-type="float" office:value="4219.0027300000011" table:style-name="ce34">
            <text:p><text:s/>4,219<text:s/></text:p>
          </table:table-cell>
          <table:table-cell office:value-type="float" office:value="4298.0796499999969" table:style-name="ce172">
            <text:p>4,298</text:p>
          </table:table-cell>
          <table:table-cell office:value-type="float" office:value="6477.4633900000008" table:style-name="ce172">
            <text:p>6,477</text:p>
          </table:table-cell>
          <table:table-cell office:value-type="float" office:value="5757.8095600000006" table:style-name="ce275">
            <text:p>5,758</text:p>
          </table:table-cell>
          <table:table-cell office:value-type="float" office:value="5935.9484700000021" table:style-name="ce172">
            <text:p>5,936</text:p>
          </table:table-cell>
          <table:table-cell office:value-type="float" office:value="5652.0230400000019" table:style-name="ce371">
            <text:p>5,652</text:p>
          </table:table-cell>
          <table:table-cell office:value-type="float" office:value="6347" table:style-name="ce349">
            <text:p>6,347</text:p>
          </table:table-cell>
          <table:table-cell office:value-type="float" office:value="6175" table:style-name="ce370">
            <text:p>6,17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13</text:p>
          </table:table-cell>
          <table:table-cell office:value-type="string" table:style-name="ce240">
            <text:p>Oil and Oil/Water Mixtures</text:p>
          </table:table-cell>
          <table:table-cell office:value-type="float" office:value="107264.28128000008" table:style-name="ce216">
            <text:p><text:s/>107,264<text:s/></text:p>
          </table:table-cell>
          <table:table-cell office:value-type="float" office:value="119960.48602849955" table:style-name="ce216">
            <text:p><text:s/>119,960<text:s/></text:p>
          </table:table-cell>
          <table:table-cell office:value-type="float" office:value="148142.24035208073" table:style-name="ce216">
            <text:p><text:s/>148,142<text:s/></text:p>
          </table:table-cell>
          <table:table-cell office:value-type="float" office:value="101777.02057911572" table:style-name="ce216">
            <text:p><text:s/>101,777<text:s/></text:p>
          </table:table-cell>
          <table:table-cell office:value-type="float" office:value="101313.48890000011" table:style-name="ce216">
            <text:p><text:s/>101,313<text:s/></text:p>
          </table:table-cell>
          <table:table-cell office:value-type="float" office:value="104338.60666229161" table:style-name="ce216">
            <text:p><text:s/>104,339<text:s/></text:p>
          </table:table-cell>
          <table:table-cell office:value-type="float" office:value="83583.05639999987" table:style-name="ce162">
            <text:p><text:s/>83,583<text:s/></text:p>
          </table:table-cell>
          <table:table-cell office:value-type="float" office:value="83476.98809999993" table:style-name="ce216">
            <text:p><text:s/>83,477<text:s/></text:p>
          </table:table-cell>
          <table:table-cell office:value-type="float" office:value="78847.266549999971" table:style-name="ce34">
            <text:p><text:s/>78,847<text:s/></text:p>
          </table:table-cell>
          <table:table-cell office:value-type="float" office:value="79110.394569999989" table:style-name="ce218">
            <text:p><text:s/>79,110<text:s/></text:p>
          </table:table-cell>
          <table:table-cell office:value-type="float" office:value="76599.634290000016" table:style-name="ce218">
            <text:p><text:s/>76,600<text:s/></text:p>
          </table:table-cell>
          <table:table-cell office:value-type="float" office:value="95869.359300000069" table:style-name="ce218">
            <text:p><text:s/>95,869<text:s/></text:p>
          </table:table-cell>
          <table:table-cell office:value-type="float" office:value="107154.90528000011" table:style-name="ce223">
            <text:p><text:s/>107,155<text:s/></text:p>
          </table:table-cell>
          <table:table-cell office:value-type="float" office:value="107148.97840000009" table:style-name="ce223">
            <text:p><text:s/>107,149<text:s/></text:p>
          </table:table-cell>
          <table:table-cell office:value-type="float" office:value="108678.05035" table:style-name="ce34">
            <text:p><text:s/>108,678<text:s/></text:p>
          </table:table-cell>
          <table:table-cell office:value-type="float" office:value="100609.9817" table:style-name="ce34">
            <text:p><text:s/>100,610<text:s/></text:p>
          </table:table-cell>
          <table:table-cell office:value-type="float" office:value="116291.95618999994" table:style-name="ce34">
            <text:p><text:s/>116,292<text:s/></text:p>
          </table:table-cell>
          <table:table-cell office:value-type="float" office:value="118722.93820000011" table:style-name="ce34">
            <text:p><text:s/>118,723<text:s/></text:p>
          </table:table-cell>
          <table:table-cell office:value-type="float" office:value="124907.6268800001" table:style-name="ce172">
            <text:p>124,908</text:p>
          </table:table-cell>
          <table:table-cell office:value-type="float" office:value="129920.03071999997" table:style-name="ce172">
            <text:p>129,920</text:p>
          </table:table-cell>
          <table:table-cell office:value-type="float" office:value="122036.69476000023" table:style-name="ce275">
            <text:p>122,037</text:p>
          </table:table-cell>
          <table:table-cell office:value-type="float" office:value="125451.23168000019" table:style-name="ce172">
            <text:p>125,451</text:p>
          </table:table-cell>
          <table:table-cell office:value-type="float" office:value="120104.28761000016" table:style-name="ce371">
            <text:p>120,104</text:p>
          </table:table-cell>
          <table:table-cell office:value-type="float" office:value="125867" table:style-name="ce349">
            <text:p>125,867</text:p>
          </table:table-cell>
          <table:table-cell office:value-type="float" office:value="122655" table:style-name="ce370">
            <text:p>122,65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14</text:p>
          </table:table-cell>
          <table:table-cell office:value-type="string" table:style-name="ce240">
            <text:p>Solvents</text:p>
          </table:table-cell>
          <table:table-cell office:value-type="float" office:value="9338.1241200000131" table:style-name="ce216">
            <text:p><text:s/>9,338<text:s/></text:p>
          </table:table-cell>
          <table:table-cell office:value-type="float" office:value="14315.778095910326" table:style-name="ce216">
            <text:p><text:s/>14,316<text:s/></text:p>
          </table:table-cell>
          <table:table-cell office:value-type="float" office:value="18884.738927049562" table:style-name="ce216">
            <text:p><text:s/>18,885<text:s/></text:p>
          </table:table-cell>
          <table:table-cell office:value-type="float" office:value="13835.727714218199" table:style-name="ce216">
            <text:p><text:s/>13,836<text:s/></text:p>
          </table:table-cell>
          <table:table-cell office:value-type="float" office:value="7810.9877500000002" table:style-name="ce216">
            <text:p><text:s/>7,811<text:s/></text:p>
          </table:table-cell>
          <table:table-cell office:value-type="float" office:value="6017.4340837665368" table:style-name="ce216">
            <text:p><text:s/>6,017<text:s/></text:p>
          </table:table-cell>
          <table:table-cell office:value-type="float" office:value="11055.219620000003" table:style-name="ce162">
            <text:p><text:s/>11,055<text:s/></text:p>
          </table:table-cell>
          <table:table-cell office:value-type="float" office:value="10835.400409999993" table:style-name="ce216">
            <text:p><text:s/>10,835<text:s/></text:p>
          </table:table-cell>
          <table:table-cell office:value-type="float" office:value="10168.364179999999" table:style-name="ce34">
            <text:p><text:s/>10,168<text:s/></text:p>
          </table:table-cell>
          <table:table-cell office:value-type="float" office:value="6929.9106899999988" table:style-name="ce218">
            <text:p><text:s/>6,930<text:s/></text:p>
          </table:table-cell>
          <table:table-cell office:value-type="float" office:value="7452.0288500000006" table:style-name="ce218">
            <text:p><text:s/>7,452<text:s/></text:p>
          </table:table-cell>
          <table:table-cell office:value-type="float" office:value="12617.860709999997" table:style-name="ce218">
            <text:p><text:s/>12,618<text:s/></text:p>
          </table:table-cell>
          <table:table-cell office:value-type="float" office:value="13414.702840000011" table:style-name="ce223">
            <text:p><text:s/>13,415<text:s/></text:p>
          </table:table-cell>
          <table:table-cell office:value-type="float" office:value="14152.76758999999" table:style-name="ce223">
            <text:p><text:s/>14,153<text:s/></text:p>
          </table:table-cell>
          <table:table-cell office:value-type="float" office:value="14507.80384" table:style-name="ce34">
            <text:p><text:s/>14,508<text:s/></text:p>
          </table:table-cell>
          <table:table-cell office:value-type="float" office:value="12201.207440000002" table:style-name="ce34">
            <text:p><text:s/>12,201<text:s/></text:p>
          </table:table-cell>
          <table:table-cell office:value-type="float" office:value="10517.170640000002" table:style-name="ce34">
            <text:p><text:s/>10,517<text:s/></text:p>
          </table:table-cell>
          <table:table-cell office:value-type="float" office:value="14230.57519" table:style-name="ce34">
            <text:p><text:s/>14,231<text:s/></text:p>
          </table:table-cell>
          <table:table-cell office:value-type="float" office:value="13235.308909999989" table:style-name="ce172">
            <text:p>13,235</text:p>
          </table:table-cell>
          <table:table-cell office:value-type="float" office:value="14891.481160000001" table:style-name="ce172">
            <text:p>14,891</text:p>
          </table:table-cell>
          <table:table-cell office:value-type="float" office:value="12444.642770000004" table:style-name="ce275">
            <text:p>12,445</text:p>
          </table:table-cell>
          <table:table-cell office:value-type="float" office:value="11633.874929999998" table:style-name="ce172">
            <text:p>11,634</text:p>
          </table:table-cell>
          <table:table-cell office:value-type="float" office:value="8988.8618600000027" table:style-name="ce371">
            <text:p>8,989</text:p>
          </table:table-cell>
          <table:table-cell office:value-type="float" office:value="10335" table:style-name="ce349">
            <text:p>10,335</text:p>
          </table:table-cell>
          <table:table-cell office:value-type="float" office:value="12173" table:style-name="ce370">
            <text:p>12,17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15</text:p>
          </table:table-cell>
          <table:table-cell office:value-type="string" table:style-name="ce240">
            <text:p>Packaging, Cloths, Filter Materials</text:p>
          </table:table-cell>
          <table:table-cell office:value-type="float" office:value="17220.631250000024" table:style-name="ce216">
            <text:p><text:s/>17,221<text:s/></text:p>
          </table:table-cell>
          <table:table-cell office:value-type="float" office:value="23424.915908742929" table:style-name="ce216">
            <text:p><text:s/>23,425<text:s/></text:p>
          </table:table-cell>
          <table:table-cell office:value-type="float" office:value="27651.460720970528" table:style-name="ce216">
            <text:p><text:s/>27,651<text:s/></text:p>
          </table:table-cell>
          <table:table-cell office:value-type="float" office:value="19441.69582704936" table:style-name="ce216">
            <text:p><text:s/>19,442<text:s/></text:p>
          </table:table-cell>
          <table:table-cell office:value-type="float" office:value="17526.024639999974" table:style-name="ce216">
            <text:p><text:s/>17,526<text:s/></text:p>
          </table:table-cell>
          <table:table-cell office:value-type="float" office:value="17353.277512901695" table:style-name="ce216">
            <text:p><text:s/>17,353<text:s/></text:p>
          </table:table-cell>
          <table:table-cell office:value-type="float" office:value="14111.817169999998" table:style-name="ce162">
            <text:p><text:s/>14,112<text:s/></text:p>
          </table:table-cell>
          <table:table-cell office:value-type="float" office:value="13293.816309999987" table:style-name="ce216">
            <text:p><text:s/>13,294<text:s/></text:p>
          </table:table-cell>
          <table:table-cell office:value-type="float" office:value="14036.130450000002" table:style-name="ce34">
            <text:p><text:s/>14,036<text:s/></text:p>
          </table:table-cell>
          <table:table-cell office:value-type="float" office:value="14975.953139999994" table:style-name="ce218">
            <text:p><text:s/>14,976<text:s/></text:p>
          </table:table-cell>
          <table:table-cell office:value-type="float" office:value="17317.161289999996" table:style-name="ce218">
            <text:p><text:s/>17,317<text:s/></text:p>
          </table:table-cell>
          <table:table-cell office:value-type="float" office:value="19755.983489999981" table:style-name="ce218">
            <text:p><text:s/>19,756<text:s/></text:p>
          </table:table-cell>
          <table:table-cell office:value-type="float" office:value="22037.351639999972" table:style-name="ce223">
            <text:p><text:s/>22,037<text:s/></text:p>
          </table:table-cell>
          <table:table-cell office:value-type="float" office:value="22223.547120000003" table:style-name="ce223">
            <text:p><text:s/>22,224<text:s/></text:p>
          </table:table-cell>
          <table:table-cell office:value-type="float" office:value="25928.659460000003" table:style-name="ce34">
            <text:p><text:s/>25,929<text:s/></text:p>
          </table:table-cell>
          <table:table-cell office:value-type="float" office:value="34684.932929999995" table:style-name="ce34">
            <text:p><text:s/>34,685<text:s/></text:p>
          </table:table-cell>
          <table:table-cell office:value-type="float" office:value="32637.90817999998" table:style-name="ce34">
            <text:p><text:s/>32,638<text:s/></text:p>
          </table:table-cell>
          <table:table-cell office:value-type="float" office:value="28616.235919999988" table:style-name="ce34">
            <text:p><text:s/>28,616<text:s/></text:p>
          </table:table-cell>
          <table:table-cell office:value-type="float" office:value="28925.556229999995" table:style-name="ce172">
            <text:p>28,926</text:p>
          </table:table-cell>
          <table:table-cell office:value-type="float" office:value="29452.701270000001" table:style-name="ce172">
            <text:p>29,453</text:p>
          </table:table-cell>
          <table:table-cell office:value-type="float" office:value="33389.400809999956" table:style-name="ce275">
            <text:p>33,389</text:p>
          </table:table-cell>
          <table:table-cell office:value-type="float" office:value="24105.022319999982" table:style-name="ce172">
            <text:p>24,105</text:p>
          </table:table-cell>
          <table:table-cell office:value-type="float" office:value="23089.739300000005" table:style-name="ce371">
            <text:p>23,090</text:p>
          </table:table-cell>
          <table:table-cell office:value-type="float" office:value="22911" table:style-name="ce349">
            <text:p>22,911</text:p>
          </table:table-cell>
          <table:table-cell office:value-type="float" office:value="21641" table:style-name="ce370">
            <text:p>21,641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16</text:p>
          </table:table-cell>
          <table:table-cell office:value-type="string" table:style-name="ce222">
            <text:p>Not Otherwise Specified*</text:p>
          </table:table-cell>
          <table:table-cell office:value-type="float" office:value="43053.915750000073" table:style-name="ce216">
            <text:p><text:s/>43,054<text:s/></text:p>
          </table:table-cell>
          <table:table-cell office:value-type="float" office:value="43338.125570105607" table:style-name="ce216">
            <text:p><text:s/>43,338<text:s/></text:p>
          </table:table-cell>
          <table:table-cell office:value-type="float" office:value="27729.487342941455" table:style-name="ce216">
            <text:p><text:s/>27,729<text:s/></text:p>
          </table:table-cell>
          <table:table-cell office:value-type="float" office:value="22295.019545560044" table:style-name="ce216">
            <text:p><text:s/>22,295<text:s/></text:p>
          </table:table-cell>
          <table:table-cell office:value-type="float" office:value="14401.435369999988" table:style-name="ce216">
            <text:p><text:s/>14,401<text:s/></text:p>
          </table:table-cell>
          <table:table-cell office:value-type="float" office:value="21187.334492795031" table:style-name="ce216">
            <text:p><text:s/>21,187<text:s/></text:p>
          </table:table-cell>
          <table:table-cell office:value-type="float" office:value="57128.952409999962" table:style-name="ce162">
            <text:p><text:s/>57,129<text:s/></text:p>
          </table:table-cell>
          <table:table-cell office:value-type="float" office:value="93990.511110000225" table:style-name="ce216">
            <text:p><text:s/>93,991<text:s/></text:p>
          </table:table-cell>
          <table:table-cell office:value-type="float" office:value="95342.607220000034" table:style-name="ce34">
            <text:p><text:s/>95,343<text:s/></text:p>
          </table:table-cell>
          <table:table-cell office:value-type="float" office:value="87827.243930000011" table:style-name="ce218">
            <text:p><text:s/>87,827<text:s/></text:p>
          </table:table-cell>
          <table:table-cell office:value-type="float" office:value="97765.027020000009" table:style-name="ce218">
            <text:p><text:s/>97,765<text:s/></text:p>
          </table:table-cell>
          <table:table-cell office:value-type="float" office:value="113711.72451999999" table:style-name="ce218">
            <text:p><text:s/>113,712<text:s/></text:p>
          </table:table-cell>
          <table:table-cell office:value-type="float" office:value="115865.6153800001" table:style-name="ce223">
            <text:p><text:s/>115,866<text:s/></text:p>
          </table:table-cell>
          <table:table-cell office:value-type="float" office:value="111072.43248000002" table:style-name="ce223">
            <text:p><text:s/>111,072<text:s/></text:p>
          </table:table-cell>
          <table:table-cell office:value-type="float" office:value="93322.591210000013" table:style-name="ce34">
            <text:p><text:s/>93,323<text:s/></text:p>
          </table:table-cell>
          <table:table-cell office:value-type="float" office:value="87468.713210000016" table:style-name="ce34">
            <text:p><text:s/>87,469<text:s/></text:p>
          </table:table-cell>
          <table:table-cell office:value-type="float" office:value="86327.911730000051" table:style-name="ce34">
            <text:p><text:s/>86,328<text:s/></text:p>
          </table:table-cell>
          <table:table-cell office:value-type="float" office:value="82355.705969999995" table:style-name="ce34">
            <text:p><text:s/>82,356<text:s/></text:p>
          </table:table-cell>
          <table:table-cell office:value-type="float" office:value="73679.585679999989" table:style-name="ce172">
            <text:p>73,680</text:p>
          </table:table-cell>
          <table:table-cell office:value-type="float" office:value="102174.20678999997" table:style-name="ce172">
            <text:p>102,174</text:p>
          </table:table-cell>
          <table:table-cell office:value-type="float" office:value="75486.409900000202" table:style-name="ce275">
            <text:p>75,486</text:p>
          </table:table-cell>
          <table:table-cell office:value-type="float" office:value="87223.127930000264" table:style-name="ce172">
            <text:p>87,223</text:p>
          </table:table-cell>
          <table:table-cell office:value-type="float" office:value="89992.188730000198" table:style-name="ce371">
            <text:p>89,992</text:p>
          </table:table-cell>
          <table:table-cell office:value-type="float" office:value="95594" table:style-name="ce349">
            <text:p>95,594</text:p>
          </table:table-cell>
          <table:table-cell office:value-type="float" office:value="95504" table:style-name="ce370">
            <text:p>95,504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17</text:p>
          </table:table-cell>
          <table:table-cell office:value-type="string" table:style-name="ce240">
            <text:p>C&amp;D Waste and Asbestos</text:p>
          </table:table-cell>
          <table:table-cell office:value-type="float" office:value="105670.29377999996" table:style-name="ce216">
            <text:p><text:s/>105,670<text:s/></text:p>
          </table:table-cell>
          <table:table-cell office:value-type="float" office:value="132247.70935062604" table:style-name="ce216">
            <text:p><text:s/>132,248<text:s/></text:p>
          </table:table-cell>
          <table:table-cell office:value-type="float" office:value="88622.376800182741" table:style-name="ce216">
            <text:p><text:s/>88,622<text:s/></text:p>
          </table:table-cell>
          <table:table-cell office:value-type="float" office:value="129136.65630909757" table:style-name="ce216">
            <text:p><text:s/>129,137<text:s/></text:p>
          </table:table-cell>
          <table:table-cell office:value-type="float" office:value="141840.80257000009" table:style-name="ce216">
            <text:p><text:s/>141,841<text:s/></text:p>
          </table:table-cell>
          <table:table-cell office:value-type="float" office:value="305170.33822431858" table:style-name="ce216">
            <text:p><text:s/>305,170<text:s/></text:p>
          </table:table-cell>
          <table:table-cell office:value-type="float" office:value="95602.223640000026" table:style-name="ce162">
            <text:p><text:s/>95,602<text:s/></text:p>
          </table:table-cell>
          <table:table-cell office:value-type="float" office:value="112908.68187999995" table:style-name="ce216">
            <text:p><text:s/>112,909<text:s/></text:p>
          </table:table-cell>
          <table:table-cell office:value-type="float" office:value="88129.837659999961" table:style-name="ce34">
            <text:p><text:s/>88,130<text:s/></text:p>
          </table:table-cell>
          <table:table-cell office:value-type="float" office:value="53784.750240000001" table:style-name="ce218">
            <text:p><text:s/>53,785<text:s/></text:p>
          </table:table-cell>
          <table:table-cell office:value-type="float" office:value="61233.535039999988" table:style-name="ce218">
            <text:p><text:s/>61,234<text:s/></text:p>
          </table:table-cell>
          <table:table-cell office:value-type="float" office:value="86286.300329999969" table:style-name="ce218">
            <text:p><text:s/>86,286<text:s/></text:p>
          </table:table-cell>
          <table:table-cell office:value-type="float" office:value="74647.54277" table:style-name="ce223">
            <text:p><text:s/>74,648<text:s/></text:p>
          </table:table-cell>
          <table:table-cell office:value-type="float" office:value="62261.486939999995" table:style-name="ce223">
            <text:p><text:s/>62,261<text:s/></text:p>
          </table:table-cell>
          <table:table-cell office:value-type="float" office:value="42084.883520000003" table:style-name="ce34">
            <text:p><text:s/>42,085<text:s/></text:p>
          </table:table-cell>
          <table:table-cell office:value-type="float" office:value="22099.318059999991" table:style-name="ce34">
            <text:p><text:s/>22,099<text:s/></text:p>
          </table:table-cell>
          <table:table-cell office:value-type="float" office:value="26696.024590000005" table:style-name="ce34">
            <text:p><text:s/>26,696<text:s/></text:p>
          </table:table-cell>
          <table:table-cell office:value-type="float" office:value="29488.196689999993" table:style-name="ce34">
            <text:p><text:s/>29,488<text:s/></text:p>
          </table:table-cell>
          <table:table-cell office:value-type="float" office:value="24029.417420000012" table:style-name="ce172">
            <text:p>24,029</text:p>
          </table:table-cell>
          <table:table-cell office:value-type="float" office:value="50989.696740000007" table:style-name="ce172">
            <text:p>50,990</text:p>
          </table:table-cell>
          <table:table-cell office:value-type="float" office:value="24316.738430000016" table:style-name="ce275">
            <text:p>24,317</text:p>
          </table:table-cell>
          <table:table-cell office:value-type="float" office:value="68202.861409999998" table:style-name="ce172">
            <text:p>68,203</text:p>
          </table:table-cell>
          <table:table-cell office:value-type="float" office:value="62549.75099" table:style-name="ce371">
            <text:p>62,550</text:p>
          </table:table-cell>
          <table:table-cell office:value-type="float" office:value="95224" table:style-name="ce349">
            <text:p>95,224</text:p>
          </table:table-cell>
          <table:table-cell office:value-type="float" office:value="105175" table:style-name="ce370">
            <text:p>105,175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18</text:p>
          </table:table-cell>
          <table:table-cell office:value-type="string" table:style-name="ce240">
            <text:p>Healthcare</text:p>
          </table:table-cell>
          <table:table-cell office:value-type="float" office:value="2772.0181900000007" table:style-name="ce216">
            <text:p><text:s/>2,772<text:s/></text:p>
          </table:table-cell>
          <table:table-cell office:value-type="float" office:value="4072.0599746910739" table:style-name="ce216">
            <text:p><text:s/>4,072<text:s/></text:p>
          </table:table-cell>
          <table:table-cell office:value-type="float" office:value="5195.6542400093749" table:style-name="ce216">
            <text:p><text:s/>5,196<text:s/></text:p>
          </table:table-cell>
          <table:table-cell office:value-type="float" office:value="5100.0544862558527" table:style-name="ce216">
            <text:p><text:s/>5,100<text:s/></text:p>
          </table:table-cell>
          <table:table-cell office:value-type="float" office:value="2378.2699900000061" table:style-name="ce216">
            <text:p><text:s/>2,378<text:s/></text:p>
          </table:table-cell>
          <table:table-cell office:value-type="float" office:value="3092.5419423927669" table:style-name="ce216">
            <text:p><text:s/>3,093<text:s/></text:p>
          </table:table-cell>
          <table:table-cell office:value-type="float" office:value="13018.91636000001" table:style-name="ce162">
            <text:p><text:s/>13,019<text:s/></text:p>
          </table:table-cell>
          <table:table-cell office:value-type="float" office:value="15680.502390000012" table:style-name="ce216">
            <text:p><text:s/>15,681<text:s/></text:p>
          </table:table-cell>
          <table:table-cell office:value-type="float" office:value="18656.407390000026" table:style-name="ce34">
            <text:p><text:s/>18,656<text:s/></text:p>
          </table:table-cell>
          <table:table-cell office:value-type="float" office:value="19355.30059000001" table:style-name="ce218">
            <text:p><text:s/>19,355<text:s/></text:p>
          </table:table-cell>
          <table:table-cell office:value-type="float" office:value="18824.474430000013" table:style-name="ce218">
            <text:p><text:s/>18,824<text:s/></text:p>
          </table:table-cell>
          <table:table-cell office:value-type="float" office:value="19262.707610000001" table:style-name="ce218">
            <text:p><text:s/>19,263<text:s/></text:p>
          </table:table-cell>
          <table:table-cell office:value-type="float" office:value="18831.172079999997" table:style-name="ce223">
            <text:p><text:s/>18,831<text:s/></text:p>
          </table:table-cell>
          <table:table-cell office:value-type="float" office:value="22033.613129999998" table:style-name="ce223">
            <text:p><text:s/>22,034<text:s/></text:p>
          </table:table-cell>
          <table:table-cell office:value-type="float" office:value="22805.171750000001" table:style-name="ce34">
            <text:p><text:s/>22,805<text:s/></text:p>
          </table:table-cell>
          <table:table-cell office:value-type="float" office:value="21577.192129999996" table:style-name="ce34">
            <text:p><text:s/>21,577<text:s/></text:p>
          </table:table-cell>
          <table:table-cell office:value-type="float" office:value="19866.126200000024" table:style-name="ce34">
            <text:p><text:s/>19,866<text:s/></text:p>
          </table:table-cell>
          <table:table-cell office:value-type="float" office:value="20874.595869999994" table:style-name="ce34">
            <text:p><text:s/>20,875<text:s/></text:p>
          </table:table-cell>
          <table:table-cell office:value-type="float" office:value="22698.612920000007" table:style-name="ce172">
            <text:p>22,699</text:p>
          </table:table-cell>
          <table:table-cell office:value-type="float" office:value="24244.922069999997" table:style-name="ce172">
            <text:p>24,245</text:p>
          </table:table-cell>
          <table:table-cell office:value-type="float" office:value="25940.270130000012" table:style-name="ce275">
            <text:p>25,940</text:p>
          </table:table-cell>
          <table:table-cell office:value-type="float" office:value="28108.588539999993" table:style-name="ce172">
            <text:p>28,109</text:p>
          </table:table-cell>
          <table:table-cell office:value-type="float" office:value="26572.530489999997" table:style-name="ce371">
            <text:p>26,573</text:p>
          </table:table-cell>
          <table:table-cell office:value-type="float" office:value="20726" table:style-name="ce349">
            <text:p>20,726</text:p>
          </table:table-cell>
          <table:table-cell office:value-type="float" office:value="18996" table:style-name="ce370">
            <text:p>18,996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19</text:p>
          </table:table-cell>
          <table:table-cell office:value-type="string" table:style-name="ce240">
            <text:p>Waste/Water Treatment and Water Industry</text:p>
          </table:table-cell>
          <table:table-cell office:value-type="float" office:value="41652.610579999993" table:style-name="ce216">
            <text:p><text:s/>41,653<text:s/></text:p>
          </table:table-cell>
          <table:table-cell office:value-type="float" office:value="57086.20897380996" table:style-name="ce216">
            <text:p><text:s/>57,086<text:s/></text:p>
          </table:table-cell>
          <table:table-cell office:value-type="float" office:value="23784.241185851395" table:style-name="ce216">
            <text:p><text:s/>23,784<text:s/></text:p>
          </table:table-cell>
          <table:table-cell office:value-type="float" office:value="83941.13010820956" table:style-name="ce216">
            <text:p><text:s/>83,941<text:s/></text:p>
          </table:table-cell>
          <table:table-cell office:value-type="float" office:value="112345.99998000007" table:style-name="ce216">
            <text:p><text:s/>112,346<text:s/></text:p>
          </table:table-cell>
          <table:table-cell office:value-type="float" office:value="105692.72121824464" table:style-name="ce216">
            <text:p><text:s/>105,693<text:s/></text:p>
          </table:table-cell>
          <table:table-cell office:value-type="float" office:value="117208.61944000002" table:style-name="ce162">
            <text:p><text:s/>117,209<text:s/></text:p>
          </table:table-cell>
          <table:table-cell office:value-type="float" office:value="94262.570549999989" table:style-name="ce216">
            <text:p><text:s/>94,263<text:s/></text:p>
          </table:table-cell>
          <table:table-cell office:value-type="float" office:value="85739.23563000001" table:style-name="ce34">
            <text:p><text:s/>85,739<text:s/></text:p>
          </table:table-cell>
          <table:table-cell office:value-type="float" office:value="85822.59901999998" table:style-name="ce218">
            <text:p><text:s/>85,823<text:s/></text:p>
          </table:table-cell>
          <table:table-cell office:value-type="float" office:value="86580.974709999995" table:style-name="ce218">
            <text:p><text:s/>86,581<text:s/></text:p>
          </table:table-cell>
          <table:table-cell office:value-type="float" office:value="91503.303689999986" table:style-name="ce218">
            <text:p><text:s/>91,503<text:s/></text:p>
          </table:table-cell>
          <table:table-cell office:value-type="float" office:value="94549.062969999999" table:style-name="ce223">
            <text:p><text:s/>94,549<text:s/></text:p>
          </table:table-cell>
          <table:table-cell office:value-type="float" office:value="88636.458749999991" table:style-name="ce223">
            <text:p><text:s/>88,636<text:s/></text:p>
          </table:table-cell>
          <table:table-cell office:value-type="float" office:value="93618.218270000012" table:style-name="ce34">
            <text:p><text:s/>93,618<text:s/></text:p>
          </table:table-cell>
          <table:table-cell office:value-type="float" office:value="101981.83667" table:style-name="ce34">
            <text:p><text:s/>101,982<text:s/></text:p>
          </table:table-cell>
          <table:table-cell office:value-type="float" office:value="100944.94503999993" table:style-name="ce34">
            <text:p><text:s/>100,945<text:s/></text:p>
          </table:table-cell>
          <table:table-cell office:value-type="float" office:value="112741.66824000006" table:style-name="ce34">
            <text:p><text:s/>112,742<text:s/></text:p>
          </table:table-cell>
          <table:table-cell office:value-type="float" office:value="145861.01230999999" table:style-name="ce172">
            <text:p>145,861</text:p>
          </table:table-cell>
          <table:table-cell office:value-type="float" office:value="158900.60179999997" table:style-name="ce172">
            <text:p>158,901</text:p>
          </table:table-cell>
          <table:table-cell office:value-type="float" office:value="170484.12193000002" table:style-name="ce275">
            <text:p>170,484</text:p>
          </table:table-cell>
          <table:table-cell office:value-type="float" office:value="179106.59008000005" table:style-name="ce172">
            <text:p>179,107</text:p>
          </table:table-cell>
          <table:table-cell office:value-type="float" office:value="187438.81860000003" table:style-name="ce371">
            <text:p>187,439</text:p>
          </table:table-cell>
          <table:table-cell office:value-type="float" office:value="231927" table:style-name="ce349">
            <text:p>231,927</text:p>
          </table:table-cell>
          <table:table-cell office:value-type="float" office:value="246623" table:style-name="ce370">
            <text:p>246,623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39">
            <text:p>20</text:p>
          </table:table-cell>
          <table:table-cell office:value-type="string" table:style-name="ce240">
            <text:p>Municipal and Similar Commercial Wastes</text:p>
          </table:table-cell>
          <table:table-cell office:value-type="float" office:value="19119.189050000001" table:style-name="ce216">
            <text:p><text:s/>19,119<text:s/></text:p>
          </table:table-cell>
          <table:table-cell office:value-type="float" office:value="24073.415791007617" table:style-name="ce216">
            <text:p><text:s/>24,073<text:s/></text:p>
          </table:table-cell>
          <table:table-cell office:value-type="float" office:value="16258.200193670396" table:style-name="ce216">
            <text:p><text:s/>16,258<text:s/></text:p>
          </table:table-cell>
          <table:table-cell office:value-type="float" office:value="38243.170243702727" table:style-name="ce216">
            <text:p><text:s/>38,243<text:s/></text:p>
          </table:table-cell>
          <table:table-cell office:value-type="float" office:value="25796.648300000019" table:style-name="ce216">
            <text:p><text:s/>25,797<text:s/></text:p>
          </table:table-cell>
          <table:table-cell office:value-type="float" office:value="16772.635807794366" table:style-name="ce216">
            <text:p><text:s/>16,773<text:s/></text:p>
          </table:table-cell>
          <table:table-cell office:value-type="float" office:value="35517.845290000005" table:style-name="ce162">
            <text:p><text:s/>35,518<text:s/></text:p>
          </table:table-cell>
          <table:table-cell office:value-type="float" office:value="35747.054860000011" table:style-name="ce216">
            <text:p><text:s/>35,747<text:s/></text:p>
          </table:table-cell>
          <table:table-cell office:value-type="float" office:value="31021.796540000018" table:style-name="ce34">
            <text:p><text:s/>31,022<text:s/></text:p>
          </table:table-cell>
          <table:table-cell office:value-type="float" office:value="36624.550349999998" table:style-name="ce218">
            <text:p><text:s/>36,625<text:s/></text:p>
          </table:table-cell>
          <table:table-cell office:value-type="float" office:value="47651.935010000001" table:style-name="ce218">
            <text:p><text:s/>47,652<text:s/></text:p>
          </table:table-cell>
          <table:table-cell office:value-type="float" office:value="45824.482970000012" table:style-name="ce218">
            <text:p><text:s/>45,824<text:s/></text:p>
          </table:table-cell>
          <table:table-cell office:value-type="float" office:value="40682.578529999999" table:style-name="ce223">
            <text:p><text:s/>40,683<text:s/></text:p>
          </table:table-cell>
          <table:table-cell office:value-type="float" office:value="37804.078790000021" table:style-name="ce223">
            <text:p><text:s/>37,804<text:s/></text:p>
          </table:table-cell>
          <table:table-cell office:value-type="float" office:value="77138.613460000008" table:style-name="ce34">
            <text:p><text:s/>77,139<text:s/></text:p>
          </table:table-cell>
          <table:table-cell office:value-type="float" office:value="122356.53169000003" table:style-name="ce34">
            <text:p><text:s/>122,357<text:s/></text:p>
          </table:table-cell>
          <table:table-cell office:value-type="float" office:value="112608.11449999991" table:style-name="ce34">
            <text:p><text:s/>112,608<text:s/></text:p>
          </table:table-cell>
          <table:table-cell office:value-type="float" office:value="88906.74524000012" table:style-name="ce34">
            <text:p><text:s/>88,907<text:s/></text:p>
          </table:table-cell>
          <table:table-cell office:value-type="float" office:value="69757.30740000002" table:style-name="ce172">
            <text:p>69,757</text:p>
          </table:table-cell>
          <table:table-cell office:value-type="float" office:value="62880.244820000007" table:style-name="ce172">
            <text:p>62,880</text:p>
          </table:table-cell>
          <table:table-cell office:value-type="float" office:value="59911.722940000007" table:style-name="ce275">
            <text:p>59,912</text:p>
          </table:table-cell>
          <table:table-cell office:value-type="float" office:value="69399.204089999985" table:style-name="ce172">
            <text:p>69,399</text:p>
          </table:table-cell>
          <table:table-cell office:value-type="float" office:value="76799.270869999775" table:style-name="ce371">
            <text:p>76,799</text:p>
          </table:table-cell>
          <table:table-cell office:value-type="float" office:value="80374" table:style-name="ce349">
            <text:p>80,374</text:p>
          </table:table-cell>
          <table:table-cell office:value-type="float" office:value="78639" table:style-name="ce370">
            <text:p>78,639</text:p>
          </table:table-cell>
          <table:table-cell table:number-columns-repeated="16356"/>
        </table:table-row>
        <table:table-row table:style-name="ro10">
          <table:table-cell/>
          <table:table-cell office:value-type="string" table:style-name="ce243">
            <text:p>99</text:p>
          </table:table-cell>
          <table:table-cell office:value-type="string" table:style-name="ce244">
            <text:p>Unclassified</text:p>
          </table:table-cell>
          <table:table-cell office:value-type="float" office:value="54454.303160000003" table:style-name="ce226">
            <text:p><text:s/>54,454<text:s/></text:p>
          </table:table-cell>
          <table:table-cell office:value-type="float" office:value="25328.040573228267" table:style-name="ce226">
            <text:p><text:s/>25,328<text:s/></text:p>
          </table:table-cell>
          <table:table-cell office:value-type="float" office:value="36568.836172723444" table:style-name="ce226">
            <text:p><text:s/>36,569<text:s/></text:p>
          </table:table-cell>
          <table:table-cell office:value-type="float" office:value="56996.09192254598" table:style-name="ce226">
            <text:p><text:s/>56,996<text:s/></text:p>
          </table:table-cell>
          <table:table-cell office:value-type="float" office:value="55741.313879999994" table:style-name="ce226">
            <text:p><text:s/>55,741<text:s/></text:p>
          </table:table-cell>
          <table:table-cell office:value-type="float" office:value="34496.965525803549" table:style-name="ce226">
            <text:p><text:s/>34,497<text:s/></text:p>
          </table:table-cell>
          <table:table-cell office:value-type="float" office:value="0" table:style-name="ce226">
            <text:p><text:s/>-<text:s/></text:p>
          </table:table-cell>
          <table:table-cell office:value-type="float" office:value="0" table:style-name="ce216">
            <text:p><text:s/>-<text:s/></text:p>
          </table:table-cell>
          <table:table-cell office:value-type="float" office:value="0" table:style-name="ce245">
            <text:p><text:s/>-<text:s/></text:p>
          </table:table-cell>
          <table:table-cell office:value-type="float" office:value="0" table:style-name="ce245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5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46">
            <text:p><text:s/>-<text:s/></text:p>
          </table:table-cell>
          <table:table-cell office:value-type="float" office:value="0" table:style-name="ce228">
            <text:p><text:s/>-<text:s/></text:p>
          </table:table-cell>
          <table:table-cell office:value-type="string" table:style-name="ce228">
            <text:p>-</text:p>
          </table:table-cell>
          <table:table-cell office:value-type="string" table:style-name="ce247">
            <text:p>-</text:p>
          </table:table-cell>
          <table:table-cell office:value-type="string" table:style-name="ce247">
            <text:p>-</text:p>
          </table:table-cell>
          <table:table-cell office:value-type="string" table:style-name="ce247">
            <text:p>-</text:p>
          </table:table-cell>
          <table:table-cell office:value-type="string" table:style-name="ce247">
            <text:p>-</text:p>
          </table:table-cell>
          <table:table-cell office:value-type="string" table:style-name="ce247">
            <text:p>-</text:p>
          </table:table-cell>
          <table:table-cell office:value-type="string" table:style-name="ce378">
            <text:p>-</text:p>
          </table:table-cell>
          <table:table-cell office:value-type="string" table:style-name="ce350">
            <text:p>-</text:p>
          </table:table-cell>
          <table:table-cell table:number-columns-repeated="16356"/>
        </table:table-row>
        <table:table-row table:style-name="ro20">
          <table:table-cell/>
          <table:table-cell table:style-name="ce249"/>
          <table:table-cell office:value-type="string" table:style-name="ce250">
            <text:p>Total</text:p>
          </table:table-cell>
          <table:table-cell office:value-type="float" office:value="822567.83039999986" table:formula="of:=SUM([.D42:.D62])" table:style-name="ce251">
            <text:p><text:s/>822,568<text:s/></text:p>
          </table:table-cell>
          <table:table-cell office:value-type="float" office:value="856859.88791737997" table:formula="of:=SUM([.E42:.E62])" table:style-name="ce231">
            <text:p><text:s/>856,860<text:s/></text:p>
          </table:table-cell>
          <table:table-cell office:value-type="float" office:value="780864.91357196902" table:formula="of:=SUM([.F42:.F62])" table:style-name="ce231">
            <text:p><text:s/>780,865<text:s/></text:p>
          </table:table-cell>
          <table:table-cell office:value-type="float" office:value="837157.43657490914" table:formula="of:=SUM([.G42:.G62])" table:style-name="ce231">
            <text:p><text:s/>837,157<text:s/></text:p>
          </table:table-cell>
          <table:table-cell office:value-type="float" office:value="852422.21003000077" table:formula="of:=SUM([.H42:.H62])" table:style-name="ce231">
            <text:p><text:s/>852,422<text:s/></text:p>
          </table:table-cell>
          <table:table-cell office:value-type="float" office:value="960289.06966024172" table:formula="of:=SUM([.I42:.I62])" table:style-name="ce231">
            <text:p><text:s/>960,289<text:s/></text:p>
          </table:table-cell>
          <table:table-cell office:value-type="float" office:value="728015.11805999978" table:formula="of:=SUM([.J42:.J62])" table:style-name="ce231">
            <text:p><text:s/>728,015<text:s/></text:p>
          </table:table-cell>
          <table:table-cell office:value-type="float" office:value="690179.43734000006" table:formula="of:=SUM([.K42:.K62])" table:style-name="ce231">
            <text:p><text:s/>690,179<text:s/></text:p>
          </table:table-cell>
          <table:table-cell office:value-type="float" office:value="611026.12346999999" table:formula="of:=SUM([.L42:.L62])" table:style-name="ce231">
            <text:p><text:s/>611,026<text:s/></text:p>
          </table:table-cell>
          <table:table-cell office:value-type="float" office:value="577190.93467999995" table:formula="of:=SUM([.M42:.M62])" table:style-name="ce231">
            <text:p><text:s/>577,191<text:s/></text:p>
          </table:table-cell>
          <table:table-cell office:value-type="float" office:value="648858.94064000004" table:formula="of:=SUM([.N42:.N62])" table:style-name="ce231">
            <text:p><text:s/>648,859<text:s/></text:p>
          </table:table-cell>
          <table:table-cell office:value-type="float" office:value="758522.70218000002" table:formula="of:=SUM([.O42:.O62])" table:style-name="ce231">
            <text:p><text:s/>758,523<text:s/></text:p>
          </table:table-cell>
          <table:table-cell office:value-type="float" office:value="716463.10910000023" table:formula="of:=SUM([.P42:.P62])" table:style-name="ce232">
            <text:p><text:s/>716,463<text:s/></text:p>
          </table:table-cell>
          <table:table-cell office:value-type="float" office:value="758536.80703000014" table:formula="of:=SUM([.Q42:.Q62])" table:style-name="ce231">
            <text:p><text:s/>758,537<text:s/></text:p>
          </table:table-cell>
          <table:table-cell office:value-type="float" office:value="739793.32631000003" table:formula="of:=SUM([.R42:.R62])" table:style-name="ce231">
            <text:p><text:s/>739,793<text:s/></text:p>
          </table:table-cell>
          <table:table-cell office:value-type="float" office:value="759191.27472999995" table:formula="of:=SUM([.S42:.S62])" table:style-name="ce231">
            <text:p><text:s/>759,191<text:s/></text:p>
          </table:table-cell>
          <table:table-cell office:value-type="float" office:value="751637.28247999982" table:formula="of:=SUM([.T42:.T62])" table:style-name="ce233">
            <text:p><text:s/>751,637<text:s/></text:p>
          </table:table-cell>
          <table:table-cell office:value-type="float" office:value="827535.10775000032" table:formula="of:=SUM([.U42:.U62])" table:style-name="ce232">
            <text:p><text:s/>827,535<text:s/></text:p>
          </table:table-cell>
          <table:table-cell office:value-type="float" office:value="914963.9909600002" table:formula="of:=SUM([.V42:.V62])" table:style-name="ce232">
            <text:p><text:s/>914,964<text:s/></text:p>
          </table:table-cell>
          <table:table-cell office:value-type="float" office:value="1021760.7223699999" table:formula="of:=SUM([.W42:.W62])" table:style-name="ce232">
            <text:p><text:s/>1,021,761<text:s/></text:p>
          </table:table-cell>
          <table:table-cell office:value-type="float" office:value="959521" table:style-name="ce232">
            <text:p><text:s/>959,521<text:s/></text:p>
          </table:table-cell>
          <table:table-cell office:value-type="float" office:value="908224.33772000077" table:formula="of:=SUM([.Y42:.Y62])" table:style-name="ce232">
            <text:p><text:s/>908,224<text:s/></text:p>
          </table:table-cell>
          <table:table-cell office:value-type="float" office:value="924241.62949000008" table:formula="of:=SUM([.Z42:.Z62])" table:style-name="ce232">
            <text:p><text:s/>924,242<text:s/></text:p>
          </table:table-cell>
          <table:table-cell office:value-type="float" office:value="956208" table:style-name="ce376">
            <text:p><text:s/>956,208<text:s/></text:p>
          </table:table-cell>
          <table:table-cell office:value-type="float" office:value="942689" table:style-name="ce232">
            <text:p><text:s/>942,689<text:s/></text:p>
          </table:table-cell>
          <table:table-cell table:number-columns-repeated="16356"/>
        </table:table-row>
        <table:table-row table:style-name="ro5">
          <table:table-cell/>
          <table:table-cell table:style-name="ce179"/>
          <table:table-cell table:number-columns-repeated="9" table:style-name="ce235"/>
          <table:table-cell table:number-columns-repeated="6" table:style-name="ce209"/>
          <table:table-cell table:number-columns-repeated="16367" table:style-name="ce14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office:value-type="string" table:style-name="ce15">
            <text:p>North West: Hazardous waste deposited by fate from 1998 to 2024 (tonnes)</text:p>
          </table:table-cell>
          <table:table-cell table:number-columns-repeated="11" table:style-name="ce209"/>
          <table:table-cell table:number-columns-repeated="16371"/>
        </table:table-row>
        <table:table-row table:style-name="ro5">
          <table:table-cell/>
          <table:table-cell table:number-columns-repeated="12" table:style-name="ce209"/>
          <table:table-cell table:number-columns-repeated="16371"/>
        </table:table-row>
        <table:table-row table:style-name="ro34">
          <table:table-cell/>
          <table:table-cell office:value-type="string" table:style-name="ce252">
            <text:p>Year</text:p>
          </table:table-cell>
          <table:table-cell office:value-type="string" table:style-name="ce253">
            <text:p>Incineration with energy recovery</text:p>
          </table:table-cell>
          <table:table-cell office:value-type="string" table:style-name="ce253">
            <text:p>Incineration without energy recovery</text:p>
          </table:table-cell>
          <table:table-cell office:value-type="string" table:style-name="ce253">
            <text:p>Landfill</text:p>
          </table:table-cell>
          <table:table-cell office:value-type="string" table:style-name="ce253">
            <text:p>Long term storage</text:p>
          </table:table-cell>
          <table:table-cell office:value-type="string" table:style-name="ce253">
            <text:p>Recovery</text:p>
          </table:table-cell>
          <table:table-cell office:value-type="string" table:style-name="ce253">
            <text:p>Transfer (Short term)</text:p>
          </table:table-cell>
          <table:table-cell office:value-type="string" table:style-name="ce253">
            <text:p>Treatment</text:p>
          </table:table-cell>
          <table:table-cell office:value-type="string" table:style-name="ce253">
            <text:p>Other</text:p>
          </table:table-cell>
          <table:table-cell office:value-type="string" table:style-name="ce254">
            <text:p>Total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string" table:style-name="ce276">
            <text:p>1998/9</text:p>
          </table:table-cell>
          <table:table-cell office:value-type="float" office:value="1596.5331199999991" table:style-name="ce255">
            <text:p>1,597</text:p>
          </table:table-cell>
          <table:table-cell office:value-type="float" office:value="60172.491609999975" table:style-name="ce255">
            <text:p>60,172</text:p>
          </table:table-cell>
          <table:table-cell office:value-type="float" office:value="269888.51310999942" table:style-name="ce255">
            <text:p>269,889</text:p>
          </table:table-cell>
          <table:table-cell office:value-type="float" office:value="3193.7115599999997" table:style-name="ce255">
            <text:p>3,194</text:p>
          </table:table-cell>
          <table:table-cell office:value-type="float" office:value="113819.41772000064" table:style-name="ce255">
            <text:p>113,819</text:p>
          </table:table-cell>
          <table:table-cell office:value-type="float" office:value="66749.211479999925" table:style-name="ce255">
            <text:p>66,749</text:p>
          </table:table-cell>
          <table:table-cell office:value-type="float" office:value="249131.03512999957" table:style-name="ce255">
            <text:p>249,131</text:p>
          </table:table-cell>
          <table:table-cell office:value-type="float" office:value="1989.0132900000012" table:style-name="ce255">
            <text:p>1,989</text:p>
          </table:table-cell>
          <table:table-cell office:value-type="float" office:value="766539.92701999971" table:formula="of:=SUM([.C69:.J69])" table:style-name="ce277">
            <text:p>766,540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00" table:style-name="ce276">
            <text:p>2000</text:p>
          </table:table-cell>
          <table:table-cell office:value-type="float" office:value="3318.0579998557805" table:style-name="ce255">
            <text:p>3,318</text:p>
          </table:table-cell>
          <table:table-cell office:value-type="float" office:value="58851.020516376942" table:style-name="ce255">
            <text:p>58,851</text:p>
          </table:table-cell>
          <table:table-cell office:value-type="float" office:value="324279.73785436543" table:style-name="ce255">
            <text:p>324,280</text:p>
          </table:table-cell>
          <table:table-cell office:value-type="float" office:value="3881.3211364746094" table:style-name="ce255">
            <text:p>3,881</text:p>
          </table:table-cell>
          <table:table-cell office:value-type="float" office:value="127751.74942815083" table:style-name="ce255">
            <text:p>127,752</text:p>
          </table:table-cell>
          <table:table-cell office:value-type="float" office:value="99043.570284444315" table:style-name="ce255">
            <text:p>99,044</text:p>
          </table:table-cell>
          <table:table-cell office:value-type="float" office:value="212639.98711271287" table:style-name="ce255">
            <text:p>212,640</text:p>
          </table:table-cell>
          <table:table-cell office:value-type="string" table:style-name="ce256">
            <text:p>-</text:p>
          </table:table-cell>
          <table:table-cell office:value-type="float" office:value="829765.44433238078" table:formula="of:=SUM([.C70:.J70])" table:style-name="ce277">
            <text:p>829,765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01" table:style-name="ce276">
            <text:p>2001</text:p>
          </table:table-cell>
          <table:table-cell office:value-type="float" office:value="37635.491250578314" table:style-name="ce255">
            <text:p>37,635</text:p>
          </table:table-cell>
          <table:table-cell office:value-type="float" office:value="57318.342864120379" table:style-name="ce255">
            <text:p>57,318</text:p>
          </table:table-cell>
          <table:table-cell office:value-type="float" office:value="205831.1823476493" table:style-name="ce255">
            <text:p>205,831</text:p>
          </table:table-cell>
          <table:table-cell office:value-type="float" office:value="1875.8153076171875" table:style-name="ce255">
            <text:p>1,876</text:p>
          </table:table-cell>
          <table:table-cell office:value-type="float" office:value="129595.60230752682" table:style-name="ce255">
            <text:p>129,596</text:p>
          </table:table-cell>
          <table:table-cell office:value-type="float" office:value="143884.21879776591" table:style-name="ce255">
            <text:p>143,884</text:p>
          </table:table-cell>
          <table:table-cell office:value-type="float" office:value="167292.7365146064" table:style-name="ce255">
            <text:p>167,293</text:p>
          </table:table-cell>
          <table:table-cell office:value-type="string" table:style-name="ce256">
            <text:p>-</text:p>
          </table:table-cell>
          <table:table-cell office:value-type="float" office:value="743433.38938986429" table:formula="of:=SUM([.C71:.J71])" table:style-name="ce277">
            <text:p>743,433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02" table:style-name="ce276">
            <text:p>2002</text:p>
          </table:table-cell>
          <table:table-cell office:value-type="float" office:value="50311.719926123274" table:style-name="ce255">
            <text:p>50,312</text:p>
          </table:table-cell>
          <table:table-cell office:value-type="float" office:value="62180.969877025986" table:style-name="ce255">
            <text:p>62,181</text:p>
          </table:table-cell>
          <table:table-cell office:value-type="float" office:value="255360.38148219397" table:style-name="ce255">
            <text:p>255,360</text:p>
          </table:table-cell>
          <table:table-cell office:value-type="float" office:value="0.20000000298023224" table:style-name="ce255">
            <text:p>0</text:p>
          </table:table-cell>
          <table:table-cell office:value-type="float" office:value="130248.51046743307" table:style-name="ce255">
            <text:p>130,249</text:p>
          </table:table-cell>
          <table:table-cell office:value-type="float" office:value="109315.23699482439" table:style-name="ce255">
            <text:p>109,315</text:p>
          </table:table-cell>
          <table:table-cell office:value-type="float" office:value="229740.41782730538" table:style-name="ce255">
            <text:p>229,740</text:p>
          </table:table-cell>
          <table:table-cell office:value-type="string" table:style-name="ce256">
            <text:p>-</text:p>
          </table:table-cell>
          <table:table-cell office:value-type="float" office:value="837157.43657490914" table:formula="of:=SUM([.C72:.J72])" table:style-name="ce278">
            <text:p>837,157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03" table:style-name="ce276">
            <text:p>2003</text:p>
          </table:table-cell>
          <table:table-cell office:value-type="float" office:value="43639.402889999976" table:style-name="ce255">
            <text:p>43,639</text:p>
          </table:table-cell>
          <table:table-cell office:value-type="float" office:value="56806.7883899999" table:style-name="ce255">
            <text:p>56,807</text:p>
          </table:table-cell>
          <table:table-cell office:value-type="float" office:value="256779.54776999992" table:style-name="ce255">
            <text:p>256,780</text:p>
          </table:table-cell>
          <table:table-cell office:value-type="float" office:value="20" table:style-name="ce255">
            <text:p>20</text:p>
          </table:table-cell>
          <table:table-cell office:value-type="float" office:value="133036.39409999998" table:style-name="ce255">
            <text:p>133,036</text:p>
          </table:table-cell>
          <table:table-cell office:value-type="float" office:value="137343.33589999983" table:style-name="ce255">
            <text:p>137,343</text:p>
          </table:table-cell>
          <table:table-cell office:value-type="float" office:value="224796.74098000085" table:style-name="ce255">
            <text:p>224,797</text:p>
          </table:table-cell>
          <table:table-cell office:value-type="string" table:style-name="ce256">
            <text:p>-</text:p>
          </table:table-cell>
          <table:table-cell office:value-type="float" office:value="852422.21003000042" table:formula="of:=SUM([.C73:.J73])" table:style-name="ce278">
            <text:p>852,422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04" table:style-name="ce279">
            <text:p>2004</text:p>
          </table:table-cell>
          <table:table-cell office:value-type="float" office:value="47106.883826092351" table:style-name="ce257">
            <text:p>47,107</text:p>
          </table:table-cell>
          <table:table-cell office:value-type="float" office:value="55360.499447074078" table:style-name="ce257">
            <text:p>55,360</text:p>
          </table:table-cell>
          <table:table-cell office:value-type="float" office:value="392307.94770810881" table:style-name="ce257">
            <text:p>392,308</text:p>
          </table:table-cell>
          <table:table-cell office:value-type="float" office:value="263.67999267578125" table:style-name="ce257">
            <text:p>264</text:p>
          </table:table-cell>
          <table:table-cell office:value-type="float" office:value="125826.0411972686" table:style-name="ce257">
            <text:p>125,826</text:p>
          </table:table-cell>
          <table:table-cell office:value-type="float" office:value="126986.54246094491" table:style-name="ce257">
            <text:p>126,987</text:p>
          </table:table-cell>
          <table:table-cell office:value-type="float" office:value="212437.47502807714" table:style-name="ce257">
            <text:p>212,437</text:p>
          </table:table-cell>
          <table:table-cell office:value-type="string" table:style-name="ce258">
            <text:p>-</text:p>
          </table:table-cell>
          <table:table-cell office:value-type="float" office:value="960289.06966024172" table:formula="of:=SUM([.C74:.J74])" table:style-name="ce280">
            <text:p>960,289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table:style-name="ce281"/>
          <table:table-cell table:number-columns-repeated="9" table:style-name="ce282"/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06" table:style-name="ce283">
            <text:p>2006</text:p>
          </table:table-cell>
          <table:table-cell office:value-type="float" office:value="45066.511619999997" table:style-name="ce259">
            <text:p>45,067</text:p>
          </table:table-cell>
          <table:table-cell office:value-type="float" office:value="94198.706119999857" table:style-name="ce260">
            <text:p>94,199</text:p>
          </table:table-cell>
          <table:table-cell office:value-type="float" office:value="101404.24702000002" table:style-name="ce260">
            <text:p>101,404</text:p>
          </table:table-cell>
          <table:table-cell office:value-type="float" office:value="8663.7558300000001" table:style-name="ce260">
            <text:p>8,664</text:p>
          </table:table-cell>
          <table:table-cell office:value-type="float" office:value="128808.95345999973" table:style-name="ce260">
            <text:p>128,809</text:p>
          </table:table-cell>
          <table:table-cell office:value-type="float" office:value="136385.40144000013" table:style-name="ce260">
            <text:p>136,385</text:p>
          </table:table-cell>
          <table:table-cell office:value-type="float" office:value="213193.76067000005" table:style-name="ce260">
            <text:p>213,194</text:p>
          </table:table-cell>
          <table:table-cell office:value-type="float" office:value="293.78190000000001" table:style-name="ce261">
            <text:p>294</text:p>
          </table:table-cell>
          <table:table-cell office:value-type="float" office:value="728015.11805999966" table:formula="of:=SUM([.C76:.J76])" table:style-name="ce284">
            <text:p>728,015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07" table:style-name="ce285">
            <text:p>2007</text:p>
          </table:table-cell>
          <table:table-cell office:value-type="float" office:value="21379.723439999998" table:style-name="ce262">
            <text:p>21,380</text:p>
          </table:table-cell>
          <table:table-cell office:value-type="float" office:value="92213.133710000009" table:style-name="ce255">
            <text:p>92,213</text:p>
          </table:table-cell>
          <table:table-cell office:value-type="float" office:value="116644.22230000001" table:style-name="ce255">
            <text:p>116,644</text:p>
          </table:table-cell>
          <table:table-cell office:value-type="float" office:value="15645.566000000001" table:style-name="ce255">
            <text:p>15,646</text:p>
          </table:table-cell>
          <table:table-cell office:value-type="float" office:value="140413.96313000005" table:style-name="ce255">
            <text:p>140,414</text:p>
          </table:table-cell>
          <table:table-cell office:value-type="float" office:value="131237.45133000007" table:style-name="ce255">
            <text:p>131,237</text:p>
          </table:table-cell>
          <table:table-cell office:value-type="float" office:value="172232.09743000005" table:style-name="ce255">
            <text:p>172,232</text:p>
          </table:table-cell>
          <table:table-cell office:value-type="float" office:value="413.28" table:style-name="ce263">
            <text:p>413</text:p>
          </table:table-cell>
          <table:table-cell office:value-type="float" office:value="690179.43734000018" table:formula="of:=SUM([.C77:.J77])" table:style-name="ce286">
            <text:p>690,179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08" table:style-name="ce285">
            <text:p>2008</text:p>
          </table:table-cell>
          <table:table-cell office:value-type="float" office:value="16503.830480000001" table:style-name="ce264">
            <text:p>16,504</text:p>
          </table:table-cell>
          <table:table-cell office:value-type="float" office:value="89971.943350000089" table:style-name="ce265">
            <text:p>89,972</text:p>
          </table:table-cell>
          <table:table-cell office:value-type="float" office:value="91747.481129999956" table:style-name="ce265">
            <text:p>91,747</text:p>
          </table:table-cell>
          <table:table-cell office:value-type="float" office:value="19094.201480000003" table:style-name="ce265">
            <text:p>19,094</text:p>
          </table:table-cell>
          <table:table-cell office:value-type="float" office:value="118309.77701999994" table:style-name="ce265">
            <text:p>118,310</text:p>
          </table:table-cell>
          <table:table-cell office:value-type="float" office:value="136599.2199400001" table:style-name="ce255">
            <text:p>136,599</text:p>
          </table:table-cell>
          <table:table-cell office:value-type="float" office:value="138081.28003000023" table:style-name="ce265">
            <text:p>138,081</text:p>
          </table:table-cell>
          <table:table-cell office:value-type="float" office:value="718.39004" table:style-name="ce263">
            <text:p>718</text:p>
          </table:table-cell>
          <table:table-cell office:value-type="float" office:value="611026.12347000022" table:formula="of:=SUM([.C78:.J78])" table:style-name="ce286">
            <text:p>611,026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09" table:style-name="ce276">
            <text:p>2009</text:p>
          </table:table-cell>
          <table:table-cell office:value-type="float" office:value="15008.04" table:style-name="ce264">
            <text:p>15,008</text:p>
          </table:table-cell>
          <table:table-cell office:value-type="float" office:value="91339.646769999978" table:style-name="ce265">
            <text:p>91,340</text:p>
          </table:table-cell>
          <table:table-cell office:value-type="float" office:value="64193.81136" table:style-name="ce265">
            <text:p>64,194</text:p>
          </table:table-cell>
          <table:table-cell office:value-type="float" office:value="27379.138999999999" table:style-name="ce265">
            <text:p>27,379</text:p>
          </table:table-cell>
          <table:table-cell office:value-type="float" office:value="120602.51009" table:style-name="ce265">
            <text:p>120,603</text:p>
          </table:table-cell>
          <table:table-cell office:value-type="float" office:value="154742.36200999998" table:style-name="ce255">
            <text:p>154,742</text:p>
          </table:table-cell>
          <table:table-cell office:value-type="float" office:value="103637.10125000001" table:style-name="ce265">
            <text:p>103,637</text:p>
          </table:table-cell>
          <table:table-cell office:value-type="float" office:value="288.32420000000002" table:style-name="ce263">
            <text:p>288</text:p>
          </table:table-cell>
          <table:table-cell office:value-type="float" office:value="577190.93467999995" table:formula="of:=SUM([.C79:.J79])" table:style-name="ce278">
            <text:p>577,191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10" table:style-name="ce285">
            <text:p>2010</text:p>
          </table:table-cell>
          <table:table-cell office:value-type="float" office:value="14607.065000000001" table:style-name="ce264">
            <text:p>14,607</text:p>
          </table:table-cell>
          <table:table-cell office:value-type="float" office:value="89751.968749999985" table:style-name="ce265">
            <text:p>89,752</text:p>
          </table:table-cell>
          <table:table-cell office:value-type="float" office:value="57818.264299999995" table:style-name="ce265">
            <text:p>57,818</text:p>
          </table:table-cell>
          <table:table-cell office:value-type="float" office:value="28350.136999999999" table:style-name="ce265">
            <text:p>28,350</text:p>
          </table:table-cell>
          <table:table-cell office:value-type="float" office:value="177246.61283000003" table:style-name="ce265">
            <text:p>177,247</text:p>
          </table:table-cell>
          <table:table-cell office:value-type="float" office:value="150902.96573000005" table:style-name="ce255">
            <text:p>150,903</text:p>
          </table:table-cell>
          <table:table-cell office:value-type="float" office:value="129891.22700000003" table:style-name="ce265">
            <text:p>129,891</text:p>
          </table:table-cell>
          <table:table-cell office:value-type="float" office:value="290.7" table:style-name="ce255">
            <text:p>291</text:p>
          </table:table-cell>
          <table:table-cell office:value-type="float" office:value="648858.94061000005" table:formula="of:=SUM([.C80:.J80])" table:style-name="ce278">
            <text:p>648,859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11" table:style-name="ce285">
            <text:p>2011</text:p>
          </table:table-cell>
          <table:table-cell office:value-type="float" office:value="13780.977989999999" table:style-name="ce266">
            <text:p>13,781</text:p>
          </table:table-cell>
          <table:table-cell office:value-type="float" office:value="86212.377470000007" table:style-name="ce267">
            <text:p>86,212</text:p>
          </table:table-cell>
          <table:table-cell office:value-type="float" office:value="69541.58" table:style-name="ce267">
            <text:p>69,542</text:p>
          </table:table-cell>
          <table:table-cell office:value-type="float" office:value="41229.550999999992" table:style-name="ce267">
            <text:p>41,230</text:p>
          </table:table-cell>
          <table:table-cell office:value-type="float" office:value="217379.76632000002" table:style-name="ce267">
            <text:p>217,380</text:p>
          </table:table-cell>
          <table:table-cell office:value-type="float" office:value="171275.18557" table:style-name="ce267">
            <text:p>171,275</text:p>
          </table:table-cell>
          <table:table-cell office:value-type="float" office:value="158711.50366999998" table:style-name="ce267">
            <text:p>158,712</text:p>
          </table:table-cell>
          <table:table-cell office:value-type="float" office:value="391.76016000000004" table:style-name="ce268">
            <text:p>392</text:p>
          </table:table-cell>
          <table:table-cell office:value-type="float" office:value="758522.70217999991" table:formula="of:=SUM([.C81:.J81])" table:style-name="ce286">
            <text:p>758,523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12" table:style-name="ce285">
            <text:p>2012</text:p>
          </table:table-cell>
          <table:table-cell office:value-type="float" office:value="17435.41" table:style-name="ce269">
            <text:p>17,435</text:p>
          </table:table-cell>
          <table:table-cell office:value-type="float" office:value="78938.540249999991" table:style-name="ce270">
            <text:p>78,939</text:p>
          </table:table-cell>
          <table:table-cell office:value-type="float" office:value="54954.74598" table:style-name="ce270">
            <text:p>54,955</text:p>
          </table:table-cell>
          <table:table-cell office:value-type="float" office:value="34896.707999999999" table:style-name="ce270">
            <text:p>34,897</text:p>
          </table:table-cell>
          <table:table-cell office:value-type="float" office:value="223006.89585999987" table:style-name="ce270">
            <text:p>223,007</text:p>
          </table:table-cell>
          <table:table-cell office:value-type="float" office:value="154120.55352000028" table:style-name="ce270">
            <text:p>154,121</text:p>
          </table:table-cell>
          <table:table-cell office:value-type="float" office:value="152794.0184900004" table:style-name="ce270">
            <text:p>152,794</text:p>
          </table:table-cell>
          <table:table-cell office:value-type="float" office:value="316.23700000000002" table:style-name="ce271">
            <text:p>316</text:p>
          </table:table-cell>
          <table:table-cell office:value-type="float" office:value="716463.10910000047" table:formula="of:=SUM([.C82:.J82])" table:style-name="ce286">
            <text:p>716,463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13" table:style-name="ce285">
            <text:p>2013</text:p>
          </table:table-cell>
          <table:table-cell office:value-type="float" office:value="20412.420000000002" table:style-name="ce266">
            <text:p>20,412</text:p>
          </table:table-cell>
          <table:table-cell office:value-type="float" office:value="77926.63162" table:style-name="ce267">
            <text:p>77,927</text:p>
          </table:table-cell>
          <table:table-cell office:value-type="float" office:value="89985.756919999985" table:style-name="ce267">
            <text:p>89,986</text:p>
          </table:table-cell>
          <table:table-cell office:value-type="float" office:value="31547.374" table:style-name="ce267">
            <text:p>31,547</text:p>
          </table:table-cell>
          <table:table-cell office:value-type="float" office:value="229952.79571999999" table:style-name="ce267">
            <text:p>229,953</text:p>
          </table:table-cell>
          <table:table-cell office:value-type="float" office:value="148284.46143999996" table:style-name="ce267">
            <text:p>148,284</text:p>
          </table:table-cell>
          <table:table-cell office:value-type="float" office:value="160117.67127000002" table:style-name="ce267">
            <text:p>160,118</text:p>
          </table:table-cell>
          <table:table-cell office:value-type="float" office:value="309.69605999999999" table:style-name="ce267">
            <text:p>310</text:p>
          </table:table-cell>
          <table:table-cell office:value-type="float" office:value="758536.80703000003" table:formula="of:=SUM([.C83:.J83])" table:style-name="ce278">
            <text:p>758,537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14" table:style-name="ce276">
            <text:p>2014</text:p>
          </table:table-cell>
          <table:table-cell office:value-type="float" office:value="23269.224999999999" table:style-name="ce269">
            <text:p>23,269</text:p>
          </table:table-cell>
          <table:table-cell office:value-type="float" office:value="83222.538080000013" table:style-name="ce270">
            <text:p>83,223</text:p>
          </table:table-cell>
          <table:table-cell office:value-type="float" office:value="56081.632669999992" table:style-name="ce270">
            <text:p>56,082</text:p>
          </table:table-cell>
          <table:table-cell office:value-type="float" office:value="30837.448" table:style-name="ce270">
            <text:p>30,837</text:p>
          </table:table-cell>
          <table:table-cell office:value-type="float" office:value="221130.46067999996" table:style-name="ce267">
            <text:p>221,130</text:p>
          </table:table-cell>
          <table:table-cell office:value-type="float" office:value="207807.01348000002" table:style-name="ce267">
            <text:p>207,807</text:p>
          </table:table-cell>
          <table:table-cell office:value-type="float" office:value="116852.0074" table:style-name="ce267">
            <text:p>116,852</text:p>
          </table:table-cell>
          <table:table-cell office:value-type="float" office:value="593.00099999999998" table:style-name="ce268">
            <text:p>593</text:p>
          </table:table-cell>
          <table:table-cell office:value-type="float" office:value="739793.32631000003" table:formula="of:=SUM([.C84:.J84])" table:style-name="ce278">
            <text:p>739,793</text:p>
          </table:table-cell>
          <table:table-cell table:number-columns-repeated="2" table:style-name="ce209"/>
          <table:table-cell table:number-columns-repeated="16371"/>
        </table:table-row>
        <table:table-row table:style-name="ro5">
          <table:table-cell/>
          <table:table-cell office:value-type="float" office:value="2015" table:style-name="ce276">
            <text:p>2015</text:p>
          </table:table-cell>
          <table:table-cell office:value-type="float" office:value="22524.690000000002" table:style-name="ce270">
            <text:p>22,525</text:p>
          </table:table-cell>
          <table:table-cell office:value-type="float" office:value="72485.559900000022" table:style-name="ce270">
            <text:p>72,486</text:p>
          </table:table-cell>
          <table:table-cell office:value-type="float" office:value="37808.69857" table:style-name="ce270">
            <text:p>37,809</text:p>
          </table:table-cell>
          <table:table-cell office:value-type="float" office:value="24413.79" table:style-name="ce270">
            <text:p>24,414</text:p>
          </table:table-cell>
          <table:table-cell office:value-type="float" office:value="259663.92439000003" table:style-name="ce267">
            <text:p>259,664</text:p>
          </table:table-cell>
          <table:table-cell office:value-type="float" office:value="244808.60873000009" table:style-name="ce267">
            <text:p>244,809</text:p>
          </table:table-cell>
          <table:table-cell office:value-type="float" office:value="97262" table:style-name="ce267">
            <text:p>97,262</text:p>
          </table:table-cell>
          <table:table-cell office:value-type="float" office:value="223.99899999999997" table:style-name="ce267">
            <text:p>224</text:p>
          </table:table-cell>
          <table:table-cell office:value-type="float" office:value="759191.27059000009" table:formula="of:=SUM([.C85:.J85])" table:style-name="ce278">
            <text:p>759,191</text:p>
          </table:table-cell>
          <table:table-cell table:number-columns-repeated="16373" table:style-name="ce14"/>
        </table:table-row>
        <table:table-row table:style-name="ro5">
          <table:table-cell/>
          <table:table-cell office:value-type="float" office:value="2016" table:style-name="ce276">
            <text:p>2016</text:p>
          </table:table-cell>
          <table:table-cell office:value-type="float" office:value="25171.883999999998" table:style-name="ce270">
            <text:p>25,172</text:p>
          </table:table-cell>
          <table:table-cell office:value-type="float" office:value="64866.566630000008" table:style-name="ce270">
            <text:p>64,867</text:p>
          </table:table-cell>
          <table:table-cell office:value-type="float" office:value="43708.329800000021" table:style-name="ce270">
            <text:p>43,708</text:p>
          </table:table-cell>
          <table:table-cell office:value-type="float" office:value="15765.799999999997" table:style-name="ce270">
            <text:p>15,766</text:p>
          </table:table-cell>
          <table:table-cell office:value-type="float" office:value="242393.43229999996" table:style-name="ce267">
            <text:p>242,393</text:p>
          </table:table-cell>
          <table:table-cell office:value-type="float" office:value="242505.06990000035" table:style-name="ce267">
            <text:p>242,505</text:p>
          </table:table-cell>
          <table:table-cell office:value-type="float" office:value="116870.25884999998" table:style-name="ce267">
            <text:p>116,870</text:p>
          </table:table-cell>
          <table:table-cell office:value-type="float" office:value="356" table:style-name="ce267">
            <text:p>356</text:p>
          </table:table-cell>
          <table:table-cell office:value-type="float" office:value="751637.34148000029" table:formula="of:=SUM([.C86:.J86])" table:style-name="ce278">
            <text:p>751,637</text:p>
          </table:table-cell>
          <table:table-cell table:number-columns-repeated="16373" table:style-name="ce14"/>
        </table:table-row>
        <table:table-row table:style-name="ro5">
          <table:table-cell/>
          <table:table-cell office:value-type="float" office:value="2017" table:style-name="ce276">
            <text:p>2017</text:p>
          </table:table-cell>
          <table:table-cell office:value-type="float" office:value="22533.473000000005" table:style-name="ce269">
            <text:p>22,533</text:p>
          </table:table-cell>
          <table:table-cell office:value-type="float" office:value="58132.548050000049" table:style-name="ce270">
            <text:p>58,133</text:p>
          </table:table-cell>
          <table:table-cell office:value-type="float" office:value="58158.670039999997" table:style-name="ce270">
            <text:p>58,159</text:p>
          </table:table-cell>
          <table:table-cell office:value-type="float" office:value="17051.64" table:style-name="ce270">
            <text:p>17,052</text:p>
          </table:table-cell>
          <table:table-cell office:value-type="float" office:value="279781.16837000009" table:style-name="ce267">
            <text:p>279,781</text:p>
          </table:table-cell>
          <table:table-cell office:value-type="float" office:value="206936.16028000013" table:style-name="ce267">
            <text:p>206,936</text:p>
          </table:table-cell>
          <table:table-cell office:value-type="float" office:value="184384.06200999988" table:style-name="ce267">
            <text:p>184,384</text:p>
          </table:table-cell>
          <table:table-cell office:value-type="float" office:value="557.38600000000008" table:style-name="ce268">
            <text:p>557</text:p>
          </table:table-cell>
          <table:table-cell office:value-type="float" office:value="827535.1077500002" table:formula="of:=SUM([.C87:.J87])" table:style-name="ce278">
            <text:p>827,535</text:p>
          </table:table-cell>
          <table:table-cell table:number-columns-repeated="16373" table:style-name="ce14"/>
        </table:table-row>
        <table:table-row table:style-name="ro5">
          <table:table-cell/>
          <table:table-cell office:value-type="float" office:value="2018" table:style-name="ce276">
            <text:p>2018</text:p>
          </table:table-cell>
          <table:table-cell office:value-type="float" office:value="22894.537" table:style-name="ce270">
            <text:p>22,895</text:p>
          </table:table-cell>
          <table:table-cell office:value-type="float" office:value="52882.45" table:style-name="ce270">
            <text:p>52,882</text:p>
          </table:table-cell>
          <table:table-cell office:value-type="float" office:value="85913.543999999994" table:style-name="ce270">
            <text:p>85,914</text:p>
          </table:table-cell>
          <table:table-cell office:value-type="float" office:value="17903.86" table:style-name="ce270">
            <text:p>17,904</text:p>
          </table:table-cell>
          <table:table-cell office:value-type="float" office:value="267965.473" table:style-name="ce267">
            <text:p>267,965</text:p>
          </table:table-cell>
          <table:table-cell office:value-type="float" office:value="261984" table:style-name="ce267">
            <text:p>261,984</text:p>
          </table:table-cell>
          <table:table-cell office:value-type="float" office:value="204574.18299999999" table:style-name="ce267">
            <text:p>204,574</text:p>
          </table:table-cell>
          <table:table-cell office:value-type="float" office:value="845.7" table:style-name="ce267">
            <text:p>846</text:p>
          </table:table-cell>
          <table:table-cell office:value-type="float" office:value="914963.74699999997" table:formula="of:=SUM([.C88:.J88])" table:style-name="ce278">
            <text:p>914,964</text:p>
          </table:table-cell>
          <table:table-cell table:number-columns-repeated="16373" table:style-name="ce14"/>
        </table:table-row>
        <table:table-row table:style-name="ro5">
          <table:table-cell/>
          <table:table-cell office:value-type="float" office:value="2019" table:style-name="ce276">
            <text:p>2019</text:p>
          </table:table-cell>
          <table:table-cell office:value-type="float" office:value="24227.266520000001" table:style-name="ce264">
            <text:p>24,227</text:p>
          </table:table-cell>
          <table:table-cell office:value-type="float" office:value="66862.895209999973" table:style-name="ce265">
            <text:p>66,863</text:p>
          </table:table-cell>
          <table:table-cell office:value-type="float" office:value="130143.69399" table:style-name="ce265">
            <text:p>130,144</text:p>
          </table:table-cell>
          <table:table-cell office:value-type="float" office:value="17261.239999999998" table:style-name="ce265">
            <text:p>17,261</text:p>
          </table:table-cell>
          <table:table-cell office:value-type="float" office:value="284654.61408999993" table:style-name="ce265">
            <text:p>284,655</text:p>
          </table:table-cell>
          <table:table-cell office:value-type="float" office:value="219160" table:style-name="ce267">
            <text:p>219,160</text:p>
          </table:table-cell>
          <table:table-cell office:value-type="float" office:value="278177.54008999979" table:style-name="ce265">
            <text:p>278,178</text:p>
          </table:table-cell>
          <table:table-cell office:value-type="float" office:value="1274" table:style-name="ce268">
            <text:p>1,274</text:p>
          </table:table-cell>
          <table:table-cell office:value-type="float" office:value="1021761.2498999997" table:formula="of:=SUM([.C89:.J89])" table:style-name="ce278">
            <text:p>1,021,761</text:p>
          </table:table-cell>
          <table:table-cell table:number-columns-repeated="16373" table:style-name="ce14"/>
        </table:table-row>
        <table:table-row table:style-name="ro5">
          <table:table-cell/>
          <table:table-cell office:value-type="float" office:value="2020" table:style-name="ce276">
            <text:p>2020</text:p>
          </table:table-cell>
          <table:table-cell office:value-type="float" office:value="20740" table:style-name="ce264">
            <text:p>20,740</text:p>
          </table:table-cell>
          <table:table-cell office:value-type="float" office:value="72380" table:style-name="ce265">
            <text:p>72,380</text:p>
          </table:table-cell>
          <table:table-cell office:value-type="float" office:value="127547" table:style-name="ce265">
            <text:p>127,547</text:p>
          </table:table-cell>
          <table:table-cell office:value-type="float" office:value="18114" table:style-name="ce265">
            <text:p>18,114</text:p>
          </table:table-cell>
          <table:table-cell office:value-type="float" office:value="265041" table:style-name="ce265">
            <text:p>265,041</text:p>
          </table:table-cell>
          <table:table-cell office:value-type="float" office:value="190421" table:style-name="ce288">
            <text:p>190,421</text:p>
          </table:table-cell>
          <table:table-cell office:value-type="float" office:value="264346" table:style-name="ce265">
            <text:p>264,346</text:p>
          </table:table-cell>
          <table:table-cell office:value-type="float" office:value="932" table:style-name="ce268">
            <text:p>932</text:p>
          </table:table-cell>
          <table:table-cell office:value-type="float" office:value="959521" table:formula="of:=SUM([.C90:.J90])" table:style-name="ce278">
            <text:p>959,521</text:p>
          </table:table-cell>
          <table:table-cell table:number-columns-repeated="16373" table:style-name="ce14"/>
        </table:table-row>
        <table:table-row table:style-name="ro5">
          <table:table-cell/>
          <table:table-cell office:value-type="float" office:value="2021" table:style-name="ce276">
            <text:p>2021</text:p>
          </table:table-cell>
          <table:table-cell office:value-type="float" office:value="19997.158100000001" table:style-name="ce264">
            <text:p>19,997</text:p>
          </table:table-cell>
          <table:table-cell office:value-type="float" office:value="62349.189659999975" table:style-name="ce265">
            <text:p>62,349</text:p>
          </table:table-cell>
          <table:table-cell office:value-type="float" office:value="124843.79200000003" table:style-name="ce265">
            <text:p>124,844</text:p>
          </table:table-cell>
          <table:table-cell office:value-type="float" office:value="20138.620000000003" table:style-name="ce265">
            <text:p>20,139</text:p>
          </table:table-cell>
          <table:table-cell office:value-type="float" office:value="321296.97794999968" table:style-name="ce265">
            <text:p>321,297</text:p>
          </table:table-cell>
          <table:table-cell office:value-type="float" office:value="240873" table:style-name="ce288">
            <text:p>240,873</text:p>
          </table:table-cell>
          <table:table-cell office:value-type="float" office:value="116837.7074800002" table:style-name="ce265">
            <text:p>116,838</text:p>
          </table:table-cell>
          <table:table-cell office:value-type="float" office:value="1887" table:style-name="ce268">
            <text:p>1,887</text:p>
          </table:table-cell>
          <table:table-cell office:value-type="float" office:value="908224" table:style-name="ce278">
            <text:p>908,224</text:p>
          </table:table-cell>
          <table:table-cell table:number-columns-repeated="16373" table:style-name="ce14"/>
        </table:table-row>
        <table:table-row table:style-name="ro5">
          <table:table-cell/>
          <table:table-cell office:value-type="float" office:value="2022" table:style-name="ce276">
            <text:p>2022</text:p>
          </table:table-cell>
          <table:table-cell office:value-type="float" office:value="17807" table:style-name="ce264">
            <text:p>17,807</text:p>
          </table:table-cell>
          <table:table-cell office:value-type="float" office:value="74007" table:style-name="ce265">
            <text:p>74,007</text:p>
          </table:table-cell>
          <table:table-cell office:value-type="float" office:value="113664" table:style-name="ce265">
            <text:p>113,664</text:p>
          </table:table-cell>
          <table:table-cell office:value-type="float" office:value="18522" table:style-name="ce265">
            <text:p>18,522</text:p>
          </table:table-cell>
          <table:table-cell office:value-type="float" office:value="317683" table:style-name="ce265">
            <text:p>317,683</text:p>
          </table:table-cell>
          <table:table-cell office:value-type="float" office:value="280563" table:style-name="ce288">
            <text:p>280,563</text:p>
          </table:table-cell>
          <table:table-cell office:value-type="float" office:value="100511" table:style-name="ce265">
            <text:p>100,511</text:p>
          </table:table-cell>
          <table:table-cell office:value-type="float" office:value="1485" table:style-name="ce268">
            <text:p>1,485</text:p>
          </table:table-cell>
          <table:table-cell office:value-type="float" office:value="924242" table:formula="of:=+SUM([.C92:.J92])" table:style-name="ce278">
            <text:p>924,242</text:p>
          </table:table-cell>
          <table:table-cell table:number-columns-repeated="16373" table:style-name="ce14"/>
        </table:table-row>
        <table:table-row table:style-name="ro5">
          <table:table-cell/>
          <table:table-cell office:value-type="float" office:value="2023" table:style-name="ce279">
            <text:p>2023</text:p>
          </table:table-cell>
          <table:table-cell office:value-type="float" office:value="17071" table:style-name="ce272">
            <text:p>17,071</text:p>
          </table:table-cell>
          <table:table-cell office:value-type="float" office:value="70243" table:style-name="ce272">
            <text:p>70,243</text:p>
          </table:table-cell>
          <table:table-cell office:value-type="float" office:value="121148" table:style-name="ce272">
            <text:p>121,148</text:p>
          </table:table-cell>
          <table:table-cell office:value-type="float" office:value="12874" table:style-name="ce272">
            <text:p>12,874</text:p>
          </table:table-cell>
          <table:table-cell office:value-type="float" office:value="341632" table:style-name="ce272">
            <text:p>341,632</text:p>
          </table:table-cell>
          <table:table-cell office:value-type="float" office:value="291473" table:style-name="ce273">
            <text:p>291,473</text:p>
          </table:table-cell>
          <table:table-cell office:value-type="float" office:value="99574" table:style-name="ce272">
            <text:p>99,574</text:p>
          </table:table-cell>
          <table:table-cell office:value-type="float" office:value="2192" table:style-name="ce273">
            <text:p>2,192</text:p>
          </table:table-cell>
          <table:table-cell office:value-type="float" office:value="956207" table:formula="of:=+SUM([.C93:.J93])" table:style-name="ce278">
            <text:p>956,207</text:p>
          </table:table-cell>
          <table:table-cell table:number-columns-repeated="16373" table:style-name="ce14"/>
        </table:table-row>
        <table:table-row table:style-name="ro5">
          <table:table-cell/>
          <table:table-cell office:value-type="float" office:value="2024" table:style-name="ce379">
            <text:p>2024</text:p>
          </table:table-cell>
          <table:table-cell office:value-type="float" office:value="22622" table:style-name="ce380">
            <text:p>22,622</text:p>
          </table:table-cell>
          <table:table-cell office:value-type="float" office:value="66852" table:style-name="ce381">
            <text:p>66,852</text:p>
          </table:table-cell>
          <table:table-cell office:value-type="float" office:value="120770" table:style-name="ce381">
            <text:p>120,770</text:p>
          </table:table-cell>
          <table:table-cell office:value-type="float" office:value="14813" table:style-name="ce381">
            <text:p>14,813</text:p>
          </table:table-cell>
          <table:table-cell office:value-type="float" office:value="360720" table:style-name="ce381">
            <text:p>360,720</text:p>
          </table:table-cell>
          <table:table-cell office:value-type="float" office:value="289756" table:style-name="ce382">
            <text:p>289,756</text:p>
          </table:table-cell>
          <table:table-cell office:value-type="float" office:value="62996" table:style-name="ce381">
            <text:p>62,996</text:p>
          </table:table-cell>
          <table:table-cell office:value-type="float" office:value="4160" table:style-name="ce383">
            <text:p>4,160</text:p>
          </table:table-cell>
          <table:table-cell office:value-type="float" office:value="942689" table:formula="of:=+SUM([.C94:.J94])" table:style-name="ce287">
            <text:p>942,689</text:p>
          </table:table-cell>
          <table:table-cell table:number-columns-repeated="16373" table:style-name="ce14"/>
        </table:table-row>
        <table:table-row table:number-rows-repeated="104848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7P2">
      <number:text> </number:text>
      <number:fill-character> </number:fill-character>
      <number:text>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0" number:min-decimal-places="0" number:min-integer-digits="1" number:grouping="true" number:display-factor="1000"/>
    </number:number-style>
    <number:number-style style:name="N40">
      <number:text>  </number:text>
      <number:number number:decimal-places="0" number:min-decimal-places="0" number:min-integer-digits="1" number:grouping="true" number:display-factor="1000"/>
    </number:number-style>
    <style:style style:name="Comma" style:family="table-cell" style:data-style-name="N38"/>
    <style:style style:name="Comma_32__91_0_93_" style:display-name="Comma [0]" style:family="table-cell" style:data-style-name="N37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EWHaz09_Final" style:display-name="Normal_Copy of EWHaz09_Final" style:family="table-cell" style:data-style-name="N0">
      <style:table-cell-properties style:vertical-align="automatic" fo:background-color="transparent"/>
    </style:style>
    <style:style style:name="Normal_E_38_WIncin09" style:display-name="Normal_E&amp;WIncin09" style:family="table-cell" style:data-style-name="N0">
      <style:table-cell-properties style:vertical-align="automatic" fo:background-color="transparent"/>
    </style:style>
    <style:style style:name="Normal_emhaztables06_1902562" style:family="table-cell" style:data-style-name="N0">
      <style:table-cell-properties style:vertical-align="automatic" fo:background-color="transparent"/>
    </style:style>
    <style:style style:name="Normal_eoehaztables06_190257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nwhaztables06_190254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yhhaztables06_190255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DPullen</meta:initial-creator>
    <dc:creator>Mike Anderson</dc:creator>
    <meta:creation-date>2006-10-24T13:52:52Z</meta:creation-date>
    <dc:date>2025-09-04T08:08:08Z</dc:date>
    <meta:user-defined meta:name="_NewReviewCycle"/>
    <meta:user-defined meta:name="_EmailSubject">Data Tables 2006</meta:user-defined>
    <meta:user-defined meta:name="_AuthorEmail">david.wynn@environment-agency.gov.uk</meta:user-defined>
    <meta:user-defined meta:name="_AuthorEmailDisplayName">Wynn, David</meta:user-defined>
    <meta:user-defined meta:name="_ReviewingToolsShownOnce"/>
    <meta:user-defined meta:name="InformationType"/>
    <meta:user-defined meta:name="Distribution">9;#Internal EA|b77da37e-7166-4741-8c12-4679faab22d9</meta:user-defined>
    <meta:user-defined meta:name="MediaServiceImageTags"/>
    <meta:user-defined meta:name="ContentTypeId">0x010100A5BF1C78D9F64B679A5EBDE1C6598EBC010034932E5E1F003A46AB4B0DB84D8159EA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</office:meta>
</office:document-meta>
</file>